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!-- Out of date -->
    <style:style style:name="s7" style:family="text" style:parent-style-name="Standard">
      <style:text-properties fo:color="#666600" style:text-line-through-style="solid" style:text-line-through-type="single" fo:font-weight="normal"/>
    </style:style>
    <!-- Comment -->
    <style:style style:name="s9" style:family="section">
      <style:section-properties fo:background-color="#f0f0f0"/>
    </style:style>
    <style:style style:family="text" style:name="s9">
      <style:text-properties fo:color="#353842" style:font-name="Times New Roman CYR" fo:font-size="12pt" fo:background-color="#f0f0f0"/>
    </style:style>
    <style:style style:family="paragraph" style:name="s9header" style:parent-style-name="s9">
      <style:text-properties fo:font-size="8pt"/>
    </style:style>
    <style:style style:name="s93" style:family="section">
      <style:section-properties fo:background-color="#FFF5AD"/>
    </style:style>
    <style:style style:name="s94" style:family="section">
      <style:section-properties fo:background-color="#f0f0f0"/>
    </style:style>
    <!-- Color selection -->
    <style:style style:family="text" style:name="s10">
      <style:text-properties fo:color="#26282f" fo:font-weight="bold"/>
    </style:style>
    <!-- Version info -->
    <style:style style:name="s22" style:family="section">
      <style:section-properties fo:background-color="#f0f0f0" fo:margin-left="0.3cm" fo:margin-right="0cm"/>
    </style:style>
    <style:style style:family="paragraph" style:name="s22header" style:parent-style-name="s22">
      <style:text-properties fo:font-size="8pt"/>
    </style:style>
    <!-- Necessary documents -->
    <style:style style:name="s45" style:family="section">
      <style:section-properties fo:background-color="#f0f0f0" fo:margin-left="0.74cm" fo:margin-right="0.74cm"/>
    </style:style>
    <!-- Who helps? -->
    <style:style style:name="s46" style:family="section">
      <style:section-properties fo:background-color="#f0f0f0" fo:margin-left="0.74cm" fo:margin-right="0.74cm"/>
    </style:style>
    <!-- Attention: dishonesty -->
    <style:style style:name="s47" style:family="section">
      <style:section-properties fo:background-color="#f0f0f0" fo:margin-left="0.74cm" fo:margin-right="0.74cm"/>
    </style:style>
    <!-- Attention: crime! -->
    <style:style style:name="s48" style:family="section">
      <style:section-properties fo:background-color="#f0f0f0" fo:margin-left="0.74cm" fo:margin-right="0.74cm"/>
    </style:style>
    <!-- Note -->
    <style:style style:name="s49" style:family="section">
      <style:section-properties fo:background-color="#f0f0f0" fo:margin-left="0.74cm" fo:margin-right="0.74cm"/>
    </style:style>
    <!-- Example -->
    <style:style style:name="s50" style:family="section">
      <style:section-properties fo:background-color="#f0f0f0" fo:margin-left="0.74cm" fo:margin-right="0.74cm"/>
    </style:style>
    <!-- Attention -->
    <style:style style:name="s68" style:family="section">
      <style:section-properties fo:background-color="#f0f0f0" fo:margin-left="0.74cm" fo:margin-right="0.74cm"/>
    </style:style>
    <!-- Special formula -->
    <style:style style:name="s74" style:family="section">
      <style:section-properties fo:background-color="#f0f0f0" fo:margin-left="0.74cm" fo:margin-right="0.74cm"/>
    </style:style>
    <!-- Changes info -->
    <style:style style:name="s52" style:family="section">
      <style:section-properties fo:background-color="#eaefed" fo:margin-left="0cm" fo:margin-right="0cm"/>
    </style:style>
    <style:style style:family="paragraph" style:name="s52header" style:parent-style-name="s52"/>
    <style:style style:name="s41" style:family="text">
      <style:text-properties fo:color="#000000" style:font-name="Arial" fo:background-color="#c1d7ff"/>
    </style:style>
    <style:style style:name="s42" style:family="text">
      <style:text-properties fo:color="#000000" style:font-name="Arial" fo:background-color="#c4c413"/>
    </style:style>
    <style:style style:name="lower" style:family="text">
      <style:text-properties style:text-position="sub 58%"/>
    </style:style>
    <style:style style:name="upper" style:family="text">
      <style:text-properties style:text-position="super 58%"/>
    </style:style>
    <style:style style:name="bold" style:family="text">
      <style:text-properties fo:font-weight="bold"/>
    </style:style>
    <style:style style:name="preformatted" style:family="text">
      <style:text-properties style:font-name="Courier New" fo:font-size="11pt"/>
    </style:style>
    <style:style style:name="fr1" style:family="graphic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icon" style:family="graphic">
      <style:graphic-properties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tiff" style:family="graphic">
      <style:graphic-properties style:vertical-pos="middle" style:vertical-rel="char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!-- prime -->
    <style:style style:family="paragraph" style:name="s777" style:parent-style-name="Heading">
      <style:paragraph-properties fo:text-align="left"/>
      <style:text-properties style:font-name="Times New Roman" fo:text-align="left" fo:font-size="20pt" fo:font-weight="normal" fo:language="ru" fo:country="RU"/>
    </style:style>
    <style:style style:family="paragraph" style:name="s778" style:parent-style-name="Heading">
      <style:paragraph-properties fo:text-align="left"/>
      <style:text-properties style:font-name="Times New Roman" fo:text-align="left" fo:background-color="#000000" fo:color="#ffffff" fo:font-size="12pt" fo:font-weight="normal" fo:language="ru" fo:country="RU"/>
    </style:style>
    <style:style style:family="paragraph" style:name="s779" style:parent-style-name="Heading">
      <style:paragraph-properties fo:text-align="left"/>
      <style:text-properties style:font-name="Times New Roman" fo:text-align="left" fo:font-size="14pt" fo:font-weight="bold" fo:language="ru" fo:country="RU"/>
    </style:style>
    <style:style style:family="paragraph" style:name="s780" style:parent-style-name="Heading">
      <style:paragraph-properties fo:text-align="left"/>
      <style:text-properties style:font-name="Times New Roman" fo:text-align="left" fo:font-size="12pt" fo:font-weight="normal" style:text-underline-type="single" fo:language="ru" fo:country="RU"/>
    </style:style>
    <!-- lists -->
    <style:style style:family="paragraph" style:name="s781" style:parent-style-name="Heading">
      <style:paragraph-properties fo:text-align="left"/>
      <style:text-properties fo:color="#ffffff" style:font-name="Times New Roman" fo:text-align="left" fo:font-size="16pt" fo:language="ru" fo:country="RU" fo:background-color="#2e2e2e"/>
    </style:style>
    <style:style style:family="paragraph" style:name="s782" style:parent-style-name="Heading">
      <style:paragraph-properties fo:text-align="left"/>
      <style:text-properties fo:color="#000000" style:text-underline-type="single" style:font-name="Times New Roman" fo:text-align="left" fo:font-size="20pt" fo:language="ru" fo:country="RU" fo:background-color="#ffffff"/>
    </style:style>
    <style:style style:family="paragraph" style:name="s84" style:parent-style-name="Standard">
      <style:paragraph-properties fo:text-align="left" fo:text-indent="0cm"/>
    </style:style>
    <style:style style:family="paragraph" style:name="s75" style:parent-style-name="Standard">
      <style:paragraph-properties fo:text-align="left" fo:text-indent="0cm"/>
      <style:text-properties fo:font-style="italic"/>
    </style:style>
    <!-- document changes style -->
    <style:style style:name="ChangesCell" style:family="table-cell">
      <style:table-cell-properties fo:padding-left="0.19cm" fo:padding-right="0.19cm"/>
    </style:style>
    <!-- Picture paragraph -->
    <style:style style:family="paragraph" style:name="image" style:parent-style-name="Heading">
      <style:paragraph-properties fo:text-indent="0cm"/>
    </style:style>
    <style:style style:name="TiffA4P" style:family="paragraph" style:parent-style-name="Standard" style:master-page-name="A4Portrait">
      <style:paragraph-properties fo:break-before="page" fo:text-indent="0cm" fo:margin-left="0cm" fo:margin-right="0cm" fo:margin-top="0cm" fo:margin-bottom="0cm"/>
    </style:style>
    <style:style style:name="TiffA4L" style:family="paragraph" style:parent-style-name="Standard" style:master-page-name="A4Landscape">
      <style:paragraph-properties fo:break-before="page" fo:text-indent="0cm" fo:margin-left="0cm" fo:margin-right="0cm" fo:margin-top="0cm" fo:margin-bottom="0cm"/>
    </style:style>
    <!-- Section break styles -->
    <!-- Page break style -->
    <style:style style:name="PB" style:family="paragraph" style:parent-style-name="Standard">
      <style:paragraph-properties fo:break-before="page"/>
    </style:style>
    <!-- Specific styles -->
    <style:style style:name="s16_fi0" style:family="paragraph" style:parent-style-name="s16">
      <style:paragraph-properties fo:text-indent="0mm"/>
    </style:style>
    <style:style style:name="s1_right_fi0" style:family="paragraph" style:parent-style-name="s1">
      <style:paragraph-properties fo:text-align="right" fo:text-indent="0mm"/>
    </style:style>
    <style:style style:name="s1_right_fi698" style:family="paragraph" style:parent-style-name="s1">
      <style:paragraph-properties fo:text-align="right" fo:text-indent="12mm"/>
    </style:style>
    <!-- Table cells styles -->
    <!-- Table columns styles -->
    <style:style style:name="3401" style:family="table-column">
      <style:table-column-properties style:column-width="60mm"/>
    </style:style>
    <style:style style:name="6803" style:family="table-column">
      <style:table-column-properties style:column-width="120mm"/>
    </style:style>
    <!-- Table styles -->
    <style:style style:name="rubber" style:family="table">
      <style:table-properties style:rel-width="100%" table:align="center"/>
    </style:style>
    <style:style style:name="10204" style:family="table">
      <style:table-properties style:width="180mm" table:align="left"/>
    </style:style>
    <!-- Colored text styles -->
  </office:automatic-styles>
  <office:body>
    <office:text text:use-soft-page-breaks="true">
      <text:h text:outline-level="1" text:style-name="s3"><text:bookmark text:name="anchor0"/><text:a xlink:type="simple" xlink:href="http://ivo.garant.ru/document/redirect/413945422/0">Постановление Правительства Российской Федерации от 17 марта 2026 г. № 277
"Об утверждении Правил формирования перечня стратегически значимых лекарственных средств"</text:a></text:h>
      <text:p text:style-name="s1"/>
      <text:p text:style-name="s1">В соответствии со <text:a xlink:type="simple" xlink:href="http://ivo.garant.ru/document/redirect/12174909/4">статьей 4</text:a> Федерального закона "Об обращении лекарственных средств" Правительство Российской Федерации постановляет:</text:p>
      <text:p text:style-name="s1"><text:bookmark text:name="anchor1"/>1. Утвердить прилагаемые <text:a xlink:type="simple" xlink:href="#anchor1000">Правила</text:a> формирования перечня стратегически значимых лекарственных средств.</text:p>
      <text:p text:style-name="s1"><text:bookmark text:name="anchor2"/>2. Реализация полномочий, предусмотренных настоящим постановлением, осуществляется соответствующими федеральными органами исполнительной власти в пределах установленной Правительством Российской Федерации предельной численности их работников, а также бюджетных ассигнований, предусмотренных этим органам в федеральном бюджете на руководство и управление в сфере установленных функций.</text:p>
      <text:p text:style-name="s1"><text:bookmark text:name="anchor3"/>3. Настоящее постановление вступает в силу со дня его <text:a xlink:type="simple" xlink:href="http://ivo.garant.ru/document/redirect/413945423/0">официального опубликования</text:a>.</text:p>
      <text:p text:style-name="s1"/>
      <table:table table:name="10204" table:style-name="10204">
        <table:table-column table:style-name="6803"/>
        <table:table-column table:style-name="3401"/>
        <table:table-row>
          <table:table-cell>
            <text:p text:style-name="s16_fi0">Председатель Правительства
Российской Федерации</text:p>
          </table:table-cell>
          <table:table-cell>
            <text:p text:style-name="s1_right_fi0">М. Мишустин</text:p>
          </table:table-cell>
        </table:table-row>
      </table:table>
      <text:p text:style-name="s1"/>
      <text:p text:style-name="s1_right_fi698"><text:bookmark text:name="anchor1000"/><text:span text:style-name="s10">УТВЕРЖДЕНЫ
<text:a xlink:type="simple" xlink:href="#anchor0">постановлением</text:a> Правительства
Российской Федерации
от 17 марта 2026 г. № 277</text:span></text:p>
      <text:p text:style-name="s1"/>
      <text:h text:outline-level="1" text:style-name="s3">Правила
формирования перечня стратегически значимых лекарственных средств</text:h>
      <text:p text:style-name="s1"/>
      <text:p text:style-name="s1"><text:bookmark text:name="anchor1001"/>1. Настоящие Правила устанавливают порядок и критерии формирования перечня стратегически значимых лекарственных средств (далее соответственно - перечень, критерии) в том числе в целях оказания мер государственной поддержки, направленных на организацию производства таких лекарственных средств на территории Российской Федерации на всех стадиях производства.</text:p>
      <text:p text:style-name="s1"><text:bookmark text:name="anchor1002"/>2. Перечень формируется из лекарственных препаратов для медицинского применения (далее - лекарственный препарат) и состоит из 2 разделов:</text:p>
      <text:p text:style-name="s1"><text:bookmark text:name="anchor10021"/>а) в первый раздел перечня включаются лекарственные препараты, которые соответствуют критериям, установленным <text:a xlink:type="simple" xlink:href="#anchor1004">пунктами 4</text:a> и <text:a xlink:type="simple" xlink:href="#anchor1005">5</text:a> настоящих Правил, или критериям, установленным <text:a xlink:type="simple" xlink:href="#anchor1006">пунктом 6</text:a> настоящих Правил, а также лекарственные препараты, указанные в <text:a xlink:type="simple" xlink:href="#anchor1017">пункте 17</text:a> настоящих Правил;</text:p>
      <text:p text:style-name="s1"><text:bookmark text:name="anchor10022"/>б) во второй раздел перечня включаются лекарственные препараты, которые соответствуют критериям, установленным <text:a xlink:type="simple" xlink:href="#anchor1004">пунктами 4</text:a> и <text:a xlink:type="simple" xlink:href="#anchor1007">7</text:a> настоящих Правил, или критериям, установленным пунктами 4 и <text:a xlink:type="simple" xlink:href="#anchor1008">8</text:a> настоящих Правил, а также лекарственные препараты, указанные в <text:a xlink:type="simple" xlink:href="#anchor1018">пункте 18</text:a> настоящих Правил.</text:p>
      <text:p text:style-name="s1"><text:bookmark text:name="anchor1003"/>3. Формирование перечня осуществляется образованной Министерством здравоохранения Российской Федерации комиссией по формированию перечня (далее - комиссия).</text:p>
      <text:p text:style-name="s1"><text:bookmark text:name="anchor1004"/>4. Лекарственный препарат (за исключением лекарственного препарата, указанного в <text:a xlink:type="simple" xlink:href="#anchor1006">пункте 6</text:a> настоящих Правил), подлежащий включению в первый или второй раздел перечня, должен соответствовать одновременно следующим критериям:</text:p>
      <text:p text:style-name="s1"><text:bookmark text:name="anchor1041"/>а) лекарственный препарат зарегистрирован в соответствии с международными договорами и актами, составляющими право Евразийского экономического союза, и (или) законодательством Российской Федерации и включен соответственно в единый реестр зарегистрированных лекарственных средств Евразийского экономического союза и (или) государственный реестр лекарственных средств для медицинского применения;</text:p>
      <text:p text:style-name="s1"><text:bookmark text:name="anchor1042"/>б) лекарственный препарат включен в <text:a xlink:type="simple" xlink:href="http://ivo.garant.ru/document/redirect/413344482/1000">перечень</text:a> жизненно необходимых и важнейших лекарственных препаратов для медицинского применения, утверждаемый Правительством Российской Федерации в соответствии с <text:a xlink:type="simple" xlink:href="http://ivo.garant.ru/document/redirect/12174909/4006">пунктом 6 статьи 4</text:a> Федерального закона "Об обращении лекарственных средств";</text:p>
      <text:p text:style-name="s1"><text:bookmark text:name="anchor1043"/>в) лекарственный препарат закупается для обеспечения государственных и (или) муниципальных нужд в течение последних 3 календарных лет в соответствии с информацией, содержащейся в единой информационной системе в сфере закупок товаров, работ, услуг для обеспечения государственных и муниципальных нужд.</text:p>
      <text:p text:style-name="s1"><text:bookmark text:name="anchor1005"/>5. Для включения лекарственного препарата в первый раздел перечня после установления соответствия лекарственного препарата критериям, указанным в <text:a xlink:type="simple" xlink:href="#anchor1004">пункте 4</text:a> настоящих Правил, комиссия определяет соответствие такого лекарственного препарата не менее чем одному из следующих критериев:</text:p>
      <text:p text:style-name="s1"><text:bookmark text:name="anchor1051"/>а) лекарственный препарат предназначен для иммунопрофилактики инфекционных болезней в соответствии с <text:a xlink:type="simple" xlink:href="http://ivo.garant.ru/document/redirect/403258640/1000">национальным календарем</text:a> профилактических прививок, утвержденным в соответствии с <text:a xlink:type="simple" xlink:href="http://ivo.garant.ru/document/redirect/12113020/120">пунктом 2 статьи 9</text:a> Федерального закона "Об иммунопрофилактике инфекционных болезней", и <text:a xlink:type="simple" xlink:href="http://ivo.garant.ru/document/redirect/403258640/2000">календарем</text:a> профилактических прививок по эпидемическим показаниям, утвержденным в соответствии с <text:a xlink:type="simple" xlink:href="http://ivo.garant.ru/document/redirect/12113020/150">пунктом 3 статьи 10</text:a> Федерального закона "Об иммунопрофилактике инфекционных болезней";</text:p>
      <text:p text:style-name="s1"><text:bookmark text:name="anchor1052"/>б) лекарственный препарат получен из крови, плазмы крови человека, является кровезаменителем, перфузионным и (или) инфузионным раствором;</text:p>
      <text:p text:style-name="s1"><text:bookmark text:name="anchor1053"/>в) лекарственный препарат включен в <text:a xlink:type="simple" xlink:href="http://ivo.garant.ru/document/redirect/12112176/1000">перечень</text:a> наркотических средств, психотропных веществ и их прекурсоров, подлежащих контролю в Российской Федерации, утвержденный <text:a xlink:type="simple" xlink:href="http://ivo.garant.ru/document/redirect/12112176/0">постановлением</text:a> Правительства Российской Федерации от 30 июня 1998 г. № 681 "Об утверждении перечня наркотических средств, психотропных веществ и их прекурсоров, подлежащих контролю в Российской Федерации".</text:p>
      <text:p text:style-name="s1"><text:bookmark text:name="anchor1006"/>6. Лекарственный препарат для профилактики и лечения отдельных инфекционных и паразитарных заболеваний подлежит включению в первый раздел перечня после установления комиссией соответствия такого лекарственного препарата критериям, установленным <text:a xlink:type="simple" xlink:href="#anchor1041">подпунктами "а"</text:a> и <text:a xlink:type="simple" xlink:href="#anchor1042">"б"</text:a> или "а" и <text:a xlink:type="simple" xlink:href="#anchor1043">"в" пункта 4</text:a> настоящих Правил, а также в случае, если лекарственный препарат предназначен для профилактики и лечения заболевания, включенного в <text:a xlink:type="simple" xlink:href="http://ivo.garant.ru/document/redirect/12137881/1200">перечень</text:a> заболеваний, представляющих опасность для окружающих, утвержденный <text:a xlink:type="simple" xlink:href="http://ivo.garant.ru/document/redirect/12137881/0">постановлением</text:a> Правительства Российской Федерации от 1 декабря 2004 г. № 715 "Об утверждении перечня социально значимых заболеваний и перечня заболеваний, представляющих опасность для окружающих", и (или) в <text:a xlink:type="simple" xlink:href="http://ivo.garant.ru/document/redirect/12116400/1000">перечень</text:a> инфекционных заболеваний, требующих проведения мероприятий по санитарной охране территории Российской Федерации, предусмотренный <text:a xlink:type="simple" xlink:href="http://ivo.garant.ru/document/redirect/12115118/3002">пунктом 2 статьи 30</text:a> Федерального закона "О санитарно-эпидемиологическом благополучии населения".</text:p>
      <text:p text:style-name="s1"><text:bookmark text:name="anchor1007"/>7. Для включения лекарственного препарата во второй раздел перечня после установления соответствия лекарственного препарата критериям, указанным в <text:a xlink:type="simple" xlink:href="#anchor1004">пункте 4</text:a> настоящих Правил, комиссия устанавливает, что лекарственный препарат не имеет в Российской Федерации аналогов в рамках одного медицинского показания и кода анатомо-терапевтической химической классификации 4-го уровня (химическая подгруппа) Евразийского экономического союза, а также применяется на территории Российской Федерации и соответствует не менее чем одному из следующих критериев:</text:p>
      <text:p text:style-name="s1"><text:bookmark text:name="anchor1071"/>а) лекарственный препарат предназначен для профилактики и лечения заболевания, включенного в перечень заболеваний, дефектов, необратимых морфологических изменений, нарушений функций органов и систем организма, а также показаний и условий в целях установления группы инвалидности и категории "ребенок-инвалид", являющийся <text:a xlink:type="simple" xlink:href="http://ivo.garant.ru/document/redirect/403829132/1500">приложением</text:a> к Правилам признания лица инвалидом, утвержденным <text:a xlink:type="simple" xlink:href="http://ivo.garant.ru/document/redirect/403829132/0">постановлением</text:a> Правительства Российской Федерации от 5 апреля 2022 г. № 588 "О признании лица инвалидом";</text:p>
      <text:p text:style-name="s1"><text:bookmark text:name="anchor1072"/>б) лекарственный препарат предназначен для профилактики и лечения заболевания, включенного в <text:a xlink:type="simple" xlink:href="http://ivo.garant.ru/document/redirect/12137881/1200">перечень</text:a> заболеваний, представляющих опасность для окружающих, утвержденный <text:a xlink:type="simple" xlink:href="http://ivo.garant.ru/document/redirect/12137881/0">постановлением</text:a> Правительства Российской Федерации от 1 декабря 2004 г. № 715 "Об утверждении перечня социально значимых заболеваний и перечня заболеваний, представляющих опасность для окружающих";</text:p>
      <text:p text:style-name="s1"><text:bookmark text:name="anchor1073"/>в) лекарственный препарат предназначен для профилактики и лечения заболевания, включенного в <text:a xlink:type="simple" xlink:href="http://ivo.garant.ru/document/redirect/12137881/1100">перечень</text:a> социально значимых заболеваний, утвержденный <text:a xlink:type="simple" xlink:href="http://ivo.garant.ru/document/redirect/12137881/0">постановлением</text:a> Правительства Российской Федерации от 1 декабря 2004 г. № 715 "Об утверждении перечня социально значимых заболеваний и перечня заболеваний, представляющих опасность для окружающих";</text:p>
      <text:p text:style-name="s1"><text:bookmark text:name="anchor1074"/>г) лекарственный препарат является антибактериальным лекарственным препаратом;</text:p>
      <text:p text:style-name="s1"><text:bookmark text:name="anchor1075"/>д) лекарственный препарат предназначен для профилактики и лечения заболеваний, на борьбу с которыми направлены федеральные проекты, для обеспечения государственных нужд в целях реализации федеральных проектов, входящих в состав <text:a xlink:type="simple" xlink:href="http://ivo.garant.ru/document/redirect/411738981/0">национального проекта</text:a> "Продолжительная и активная жизнь";</text:p>
      <text:p text:style-name="s1"><text:bookmark text:name="anchor1076"/>е) лекарственный препарат отпускается по рецептам врачей при амбулаторном лечении группам населения, утвержденным <text:a xlink:type="simple" xlink:href="http://ivo.garant.ru/document/redirect/101268/0">постановлением</text:a> Правительства Российской Федерации от 30 июля 1994 г. № 890 "О государственной поддержке развития медицинской промышленности и улучшении обеспечения населения и учреждений здравоохранения лекарственными средствами и изделиями медицинского назначения".</text:p>
      <text:p text:style-name="s1"><text:bookmark text:name="anchor1008"/>8. Для включения лекарственного препарата во второй раздел перечня после установления соответствия лекарственного препарата критериям, указанным в <text:a xlink:type="simple" xlink:href="#anchor1004">пункте 4</text:a> настоящих Правил, комиссия устанавливает, что в отношении лекарственного препарата обеспечена технологическая возможность производства на территории Российской Федерации на всех стадиях производства (в том числе синтез молекулы действующего вещества при производстве фармацевтических субстанций) и такой лекарственный препарат соответствует не менее чем одному из критериев, установленных <text:a xlink:type="simple" xlink:href="#anchor1071">подпунктами "а" - "е" пункта 7</text:a> настоящих Правил.</text:p>
      <text:p text:style-name="s1"><text:bookmark text:name="anchor1009"/>9. Организационно-техническое обеспечение деятельности комиссии осуществляет Министерство здравоохранения Российской Федерации.</text:p>
      <text:p text:style-name="s1"><text:bookmark text:name="anchor1010"/>10. В состав комиссии, утверждаемый Министерством здравоохранения Российской Федерации, включаются 2 представителя Министерства здравоохранения Российской Федерации в качестве председателя комиссии и секретаря комиссии, 2 представителя Министерства промышленности и торговли Российской Федерации, а также по одному представителю Министерства финансов Российской Федерации, Федерального медико-биологического агентства, Министерства экономического развития Российской Федерации, Федеральной антимонопольной службы, Федеральной службы по надзору в сфере здравоохранения, Федеральной службы по надзору в сфере защиты прав потребителей и благополучия человека в качестве членов комиссии.</text:p>
      <text:p text:style-name="s1">Комиссия может привлекать к своей работе без права голоса представителей иных федеральных органов исполнительной власти и исполнительных органов субъектов Российской Федерации в сфере охраны здоровья, представителей федерального государственного бюджетного учреждения "Центр экспертизы и контроля качества медицинской помощи" Министерства здравоохранения Российской Федерации (далее - Центр экспертизы), главных внештатных специалистов Министерства здравоохранения Российской Федерации, главных внештатных специалистов Министерства здравоохранения Российской Федерации в федеральных округах и главных внештатных специалистов исполнительных органов субъектов Российской Федерации в сфере охраны здоровья, а также представителей медицинских, фармацевтических, научных и иных организаций, подведомственных федеральным органам исполнительной власти.</text:p>
      <text:p text:style-name="s1"><text:bookmark text:name="anchor1011"/>11. Решение комиссии о включении в перечень или об исключении из перечня лекарственного препарата принимается коллегиально на заседаниях комиссии двумя третями голосов присутствующих на заседании членов комиссии и оформляется протоколом на бумажном носителе, который подписывается председателем.</text:p>
      <text:p text:style-name="s1">Заседание комиссии считается правомочным, если на нем присутствует не менее 50 процентов членов комиссии.</text:p>
      <text:p text:style-name="s1">При голосовании каждый член комиссии имеет право одного голоса. Право участия в заседании комиссии и голосования может быть делегировано членом комиссии своему заместителю, являющемуся таковым по штатному расписанию организации, работниками (служащими) которой они являются, на основании письменного обращения на имя председателя комиссии, в котором указываются фамилия, имя, отчество (последнее при наличии), должность представителя, а также дата заседания комиссии, в котором такой представитель будет участвовать.</text:p>
      <text:p text:style-name="s1">Член комиссии, отсутствующий на заседании комиссии, вправе представить свое мнение по рассматриваемому вопросу в письменном виде, которое подлежит обязательному приобщению к протоколу заседания комиссии. Такое мнение не учитывается при подсчете голосов при принятии решения в соответствии с <text:a xlink:type="simple" xlink:href="#anchor1011">абзацем первым</text:a> настоящего пункта.</text:p>
      <text:p text:style-name="s1"><text:bookmark text:name="anchor1012"/>12. Заседания комиссии проводятся (за исключением первого заседания комиссии):</text:p>
      <text:p text:style-name="s1">не чаще одного раза в квартал (до 25-го числа третьего месяца квартала) при наличии предусмотренных <text:a xlink:type="simple" xlink:href="#anchor1013">пунктом 13</text:a> настоящих Правил предложений о включении в перечень либо об исключении из перечня лекарственных препаратов (далее - предложения), поступивших до 5-го числа второго месяца квартала. Предложения, поступившие после 5-го числа второго месяца квартала, рассматриваются на заседании комиссии в следующем квартале;</text:p>
      <text:p text:style-name="s1">начиная с 2027 года ежегодно, не позднее 15 февраля, для анализа применения настоящих Правил и направления в Министерство здравоохранения Российской Федерации на основании решения комиссии и по согласованию с членами комиссии рекомендации о внесении изменений в Правила.</text:p>
      <text:p text:style-name="s1">Первое заседание комиссии проводится в течение 10 рабочих дней со дня <text:a xlink:type="simple" xlink:href="http://ivo.garant.ru/document/redirect/413945423/0">вступления в силу</text:a> постановления Правительства Российской Федерации от 17 марта 2026 г. № 277 "Об утверждении Правил формирования перечня стратегически значимых лекарственных средств" в целях обеспечения формирования перечня исходя из пересмотра <text:a xlink:type="simple" xlink:href="http://ivo.garant.ru/document/redirect/12177114/1000">перечня</text:a> стратегически значимых лекарственных средств, производство которых должно быть обеспечено на территории Российской Федерации, утвержденного <text:a xlink:type="simple" xlink:href="http://ivo.garant.ru/document/redirect/12177114/0">распоряжением</text:a> Правительства Российской Федерации от 6 июля 2010 г. № 1141-р (далее - перечень № 1141-р), с применением процедур и критериев, предусмотренных <text:a xlink:type="simple" xlink:href="#anchor1016">пунктами 16 - 19</text:a> настоящих Правил.</text:p>
      <text:p text:style-name="s1"><text:bookmark text:name="anchor1013"/>13. Субъекты обращения лекарственных средств, заинтересованные федеральные органы исполнительной власти (далее - заявители) направляют в Министерство здравоохранения Российской Федерации предложения на бумажном носителе или в электронной форме посредством информационно-коммуникационных технологий, содержащие следующую информацию:</text:p>
      <text:p text:style-name="s1"><text:bookmark text:name="anchor1131"/>а) полное наименование заявителя, адрес места нахождения (для юридического лица) или адрес регистрации (для индивидуального предпринимателя), адрес электронной почты заявителя, наименование лекарственного препарата (международное непатентованное, или группировочное, или химическое и торговое наименования);</text:p>
      <text:p text:style-name="s1"><text:bookmark text:name="anchor1132"/>б) целевое показание и область применения лекарственного препарата, соответствующие общей характеристике лекарственного препарата или инструкции по медицинскому применению лекарственного препарата;</text:p>
      <text:p text:style-name="s1"><text:bookmark text:name="anchor1133"/>в) обоснование соответствия или несоответствия лекарственного препарата критериям, установленным <text:a xlink:type="simple" xlink:href="#anchor1004">пунктами 4 - 8</text:a> настоящих Правил.</text:p>
      <text:p text:style-name="s1"><text:bookmark text:name="anchor1014"/>14. В течение 8 рабочих дней со дня получения предложения Министерство здравоохранения Российской Федерации:</text:p>
      <text:p text:style-name="s1"><text:bookmark text:name="anchor1141"/>а) направляет предложение в Центр экспертизы для подготовки позиции в отношении лекарственного препарата, предлагаемого для включения во второй раздел перечня в соответствии с <text:a xlink:type="simple" xlink:href="#anchor1007">пунктами 7</text:a> и <text:a xlink:type="simple" xlink:href="#anchor1008">8</text:a> настоящих Правил (за исключением требований в отношении лекарственного препарата об обеспечении технологической возможности производства на территории Российской Федерации на всех стадиях производства (в том числе синтеза молекулы действующего вещества при производстве фармацевтических субстанций), о том, что лекарственный препарат не имеет в Российской Федерации аналогов в рамках одного медицинского показания и кода анатомо-терапевтической химической классификации 4-го уровня (химическая подгруппа) Евразийского экономического союза, а также для представления сведений об имеющейся практике применения лекарственного препарата на территории Российской Федерации;</text:p>
      <text:p text:style-name="s1"><text:bookmark text:name="anchor1142"/>б) осуществляет проверку представленной информации на соответствие критериям, установленным <text:a xlink:type="simple" xlink:href="#anchor1041">подпунктами "а" - "в" пункта 4</text:a>, <text:a xlink:type="simple" xlink:href="#anchor1005">пунктами 5</text:a>, <text:a xlink:type="simple" xlink:href="#anchor1006">6</text:a> и <text:a xlink:type="simple" xlink:href="#anchor1071">подпунктами "а" - "е" пункта 7</text:a>, а также <text:a xlink:type="simple" xlink:href="#anchor1008">пунктом 8</text:a> настоящих Правил (за исключением требований в отношении лекарственного препарата об обеспечении технологической возможности производства на территории Российской Федерации на всех стадиях производства (в том числе синтеза молекулы действующего вещества при производстве фармацевтических субстанций), и готовит соответствующую позицию;</text:p>
      <text:p text:style-name="s1"><text:bookmark text:name="anchor1143"/>в) направляет предложение в Министерство промышленности и торговли Российской Федерации для проверки представленной информации на соответствие критерию, установленному <text:a xlink:type="simple" xlink:href="#anchor1008">пунктом 8</text:a> настоящих Правил, в части требования в отношении лекарственного препарата об обеспечении технологической возможности производства на территории Российской Федерации на всех стадиях производства (в том числе синтеза молекулы действующего вещества при производстве фармацевтических субстанций) и подготовки позиции Министерства промышленности и торговли Российской Федерации.</text:p>
      <text:p text:style-name="s1"><text:bookmark text:name="anchor1015"/>15. Позиции Центра экспертизы, Министерства промышленности и торговли Российской Федерации, указанные соответственно в <text:a xlink:type="simple" xlink:href="#anchor1141">подпунктах "а"</text:a> и <text:a xlink:type="simple" xlink:href="#anchor1143">"в" пункта 14</text:a> настоящих Правил, направляются в Министерство здравоохранения Российской Федерации в течение 7 рабочих дней со дня поступления предложения от Министерства здравоохранения Российской Федерации.</text:p>
      <text:p text:style-name="s1">В целях получения дополнительной информации для подготовки позиции Центр экспертизы вправе направлять запросы главным внештатным специалистам Министерства здравоохранения Российской Федерации в федеральных округах и (или) главным внештатным специалистам исполнительных органов субъектов Российской Федерации в сфере охраны здоровья, иным специалистам, в профессиональные медицинские сообщества. Направление таких запросов и получение ответов на них осуществляются в пределах срока, установленного <text:a xlink:type="simple" xlink:href="#anchor1015">абзацем первым</text:a> настоящего пункта.</text:p>
      <text:p text:style-name="s1">Указанные в <text:a xlink:type="simple" xlink:href="#anchor1015">абзаце первом</text:a> настоящего пункта позиции Центра экспертизы и Министерства промышленности и торговли Российской Федерации в течение одного рабочего дня со дня поступления передаются Министерством здравоохранения Российской Федерации совместно с позицией, указанной в <text:a xlink:type="simple" xlink:href="#anchor1142">подпункте "б" пункта 14</text:a>, в комиссию.</text:p>
      <text:p text:style-name="s1"><text:bookmark text:name="anchor1016"/>16. Лекарственные препараты, включенные в <text:a xlink:type="simple" xlink:href="http://ivo.garant.ru/document/redirect/12177114/1000">перечень</text:a> № 1141-р, должны соответствовать критериям, установленным <text:a xlink:type="simple" xlink:href="#anchor1004">пунктом 4</text:a> настоящих Правил, а также <text:a xlink:type="simple" xlink:href="#anchor1006">пункту 6</text:a> настоящих Правил или одному из критериев, установленных <text:a xlink:type="simple" xlink:href="#anchor1005">пунктом 5</text:a>, или <text:a xlink:type="simple" xlink:href="#anchor1007">пунктом 7</text:a>, или <text:a xlink:type="simple" xlink:href="#anchor1008">пунктом 8</text:a> настоящих Правил, или положениям <text:a xlink:type="simple" xlink:href="#anchor1007">абзаца первого пункта 7</text:a> настоящих Правил, или критерию, согласно которому по состоянию на дату рассмотрения комиссией вопроса о включении лекарственного препарата в перечень в отношении такого лекарственного препарата обеспечена технологическая возможность производства на территории Российской Федерации на всех стадиях производства (в том числе синтез молекулы действующего вещества при производстве фармацевтических субстанций) и (или) оказаны меры государственной поддержки, направленные на организацию производства такого лекарственного препарата на территории Российской Федерации на всех стадиях производства.</text:p>
      <text:p text:style-name="s1"><text:bookmark text:name="anchor1017"/>17. В первый раздел перечня включаются лекарственные препараты, включенные в <text:a xlink:type="simple" xlink:href="http://ivo.garant.ru/document/redirect/12177114/1000">перечень</text:a> № 1141-р:</text:p>
      <text:p text:style-name="s1"><text:bookmark text:name="anchor1171"/>а) соответствующие критериям, установленным <text:a xlink:type="simple" xlink:href="#anchor1004">пунктом 4</text:a> настоящих Правил, и одному из критериев, установленных <text:a xlink:type="simple" xlink:href="#anchor1005">пунктом 5</text:a> настоящих Правил, или критериям, установленным <text:a xlink:type="simple" xlink:href="#anchor1006">пунктом 6</text:a> настоящих Правил;</text:p>
      <text:p text:style-name="s1"><text:bookmark text:name="anchor1172"/>б) соответствующие критериям, установленным <text:a xlink:type="simple" xlink:href="#anchor1004">пунктом 4</text:a> настоящих Правил, и положениям <text:a xlink:type="simple" xlink:href="#anchor1007">абзаца первого пункта 7</text:a> настоящих Правил или критерию, установленному <text:a xlink:type="simple" xlink:href="#anchor1074">подпунктом "г" пункта 7</text:a> настоящих Правил.</text:p>
      <text:p text:style-name="s1"><text:bookmark text:name="anchor1018"/>18. Во второй раздел перечня включаются иные лекарственные препараты, включенные в <text:a xlink:type="simple" xlink:href="http://ivo.garant.ru/document/redirect/12177114/1000">перечень</text:a> № 1141-р, соответствующие положениям <text:a xlink:type="simple" xlink:href="#anchor1016">пункта 16</text:a> настоящих Правил и не подлежащие включению в первый раздел перечня в соответствии с <text:a xlink:type="simple" xlink:href="#anchor1017">пунктом 17</text:a> настоящих Правил.</text:p>
      <text:p text:style-name="s1"><text:bookmark text:name="anchor1019"/>19. В отношении лекарственных препаратов, включенных в <text:a xlink:type="simple" xlink:href="http://ivo.garant.ru/document/redirect/12177114/1000">перечень</text:a> № 1141-р, не требуется прохождение процедур, предусмотренных <text:a xlink:type="simple" xlink:href="#anchor1013">пунктами 13 - 15</text:a> настоящих Правил.</text:p>
      <text:p text:style-name="s1"><text:bookmark text:name="anchor1020"/>20. Основаниями для отказа комиссией во включении в перечень лекарственного препарата являются:</text:p>
      <text:p text:style-name="s1"><text:bookmark text:name="anchor1201"/>а) выявление недостоверности и (или) недостаточности информации, содержащейся в предложении;</text:p>
      <text:p text:style-name="s1"><text:bookmark text:name="anchor1202"/>б) несоответствие лекарственного препарата критериям, установленным <text:a xlink:type="simple" xlink:href="#anchor1004">пунктами 4 - 8</text:a> настоящих Правил.</text:p>
      <text:p text:style-name="s1"><text:bookmark text:name="anchor1021"/>21. Основанием для исключения комиссией лекарственного препарата из перечня является несоответствие лекарственного препарата одному из критериев, установленных <text:a xlink:type="simple" xlink:href="#anchor1004">пунктами 4 - 8</text:a> настоящих Правил.</text:p>
      <text:p text:style-name="s1">Лекарственные препараты, включенные в перечень в соответствии с <text:a xlink:type="simple" xlink:href="#anchor1017">пунктами 17</text:a> и <text:a xlink:type="simple" xlink:href="#anchor1018">18</text:a> настоящих Правил, не подлежат исключению из перечня до 1 января 2031 г., за исключением случаев внесения изменений в перечень в соответствии с <text:a xlink:type="simple" xlink:href="#anchor1023">пунктом 23</text:a> настоящих Правил.</text:p>
      <text:p text:style-name="s1"><text:bookmark text:name="anchor1022"/>22. Внесение изменений в перечень осуществляется в соответствии с положениями настоящих Правил, за исключением случаев внесения изменений в перечень в соответствии с <text:a xlink:type="simple" xlink:href="#anchor1023">пунктом 23</text:a> настоящих Правил.</text:p>
      <text:p text:style-name="s1"><text:bookmark text:name="anchor1023"/>23. В случае необходимости по поручению Правительства Российской Федерации комиссией осуществляется оперативное рассмотрение предложений в соответствии с положениями настоящих Правил на основании и в срок, которые установлены соответствующим поручением Правительства Российской Федерации.</text:p>
      <text:p text:style-name="s1"><text:bookmark text:name="anchor1024"/>24. В течение 10 рабочих дней со дня заседания комиссии Министерство здравоохранения Российской Федерации размещает на <text:a xlink:type="simple" xlink:href="https://minzdrav.gov.ru">официальном сайте</text:a> Министерства здравоохранения Российской Федерации в информационно-телекоммуникационной сети "Интернет" информацию о принятых на заседании комиссии решениях, в том числе сформированный комиссией проект акта Правительства Российской Федерации (проект внесения изменений в перечень), а также вносит в Правительство Российской Федерации в установленном порядке проект акта Правительства Российской Федерации об утверждении перечня (о внесении изменений в перечень).</text:p>
      <text:p text:style-name="s1">Перечень формируется в соответствии с международными непатентованными наименованиями лекарственных препаратов, при отсутствии таких наименований - в соответствии с группировочными или химическими наименованиями лекарственных препаратов.</text:p>
      <text:p text:style-name="s1"><text:bookmark text:name="anchor1025"/>25. В случае если предложение об исключении лекарственного препарата из перечня поступило не от заявителя, по предложению которого лекарственный препарат был включен в перечень, такой заявитель уведомляется о поступлении такого предложения (с приложением к уведомлению копии предложения и обосновывающих материалов), дате его рассмотрения комиссией и приглашается для участия в заседании комиссии по соответствующему вопросу посредством почтового отправления или в электронной форме по телекоммуникационным каналам связи, включая электронную почту.</text:p>
      <text:p text:style-name="s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style style:family="paragraph" style:name="Normal">
      <style:paragraph-properties style:writing-mode="lr"/>
      <style:text-properties style:font-name="Times New Roman" fo:font-size="12pt" fo:language="ru" fo:country="RU"/>
    </style:style>
    <style:style style:family="paragraph" style:name="Standard">
      <style:paragraph-properties fo:text-align="justify" fo:text-indent="1.27cm" fo:widows="2" fo:orphans="2" fo:margin-left="0cm" fo:margin-right="0cm" fo:margin-top="0cm" fo:margin-bottom="0cm" style:writing-mode="lr"/>
      <style:text-properties style:font-name="Times New Roman" fo:font-size="12pt"/>
    </style:style>
    <style:style style:name="Preformatted" style:display-name="Preformatted" style:family="paragraph">
      <style:paragraph-properties fo:margin-left="0cm" fo:margin-right="0cm" fo:margin-top="0cm" fo:margin-bottom="0cm" fo:text-align="justify" style:justify-single-word="false" fo:orphans="2" fo:widows="2" fo:hyphenation-ladder-count="no-limit" fo:text-indent="0cm" style:auto-text-indent="false" style:writing-mode="lr-tb"/>
      <style:text-properties style:font-name="Courier New" fo:font-family="'Courier New'" style:font-family-generic="roman" style:font-pitch="fixed" fo:font-size="12pt" style:font-name-asian="Symbol" style:font-family-asian="Symbol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 fo:hyphenate="true" fo:hyphenation-remain-char-count="2" fo:hyphenation-push-char-count="2"/>
    </style:style>
    <style:style style:family="paragraph" style:name="Heading" style:parent-style-name="Standard">
      <style:paragraph-properties fo:text-align="center" fo:margin-top="0.423cm" fo:margin-bottom="0.212cm" fo:keep-with-next="always"/>
      <style:text-properties style:font-name="Times New Roman" fo:font-weight="bold"/>
    </style:style>
    <style:style style:name="s1" style:family="paragraph" style:display-name="Нормальный" style:parent-style-name="Standard"/>
    <style:style style:name="s2" style:family="paragraph" style:display-name="Нормальный (OEM)" style:parent-style-name="Preformatted"/>
    <style:style style:name="s3" style:family="paragraph" style:display-name="Заголовок 1" style:parent-style-name="Heading"/>
    <style:style style:name="s4" style:family="paragraph" style:display-name="Заголовок 2" style:parent-style-name="Heading"/>
    <style:style style:name="s5" style:family="paragraph" style:display-name="Заголовок 3" style:parent-style-name="Heading"/>
    <style:style style:name="s6" style:family="paragraph" style:display-name="Заголовок 4" style:parent-style-name="Heading"/>
    <style:style style:name="s7" style:family="paragraph" style:display-name="Утратил силу" style:parent-style-name="Standard">
      <style:text-properties fo:color="#666600" style:text-line-through-style="solid" style:text-line-through-type="single"/>
    </style:style>
    <!-- Text (reference) -->
    <style:style style:name="Text (reference)" style:family="paragraph" style:parent-style-name="Standard">
      <style:paragraph-properties fo:text-align="justify" fo:text-indent="0cm" fo:margin-left="0cm" fo:margin-right="0cm" fo:margin-top="0.132cm" fo:margin-bottom="0cm"/>
      <style:text-properties fo:font-style="italic" fo:color="#353842" style:font-name="Times New Roman CYR" fo:font-size="12pt"/>
    </style:style>
    <style:style style:name="s9" style:family="paragraph" style:display-name="Комментарий" style:parent-style-name="Text (reference)">
      <style:paragraph-properties fo:text-align="justify" fo:background-color="#f0f0f0"/>
      <style:text-properties fo:background-color="#f0f0f0"/>
    </style:style>
    <style:style style:name="s15" style:family="paragraph" style:display-name="Заголовок статьи" style:parent-style-name="Standard">
      <style:paragraph-properties fo:text-align="justify" fo:text-indent="-1.573cm" fo:margin-left="2.843cm" fo:margin-right="0cm" fo:margin-top="0cm" fo:margin-bottom="0cm"/>
    </style:style>
    <style:style style:name="s16" style:family="paragraph" style:display-name="Прижатый влево" style:parent-style-name="Standard">
      <style:paragraph-properties fo:text-indent="0cm" fo:text-align="start" style:justify-single-word="false" fo:hyphenation-ladder-count="no-limit"/>
    </style:style>
    <style:style style:name="s22" style:family="paragraph" style:display-name="Информация о версии" style:parent-style-name="Text (reference)">
      <style:paragraph-properties fo:text-align="justify" fo:background-color="#f0f0f0"/>
      <style:text-properties fo:background-color="#f0f0f0"/>
    </style:style>
    <style:style style:name="s25" style:family="paragraph" style:display-name="Не вступил в силу" style:parent-style-name="Standard">
      <style:paragraph-properties fo:margin-left="0.245cm" fo:margin-right="0cm" fo:text-indent="-0.245cm"/>
    </style:style>
    <style:style style:name="s52" style:family="paragraph" style:display-name="Информация об изменениях" style:parent-style-name="Text (reference)">
      <style:paragraph-properties fo:background-color="#eaefed"/>
      <style:text-properties fo:font-size="10pt" fo:background-color="#eaefed"/>
    </style:style>
    <style:style style:name="s71" style:family="paragraph" style:display-name="Заголовок ЭР (левое окно)" style:parent-style-name="Heading"/>
    <style:style style:name="s91" style:family="paragraph" style:display-name="Сноска" style:parent-style-name="Standard">
      <style:text-properties fo:font-size="10pt"/>
    </style:style>
    <style:style style:name="s93" style:family="paragraph" style:display-name="Взамен" style:parent-style-name="Text (reference)">
      <style:paragraph-properties fo:auto-text-indent="false" fo:text-indent="0cm" fo:background-color="#FFF5AD" fo:margin-left="0.3in"/>
      <style:text-properties fo:background-color="#FFF5AD"/>
    </style:style>
    <style:style style:name="s94" style:family="paragraph" style:display-name="Сравнение" style:parent-style-name="Text (reference)">
      <style:paragraph-properties fo:auto-text-indent="false" fo:text-indent="0cm" fo:background-color="#f0f0f0" fo:margin-left="0.3in"/>
      <style:text-properties fo:background-color="#f0f0f0"/>
    </style:style>
  </office:styles>
  <office:automatic-styles>
    <!-- header and footer styles -->
    <style:style style:family="paragraph" style:name="header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left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center" style:parent-style-name="Standard">
      <style:paragraph-properties fo:text-align="center" fo:text-indent="0cm"/>
      <style:text-properties style:font-name="Times New Roman" fo:font-family="'Times New Roman'" fo:font-size="10"/>
    </style:style>
    <style:style style:family="paragraph" style:name="footer_right" style:parent-style-name="Standard">
      <style:paragraph-properties fo:text-align="right" fo:text-indent="0cm"/>
      <style:text-properties style:font-name="Times New Roman" fo:font-family="'Times New Roman'" fo:font-size="10"/>
    </style:style>
    <style:page-layout style:name="Standard">
      <style:page-layout-properties fo:page-width="210mm" fo:page-height="297mm" style:num-format="1" style:print-orientation="portrait" fo:margin-top="14mm" fo:margin-bottom="14mm" fo:margin-left="14mm" fo:margin-right="14mm"/>
      <style:header-style>
        <style:header-footer-properties fo:margin-bottom="5mm"/>
      </style:header-style>
      <style:footer-style/>
    </style:page-layout>
    <number:date-style style:name="date" number:automatic-order="true" number:format-source="fixed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Standard">
      <style:header>
        <text:p text:style-name="header">Постановление Правительства Российской Федерации от 17 марта 2026 г. № 277 "Об утверждении Правил...</text:p>
      </style:header>
      <style:footer>
        <table:table>
          <table:table-column table:number-columns-repeated="3"/>
          <table:table-row>
            <table:table-cell>
              <text:p text:style-name="footer_left">
							<text:date style:data-style-name="date" text:fixed="true" text:date-value="2026-5-12"/>
						</text:p>
            </table:table-cell>
            <table:table-cell>
              <text:p text:style-name="footer_center">Система ГАРАНТ
						</text:p>
            </table:table-cell>
            <table:table-cell>
              <text:p text:style-name="footer_right">
							<text:page-number text:select-page="current"/>/<text:page-count style:num-format="1"/>
						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initial-creator>НПП "Гарант-Сервис"</meta:initial-creator>
    <dc:description>Документ экспортирован из системы ГАРАНТ</dc:description>
    <meta:generator>Garant</meta:generator>
    <meta:user-defined meta:name="Company">НПП "Гарант-Сервис"</meta:user-defined>
  </office:meta>
</office:document-meta>
</file>