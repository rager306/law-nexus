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480512504.png" manifest:media-type=""/>
  <manifest:file-entry manifest:full-path="Pictures/480512505.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style:style style:name="SB0" style:family="paragraph" style:parent-style-name="Standard" style:master-page-name="landscape0">
      <style:paragraph-properties fo:break-before="page"/>
    </style:style>
    <style:style style:name="SB1" style:family="paragraph" style:parent-style-name="Standard" style:master-page-name="portrait1">
      <style:paragraph-properties fo:break-before="page"/>
    </style:style>
    <!-- Page break style -->
    <style:style style:name="PB" style:family="paragraph" style:parent-style-name="Standard">
      <style:paragraph-properties fo:break-before="page"/>
    </style:style>
    <!-- Specific styles -->
    <style:style style:name="s25_fi698" style:family="paragraph" style:parent-style-name="s25">
      <style:paragraph-properties fo:text-indent="12mm"/>
    </style:style>
    <style:style style:name="s16_fi0" style:family="paragraph" style:parent-style-name="s16">
      <style:paragraph-properties fo:text-indent="0mm"/>
    </style:style>
    <style:style style:name="s1_right_fi0" style:family="paragraph" style:parent-style-name="s1">
      <style:paragraph-properties fo:text-align="right" fo:text-indent="0mm"/>
    </style:style>
    <style:style style:name="s1_right_fi698" style:family="paragraph" style:parent-style-name="s1">
      <style:paragraph-properties fo:text-align="right" fo:text-indent="12mm"/>
    </style:style>
    <style:style style:name="s1_center_fi0" style:family="paragraph" style:parent-style-name="s1">
      <style:paragraph-properties fo:text-align="center" fo:text-indent="0mm"/>
    </style:style>
    <style:style style:name="s1_fi0" style:family="paragraph" style:parent-style-name="s1">
      <style:paragraph-properties fo:text-indent="0mm"/>
    </style:style>
    <!-- Table cells styles -->
    <style:style style:name="0" style:family="table-cell">
      <style:table-cell-properties style:vertical-align="top"/>
    </style:style>
    <style:style style:name="1" style:family="table-cell">
      <style:table-cell-properties fo:border-bottom="0.05pt solid #000000" style:vertical-align="top"/>
    </style:style>
    <style:style style:name="4" style:family="table-cell">
      <style:table-cell-properties fo:border-right="0.05pt solid #000000" style:vertical-align="top"/>
    </style:style>
    <style:style style:name="5" style:family="table-cell">
      <style:table-cell-properties fo:border-right="0.05pt solid #000000" fo:border-bottom="0.05pt solid #000000" style:vertical-align="top"/>
    </style:style>
    <style:style style:name="7" style:family="table-cell">
      <style:table-cell-properties fo:border-left="0.05pt solid #000000" fo:border-right="0.05pt solid #000000" fo:border-bottom="0.05pt solid #000000" style:vertical-align="top"/>
    </style:style>
    <style:style style:name="9" style:family="table-cell">
      <style:table-cell-properties fo:border-top="0.05pt solid #000000" fo:border-bottom="0.05pt solid #000000" style:vertical-align="top"/>
    </style:style>
    <style:style style:name="13" style:family="table-cell">
      <style:table-cell-properties fo:border-top="0.05pt solid #000000" fo:border-right="0.05pt solid #000000" fo:border-bottom="0.05pt solid #000000" style:vertical-align="top"/>
    </style:style>
    <style:style style:name="15" style:family="table-cell">
      <style:table-cell-properties fo:border-left="0.05pt solid #000000" fo:border-top="0.05pt solid #000000" fo:border-right="0.05pt solid #000000" fo:border-bottom="0.05pt solid #000000" style:vertical-align="top"/>
    </style:style>
    <style:style style:name="21" style:family="table-cell">
      <style:table-cell-properties fo:border-right="0.05pt solid #000000" fo:border-bottom="0.05pt solid #000000" style:vertical-align="middle"/>
    </style:style>
    <style:style style:name="29" style:family="table-cell">
      <style:table-cell-properties fo:border-top="0.05pt solid #000000" fo:border-right="0.05pt solid #000000" fo:border-bottom="0.05pt solid #000000" style:vertical-align="middle"/>
    </style:style>
    <style:style style:name="64" style:family="table-cell">
      <style:table-cell-properties style:vertical-align="top"/>
    </style:style>
    <style:style style:name="77" style:family="table-cell">
      <style:table-cell-properties fo:border-top="0.05pt solid #000000" fo:border-right="0.05pt solid #000000" fo:border-bottom="0.05pt solid #000000" style:vertical-align="top"/>
    </style:style>
    <style:style style:name="79" style:family="table-cell">
      <style:table-cell-properties fo:border-left="0.05pt solid #000000" fo:border-top="0.05pt solid #000000" fo:border-right="0.05pt solid #000000" fo:border-bottom="0.05pt solid #000000" style:vertical-align="top"/>
    </style:style>
    <style:style style:name="93" style:family="table-cell">
      <style:table-cell-properties fo:border-top="0.05pt solid #000000" fo:border-right="0.05pt solid #000000" fo:border-bottom="0.05pt solid #000000" style:vertical-align="middle"/>
    </style:style>
    <style:style style:name="95" style:family="table-cell">
      <style:table-cell-properties fo:border-left="0.05pt solid #000000" fo:border-top="0.05pt solid #000000" fo:border-right="0.05pt solid #000000" fo:border-bottom="0.05pt solid #000000" style:vertical-align="middle"/>
    </style:style>
    <!-- Table columns styles -->
    <style:style style:name="408" style:family="table-column">
      <style:table-column-properties style:column-width="7mm"/>
    </style:style>
    <style:style style:name="479" style:family="table-column">
      <style:table-column-properties style:column-width="8mm"/>
    </style:style>
    <style:style style:name="494" style:family="table-column">
      <style:table-column-properties style:column-width="9mm"/>
    </style:style>
    <style:style style:name="499" style:family="table-column">
      <style:table-column-properties style:column-width="9mm"/>
    </style:style>
    <style:style style:name="546" style:family="table-column">
      <style:table-column-properties style:column-width="10mm"/>
    </style:style>
    <style:style style:name="580" style:family="table-column">
      <style:table-column-properties style:column-width="10mm"/>
    </style:style>
    <style:style style:name="597" style:family="table-column">
      <style:table-column-properties style:column-width="11mm"/>
    </style:style>
    <style:style style:name="634" style:family="table-column">
      <style:table-column-properties style:column-width="11mm"/>
    </style:style>
    <style:style style:name="681" style:family="table-column">
      <style:table-column-properties style:column-width="12mm"/>
    </style:style>
    <style:style style:name="887" style:family="table-column">
      <style:table-column-properties style:column-width="16mm"/>
    </style:style>
    <style:style style:name="1000" style:family="table-column">
      <style:table-column-properties style:column-width="18mm"/>
    </style:style>
    <style:style style:name="1483" style:family="table-column">
      <style:table-column-properties style:column-width="26mm"/>
    </style:style>
    <style:style style:name="1488" style:family="table-column">
      <style:table-column-properties style:column-width="26mm"/>
    </style:style>
    <style:style style:name="1632" style:family="table-column">
      <style:table-column-properties style:column-width="29mm"/>
    </style:style>
    <style:style style:name="1637" style:family="table-column">
      <style:table-column-properties style:column-width="29mm"/>
    </style:style>
    <style:style style:name="1664" style:family="table-column">
      <style:table-column-properties style:column-width="29mm"/>
    </style:style>
    <style:style style:name="1696" style:family="table-column">
      <style:table-column-properties style:column-width="30mm"/>
    </style:style>
    <style:style style:name="1711" style:family="table-column">
      <style:table-column-properties style:column-width="30mm"/>
    </style:style>
    <style:style style:name="1812" style:family="table-column">
      <style:table-column-properties style:column-width="32mm"/>
    </style:style>
    <style:style style:name="1844" style:family="table-column">
      <style:table-column-properties style:column-width="33mm"/>
    </style:style>
    <style:style style:name="1849" style:family="table-column">
      <style:table-column-properties style:column-width="33mm"/>
    </style:style>
    <style:style style:name="1856" style:family="table-column">
      <style:table-column-properties style:column-width="33mm"/>
    </style:style>
    <style:style style:name="1867" style:family="table-column">
      <style:table-column-properties style:column-width="33mm"/>
    </style:style>
    <style:style style:name="1919" style:family="table-column">
      <style:table-column-properties style:column-width="34mm"/>
    </style:style>
    <style:style style:name="1941" style:family="table-column">
      <style:table-column-properties style:column-width="34mm"/>
    </style:style>
    <style:style style:name="1957" style:family="table-column">
      <style:table-column-properties style:column-width="35mm"/>
    </style:style>
    <style:style style:name="2000" style:family="table-column">
      <style:table-column-properties style:column-width="35mm"/>
    </style:style>
    <style:style style:name="2002" style:family="table-column">
      <style:table-column-properties style:column-width="35mm"/>
    </style:style>
    <style:style style:name="2045" style:family="table-column">
      <style:table-column-properties style:column-width="36mm"/>
    </style:style>
    <style:style style:name="2095" style:family="table-column">
      <style:table-column-properties style:column-width="37mm"/>
    </style:style>
    <style:style style:name="2135" style:family="table-column">
      <style:table-column-properties style:column-width="38mm"/>
    </style:style>
    <style:style style:name="2168" style:family="table-column">
      <style:table-column-properties style:column-width="38mm"/>
    </style:style>
    <style:style style:name="2184" style:family="table-column">
      <style:table-column-properties style:column-width="39mm"/>
    </style:style>
    <style:style style:name="2218" style:family="table-column">
      <style:table-column-properties style:column-width="39mm"/>
    </style:style>
    <style:style style:name="2243" style:family="table-column">
      <style:table-column-properties style:column-width="40mm"/>
    </style:style>
    <style:style style:name="2353" style:family="table-column">
      <style:table-column-properties style:column-width="42mm"/>
    </style:style>
    <style:style style:name="2437" style:family="table-column">
      <style:table-column-properties style:column-width="43mm"/>
    </style:style>
    <style:style style:name="2665" style:family="table-column">
      <style:table-column-properties style:column-width="47mm"/>
    </style:style>
    <style:style style:name="2719" style:family="table-column">
      <style:table-column-properties style:column-width="48mm"/>
    </style:style>
    <style:style style:name="2747" style:family="table-column">
      <style:table-column-properties style:column-width="48mm"/>
    </style:style>
    <style:style style:name="2817" style:family="table-column">
      <style:table-column-properties style:column-width="50mm"/>
    </style:style>
    <style:style style:name="2866" style:family="table-column">
      <style:table-column-properties style:column-width="51mm"/>
    </style:style>
    <style:style style:name="3039" style:family="table-column">
      <style:table-column-properties style:column-width="54mm"/>
    </style:style>
    <style:style style:name="3063" style:family="table-column">
      <style:table-column-properties style:column-width="54mm"/>
    </style:style>
    <style:style style:name="3083" style:family="table-column">
      <style:table-column-properties style:column-width="54mm"/>
    </style:style>
    <style:style style:name="3256" style:family="table-column">
      <style:table-column-properties style:column-width="57mm"/>
    </style:style>
    <style:style style:name="3263" style:family="table-column">
      <style:table-column-properties style:column-width="58mm"/>
    </style:style>
    <style:style style:name="3282" style:family="table-column">
      <style:table-column-properties style:column-width="58mm"/>
    </style:style>
    <style:style style:name="3291" style:family="table-column">
      <style:table-column-properties style:column-width="58mm"/>
    </style:style>
    <style:style style:name="3401" style:family="table-column">
      <style:table-column-properties style:column-width="60mm"/>
    </style:style>
    <style:style style:name="3477" style:family="table-column">
      <style:table-column-properties style:column-width="61mm"/>
    </style:style>
    <style:style style:name="3777" style:family="table-column">
      <style:table-column-properties style:column-width="67mm"/>
    </style:style>
    <style:style style:name="3875" style:family="table-column">
      <style:table-column-properties style:column-width="68mm"/>
    </style:style>
    <style:style style:name="4095" style:family="table-column">
      <style:table-column-properties style:column-width="72mm"/>
    </style:style>
    <style:style style:name="4217" style:family="table-column">
      <style:table-column-properties style:column-width="74mm"/>
    </style:style>
    <style:style style:name="5550" style:family="table-column">
      <style:table-column-properties style:column-width="98mm"/>
    </style:style>
    <style:style style:name="6055" style:family="table-column">
      <style:table-column-properties style:column-width="107mm"/>
    </style:style>
    <style:style style:name="6803" style:family="table-column">
      <style:table-column-properties style:column-width="120mm"/>
    </style:style>
    <style:style style:name="7849" style:family="table-column">
      <style:table-column-properties style:column-width="138mm"/>
    </style:style>
    <!-- Table styles -->
    <style:style style:name="rubber" style:family="table">
      <style:table-properties style:rel-width="100%" table:align="center"/>
    </style:style>
    <style:style style:name="9887" style:family="table">
      <style:table-properties style:width="174mm" table:align="left"/>
    </style:style>
    <style:style style:name="9972" style:family="table">
      <style:table-properties style:width="176mm" table:align="left"/>
    </style:style>
    <style:style style:name="9989" style:family="table">
      <style:table-properties style:width="176mm" table:align="left"/>
    </style:style>
    <style:style style:name="10027" style:family="table">
      <style:table-properties style:width="177mm" table:align="left"/>
    </style:style>
    <style:style style:name="10129" style:family="table">
      <style:table-properties style:width="179mm" table:align="left"/>
    </style:style>
    <style:style style:name="10204" style:family="table">
      <style:table-properties style:width="180mm" table:align="left"/>
    </style:style>
    <style:style style:name="15156" style:family="table">
      <style:table-properties style:width="267mm" table:align="left"/>
    </style:style>
    <style:style style:name="15204" style:family="table">
      <style:table-properties style:width="268mm" table:align="left"/>
    </style:style>
    <!-- Colored text styles -->
  </office:automatic-styles>
  <office:body>
    <office:text text:use-soft-page-breaks="true">
      <text:h text:outline-level="1" text:style-name="s3"><text:bookmark text:name="anchor0"/><text:a xlink:type="simple" xlink:href="http://ivo.garant.ru/document/redirect/411197447/0">Постановление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text:a></text:h>
      <text:p text:style-name="s52header">С изменениями и дополнениями от:</text:p>
      <text:p text:style-name="s52">18 февраля, 10 июня, 29 августа, 27 сентября, 28 ноября, 18, 19, 23, 30 декабря 2025 г., 28 января, 11 февраля, 4 мая 2026 г.</text:p>
      <text:p text:style-name="s9header">ГАРАНТ:</text:p>
      <text:p text:style-name="s9">О применении настоящего документа см. <text:a xlink:type="simple" xlink:href="http://ivo.garant.ru/document/redirect/411397379/0">информационное письмо</text:a> Минфина России от 31 января 2025 г. № 24-01-06/8697</text:p>
      <text:p text:style-name="s1">В соответствии со <text:a xlink:type="simple" xlink:href="http://ivo.garant.ru/document/redirect/70353464/14">статьями 14</text:a>, <text:a xlink:type="simple" xlink:href="http://ivo.garant.ru/document/redirect/70353464/22">22</text:a>, <text:a xlink:type="simple" xlink:href="http://ivo.garant.ru/document/redirect/70353464/27">27</text:a>, <text:a xlink:type="simple" xlink:href="http://ivo.garant.ru/document/redirect/70353464/33">33</text:a> и <text:a xlink:type="simple" xlink:href="http://ivo.garant.ru/document/redirect/70353464/34">34</text:a> Федерального закона "О контрактной системе в сфере закупок товаров, работ, услуг для обеспечения государственных и муниципальных нужд", <text:a xlink:type="simple" xlink:href="http://ivo.garant.ru/document/redirect/12188083/3">статьями 3</text:a> и <text:a xlink:type="simple" xlink:href="http://ivo.garant.ru/document/redirect/12188083/3140">3<text:span text:style-name="upper"><text:span> 1-4</text:span></text:span></text:a> Федерального закона "О закупках товаров, работ, услуг отдельными видами юридических лиц" Правительство Российской Федерации постановляет:</text:p>
      <text:p text:style-name="s22header">Информация об изменениях:</text:p>
      <text:p text:style-name="s22"><text:bookmark text:name="anchor1"/>Пункт 1 изменен с 19 июня 2025 г. - <text:a xlink:type="simple" xlink:href="http://ivo.garant.ru/document/redirect/412162530/1051">Постановление</text:a> Правительства России от 10 июня 2025 г. № 879</text:p>
      <text:p text:style-name="s22"><text:a xlink:type="simple" xlink:href="http://ivo.garant.ru/document/redirect/483408352/1">См. предыдущую редакцию</text:a></text:p>
      <text:p text:style-name="s1">1. Установить при осуществлении закупок в соответствии с <text:a xlink:type="simple" xlink:href="http://ivo.garant.ru/document/redirect/70353464/14">Федеральным законом</text:a> "О контрактной системе в сфере закупок товаров, работ, услуг для обеспечения государственных и муниципальных нужд" и закупок в соответствии с <text:a xlink:type="simple" xlink:href="http://ivo.garant.ru/document/redirect/12188083/3140">Федеральным законом</text:a> "О закупках товаров, работ, услуг отдельными видами юридических лиц":</text:p>
      <text:p text:style-name="s1"><text:bookmark text:name="anchor112"/>запрет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гражданами, иностранными юридическими лицами (далее - иностранные лица), по перечню согласно <text:a xlink:type="simple" xlink:href="#anchor1000">приложению N 1</text:a>, а также закупок в рамках государственного оборонного заказа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text:p>
      <text:p text:style-name="s1"><text:bookmark text:name="anchor113"/>ограничение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 по перечню согласно <text:a xlink:type="simple" xlink:href="#anchor2000">приложению N 2</text:a>;</text:p>
      <text:p text:style-name="s1"><text:bookmark text:name="anchor114"/>преимущество в отношении товаров российского происхождения (в том числе поставляемых при выполнении закупаемых работ, оказании закупаемых услуг).</text:p>
      <text:p text:style-name="s1"><text:bookmark text:name="anchor2"/>2. Установить минимальную обязательную долю закупок товаров российского происхождения по перечню согласно <text:a xlink:type="simple" xlink:href="#anchor3000">приложению N 3</text:a> при осуществлении с учетом положений <text:a xlink:type="simple" xlink:href="#anchor411">подпункта "л" пункта 4</text:a> настоящего постановления закупок в соответствии с <text:a xlink:type="simple" xlink:href="http://ivo.garant.ru/document/redirect/12188083/3140">Федеральным законом</text:a> "О закупках товаров, работ, услуг отдельными видами юридических лиц", определенную в процентном отношении к объему закупок соответствующих товаров (в том числе товаров, поставляемых при выполнении закупаемых работ, оказании закупаемых услуг), осуществленных заказчиком в отчетном году.</text:p>
      <text:p text:style-name="s1"><text:bookmark text:name="anchor3"/>3. Установить, что информацией и документами, подтверждающими страну происхождения товара для целей настоящего постановления, являются:</text:p>
      <text:p text:style-name="s22header">Информация об изменениях:</text:p>
      <text:p text:style-name="s22"><text:bookmark text:name="anchor31"/>Подпункт "а" изменен с 19 июня 2025 г. - <text:a xlink:type="simple" xlink:href="http://ivo.garant.ru/document/redirect/412162530/1521">Постановление</text:a> Правительства России от 10 июня 2025 г. № 879</text:p>
      <text:p text:style-name="s22"><text:a xlink:type="simple" xlink:href="http://ivo.garant.ru/document/redirect/483408352/31">См. предыдущую редакцию</text:a></text:p>
      <text:p text:style-name="s9header">ГАРАНТ:</text:p>
      <text:p text:style-name="s9">Положения подпункта "а" в части, касающейся товаров, указанных в <text:a xlink:type="simple" xlink:href="#anchor2400">позициях 400 - 432</text:a> приложения N 2, <text:a xlink:type="simple" xlink:href="#anchor102">применяются</text:a> с 1 сентября 2025 г.</text:p>
      <text:p text:style-name="s1">а) для подтверждения происхождения товаров, указанных в <text:a xlink:type="simple" xlink:href="#anchor1001">позициях 1 - 145</text:a> приложения N 1 к настоящему постановлению, <text:a xlink:type="simple" xlink:href="#anchor2001">позициях 1 - 433</text:a> приложения N 2 к настоящему постановлению, <text:a xlink:type="simple" xlink:href="#anchor3000">приложении N 3</text:a> к настоящему постановлению, из Российской Федерации - номер реестровой записи из <text:a xlink:type="simple" xlink:href="https://gisp.gov.ru/pp719v2/pub/prod/">реестра</text:a> российской промышленной продукции, предусмотренного <text:a xlink:type="simple" xlink:href="http://ivo.garant.ru/document/redirect/70833138/1710">статьей 17<text:span text:style-name="upper"><text:span> 1</text:span></text:span></text:a> Федерального закона "О промышленной политике в Российской Федерации" (далее - реестр российской промышленной продукции), и справка, подтверждающая наличие специального инвестиционного контракта и предусмотренная <text:a xlink:type="simple" xlink:href="http://ivo.garant.ru/document/redirect/71139412/101">пунктом 1<text:span text:style-name="upper"><text:span> 1</text:span></text:span></text:a> постановления Правительства Российской Федерации от 17 июля 2015 г. № 719 "О подтверждении производства российской промышленной продукции", или номер реестровой записи из реестра российской промышленной продукции, содержащей в том числе:</text:p>
      <text:p text:style-name="s1"><text:bookmark text:name="anchor312"/>информацию о совокупном количестве баллов за выполнение (освоение) на территории Российской Федерации соответствующих операций (условий) (если в отношении такого товара <text:a xlink:type="simple" xlink:href="http://ivo.garant.ru/document/redirect/71139412/0">постановлением</text:a> Правительства Российской Федерации от 17 июля 2015 г. N 719 "О подтверждении производства российской промышленной продукции" за выполнение (освоение) на территории Российской Федерации соответствующих операций (условий) установлены требования о совокупном количестве баллов), которое составляет или превышает значение, определенное постановлением Правительства Российской Федерации от 17 июля 2015 г. N 719 "О подтверждении производства российской промышленной продукции", включая значение, определенное для целей осуществления закупок (если постановлением Правительства Российской Федерации от 17 июля 2015 г. № 719 "О подтверждении производства российской промышленной продукции" в отношении такого товара определено значение для целей осуществления закупок);</text:p>
      <text:p text:style-name="s1"><text:bookmark text:name="anchor313"/>информацию об уровне радиоэлектронной продукции (для товара, являющегося в соответствии с <text:a xlink:type="simple" xlink:href="http://ivo.garant.ru/document/redirect/71139412/0">постановлением</text:a> Правительства Российской Федерации от 17 июля 2015 г. N 719 "О подтверждении производства российской промышленной продукции" радиоэлектронной продукцией первого уровня или радиоэлектронной продукцией второго уровня);</text:p>
      <text:p text:style-name="s9header">ГАРАНТ:</text:p>
      <text:p text:style-name="s9"><text:bookmark text:name="anchor32"/>Положения подпункта "б" в части, касающейся товаров, указанных в <text:a xlink:type="simple" xlink:href="#anchor2400">позициях 400 - 432</text:a> приложения N 2, <text:a xlink:type="simple" xlink:href="#anchor102">применяются</text:a> с 1 сентября 2025 г.</text:p>
      <text:p text:style-name="s1">б) для подтверждения происхождения товаров, указанных в <text:a xlink:type="simple" xlink:href="#anchor1001">позициях 1 - 145</text:a> приложения N 1 к настоящему постановлению, <text:a xlink:type="simple" xlink:href="#anchor2001">позициях 1 - 433</text:a> приложения N 2 к настоящему постановлению, <text:a xlink:type="simple" xlink:href="#anchor3000">приложении N 3</text:a> к настоящему постановлению, из государств - членов Евразийского экономического союза, за исключением Российской Федерации, - номер реестровой записи из <text:a xlink:type="simple" xlink:href="https://goszakupki.eaeunion.org/erpt/ru/registers/products">евразийского реестра</text:a> промышленных товаров государств - членов Евразийского экономического союза, порядок формирования и ведения которого устанавливается правом Евразийского экономического союза (далее - евразийский реестр промышленных товаров), содержащей в том числе:</text:p>
      <text:p text:style-name="s1"><text:bookmark text:name="anchor322"/>информацию о совокупном количестве баллов за выполнение (освоение) на территории Евразийского экономического союза соответствующих операций (условий) (если в отношении такого товара правом Евразийского экономического союза за выполнение (освоение) на территории Евразийского экономического союза соответствующих операций (условий) установлены требования о совокупном количестве баллов), которое составляет или превышает значение, определенное правом Евразийского экономического союза;</text:p>
      <text:p text:style-name="s1"><text:bookmark text:name="anchor323"/>информацию об уровне радиоэлектронной продукции (для товара, являющегося в соответствии с правом Евразийского экономического союза радиоэлектронной продукцией первого уровня или радиоэлектронной продукцией второго уровня);</text:p>
      <text:p text:style-name="s1"><text:bookmark text:name="anchor33"/>в) для подтверждения осуществления всех стадий производства (в том числе синтеза молекулы действующего вещества при производстве фармацевтических субстанций) лекарственного препарата на территориях государств - членов Евразийского экономического союза в целях <text:a xlink:type="simple" xlink:href="#anchor419">подпунктов "у"</text:a> и <text:a xlink:type="simple" xlink:href="#anchor420">"ф" пункта 4</text:a> настоящего постановления в дополнение к информации и документам, предусмотренным настоящим постановлением, - документ, содержащий сведения о стадиях технологического процесса производства лекарственного средства для медицинского применения, осуществляемых на территории Евразийского экономического союза (в том числе о стадиях производства молекулы действующего вещества фармацевтической субстанции), выданный Министерством промышленности и торговли Российской Федерации в установленном им порядке;</text:p>
      <text:p text:style-name="s1"><text:bookmark text:name="anchor34"/>г) для подтверждения происхождения программ для электронных вычислительных машин и (или) баз данных (далее - программное обеспечение), указанных в <text:a xlink:type="simple" xlink:href="#anchor1146">позиции 146</text:a> приложения N 1 к настоящему постановлению, из Российской Федерации - порядковый номер реестровой записи из <text:a xlink:type="simple" xlink:href="https://reestr.digital.gov.ru/">единого реестра</text:a> российских программ для электронных вычислительных машин и баз данных (далее - реестр российского программного обеспечения);</text:p>
      <text:p text:style-name="s22header">Информация об изменениях:</text:p>
      <text:p text:style-name="s22"><text:bookmark text:name="anchor35"/>Подпункт "д" изменен с 1 марта 2026 г. - <text:a xlink:type="simple" xlink:href="http://ivo.garant.ru/document/redirect/413219605/100312">Постановление</text:a> Правительства России от 28 ноября 2025 г. № 1937</text:p>
      <text:p text:style-name="s22">Изменения не распространяются на закупки товаров, работ и услуг для обеспечения государственных и муниципальных нужд, извещения об осуществлении которых размещены в ЕИС в сфере закупок до 1 марта 2026 г. либо приглашения принять участие в которых направлены до 1 марта 2026 г.</text:p>
      <text:p text:style-name="s22"><text:a xlink:type="simple" xlink:href="http://ivo.garant.ru/document/redirect/483413627/35">См. предыдущую редакцию</text:a></text:p>
      <text:p text:style-name="s1">д) для подтверждения происхождения программного обеспечения, указанного в <text:a xlink:type="simple" xlink:href="#anchor1146">позиции 146</text:a> приложения № 1 к настоящему постановлению, из Российской Федерации и его соответствия требованиям, установленным <text:a xlink:type="simple" xlink:href="http://ivo.garant.ru/document/redirect/411824730/237">частями 3<text:span text:style-name="upper"><text:span> 7</text:span></text:span></text:a> и <text:a xlink:type="simple" xlink:href="http://ivo.garant.ru/document/redirect/411824730/239">3<text:span text:style-name="upper"><text:span> 9</text:span></text:span> статьи 2</text:a> Федерального закона "О внесении изменений в Федеральный закон "О безопасности критической информационной инфраструктуры Российской Федерации" (далее - требования к доверенному программному обеспечению), - порядковый номер реестровой записи из реестра российского программного обеспечения, содержащей информацию о соответствии программного обеспечения требованиям к доверенному программному обеспечению;</text:p>
      <text:p text:style-name="s1"><text:bookmark text:name="anchor36"/>е) для подтверждения происхождения программного обеспечения, указанного в <text:a xlink:type="simple" xlink:href="#anchor1146">позиции 146</text:a> приложения N 1 к настоящему постановлению, из государств - членов Евразийского экономического союза, за исключением Российской Федерации, - порядковый номер реестровой записи из <text:a xlink:type="simple" xlink:href="https://eac-reestr.digital.gov.ru">единого реестра</text:a>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 (далее - реестр евразийского программного обеспечения);</text:p>
      <text:p text:style-name="s22header">Информация об изменениях:</text:p>
      <text:p text:style-name="s22"><text:bookmark text:name="anchor37"/>Подпункт "ж" изменен с 1 марта 2026 г. - <text:a xlink:type="simple" xlink:href="http://ivo.garant.ru/document/redirect/413219605/100313">Постановление</text:a> Правительства России от 28 ноября 2025 г. № 1937</text:p>
      <text:p text:style-name="s22">Изменения не распространяются на закупки товаров, работ и услуг для обеспечения государственных и муниципальных нужд, извещения об осуществлении которых размещены в ЕИС в сфере закупок до 1 марта 2026 г. либо приглашения принять участие в которых направлены до 1 марта 2026 г.</text:p>
      <text:p text:style-name="s22"><text:a xlink:type="simple" xlink:href="http://ivo.garant.ru/document/redirect/483413627/37">См. предыдущую редакцию</text:a></text:p>
      <text:p text:style-name="s1">ж) для подтверждения происхождения программного обеспечения, указанного в <text:a xlink:type="simple" xlink:href="#anchor1146">позиции 146</text:a> приложения № 1 к настоящему постановлению, из государств - членов Евразийского экономического союза, за исключением Российской Федерации, и его соответствия требованиям к доверенному программному обеспечению - порядковый номер реестровой записи из реестра евразийского программного обеспечения, содержащей информацию о соответствии программного обеспечения требованиям к доверенному программному обеспечению;</text:p>
      <text:p text:style-name="s22header">Информация об изменениях:</text:p>
      <text:p text:style-name="s22"><text:bookmark text:name="anchor38"/>Подпункт "з" изменен с 1 января 2026 г. - <text:a xlink:type="simple" xlink:href="http://ivo.garant.ru/document/redirect/413396332/1011">Постановление</text:a> Правительства России от 30 декабря 2025 г. № 2225</text:p>
      <text:p text:style-name="s22"><text:a xlink:type="simple" xlink:href="http://ivo.garant.ru/document/redirect/76849700/38">См. предыдущую редакцию</text:a></text:p>
      <text:p text:style-name="s1">з) указание в заявке на участие в закупке наименования страны происхождения товара (в случае осуществления закупки в соответствии с Федеральным законом "О контрактной системе в сфере закупок товаров, работ, услуг для обеспечения государственных и муниципальных нужд" такое указание осуществляется в соответствии с <text:a xlink:type="simple" xlink:href="http://ivo.garant.ru/document/redirect/70353464/431202">подпунктом "б" пункта 2 части 1 статьи 43</text:a> указанного Федерального закона):</text:p>
      <text:p text:style-name="s1"><text:bookmark text:name="anchor382"/>для подтверждения происхождения товаров из Российской Федерации, не указанных в <text:a xlink:type="simple" xlink:href="#anchor1001">позициях 1 - 146</text:a> приложения N 1 к настоящему постановлению, <text:a xlink:type="simple" xlink:href="#anchor2001">позициях 1 - 433</text:a> приложения N 2 к настоящему постановлению;</text:p>
      <text:p text:style-name="s1"><text:bookmark text:name="anchor383"/>для подтверждения происхождения товаров из Российской Федерации, указанных в <text:a xlink:type="simple" xlink:href="#anchor2001">позициях 1 - 433</text:a> приложения № 2 к настоящему постановлению (если отсутствие в реестре российской промышленной продукции такого товара с характеристиками, соответствующими потребности заказчика, задекларировано заказчиком в соответствии с <text:a xlink:type="simple" xlink:href="#anchor713">абзацем четвертым подпункта "а" пункта 7</text:a> настоящего постановления или при осуществлении в соответствии с <text:a xlink:type="simple" xlink:href="http://ivo.garant.ru/document/redirect/12188083/0">Федеральным законом</text:a> "О закупках товаров, работ, услуг отдельными видами юридических лиц" закупки задекларировано в документации о закупке), за исключением случая, если в заявке на участие в закупке содержится предложение о поставке товара, который по состоянию на момент подачи заявки на участие в закупке включен в реестр российской промышленной продукции;</text:p>
      <text:p text:style-name="s1"><text:bookmark text:name="anchor384"/>для подтверждения происхождения товара из иностранного государства, за исключением предусмотренных настоящим пунктом случаев, при которых предусмотрены иные информация и документы, подтверждающие происхождение товара из государств - членов Евразийского экономического союза;</text:p>
      <text:p text:style-name="s22header">Информация об изменениях:</text:p>
      <text:p text:style-name="s22"><text:bookmark text:name="anchor39"/>Подпункт "и" изменен с 19 июня 2025 г. - <text:a xlink:type="simple" xlink:href="http://ivo.garant.ru/document/redirect/412162530/1523">Постановление</text:a> Правительства России от 10 июня 2025 г. № 879</text:p>
      <text:p text:style-name="s22"><text:a xlink:type="simple" xlink:href="http://ivo.garant.ru/document/redirect/483408352/39">См. предыдущую редакцию</text:a></text:p>
      <text:p text:style-name="s1">и) при осуществлении закупок в рамках государственного оборонного заказа товара, не относящегося к товарам, указанным в <text:a xlink:type="simple" xlink:href="#anchor1001">позициях 1 - 146</text:a> приложения N 1 к настоящему постановлению, <text:a xlink:type="simple" xlink:href="#anchor2001">позициях 1 - 433</text:a> приложения N 2 к настоящему постановлению, при осуществлении закупок вооружения, военной и специальной техники, принятых на вооружение, снабжение, в эксплуатацию, и образцов вооружения, военной и специальной техники, разработанных в соответствии с конструкторской документацией с литерой не ниже "О<text:span text:style-name="lower"><text:span> 1</text:span></text:span>", при осуществлении закупок составных частей вооружения, военной и специальной техники, принятых на вооружение, снабжение, в эксплуатацию, разработанных в соответствии с конструкторской документацией с литерой не ниже "O<text:span text:style-name="lower"><text:span> 1</text:span></text:span>" и (или) указанных в конструкторской документации на такие составные части, в дополнение к информации, предусмотренной <text:a xlink:type="simple" xlink:href="#anchor38">подпунктом "з"</text:a> настоящего пункта, - информация и документы, предусмотренные извещением об осуществлении закупки, приглашением принять участие в определении поставщика (подрядчика, исполнителя), условиями контракта и подлежащие представлению заказчику при поставке товара (в том числе при выполнении работ, оказании услуг).</text:p>
      <text:p text:style-name="s22header">Информация об изменениях:</text:p>
      <text:p text:style-name="s22">Пункт 3 дополнен подпунктами "к" и "л" с 1 июля 2026 г. - <text:a xlink:type="simple" xlink:href="http://ivo.garant.ru/document/redirect/413308835/1001">Постановление</text:a> Правительства России от 18 декабря 2025 г. № 2062</text:p>
      <text:p text:style-name="s22"><text:a xlink:type="simple" xlink:href="http://ivo.garant.ru/document/redirect/483414703/310">См. будущую редакцию</text:a></text:p>
      <text:p text:style-name="s1"><text:bookmark text:name="anchor4"/>4. Установить, что:</text:p>
      <text:p text:style-name="s1"><text:bookmark text:name="anchor41"/>а) положения настоящего постановления, касающиеся товара российского происхождения, работы, услуги, соответственно выполняемой, оказываемой российским гражданином, российским юридическим лицом, применяются также в отношении товара, происходящего из государства - члена Евразийского экономического союза, работы, услуги, соответственно выполняемой, оказываемой иностранным лицом, зарегистрированным на территории государства - члена Евразийского экономического союза;</text:p>
      <text:p text:style-name="s1"><text:bookmark text:name="anchor42"/>б) если объект закупки (предмет закупки) включает хотя бы один товар, не указанный в <text:a xlink:type="simple" xlink:href="#anchor1000">приложении N 1</text:a> к настоящему постановлению и приложении N 2 к настоящему постановлению, в отношении заявки, содержащей предложение о поставке товаров (в том числе поставляемых при выполнении закупаемых работ, оказании закупаемых услуг) только российского происхождения, применяется предусмотренное <text:a xlink:type="simple" xlink:href="#anchor1">пунктом 1</text:a> настоящего постановления преимущество при условии, что:</text:p>
      <text:p text:style-name="s1"><text:bookmark text:name="anchor422"/>при осуществлении закупки в соответствии с Федеральным законом "О контрактной системе в сфере закупок товаров, работ, услуг для обеспечения государственных и муниципальных нужд" в числе заявок на участие в закупке, которым в соответствии с <text:a xlink:type="simple" xlink:href="http://ivo.garant.ru/document/redirect/70353464/481512">подпунктом "б" пункта 1 части 15 статьи 48</text:a>, <text:a xlink:type="simple" xlink:href="http://ivo.garant.ru/document/redirect/70353464/49512">подпунктом "б" пункта 1 части 5 статьи 49</text:a>, <text:a xlink:type="simple" xlink:href="http://ivo.garant.ru/document/redirect/70353464/50312">подпунктом "б" пункта 1 части 3 статьи 50</text:a>, <text:a xlink:type="simple" xlink:href="http://ivo.garant.ru/document/redirect/70353464/731013">подпунктом "в" пункта 1 части 10 статьи 73</text:a>, <text:a xlink:type="simple" xlink:href="http://ivo.garant.ru/document/redirect/70353464/7451">пунктом 1 части 5 статьи 74</text:a>, <text:a xlink:type="simple" xlink:href="http://ivo.garant.ru/document/redirect/70353464/75913">подпунктом "в" пункта 1 части 9 статьи 75</text:a>, <text:a xlink:type="simple" xlink:href="http://ivo.garant.ru/document/redirect/70353464/76512">подпунктом "б" пункта 1 части 5 статьи 76</text:a> Федерального закона "О контрактной системе в сфере закупок товаров, работ, услуг для обеспечения государственных и муниципальных нужд" присваиваются порядковые номера, имеется заявка на участие в закупке, содержащая предложение о поставке хотя бы одного товара, происходящего из иностранного государства;</text:p>
      <text:p text:style-name="s1"><text:bookmark text:name="anchor423"/>при осуществлении закупки в соответствии с <text:a xlink:type="simple" xlink:href="http://ivo.garant.ru/document/redirect/12188083/0">Федеральным законом</text:a> "О закупках товаров, работ, услуг отдельными видами юридических лиц" в числе заявок на участие в закупке (окончательных предложений), которые рассматриваются, оцениваются, сопоставляются, имеется заявка на участие в закупке, которая не отклонена и содержит предложение о поставке хотя бы одного товара, происходящего из иностранного государства;</text:p>
      <text:p text:style-name="s1"><text:bookmark text:name="anchor43"/>в) если иное не установлено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с <text:a xlink:type="simple" xlink:href="http://ivo.garant.ru/document/redirect/12188083/0">Федеральным законом</text:a> "О закупках товаров, работ, услуг отдельными видами юридических лиц" и принятыми в соответствии с ними нормативными правовыми актами, в том числе настоящим постановлением, допускается включать в один объект закупки (предмет закупки) товары, работы, услуги как указанные в <text:a xlink:type="simple" xlink:href="#anchor1000">приложении N 1</text:a> к настоящему постановлению и <text:a xlink:type="simple" xlink:href="#anchor2000">приложении N 2</text:a> к настоящему постановлению, так и не указанные в таких приложениях, при этом:</text:p>
      <text:p text:style-name="s1">к включенным в объект закупки товарам, работам, услугам, указанным в <text:a xlink:type="simple" xlink:href="#anchor1000">приложении N 1</text:a> к настоящему постановлению, применяются положения настоящего постановления, касающиеся запрета, указанного в <text:a xlink:type="simple" xlink:href="#anchor1">пункте 1</text:a> настоящего постановления;</text:p>
      <text:p text:style-name="s1">к включенным в объект закупки товарам, работам, услугам, указанным в <text:a xlink:type="simple" xlink:href="#anchor2000">приложении N 2</text:a> к настоящему постановлению, применяются положения настоящего постановления, касающиеся ограничения, указанного в <text:a xlink:type="simple" xlink:href="#anchor1">пункте 1</text:a> настоящего постановления;</text:p>
      <text:p text:style-name="s1"><text:bookmark text:name="anchor4304"/>к включенным в объект закупки товарам, не указанным в <text:a xlink:type="simple" xlink:href="#anchor1000">приложении N 1</text:a> к настоящему постановлению и <text:a xlink:type="simple" xlink:href="#anchor2000">приложении N 2</text:a> к настоящему постановлению, применяются положения настоящего постановления, касающиеся преимущества, указанного в <text:a xlink:type="simple" xlink:href="#anchor1">пункте 1</text:a> настоящего постановления;</text:p>
      <text:p text:style-name="s1"><text:bookmark text:name="anchor4305"/>преимущество, указанное в <text:a xlink:type="simple" xlink:href="#anchor1">пункте 1</text:a> настоящего постановления, предоставляется при условии, указанном в <text:a xlink:type="simple" xlink:href="#anchor422">абзаце втором</text:a> или <text:a xlink:type="simple" xlink:href="#anchor423">третьем подпункта "б"</text:a> настоящего пункта, заявке на участие в закупке, которая содержит предложение о поставке товара (в том числе поставляемого при выполнении закупаемых работ, оказании закупаемых услуг) только российского происхождения, как в отношении включенных в объект закупки (предмет закупки) товаров, не указанных в <text:a xlink:type="simple" xlink:href="#anchor1000">приложении N 1</text:a> к настоящему постановлению и <text:a xlink:type="simple" xlink:href="#anchor2000">приложении N 2</text:a> к настоящему постановлению, так и включенных в объект закупки (предмет закупки) товаров, указанных в таких приложениях;</text:p>
      <text:p text:style-name="s22header">Информация об изменениях:</text:p>
      <text:p text:style-name="s22"><text:bookmark text:name="anchor44"/>Подпункт "г" изменен с 1 января 2026 г. - <text:a xlink:type="simple" xlink:href="http://ivo.garant.ru/document/redirect/413396332/1121">Постановление</text:a> Правительства России от 30 декабря 2025 г. № 2225</text:p>
      <text:p text:style-name="s22"><text:a xlink:type="simple" xlink:href="http://ivo.garant.ru/document/redirect/76849700/44">См. предыдущую редакцию</text:a></text:p>
      <text:p text:style-name="s1">г) при осуществлении закупок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text:a xlink:type="simple" xlink:href="http://ivo.garant.ru/document/redirect/12188083/0">Федеральным законом</text:a> "О закупках товаров, работ, услуг отдельными видами юридических лиц", за исключением закупок у единственного поставщика (подрядчика, исполнителя) и закупок у единственного поставщика (исполнителя, подрядчика) соответственно, не могут быть включены в предмет одного контракта (одного лота), одного договора (одного лота):</text:p>
      <text:p text:style-name="s1">товары, указанные в <text:a xlink:type="simple" xlink:href="#anchor2143">позициях 143</text:a> и <text:a xlink:type="simple" xlink:href="#anchor2144">144</text:a> приложения N 2 к настоящему постановлению, и товары, не указанные в таких позициях;</text:p>
      <text:p text:style-name="s1">товары, указанные в <text:a xlink:type="simple" xlink:href="#anchor2145">позициях 145</text:a>, <text:a xlink:type="simple" xlink:href="#anchor2149">149</text:a> и <text:a xlink:type="simple" xlink:href="#anchor2150">150</text:a> приложения N 2 к настоящему постановлению, и товары, не указанные в таких позициях;</text:p>
      <text:p text:style-name="s1">товары, указанные в <text:a xlink:type="simple" xlink:href="#anchor2146">позициях 146 - 148</text:a>, <text:a xlink:type="simple" xlink:href="#anchor2151">151 - 153</text:a> и <text:a xlink:type="simple" xlink:href="#anchor2162">162</text:a> приложения N 2 к настоящему постановлению, и товары, не указанные в таких позициях;</text:p>
      <text:p text:style-name="s1">товары, указанные в <text:a xlink:type="simple" xlink:href="#anchor2154">позиции 154</text:a> приложения N 2 к настоящему постановлению, и товары, не указанные в такой позиции;</text:p>
      <text:p text:style-name="s1">товары, указанные в <text:a xlink:type="simple" xlink:href="#anchor2155">позициях 155 - 160</text:a> приложения N 2 к настоящему постановлению, и товары, не указанные в таких позициях;</text:p>
      <text:p text:style-name="s1">товары, указанные в <text:a xlink:type="simple" xlink:href="#anchor2161">позиции 161</text:a> приложения N 2 к настоящему постановлению, и товары, не указанные в такой позиции;</text:p>
      <text:p text:style-name="s1">товары, указанные в <text:a xlink:type="simple" xlink:href="#anchor2163">позиции 163</text:a> приложения N 2 к настоящему постановлению, и товары, не указанные в такой позиции;</text:p>
      <text:p text:style-name="s1"><text:bookmark text:name="anchor449"/>товары, указанные в <text:a xlink:type="simple" xlink:href="#anchor1017">позициях 17</text:a>, <text:a xlink:type="simple" xlink:href="#anchor1139">139 - 141</text:a> приложения N 1 к настоящему постановлению, <text:a xlink:type="simple" xlink:href="#anchor2179">179</text:a>, <text:a xlink:type="simple" xlink:href="#anchor2189">189</text:a>, <text:a xlink:type="simple" xlink:href="#anchor2320">320</text:a> (в части дефибрилляторов), <text:a xlink:type="simple" xlink:href="#anchor2362">362 - 432</text:a> приложения N 2 к настоящему постановлению, и товары, не указанные в таких позициях;</text:p>
      <text:p text:style-name="s1">товары, указанные в <text:a xlink:type="simple" xlink:href="#anchor2237">позиции 237</text:a> приложения N 2 к настоящему постановлению, громкоговорители, усилители электрические звуковых частот, установки электрических усилителей звука, соответствующие кодам <text:a xlink:type="simple" xlink:href="http://ivo.garant.ru/document/redirect/70650730/264042110">26.40.42.110</text:a>, <text:a xlink:type="simple" xlink:href="http://ivo.garant.ru/document/redirect/70650730/264043110">26.40.43.110</text:a>, <text:a xlink:type="simple" xlink:href="http://ivo.garant.ru/document/redirect/70650730/264043120">26.40.43.120</text:a> по Общероссийскому классификатору продукции по видам экономической деятельности ОК 034-2014 (КПЕС 2008), из числа товаров, указанных в <text:a xlink:type="simple" xlink:href="#anchor2241">позиции 241</text:a> приложения N 2 к настоящему постановлению, с другими товарами;</text:p>
      <text:p text:style-name="s1"><text:bookmark text:name="anchor4411"/>микрофоны и подставки для них, соответствующие коду <text:a xlink:type="simple" xlink:href="http://ivo.garant.ru/document/redirect/70650730/2640410">26.40.41.000</text:a> по Общероссийскому классификатору продукции по видам экономической деятельности ОК 034-2014 (КПЕС 2008), из числа товаров, указанных в <text:a xlink:type="simple" xlink:href="#anchor2241">позиции 241</text:a> приложения N 2 к настоящему постановлению, с другими товарами;</text:p>
      <text:p text:style-name="s1"><text:bookmark text:name="anchor4412"/>указанные в <text:a xlink:type="simple" xlink:href="#anchor2433">позиции 433</text:a> приложения N 2 к настоящему постановлению лекарственные препараты, включенные в <text:a xlink:type="simple" xlink:href="http://ivo.garant.ru/document/redirect/5756200/1111">перечень</text:a> жизненно необходимых и важнейших лекарственных препаратов для медицинского применения, утвержденный Правительством Российской Федерации в соответствии с <text:a xlink:type="simple" xlink:href="http://ivo.garant.ru/document/redirect/12174909/4006">пунктом 6 статьи 4</text:a> Федерального закона "Об обращении лекарственных средств" (за исключением лекарственных препаратов, включенных в <text:a xlink:type="simple" xlink:href="http://ivo.garant.ru/document/redirect/12177114/1000">перечень</text:a> стратегически значимых лекарственных средств, производство которых должно быть обеспечено на территории Российской Федерации, утвержденный <text:a xlink:type="simple" xlink:href="http://ivo.garant.ru/document/redirect/12177114/0">распоряжением</text:a> Правительства Российской Федерации от 6 июля 2010 г. N 1141-р), и не включенные в такой перечень (есл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text:a xlink:type="simple" xlink:href="http://ivo.garant.ru/document/redirect/12188083/0">Федеральным законом</text:a> "О закупках товаров, работ, услуг отдельными видами юридических лиц" и принятыми в соответствии с ними нормативными правовыми актами допускается включение в предмет одного контракта (одного лота), одного договора (одного лота) лекарственных препаратов с различными международными непатентованными наименованиями или при отсутствии таких наименований с химическими, группировочными наименованиями);</text:p>
      <text:p text:style-name="s1"><text:bookmark text:name="anchor4413"/>указанные в <text:a xlink:type="simple" xlink:href="#anchor2433">позиции 433</text:a> приложения N 2 к настоящему постановлению лекарственные препараты, включенные в <text:a xlink:type="simple" xlink:href="http://ivo.garant.ru/document/redirect/12177114/1000">перечень</text:a> стратегически значимых лекарственных средств, производство которых должно быть обеспечено на территории Российской Федерации, утвержденный <text:a xlink:type="simple" xlink:href="http://ivo.garant.ru/document/redirect/12177114/0">распоряжением</text:a> Правительства Российской Федерации от 6 июля 2010 г. N 1141-р, и не включенные в такой перечень (есл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text:a xlink:type="simple" xlink:href="http://ivo.garant.ru/document/redirect/12188083/0">Федеральным законом</text:a> "О закупках товаров, работ, услуг отдельными видами юридических лиц" и принятыми в соответствии с ними нормативными правовыми актами допускается включение в предмет одного контракта (одного лота), одного договора (одного лота) лекарственных препаратов с различными международными непатентованными наименованиями или при отсутствии таких наименований с химическими, группировочными наименованиями);</text:p>
      <text:p text:style-name="s1"><text:bookmark text:name="anchor45"/>д) позиции приложения N 1 к настоящему постановлению и приложения N 2 к настоящему постановлению применяются, если в объект закупки включены товар, работа, услуга, наименования которых указаны в <text:a xlink:type="simple" xlink:href="#anchor10100">графе</text:a> "Наименование товара, работы, услуги" и которые включены в код, указанный в графе "Код товара, работы, услуги по Общероссийскому классификатору продукции по видам экономической деятельности ОК 034-2014 (КПЕС 2008)", или если в объект закупки включен товар, наименование которого указано в <text:a xlink:type="simple" xlink:href="#anchor20100">графе</text:a> "Наименование товара" и который включен в код, указанный в графе "Код товара по Общероссийскому классификатору продукции по видам экономической деятельности ОК 034-2014 (КПЕС 2008)". При этом если в объект закупки включено медицинское изделие, соответствующая позиция применяется, если закупаемое медицинское изделие также относится к указанному в графе "Наименование товара, работы, услуги" или графе "Наименование товара" коду вида медицинского изделия в соответствии с <text:a xlink:type="simple" xlink:href="http://ivo.garant.ru/document/redirect/70199586/1000">номенклатурной классификацией</text:a> медицинских изделий, утвержденной Министерством здравоохранения Российской Федерации;</text:p>
      <text:p text:style-name="s1"><text:bookmark text:name="anchor46"/>е) позиция приложения N 3 к настоящему постановлению применяется, если в объект закупки включен товар, наименование которого указано в <text:a xlink:type="simple" xlink:href="#anchor30100">графе</text:a> "Наименование товара" и который включен в код, указанный в графе "Код товара по Общероссийскому классификатору продукции по видам экономической деятельности ОК 034-2014 (КПЕС 2008)";</text:p>
      <text:p text:style-name="s22header">Информация об изменениях:</text:p>
      <text:p text:style-name="s22"><text:bookmark text:name="anchor47"/>Подпункт "ж" изменен с 19 июня 2025 г. - <text:a xlink:type="simple" xlink:href="http://ivo.garant.ru/document/redirect/412162530/1531">Постановление</text:a> Правительства России от 10 июня 2025 г. № 879</text:p>
      <text:p text:style-name="s22"><text:a xlink:type="simple" xlink:href="http://ivo.garant.ru/document/redirect/483408352/47">См. предыдущую редакцию</text:a></text:p>
      <text:p text:style-name="s1">ж) запрет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 применяется заказчиком из числа заказчиков, предусмотренных <text:a xlink:type="simple" xlink:href="http://ivo.garant.ru/document/redirect/70353464/2401151">подпунктом "а" пункта 5 части 11 статьи 24</text:a> Федерального закона "О контрактной системе в сфере закупок товаров, работ, услуг для обеспечения государственных и муниципальных нужд", также при осуществлении в соответствии с Федеральным законом "О контрактной системе в сфере закупок товаров, работ, услуг для обеспечения государственных и муниципальных нужд" закупок товаров, работ, услуг, не указанных в <text:a xlink:type="simple" xlink:href="#anchor112">абзаце втором пункта 1</text:a> настоящего постановления;</text:p>
      <text:p text:style-name="s1"><text:bookmark text:name="anchor48"/>з) предусмотренные <text:a xlink:type="simple" xlink:href="#anchor1">пунктом 1</text:a> настоящего постановления запрет, ограничение, преимущество распространяются также на товары, являющиеся предметом финансовой аренды (лизинга);</text:p>
      <text:p text:style-name="s22header">Информация об изменениях:</text:p>
      <text:p text:style-name="s22"><text:bookmark text:name="anchor49"/>Подпункт "и" изменен с 1 сентября 2025 г. - <text:a xlink:type="simple" xlink:href="http://ivo.garant.ru/document/redirect/412615083/1001">Постановление</text:a> Правительства России от 29 августа 2025 г. № 1326</text:p>
      <text:p text:style-name="s22"><text:a xlink:type="simple" xlink:href="http://ivo.garant.ru/document/redirect/76849699/49">См. предыдущую редакцию</text:a></text:p>
      <text:p text:style-name="s1">и) предусмотренные <text:a xlink:type="simple" xlink:href="#anchor112">абзацем вторым пункта 1</text:a> настоящего постановления и <text:a xlink:type="simple" xlink:href="#anchor47">подпунктом "ж"</text:a> настоящего пункта запреты, а также предусмотренные <text:a xlink:type="simple" xlink:href="#anchor113">абзацами третьим</text:a> и <text:a xlink:type="simple" xlink:href="#anchor114">четвертым пункта 1</text:a> настоящего постановления ограничение и преимущество не применяются при осуществлении:</text:p>
      <text:p text:style-name="s1"><text:bookmark text:name="anchor492"/>закупки товара (в том числе поставляемого при выполнении закупаемых работ, оказании закупаемых услуг) в целях исполнения контракта (договора), содержащего условие о поставке или использовании такого товара и заключенного с лицом, которое не является заказчиком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и <text:a xlink:type="simple" xlink:href="http://ivo.garant.ru/document/redirect/12188083/0">Федеральным законом</text:a> "О закупках товаров, работ, услуг отдельными видами юридических лиц", либо заключенного с лицом, которое относится к числу таких заказчиков и при осуществлении закупки которым не применены в случаях, предусмотренных указанными федеральными законами и настоящим постановлением, такие запрет, ограничение или преимущество, либо заключенного до 1 января 2025 г. с лицом, которое относится к числу таких заказчиков;</text:p>
      <text:p text:style-name="s1"><text:bookmark text:name="anchor493"/>закупки товара (в том числе поставляемого при выполнении закупаемых работ, оказании закупаемых услуг) в целях изготовления, ремонта, модернизации, технического и сервисного обслуживания вооружения, военной и специальной техники (их составных частей), изготавливаемых по нормативно-технической документации (или указанных в такой документации), утвержденной (согласованной) в установленном порядке (государственным заказчиком государственного оборонного заказа либо военным представительством Министерства обороны Российской Федерации или иного государственного заказчика, уполномоченным осуществлять деятельность в организации, осуществляющей закупку такого товара) и (или) передаваемой заказчику, осуществляющему закупку такого товара, государственным заказчиком государственного оборонного заказа, головным исполнителем поставок продукции по государственному оборонному заказу, исполнителем, участвующим в поставках продукции по государственному оборонному заказу (в том числе для целей выполнения закупаемых работ, оказания закупаемых услуг);</text:p>
      <text:p text:style-name="s1"><text:bookmark text:name="anchor494"/>для служебного пользования;</text:p>
      <text:p text:style-name="s1"><text:bookmark text:name="anchor495"/>для служебного пользования;</text:p>
      <text:p text:style-name="s1"><text:bookmark text:name="anchor496"/>закупки товара (в том числе поставляемого при выполнении закупаемых работ, оказании закупаемых услуг), не относящегося к товарам, указанным в <text:a xlink:type="simple" xlink:href="#anchor1001">позициях 1 - 3</text:a>, <text:a xlink:type="simple" xlink:href="#anchor1005">5</text:a>, <text:a xlink:type="simple" xlink:href="#anchor1007">7</text:a>, <text:a xlink:type="simple" xlink:href="#anchor10010">10</text:a>, <text:a xlink:type="simple" xlink:href="#anchor1013">13</text:a>, <text:a xlink:type="simple" xlink:href="#anchor1016">16 - 17</text:a>, <text:a xlink:type="simple" xlink:href="#anchor1137">137</text:a>, <text:a xlink:type="simple" xlink:href="#anchor1140">140 - 141</text:a> и <text:a xlink:type="simple" xlink:href="#anchor1144">144</text:a> приложения № 1 к настоящему постановлению, <text:a xlink:type="simple" xlink:href="#anchor2172">позициях 172 - 179</text:a>, <text:a xlink:type="simple" xlink:href="#anchor2189">189</text:a>, <text:a xlink:type="simple" xlink:href="#anchor2362">362 - 378</text:a>, <text:a xlink:type="simple" xlink:href="#anchor2383">383 - 388</text:a>, <text:a xlink:type="simple" xlink:href="#anchor2390">390 - 415</text:a>, <text:a xlink:type="simple" xlink:href="#anchor2429">429 - 433</text:a> приложения № 2 к настоящему постановлению, в целях исполнения заказчиком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и <text:a xlink:type="simple" xlink:href="http://ivo.garant.ru/document/redirect/12188083/0">Федеральным законом</text:a> "О закупках товаров, работ, услуг отдельными видами юридических лиц" обязательств, предусмотренных специальным инвестиционным контрактом, стороной которого является такой заказчик;</text:p>
      <text:p text:style-name="s1"><text:bookmark text:name="anchor497"/>закупки товара, поставляемого при выполнении закупаемых работ, оказании закупаемых услуг по изготовлению такого товара по индивидуальному заказу заказчика, осуществляющего закупку;</text:p>
      <text:p text:style-name="s1"><text:bookmark text:name="anchor498"/>закупки, при которой заключается контракт (договор) со встречными инвестиционными обязательствами, предусматривающий поставку товара, произведенного исключительно на создаваемом, модернизируемом, осваиваемом в соответствии с таким контрактом (договором) производстве;</text:p>
      <text:p text:style-name="s1"><text:bookmark text:name="anchor499"/>закупки товара, осуществляемой за пределами Российской Федерации у иностранного лица для обеспечения деятельности заказчика за пределами Российской Федерации, права владения, пользования и распоряжения которым будут реализовываться таким заказчиком за пределами Российской Федерации;</text:p>
      <text:p text:style-name="s1"><text:bookmark text:name="anchor410"/>к) предусмотренные <text:a xlink:type="simple" xlink:href="#anchor1">пунктом 1</text:a> настоящего постановления запрет, ограничение, преимущество не применяются при осуществлении в соответствии с <text:a xlink:type="simple" xlink:href="http://ivo.garant.ru/document/redirect/12188083/0">Федеральным законом</text:a> "О закупках товаров, работ, услуг отдельными видами юридических лиц" заказчиками, являющимися аптечными организациями, закупок лекарственных препаратов и медицинских изделий в целях розничной торговли такими лекарственными препаратами и медицинскими изделиями;</text:p>
      <text:p text:style-name="s1"><text:bookmark text:name="anchor411"/>л) минимальная обязательная доля, предусмотренная <text:a xlink:type="simple" xlink:href="#anchor2">пунктом 2</text:a> настоящего постановления:</text:p>
      <text:p text:style-name="s1"><text:bookmark text:name="anchor4112"/>применяется при осуществлении в соответствии с Федеральным законом "О закупках товаров, работ, услуг отдельными видами юридических лиц" закупок отдельными заказчиками, являющимися хозяйственными обществами, указанными в <text:a xlink:type="simple" xlink:href="http://ivo.garant.ru/document/redirect/12188083/121">пунктах 1 - 3 части 2 статьи 1</text:a> Федерального закона "О закупках товаров, работ, услуг отдельными видами юридических лиц", за исключением хозяйственных обществ, включенных в сводный реестр организаций оборонно-промышленного комплекса, предусмотренный <text:a xlink:type="simple" xlink:href="http://ivo.garant.ru/document/redirect/186770/1000">постановлением</text:a> Правительства Российской Федерации от 20 февраля 2004 г. N 96 "О сводном реестре организаций оборонно-промышленного комплекса", а также хозяйственных обществ, являющихся субъектами естественных монополий или организациями, осуществляющими регулируемые виды деятельности в сфере электроснабжения, газоснабжения, теплоснабжения, водоснабжения, водоотведения, очистки сточных вод, обращения с твердыми коммунальными отходами;</text:p>
      <text:p text:style-name="s1"><text:bookmark text:name="anchor4113"/>не применяется при осуществлении в соответствии с Федеральным законом "О закупках товаров, работ, услуг отдельными видами юридических лиц" закупок заказчиками, не относящимися к хозяйственным обществам, указанным в <text:a xlink:type="simple" xlink:href="http://ivo.garant.ru/document/redirect/12188083/121">пунктах 1 - 3 части 2 статьи 1</text:a> Федерального закона "О закупках товаров, работ, услуг отдельными видами юридических лиц", а также заказчиками, являющимися хозяйственными обществами, включенными в сводный реестр организаций оборонно-промышленного комплекса, предусмотренный <text:a xlink:type="simple" xlink:href="http://ivo.garant.ru/document/redirect/186770/1000">постановлением</text:a> Правительства Российской Федерации от 20 февраля 2004 г. N 96 "О сводном реестре организаций оборонно-промышленного комплекса", или хозяйственными обществами, являющимися субъектами естественных монополий или организациями, осуществляющими регулируемые виды деятельности в сфере электроснабжения, газоснабжения, теплоснабжения, водоснабжения, водоотведения, очистки сточных вод, обращения с твердыми коммунальными отходами;</text:p>
      <text:p text:style-name="s22header">Информация об изменениях:</text:p>
      <text:p text:style-name="s22"><text:bookmark text:name="anchor412"/>Подпункт "м" изменен с 19 июня 2025 г. - <text:a xlink:type="simple" xlink:href="http://ivo.garant.ru/document/redirect/412162530/1533">Постановление</text:a> Правительства России от 10 июня 2025 г. № 879</text:p>
      <text:p text:style-name="s22"><text:a xlink:type="simple" xlink:href="http://ivo.garant.ru/document/redirect/483408352/412">См. предыдущую редакцию</text:a></text:p>
      <text:p text:style-name="s1">м) предусмотренные <text:a xlink:type="simple" xlink:href="#anchor1">пунктом 1</text:a> настоящего постановления запрет, ограничение, преимущество не распространяются на закупки, осуществляемые в соответствии с <text:a xlink:type="simple" xlink:href="http://ivo.garant.ru/document/redirect/12188083/0">Федеральным законом</text:a> "О закупках товаров, работ, услуг отдельными видами юридических лиц" отдельными заказчиками, указанными в <text:a xlink:type="simple" xlink:href="#anchor4112">абзаце втором подпункта "л"</text:a> настоящего пункта, за исключением закупок товаров, работ, услуг, осуществляемых:</text:p>
      <text:p text:style-name="s1"><text:bookmark text:name="anchor4122"/>в рамках государственного оборонного заказа;</text:p>
      <text:p text:style-name="s1">для функционирования критической информационной инфраструктуры Российской Федерации;</text:p>
      <text:p text:style-name="s1">в сфере использования атомной энергии;</text:p>
      <text:p text:style-name="s1">для реализации проекта технологического суверенитета, включенного в реестр проектов технологического суверенитета и проектов структурной адаптации экономики Российской Федерации в соответствии с <text:a xlink:type="simple" xlink:href="http://ivo.garant.ru/document/redirect/406741957/2000">Положением</text:a> об условиях отнесения проектов к проектам технологического суверенитета и проектам структурной адаптации экономики Российской Федерации, о представлении сведений о проектах технологического суверенитета и проектах структурной адаптации экономики Российской Федерации и ведении реестра указанных проектов, а также о требованиях к организациям, уполномоченным представлять заключения о соответствии проектов требованиям к проектам технологического суверенитета и проектам структурной адаптации экономики Российской Федерации, утвержденным <text:a xlink:type="simple" xlink:href="http://ivo.garant.ru/document/redirect/406741957/0">постановлением</text:a> Правительства Российской Федерации от 15 апреля 2023 г. N 603 "Об утверждении приоритетных направлений проектов технологического суверенитета и проектов структурной адаптации экономики Российской Федерации и Положения об условиях отнесения проектов к проектам технологического суверенитета и проектам структурной адаптации экономики Российской Федерации, о представлении сведений о проектах технологического суверенитета и проектах структурной адаптации экономики Российской Федерации и ведении реестра указанных проектов, а также о требованиях к организациям, уполномоченным представлять заключения о соответствии проектов требованиям к проектам технологического суверенитета и проектам структурной адаптации экономики Российской Федерации";</text:p>
      <text:p text:style-name="s1"><text:bookmark text:name="anchor413"/>н) предусмотренный <text:a xlink:type="simple" xlink:href="#anchor1">пунктом 1</text:a> настоящего постановления запрет закупок товаров, указанных в <text:a xlink:type="simple" xlink:href="#anchor1027">позиции 27</text:a> приложения N 1 к настоящему постановлению, также применяется, если такие товары включены в состав закупаемых товаров, указанных в <text:a xlink:type="simple" xlink:href="#anchor1063">позициях 63 - 67</text:a> приложения N 1 к настоящему постановлению;</text:p>
      <text:p text:style-name="s1"><text:bookmark text:name="anchor414"/>о) предусмотренный <text:a xlink:type="simple" xlink:href="#anchor1">пунктом 1</text:a> настоящего постановления запрет закупок программного обеспечения, указанного в <text:a xlink:type="simple" xlink:href="#anchor1146">позиции 146</text:a> приложения N 1 к настоящему постановлению:</text:p>
      <text:p text:style-name="s1">также применяется, если такое программное обеспечение включено в состав объекта закупки наряду с иными товарами, работами, услугами;</text:p>
      <text:p text:style-name="s1"><text:bookmark text:name="anchor4143"/>применяется в отношении программного обеспечения, реализуемого, независимо от вида договора, на материальном носителе и (или) в электронном виде по каналам связи, а также исключительных прав на программное обеспечение и прав использования программного обеспечения;</text:p>
      <text:p text:style-name="s1">не применяется при осуществлении закупок программного обеспечения, сведения о котором и (или) о закупке которого составляют государственную тайну;</text:p>
      <text:p text:style-name="s1"><text:bookmark text:name="anchor415"/>п) предусмотренное <text:a xlink:type="simple" xlink:href="#anchor1">пунктом 1</text:a> настоящего постановления ограничение закупок товаров, указанных в <text:a xlink:type="simple" xlink:href="#anchor2362">позициях 362 - 432</text:a> приложения N 2 к настоящему постановлению, применяется при осуществлении закупок товаров, являющихся медицинскими изделиями;</text:p>
      <text:p text:style-name="s22header">Информация об изменениях:</text:p>
      <text:p text:style-name="s22"><text:bookmark text:name="anchor416"/>Подпункт "р" изменен с 1 января 2026 г. - <text:a xlink:type="simple" xlink:href="http://ivo.garant.ru/document/redirect/413396332/1121">Постановление</text:a> Правительства России от 30 декабря 2025 г. № 2225</text:p>
      <text:p text:style-name="s22"><text:a xlink:type="simple" xlink:href="http://ivo.garant.ru/document/redirect/76849700/416">См. предыдущую редакцию</text:a></text:p>
      <text:p text:style-name="s1">р) предусмотренное <text:a xlink:type="simple" xlink:href="#anchor1">пунктом 1</text:a> настоящего постановления ограничение в отношении лекарственных препаратов, указанных в <text:a xlink:type="simple" xlink:href="#anchor2433">позиции 433</text:a> приложения № 2 к настоящему постановлению, применяется при осуществлении закупок лекарственных препаратов, включенных в <text:a xlink:type="simple" xlink:href="http://ivo.garant.ru/document/redirect/5756200/1111">перечень</text:a> жизненно необходимых и важнейших лекарственных препаратов для медицинского применения, утвержденный Правительством Российской Федерации в соответствии с <text:a xlink:type="simple" xlink:href="http://ivo.garant.ru/document/redirect/12174909/4006">пунктом 6 статьи 4</text:a> Федерального закона "Об обращении лекарственных средств";</text:p>
      <text:p text:style-name="s22header">Информация об изменениях:</text:p>
      <text:p text:style-name="s22"><text:bookmark text:name="anchor417"/>Подпункт "с" изменен с 19 июня 2025 г. - <text:a xlink:type="simple" xlink:href="http://ivo.garant.ru/document/redirect/412162530/1535">Постановление</text:a> Правительства России от 10 июня 2025 г. № 879</text:p>
      <text:p text:style-name="s22"><text:a xlink:type="simple" xlink:href="http://ivo.garant.ru/document/redirect/483408352/417">См. предыдущую редакцию</text:a></text:p>
      <text:p text:style-name="s1">с) для целей настоящего постановления под программным обеспечением, указанным в <text:a xlink:type="simple" xlink:href="#anchor1146">позиции 146</text:a> приложения N 1 к настоящему постановлению, понимается программное обеспечение и (или) права на него возникшие вследствие:</text:p>
      <text:p text:style-name="s1"><text:bookmark text:name="anchor4172"/>поставки на материальном носителе и (или) в электронном виде по каналам связи, а также предоставления в пользование программного обеспечения посредством использования каналов связи и внешней информационно-технологической и программно-аппаратной инфраструктуры, обеспечивающей сбор, обработку и хранение данных (услуги облачных вычислений);</text:p>
      <text:p text:style-name="s1"><text:bookmark text:name="anchor4173"/>поставки, технического обслуживания персональных электронных вычислительных машин, устройств терминального доступа, серверного оборудования и иных средств вычислительной техники, на которых программное обеспечение подлежит установке в результате исполнения контракта (договора);</text:p>
      <text:p text:style-name="s1"><text:bookmark text:name="anchor4174"/>выполнения работ, оказания услуг, связанных с разработкой, модификацией, модернизацией программного обеспечения, в том числе в составе существующих автоматизированных систем, если такие работы или услуги сопряжены с предоставлением заказчику прав на использование программного обеспечения или расширением ранее предоставленного объема прав;</text:p>
      <text:p text:style-name="s1"><text:bookmark text:name="anchor4175"/>оказания услуг, связанных с сопровождением, технической поддержкой, обновлением программного обеспечения, в том числе в составе существующих автоматизированных систем, если такие услуги сопряжены с предоставлением заказчику прав на использование программного обеспечения или расширением ранее предоставленного объема прав;</text:p>
      <text:p text:style-name="s1"><text:bookmark text:name="anchor418"/>т) при осуществлени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text:a xlink:type="simple" xlink:href="http://ivo.garant.ru/document/redirect/12188083/0">Федеральным законом</text:a> "О закупках товаров, работ, услуг отдельными видами юридических лиц" закупок товаров, указанных в <text:a xlink:type="simple" xlink:href="#anchor2195">позициях 195</text:a>, <text:a xlink:type="simple" xlink:href="#anchor2197">197 - 199</text:a> и <text:a xlink:type="simple" xlink:href="#anchor2203">203</text:a> приложения N 2 к настоящему постановлению, заявка на участие в закупке, в которой содержится предложение о поставке товара российского происхождения, являющегося радиоэлектронной продукцией, не признанной в соответствии с <text:a xlink:type="simple" xlink:href="http://ivo.garant.ru/document/redirect/71139412/0">постановлением</text:a> Правительства Российской Федерации от 17 июля 2015 г. N 719 "О подтверждении производства российской промышленной продукции" радиоэлектронной продукцией первого уровня, приравнивается к заявке на участие в закупке, в которой содержится предложение о поставке товара, происходящего из иностранного государства, если на участие в такой закупке подана заявка на участие в закупке, признанная по результатам ее рассмотрения соответствующей установленным в соответствии с Федеральным законом "О контрактной системе в сфере закупок товаров, работ, услуг для обеспечения государственных и муниципальных нужд", Федеральным законом "О закупках товаров, работ, услуг отдельными видами юридических лиц" соответственно требованиям и содержащая предложение о поставке товара российского происхождения, являющегося радиоэлектронной продукцией, признанной в соответствии с постановлением Правительства Российской Федерации от 17 июля 2015 г. N 719 "О подтверждении производства российской промышленной продукции" радиоэлектронной продукцией первого уровня;</text:p>
      <text:p text:style-name="s22header">Информация об изменениях:</text:p>
      <text:p text:style-name="s22"><text:bookmark text:name="anchor419"/>Подпункт "у" изменен с 1 января 2026 г. - <text:a xlink:type="simple" xlink:href="http://ivo.garant.ru/document/redirect/413396332/1121">Постановление</text:a> Правительства России от 30 декабря 2025 г. № 2225</text:p>
      <text:p text:style-name="s22"><text:a xlink:type="simple" xlink:href="http://ivo.garant.ru/document/redirect/76849700/419">См. предыдущую редакцию</text:a></text:p>
      <text:p text:style-name="s1">у) в случае осуществления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text:a xlink:type="simple" xlink:href="http://ivo.garant.ru/document/redirect/12188083/0">Федеральным законом</text:a> "О закупках товаров, работ, услуг отдельными видами юридических лиц" закупки указанных в <text:a xlink:type="simple" xlink:href="#anchor2433">позиции 433</text:a> приложения N 2 к настоящему постановлению лекарственных препаратов, включенных в <text:a xlink:type="simple" xlink:href="http://ivo.garant.ru/document/redirect/5756200/1111">перечень</text:a> жизненно необходимых и важнейших лекарственных препаратов для медицинского применения, утвержденный Правительством Российской Федерации в соответствии с <text:a xlink:type="simple" xlink:href="http://ivo.garant.ru/document/redirect/12174909/4006">пунктом 6 статьи 4</text:a> Федерального закона "Об обращении лекарственных средств", и не включенных в <text:a xlink:type="simple" xlink:href="http://ivo.garant.ru/document/redirect/12177114/1000">перечень</text:a> стратегически значимых лекарственных средств, производство которых должно быть обеспечено на территории Российской Федерации, утвержденный <text:a xlink:type="simple" xlink:href="http://ivo.garant.ru/document/redirect/12177114/0">распоряжением</text:a> Правительства Российской Федерации от 6 июля 2010 г. N 1141-р, в отношении заявки, содержащей предложение о поставке таких лекарственных препаратов только российского происхождения, помимо предусмотренного <text:a xlink:type="simple" xlink:href="#anchor1">пунктом 1</text:a> настоящего постановления ограничения, также применяется предусмотренное пунктом 1 настоящего постановления преимущество, при котором для цели такого преимущества заявка на участие в закупке, в которой содержится предложение о поставке такого лекарственного препарата, происходящего из государств - членов Евразийского экономического союза, в том числе из Российской Федерации, но не все стадии производства которого (в том числе синтез молекулы действующего вещества при производстве фармацевтических субстанций) осуществляются на территориях государств - членов Евразийского экономического союза, приравнивается к заявке на участие в закупке, в которой содержится предложение о поставке товара, происходящего из иностранного государства, если на участие в такой закупке подана заявка на участие в закупке, признанная по результатам ее рассмотрения соответствующей установленным в соответствии с Федеральным законом "О контрактной системе в сфере закупок товаров, работ, услуг для обеспечения государственных и муниципальных нужд", Федеральным законом "О закупках товаров, работ, услуг отдельными видами юридических лиц" соответственно требованиям и содержащая предложение о поставке лекарственного препарата, все стадии производства которого (в том числе синтез молекулы действующего вещества при производстве фармацевтических субстанций) осуществляются на территориях государств - членов Евразийского экономического союза;</text:p>
      <text:p text:style-name="s9header">ГАРАНТ:</text:p>
      <text:p text:style-name="s9"><text:bookmark text:name="anchor420"/>Подпункт "ф" <text:a xlink:type="simple" xlink:href="#anchor12">вступает в силу</text:a> с 1 июля 2026 г.</text:p>
      <text:p text:style-name="s9"> </text:p>
      <text:p text:style-name="s9">Положения подпункта "ф" в части, касающейся лекарственных препаратов, включенных в <text:a xlink:type="simple" xlink:href="http://ivo.garant.ru/document/redirect/12177114/1000">перечень</text:a> стратегически значимых лекарственных средств, производство которых должно быть обеспечено на территории Российской Федерации, утвержденный <text:a xlink:type="simple" xlink:href="http://ivo.garant.ru/document/redirect/12177114/0">распоряжением</text:a> Правительства Российской Федерации от 6 июля 2010 г. N 1141-р, после 1 января 2025 г. <text:a xlink:type="simple" xlink:href="#anchor107">применяются</text:a> при осуществлении закупок,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с 1 сентября 2-го года после года включения лекарственного препарата, являющегося объектом закупки (предметом закупки), в указанный перечень</text:p>
      <text:p text:style-name="s25_fi698">ф) при осуществлени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text:a xlink:type="simple" xlink:href="http://ivo.garant.ru/document/redirect/12188083/0">Федеральным законом</text:a> "О закупках товаров, работ, услуг отдельными видами юридических лиц" закупки указанных в <text:a xlink:type="simple" xlink:href="#anchor2433">позиции 433</text:a> приложения N 2 к настоящему постановлению лекарственных препаратов, включенных в <text:a xlink:type="simple" xlink:href="http://ivo.garant.ru/document/redirect/12177114/1000">перечень</text:a> стратегически значимых лекарственных средств, производство которых должно быть обеспечено на территории Российской Федерации, утвержденный <text:a xlink:type="simple" xlink:href="http://ivo.garant.ru/document/redirect/12177114/0">распоряжением</text:a> Правительства Российской Федерации от 6 июля 2010 г. N 1141-р, заявка на участие в закупке, в которой содержится предложение о поставке такого лекарственного препарата, происходящего из государств - членов Евразийского экономического союза, в том числе из Российской Федерации, но не все стадии производства которого (в том числе синтез молекулы действующего вещества при производстве фармацевтических субстанций) осуществляются на территориях государств - членов Евразийского экономического союза, приравнивается к заявке на участие в закупке, в которой содержится предложение о поставке товара, происходящего из иностранного государства, если на участие в такой закупке подана заявка на участие в закупке, признанная по результатам ее рассмотрения соответствующей установленным в соответствии с Федеральным законом "О контрактной системе в сфере закупок товаров, работ, услуг для обеспечения государственных и муниципальных нужд", Федеральным законом "О закупках товаров, работ, услуг отдельными видами юридических лиц" соответственно требованиям и содержащая предложение о поставке лекарственного препарата, все стадии производства которого (в том числе синтез молекулы действующего вещества при производстве фармацевтических субстанций) осуществляются на территориях государств - членов Евразийского экономического союза;</text:p>
      <text:p text:style-name="s22header">Информация об изменениях:</text:p>
      <text:p text:style-name="s22"><text:bookmark text:name="anchor421"/>Подпункт "х" изменен с 1 марта 2026 г. - <text:a xlink:type="simple" xlink:href="http://ivo.garant.ru/document/redirect/413219605/10032">Постановление</text:a> Правительства России от 28 ноября 2025 г. № 1937</text:p>
      <text:p text:style-name="s22">Изменения не распространяются на закупки товаров, работ и услуг для обеспечения государственных и муниципальных нужд, извещения об осуществлении которых размещены в ЕИС в сфере закупок до 1 марта 2026 г. либо приглашения принять участие в которых направлены до 1 марта 2026 г.</text:p>
      <text:p text:style-name="s22"><text:a xlink:type="simple" xlink:href="http://ivo.garant.ru/document/redirect/483413627/421">См. предыдущую редакцию</text:a></text:p>
      <text:p text:style-name="s1">х) при осуществлени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text:a xlink:type="simple" xlink:href="http://ivo.garant.ru/document/redirect/12188083/0">Федеральным законом</text:a> "О закупках товаров, работ, услуг отдельными видами юридических лиц" закупки программного обеспечения, указанного в <text:a xlink:type="simple" xlink:href="#anchor1146">позиции 146</text:a> приложения № 1 к настоящему постановлению, заявка на участие в закупке, в которой содержится предложение программного обеспечения, реестровая запись о котором в <text:a xlink:type="simple" xlink:href="https://reestr.digital.gov.ru/">реестре</text:a> российского программного обеспечения или <text:a xlink:type="simple" xlink:href="https://eac-reestr.digital.gov.ru">реестре</text:a> евразийского программного обеспечения не содержит информацию о соответствии предлагаемого программного обеспечения требованиям к доверенному программному обеспечению, приравнивается к заявке на участие в закупке, в которой содержится предложение программного обеспечения, происходящего из иностранного государства, если на участие в такой закупке подана заявка на участие в закупке, признанная по результатам ее рассмотрения соответствующей установленным в соответствии с Федеральным законом "О контрактной системе в сфере закупок товаров, работ, услуг для обеспечения государственных и муниципальных нужд", Федеральным законом "О закупках товаров, работ, услуг отдельными видами юридических лиц" соответственно требованиям и содержащая предложение о программном обеспечении, реестровая запись о котором в реестре российского программного обеспечения или реестре евразийского программного обеспечения содержит информацию о соответствии предлагаемого программного обеспечения требованиям к доверенному программному обеспечению;</text:p>
      <text:p text:style-name="s22header">Информация об изменениях:</text:p>
      <text:p text:style-name="s22"><text:bookmark text:name="anchor4022"/>Подпункт "ц" изменен с 1 января 2026 г. - <text:a xlink:type="simple" xlink:href="http://ivo.garant.ru/document/redirect/413396332/1122">Постановление</text:a> Правительства России от 30 декабря 2025 г. № 2225</text:p>
      <text:p text:style-name="s22"><text:a xlink:type="simple" xlink:href="http://ivo.garant.ru/document/redirect/76849700/4022">См. предыдущую редакцию</text:a></text:p>
      <text:p text:style-name="s1">ц) если при осуществлени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закупки товаров, указанных в <text:a xlink:type="simple" xlink:href="#anchor2001">позициях 1 - 433</text:a> приложения № 2 к настоящему постановлению, заказчиком в соответствии с <text:a xlink:type="simple" xlink:href="#anchor713">абзацем четвертым подпункта "а" пункта 7</text:a> настоящего постановления задекларировано отсутствие в реестре российской промышленной продукции такого товара с характеристиками, соответствующими потребности заказчика, а на участие в закупке подана заявка на участие в закупке, признанная по результатам ее рассмотрения соответствующей установленным в соответствии с Федеральным законом "О контрактной системе в сфере закупок товаров, работ, услуг для обеспечения государственных и муниципальных нужд" требованиям и содержащая предложение о поставке такого товара, включенного в реестр российской промышленной продукции или евразийский реестр промышленных товаров, и предусмотренный <text:a xlink:type="simple" xlink:href="#anchor31">подпунктом "а"</text:a> или <text:a xlink:type="simple" xlink:href="#anchor32">"б" пункта 3</text:a> настоящего постановления номер реестровой записи, то заявка на участие в закупке, содержащая предусмотренное <text:a xlink:type="simple" xlink:href="#anchor383">абзацем третьим подпункта "з" пункта 3</text:a> настоящего постановления указание наименования страны происхождения товара, приравнивается к заявке на участие в закупке, в которой содержится предложение о поставке товара, происходящего из иностранного государства;</text:p>
      <text:p text:style-name="s22header">Информация об изменениях:</text:p>
      <text:p text:style-name="s22"><text:bookmark text:name="anchor4023"/>Пункт 4 дополнен подпунктом "ч" с 19 июня 2025 г. - <text:a xlink:type="simple" xlink:href="http://ivo.garant.ru/document/redirect/412162530/1537">Постановление</text:a> Правительства России от 10 июня 2025 г. № 879</text:p>
      <text:p text:style-name="s1">ч) для целей настоящего постановления под закупками в рамках государственного оборонного заказа понимаются закупки товаров (в том числе товаров, поставляемых при выполнении закупаемых работ, оказании закупаемых услуг), работ, услуг, осуществляемые:</text:p>
      <text:p text:style-name="s1"><text:bookmark text:name="anchor40232"/>государственным заказчиком государственного оборонного заказа при размещении государственного оборонного заказа (в том числе для выполнения мероприятий государственных программ Российской Федерации, государственной программы вооружения, иных мероприятий в рамках государственного оборонного заказа);</text:p>
      <text:p text:style-name="s1"><text:bookmark text:name="anchor40233"/>головным исполнителем поставок продукции по государственному оборонному заказу, исполнителем, участвующим в поставках продукции по государственному оборонному заказу, при выполнении государственного оборонного заказа, для формирования запаса продукции, сырья, материалов, полуфабрикатов, комплектующих изделий, предусмотренного <text:a xlink:type="simple" xlink:href="http://ivo.garant.ru/document/redirect/70291366/713">пунктами 3 - 3<text:span text:style-name="upper"><text:span> 2</text:span></text:span> статьи 7<text:span text:style-name="upper"><text:span> 1</text:span></text:span></text:a> Федерального закона "О государственном оборонном заказе";</text:p>
      <text:p text:style-name="s22header">Информация об изменениях:</text:p>
      <text:p text:style-name="s22"><text:bookmark text:name="anchor4024"/>Пункт 4 дополнен подпунктом "ш" с 11 октября 2025 г. - <text:a xlink:type="simple" xlink:href="http://ivo.garant.ru/document/redirect/412797209/1">Постановление</text:a> Правительства России от 27 сентября 2025 г. № 1478</text:p>
      <text:p text:style-name="s1">ш) для целей настоящего постановления к услугам, указанным в <text:a xlink:type="simple" xlink:href="#anchor1147">позициях 147 - 151</text:a> приложения № 1 к настоящему постановлению и оказываемым иностранными лицами, также относятся услуги, оказываемые российскими юридическими лицами, имеющими иностранных лиц, за исключением иностранных лиц, зарегистрированных на территории государства - члена Евразийского экономического союза, в составе участников (членов) корпоративного юридического лица, в составе учредителей унитарного юридического лица, в числе лиц, владеющих напрямую или косвенно (через юридическое лицо или через несколько юридических лиц) более чем 10 процентами голосующих акций хозяйственного общества либо долей, превышающей 10 процентов в уставном (складочном) капитале хозяйственного товарищества или общества.</text:p>
      <text:p text:style-name="s1"><text:bookmark text:name="anchor5"/>5. Запрет, предусмотренный <text:a xlink:type="simple" xlink:href="#anchor1">пунктом 1</text:a>, <text:a xlink:type="simple" xlink:href="#anchor47">подпунктом "ж" пункта 4</text:a> настоящего постановления, может не применяться заказчиками при наступлении одного из следующих случаев:</text:p>
      <text:p text:style-name="s1"><text:bookmark text:name="anchor51"/>а) отсутствие на территории Российской Федерации производства товара, являющегося объектом закупки (предметом закупки) и указанного в <text:a xlink:type="simple" xlink:href="#anchor1001">позициях 1 - 145</text:a> приложения N 1 к настоящему постановлению, которое подтверждается разрешением на закупку происходящего из иностранного государства товара, являющегося промышленной продукцией, которое выдается в <text:a xlink:type="simple" xlink:href="http://ivo.garant.ru/document/redirect/411382407/1000">порядке</text:a>, установленном Министерством промышленности и торговли Российской Федерации, заказчику до начала осуществления закупки по его обращению, содержащему в том числе указание на характеристики такого товара, потребность в котором имеется у заказчика. При этом в случае осуществления закупк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характеристики указываются в соответствии с каталогом товаров, работ, услуг для обеспечения государственных и муниципальных нужд (включая при необходимости дополнительные потребительские свойства, в том числе функциональные, технические, качественные, эксплуатационные характеристики товара, работы, услуги, за исключением случаев, предусмотренных <text:a xlink:type="simple" xlink:href="http://ivo.garant.ru/document/redirect/71606930/2005">пунктом 5</text:a> Правил использования каталога товаров, работ, услуг для обеспечения государственных и муниципальных нужд, утвержденных <text:a xlink:type="simple" xlink:href="http://ivo.garant.ru/document/redirect/71606930/0">постановлением</text:a> Правительства Российской Федерации от 8 февраля 2017 г. N 145 "Об утверждении Правил формирования и ведения в единой информационной системе в сфере закупок каталога товаров, работ, услуг для обеспечения государственных и муниципальных нужд и Правил использования каталога товаров, работ, услуг для обеспечения государственных и муниципальных нужд"), за исключением случаев отсутствия в таком каталоге позиции, соответствующей потребностям заказчика, или отсутствия характеристик товара в позиции каталога, при которых характеристики товара, потребность в котором имеется у заказчика, указываются в обращении в соответствии с положениями <text:a xlink:type="simple" xlink:href="http://ivo.garant.ru/document/redirect/70353464/33">статьи 33</text:a> Федерального закона "О контрактной системе в сфере закупок товаров, работ, услуг для обеспечения государственных и муниципальных нужд";</text:p>
      <text:p text:style-name="s22header">Информация об изменениях:</text:p>
      <text:p text:style-name="s22"><text:bookmark text:name="anchor52"/>Подпункт "б" изменен с 19 июня 2025 г. - <text:a xlink:type="simple" xlink:href="http://ivo.garant.ru/document/redirect/412162530/1541">Постановление</text:a> Правительства России от 10 июня 2025 г. № 879</text:p>
      <text:p text:style-name="s22"><text:a xlink:type="simple" xlink:href="http://ivo.garant.ru/document/redirect/483408352/52">См. предыдущую редакцию</text:a></text:p>
      <text:p text:style-name="s1">б) отсутствие на территории Российской Федерации российских граждан, российских юридических лиц, осуществляющих оказание услуг, указанных в <text:a xlink:type="simple" xlink:href="#anchor1147">позициях 147 - 151</text:a> приложения № 1 к настоящему постановлению, отсутствие в реестре российской промышленной продукции товаров, указанных в <text:a xlink:type="simple" xlink:href="#anchor2001">позициях 1 - 433</text:a> приложения № 2 к настоящему постановлению, с характеристиками, соответствующими потребности заказчика, отсутствие на территории Российской Федерации производства товаров, указанных в <text:a xlink:type="simple" xlink:href="#anchor2434">позициях 434 - 465</text:a> приложения № 2 к настоящему постановлению, отсутствие на территории Российской Федерации производства товаров, не указанных в приложениях № 1 и 2 к настоящему постановлению, отсутствие на территории Российской Федерации российских граждан, российских юридических лиц, осуществляющих выполнение работ, оказание услуг, не указанных в приложениях № 1 и 2 к настоящему постановлению, при осуществлении в соответствии с Федеральным законом "О контрактной системе в сфере закупок товаров, работ, услуг для обеспечения государственных и муниципальных нужд" закупок таких товаров (в том числе поставляемых при выполнении закупаемых работ, оказании закупаемых услуг), работ, услуг заказчиком из числа заказчиков, предусмотренных <text:a xlink:type="simple" xlink:href="http://ivo.garant.ru/document/redirect/70353464/2401151">подпунктом "а" пункта 5 части 11 статьи 24</text:a> Федерального закона "О контрактной системе в сфере закупок товаров, работ, услуг для обеспечения государственных и муниципальных нужд", или при осуществлении в рамках государственного оборонного заказа в соответствии с Федеральным законом "О контрактной системе в сфере закупок товаров, работ, услуг для обеспечения государственных и муниципальных нужд" и <text:a xlink:type="simple" xlink:href="http://ivo.garant.ru/document/redirect/12188083/0">Федеральным законом</text:a> "О закупках товаров, работ, услуг отдельными видами юридических лиц" закупок таких товаров (в том числе поставляемых при выполнении закупаемых работ, оказании закупаемых услуг), работ, услуг иными заказчиками. Такое отсутствие декларируется заказчиком самостоятельно в извещении об осуществлении закупки, приглашении принять участие в определении поставщика (подрядчика, исполнителя), документации о закупке, в заключаемом с единственным поставщиком (подрядчиком, исполнителем) контракте (заключаемом с единственным поставщиком (исполнителем, подрядчиком) договоре);</text:p>
      <text:p text:style-name="s1"><text:bookmark text:name="anchor53"/>в) осуществляется закупка указанного в <text:a xlink:type="simple" xlink:href="#anchor1001">позициях 1 - 145</text:a> приложения N 1 к настоящему постановлению товара в целях исполнения контракта (договора), предусматривающего с учетом разрешения, полученного в соответствии с <text:a xlink:type="simple" xlink:href="#anchor51">подпунктом "а"</text:a> настоящего пункта, поставку такого товара, происходящего из иностранного государства;</text:p>
      <text:p text:style-name="s1"><text:bookmark text:name="anchor54"/>г) в соответствии с Федеральным законом "О закупках товаров, работ, услуг отдельными видами юридических лиц" осуществляется закупка товара за пределами Российской Федерации с учетом согласований, предусмотренных <text:a xlink:type="simple" xlink:href="http://ivo.garant.ru/document/redirect/12188083/30072">пунктом 2 части 7 статьи 3<text:span text:style-name="upper"><text:span> 1</text:span></text:span></text:a>, <text:a xlink:type="simple" xlink:href="http://ivo.garant.ru/document/redirect/12188083/3114">частью 4 статьи 3<text:span text:style-name="upper"><text:span> 1-1</text:span></text:span></text:a> указанного Федерального закона;</text:p>
      <text:p text:style-name="s22header">Информация об изменениях:</text:p>
      <text:p text:style-name="s22"><text:bookmark text:name="anchor55"/>Подпункт "д" изменен с 19 июня 2025 г. - <text:a xlink:type="simple" xlink:href="http://ivo.garant.ru/document/redirect/412162530/1542">Постановление</text:a> Правительства России от 10 июня 2025 г. № 879</text:p>
      <text:p text:style-name="s22"><text:a xlink:type="simple" xlink:href="http://ivo.garant.ru/document/redirect/483408352/55">См. предыдущую редакцию</text:a></text:p>
      <text:p text:style-name="s1">д) лизингодателем осуществляется закупка предмета лизинга, происходящего из иностранного государства, если такой предмет лизинга определен в соответствии с договором лизинга лизингополучателем, который не является заказчиком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и <text:a xlink:type="simple" xlink:href="http://ivo.garant.ru/document/redirect/12188083/0">Федеральным законом</text:a> "О закупках товаров, работ, услуг отдельными видами юридических лиц", либо лизингополучателем, который относится к числу таких заказчиков и при осуществлении закупки которым не применен в случаях, предусмотренных настоящим постановлением, такой запрет;</text:p>
      <text:p text:style-name="s1"><text:bookmark text:name="anchor56"/>е) при осуществлении закупки программного обеспечения, указанного в <text:a xlink:type="simple" xlink:href="#anchor1146">позиции 146</text:a> приложения N 1 к настоящему постановлению, - отсутствие в <text:a xlink:type="simple" xlink:href="https://reestr.digital.gov.ru/">реестре</text:a> российского программного обеспечения и <text:a xlink:type="simple" xlink:href="https://eac-reestr.digital.gov.ru">реестре</text:a> евразийского программного обеспечения по состоянию на день, предшествующий дню размещения в единой информационной системе в сфере закупок товаров, работ, услуг для обеспечения государственных и муниципальных нужд (далее - единая информационная система) извещения об осуществлении закупки, направления приглашения принять участие в определении поставщика (подрядчика, исполнителя), заключения контракта (договора) с единственным поставщиком (подрядчиком, исполнителем), сведений о программном обеспечении, соответствующем тому же классу программного обеспечения, что и программное обеспечение, являющееся объектом закупки (предметом закупки). В этом случае в описание объекта закупки (предмета закупки) включается обоснование неприменения запрета, предусмотренного <text:a xlink:type="simple" xlink:href="#anchor1">пунктом 1</text:a> настоящего постановления, содержащее:</text:p>
      <text:p text:style-name="s1">указание на настоящий подпункт;</text:p>
      <text:p text:style-name="s1"><text:bookmark text:name="anchor563"/>класс (классы) программного обеспечения, которому (которым) должно соответствовать программное обеспечение, являющееся объектом закупки (предметом закупки);</text:p>
      <text:p text:style-name="s1"><text:bookmark text:name="anchor564"/>требования к функциональным, техническим и эксплуатационным характеристикам программного обеспечения, являющегося объектом закупки (предметом закупки), с указанием класса (классов), которому (которым) должно соответствовать такое программное обеспечение;</text:p>
      <text:p text:style-name="s1"><text:bookmark text:name="anchor57"/>ж) при осуществлении закупки программного обеспечения, указанного в <text:a xlink:type="simple" xlink:href="#anchor1146">позиции 146</text:a> приложения N 1 к настоящему постановлению, программное обеспечение, сведения о котором по состоянию на день, предшествующий дню размещения в единой информационной системе извещения об осуществлении закупки, направления приглашения принять участие в определении поставщика (подрядчика, исполнителя), заключения контракта (договора) с единственным поставщиком (подрядчиком, исполнителем), включены в <text:a xlink:type="simple" xlink:href="https://reestr.digital.gov.ru/">реестр</text:a> российского программного обеспечения и (или) <text:a xlink:type="simple" xlink:href="https://eac-reestr.digital.gov.ru">реестр</text:a> евразийского программного обеспечения и которое соответствует тому же классу программного обеспечения, что и программное обеспечение, являющееся объектом закупки (предметом закупки), по своим функциональным, техническим и (или) эксплуатационным характеристикам не соответствует установленным заказчиком требованиям к программному обеспечению, являющемуся объектом закупки (предметом закупки). В этом случае в описание объекта закупки (предмета закупки) включается обоснование неприменения запрета, предусмотренного <text:a xlink:type="simple" xlink:href="#anchor1">пунктом 1</text:a> настоящего постановления, содержащее, помимо информации, предусмотренной <text:a xlink:type="simple" xlink:href="#anchor563">абзацами третьим</text:a> и <text:a xlink:type="simple" xlink:href="#anchor564">четвертым подпункта "е"</text:a> настоящего пункта, указание на настоящий подпункт, а также функциональные, технические и (или) эксплуатационные характеристики (в том числе их значения), по которым программное обеспечение, сведения о котором включены в реестр российского программного обеспечения и (или) реестр евразийского программного обеспечения, не соответствует установленным заказчиком требованиям к программному обеспечению по каждому программному обеспечению (с указанием названия программного обеспечения), сведения о котором включены в реестр российского программного обеспечения и (или) реестр евразийского программного обеспечения и которое соответствует тому же классу программного обеспечения, что и программное обеспечение, являющееся объектом закупки (предметом закупки).</text:p>
      <text:p text:style-name="s1">Положения настоящего подпункта не применяются при осуществлении в соответствии с <text:a xlink:type="simple" xlink:href="http://ivo.garant.ru/document/redirect/12188083/0">Федеральным законом</text:a> "О закупках товаров, работ, услуг отдельными видами юридических лиц" закупок программного обеспечения, включенного в перечень, утвержденный распоряжением Правительства Российской Федерации от 7 февраля 2024 г. N 270-р, заказчиками из числа лиц, включенных в перечни, утвержденные указанным распоряжением Правительства Российской Федерации;</text:p>
      <text:p text:style-name="s22header">Информация об изменениях:</text:p>
      <text:p text:style-name="s22"><text:bookmark text:name="anchor58"/>Подпункт "з" изменен с 19 июня 2025 г. - <text:a xlink:type="simple" xlink:href="http://ivo.garant.ru/document/redirect/412162530/1543">Постановление</text:a> Правительства России от 10 июня 2025 г. № 879</text:p>
      <text:p text:style-name="s22"><text:a xlink:type="simple" xlink:href="http://ivo.garant.ru/document/redirect/483408352/58">См. предыдущую редакцию</text:a></text:p>
      <text:p text:style-name="s1">з) осуществляется закупка товара, не относящегося к товарам и программному обеспечению, указанным в <text:a xlink:type="simple" xlink:href="#anchor1017">позициях 17</text:a>, <text:a xlink:type="simple" xlink:href="#anchor1021">21</text:a>, <text:a xlink:type="simple" xlink:href="#anchor1027">27</text:a>, <text:a xlink:type="simple" xlink:href="#anchor1035">35</text:a>, <text:a xlink:type="simple" xlink:href="#anchor1140">140</text:a>, <text:a xlink:type="simple" xlink:href="#anchor1141">141</text:a>, <text:a xlink:type="simple" xlink:href="#anchor1144">144</text:a> и <text:a xlink:type="simple" xlink:href="#anchor1146">146</text:a> приложения N 1 к настоящему постановлению, в количестве одной штуки и начальная (максимальная) цена контракта (начальная (максимальная) цена договора) или цена контракта, заключаемого с единственным поставщиком (подрядчиком, исполнителем) (цена, заключаемого с единственным поставщиком (исполнителем, подрядчиком) договора), не превышает 300 тыс. рублей;</text:p>
      <text:p text:style-name="s22header">Информация об изменениях:</text:p>
      <text:p text:style-name="s22"><text:bookmark text:name="anchor59"/>Подпункт "и" изменен с 19 июня 2025 г. - <text:a xlink:type="simple" xlink:href="http://ivo.garant.ru/document/redirect/412162530/1544">Постановление</text:a> Правительства России от 10 июня 2025 г. № 879</text:p>
      <text:p text:style-name="s22"><text:a xlink:type="simple" xlink:href="http://ivo.garant.ru/document/redirect/483408352/59">См. предыдущую редакцию</text:a></text:p>
      <text:p text:style-name="s1">и) осуществляется закупка товаров, не относящихся к товарам и программному обеспечению, указанным в <text:a xlink:type="simple" xlink:href="#anchor1017">позициях 17</text:a>, <text:a xlink:type="simple" xlink:href="#anchor1021">21</text:a>, <text:a xlink:type="simple" xlink:href="#anchor1027">27</text:a>, <text:a xlink:type="simple" xlink:href="#anchor1035">35</text:a>, <text:a xlink:type="simple" xlink:href="#anchor1140">140</text:a>, <text:a xlink:type="simple" xlink:href="#anchor1141">141</text:a>, <text:a xlink:type="simple" xlink:href="#anchor1144">144</text:a> и <text:a xlink:type="simple" xlink:href="#anchor1146">146</text:a> приложения № 1 к настоящему постановлению, в одном из следующих случаев:</text:p>
      <text:p text:style-name="s1"><text:bookmark text:name="anchor59002"/>начальная (максимальная) цена контракта (начальная (максимальная) цена договора), максимальное значение цены контракта (максимальное значение цены договора) или цена контракта, заключаемого с единственным поставщиком (подрядчиком, исполнителем) (цена заключаемого с единственным поставщиком (исполнителем, подрядчиком) договора), не превышает 1 млн. рублей и при этом ни одна из использованных при определении таких цен цена единицы товара не превышает 300 тыс. рублей;</text:p>
      <text:p text:style-name="s1"><text:bookmark text:name="anchor59003"/>ни одна из использованных при определении начальной (максимальной) цены контракта (начальной (максимальной) цены договора) или цены контракта, заключаемого с единственным поставщиком (подрядчиком, исполнителем) (цены заключаемого с единственным поставщиком (исполнителем, подрядчиком) договора), цена единицы товара не превышает 300 тыс. рублей и при этом произведение каждой цены единицы товара на количество такого товара не превышает 1 млн. рублей;</text:p>
      <text:p text:style-name="s1"><text:bookmark text:name="anchor510"/>к) осуществляется закупка товаров, указанных в <text:a xlink:type="simple" xlink:href="#anchor1035">позиции 35</text:a> приложения N 1 к настоящему постановлению, в количестве одной штуки и начальная (максимальная) цена контракта (начальная (максимальная) цена договора) или цена контракта, заключаемого с единственным поставщиком (подрядчиком, исполнителем) (цена, заключаемого с единственным поставщиком (исполнителем, подрядчиком) договора), не превышает 3 тыс. рублей;</text:p>
      <text:p text:style-name="s22header">Информация об изменениях:</text:p>
      <text:p text:style-name="s22"><text:bookmark text:name="anchor511"/>Подпункт "л" изменен с 19 июня 2025 г. - <text:a xlink:type="simple" xlink:href="http://ivo.garant.ru/document/redirect/412162530/1545">Постановление</text:a> Правительства России от 10 июня 2025 г. № 879</text:p>
      <text:p text:style-name="s22"><text:a xlink:type="simple" xlink:href="http://ivo.garant.ru/document/redirect/483408352/511">См. предыдущую редакцию</text:a></text:p>
      <text:p text:style-name="s1">л) осуществляется закупка товаров, указанных в <text:a xlink:type="simple" xlink:href="#anchor1035">позиции 35</text:a> приложения N 1 к настоящему постановлению, при которой начальная (максимальная) цена контракта (начальная (максимальная) цена договора), максимальное значение цены контракта (максимальное значение цены договора) или цена контракта, заключаемого с единственным поставщиком (подрядчиком, исполнителем) (цена, заключаемого с единственным поставщиком (исполнителем, подрядчиком) договора), не превышает 30 тыс. рублей и при этом ни одна из использованных при определении таких цен цена единицы товара не превышает 3 тыс. рублей;</text:p>
      <text:p text:style-name="s22header">Информация об изменениях:</text:p>
      <text:p text:style-name="s22"><text:bookmark text:name="anchor512"/>Подпункт "м" изменен с 19 июня 2025 г. - <text:a xlink:type="simple" xlink:href="http://ivo.garant.ru/document/redirect/412162530/1546">Постановление</text:a> Правительства России от 10 июня 2025 г. № 879</text:p>
      <text:p text:style-name="s22"><text:a xlink:type="simple" xlink:href="http://ivo.garant.ru/document/redirect/483408352/512">См. предыдущую редакцию</text:a></text:p>
      <text:p text:style-name="s1">м) осуществляется закупка товара, не относящегося к товарам и программному обеспечению, указанным в <text:a xlink:type="simple" xlink:href="#anchor1023">позициях 23</text:a>, <text:a xlink:type="simple" xlink:href="#anchor1024">24</text:a>, <text:a xlink:type="simple" xlink:href="#anchor1044">44 - 47</text:a>, <text:a xlink:type="simple" xlink:href="#anchor1071">71 - 77</text:a>, <text:a xlink:type="simple" xlink:href="#anchor1079">79 - 88</text:a>, <text:a xlink:type="simple" xlink:href="#anchor1095">95 - 118</text:a> и <text:a xlink:type="simple" xlink:href="#anchor1146">146</text:a> приложения N 1 к настоящему постановлению, определенного товарного знака ввиду его несовместимости с товарами, на которых размещаются другие товарные знаки, и необходимости обеспечения взаимодействия закупаемого товара с товарами, используемыми заказчиком;</text:p>
      <text:p text:style-name="s22header">Информация об изменениях:</text:p>
      <text:p text:style-name="s22"><text:bookmark text:name="anchor513"/>Подпункт "н" изменен с 1 января 2026 г. - <text:a xlink:type="simple" xlink:href="http://ivo.garant.ru/document/redirect/413308839/1">Постановление</text:a> Правительства России от 19 декабря 2025 г. № 2067</text:p>
      <text:p text:style-name="s22"><text:a xlink:type="simple" xlink:href="http://ivo.garant.ru/document/redirect/76849700/513">См. предыдущую редакцию</text:a></text:p>
      <text:p text:style-name="s1">н) осуществляется закупка в целях оказания медицинской помощи в неотложной или экстренной форме либо вследствие аварии, обстоятельств непреодолимой силы, для предупреждения (при введении режима повышенной готовности функционирования органов управления и сил единой государственной системы предупреждения и ликвидации чрезвычайных ситуаций) и (или) ликвидации чрезвычайной ситуации, в целях проведения специальной военной операции, мобилизационной подготовки, мобилизации, осуществления деятельности на территории, на которой введено военное положение. Положения настоящего подпункта не распространяются на закупки вещевого имущества для нужд Вооруженных Сил Российской Федерации;</text:p>
      <text:p text:style-name="s1"><text:bookmark text:name="anchor514"/>о) Федеральной службой охраны Российской Федерации, Службой внешней разведки Российской Федерации, органами внешней разведки Министерства обороны Российской Федерации, Министерством внутренних дел Российской Федерации, Федеральной службой войск национальной гвардии Российской Федерации и подведомственными им организациями осуществляется закупка товаров, не относящихся к товарам, указанным в <text:a xlink:type="simple" xlink:href="#anchor1001">позициях 1 - 7</text:a>, <text:a xlink:type="simple" xlink:href="#anchor1063">63 - 73</text:a>, <text:a xlink:type="simple" xlink:href="#anchor1092">92 - 94</text:a> и <text:a xlink:type="simple" xlink:href="#anchor1099">99</text:a> приложения N 1 к настоящему постановлению. При этом запрет может также не применяться указанными федеральными органами исполнительной власти и подведомственными им организациями, если осуществляется закупка товара, указанного в <text:a xlink:type="simple" xlink:href="#anchor1063">позициях 63 - 67</text:a> приложения N 1 к настоящему постановлению, в количестве одной штуки и начальная (максимальная) цена контракта (начальная (максимальная) цена договора) или цена контракта, заключаемого с единственным поставщиком (подрядчиком, исполнителем) (цена, заключаемого с единственным поставщиком (исполнителем, подрядчиком) договора), не превышает 2 млн. рублей;</text:p>
      <text:p text:style-name="s1"><text:bookmark text:name="anchor515"/>п) Федеральной службой охраны Российской Федерации осуществляется закупка в целях реализации мер по осуществлению государственной охраны;</text:p>
      <text:p text:style-name="s1"><text:bookmark text:name="anchor516"/>р) Министерством внутренних дел Российской Федерации осуществляется закупка транспортных средств для обеспечения безопасности объектов государственной охраны и проведения оперативно-поисковых мероприятий;</text:p>
      <text:p text:style-name="s1"><text:bookmark text:name="anchor517"/>с) Федеральной службой исполнения наказаний осуществляется закупка транспортных средств для проведения оперативно-разыскных мероприятий;</text:p>
      <text:p text:style-name="s1"><text:bookmark text:name="anchor518"/>т) Главным управлением специальных программ Президента Российской Федерации и подведомственными ему организациями осуществляется закупка товаров, не относящихся к товарам, указанным в <text:a xlink:type="simple" xlink:href="#anchor1001">позициях 1 - 7</text:a>, <text:a xlink:type="simple" xlink:href="#anchor1063">63 - 73</text:a> и <text:a xlink:type="simple" xlink:href="#anchor1099">99</text:a> приложения N 1 к настоящему постановлению. При этом запрет может также не применяться Главным управлением специальных программ Президента Российской Федерации и подведомственными ему организациями, если осуществляется закупка товара, указанного в <text:a xlink:type="simple" xlink:href="#anchor1063">позициях 63 - 67</text:a> приложения N 1 к настоящему постановлению, в количестве одной штуки и начальная (максимальная) цена контракта (начальная (максимальная) цена договора) или цена контракта, заключаемого с единственным поставщиком (подрядчиком, исполнителем) (цена, заключаемого с единственным поставщиком (исполнителем, подрядчиком) договора), не превышает 2 млн. рублей;</text:p>
      <text:p text:style-name="s1"><text:bookmark text:name="anchor519"/>у) Управлением делами Президента Российской Федерации и подведомственными ему организациями осуществляется закупка товаров, не относящихся к товарам, указанным в <text:a xlink:type="simple" xlink:href="#anchor1003">позициях 3 - 7</text:a>, <text:a xlink:type="simple" xlink:href="#anchor1063">63 - 73</text:a>, <text:a xlink:type="simple" xlink:href="#anchor1092">92 - 94</text:a> и <text:a xlink:type="simple" xlink:href="#anchor1099">99</text:a> приложения N 1 к настоящему постановлению. При этом запрет может также не применяться Управлением делами Президента Российской Федерации и подведомственными ему организациями, если осуществляется закупка товара, указанного в <text:a xlink:type="simple" xlink:href="#anchor1063">позициях 63 - 67</text:a> приложения N 1 к настоящему постановлению, в количестве одной штуки и начальная (максимальная) цена контракта (начальная (максимальная) цена договора) или цена контракта, заключаемого с единственным поставщиком (подрядчиком, исполнителем) (цена, заключаемого с единственным поставщиком (исполнителем, подрядчиком) договора), не превышает 2 млн. рублей;</text:p>
      <text:p text:style-name="s22header">Информация об изменениях:</text:p>
      <text:p text:style-name="s22"><text:bookmark text:name="anchor520"/>Пункт 5 дополнен подпунктом "ф" с 19 июня 2025 г. - <text:a xlink:type="simple" xlink:href="http://ivo.garant.ru/document/redirect/412162530/1547">Постановление</text:a> Правительства России от 10 июня 2025 г. № 879</text:p>
      <text:p text:style-name="s1">ф) осуществляется закупка товаров из числа запасных частей и расходных материалов к машинам и оборудованию, используемых заказчиками, предусмотренными <text:a xlink:type="simple" xlink:href="http://ivo.garant.ru/document/redirect/70353464/2401151">подпунктом "а" пункта 5 части 11 статьи 24</text:a> Федерального закона "О контрактной системе в сфере закупок товаров, работ, услуг для обеспечения государственных и муниципальных нужд", в соответствии с технической документацией на указанные машины и оборудование.</text:p>
      <text:p text:style-name="s1"><text:bookmark text:name="anchor6"/>6. Ограничение, предусмотренное <text:a xlink:type="simple" xlink:href="#anchor1">пунктом 1</text:a> настоящего постановления, может не применяться заказчиками при осуществлении закупок:</text:p>
      <text:p text:style-name="s1"><text:bookmark text:name="anchor61"/>а) товара определенного товарного знака ввиду его несовместимости с товарами, на которых размещаются другие товарные знаки, и необходимости обеспечения взаимодействия закупаемого товара с товарами, используемыми заказчиком, за исключением случаев осуществления закупок товара, указанного в <text:a xlink:type="simple" xlink:href="#anchor2371">позиции 371</text:a> приложения N 2 к настоящему постановлению;</text:p>
      <text:p text:style-name="s1"><text:bookmark text:name="anchor62"/>б) товара из числа запасных частей и расходных материалов к машинам и оборудованию, используемым заказчиком, в соответствии с технической документацией на указанные машины и оборудование. Положения настоящего подпункта не применяются при осуществлении закупок товаров, указанных в <text:a xlink:type="simple" xlink:href="#anchor2000">приложении N 2</text:a> к настоящему постановлению и являющихся расходными материалами, комплектующими, принадлежностями к медицинским изделиям;</text:p>
      <text:p text:style-name="s1"><text:bookmark text:name="anchor63"/>в) товаров, указанных в <text:a xlink:type="simple" xlink:href="#anchor2100">позициях 100</text:a> и <text:a xlink:type="simple" xlink:href="#anchor2101">101</text:a> приложения N 2 к настоящему постановлению, в целях обеспечения нужд спорта высших достижений;</text:p>
      <text:p text:style-name="s1"><text:bookmark text:name="anchor64"/>г) товара из числа запасных частей и деталей к используемому оружию спортивному огнестрельному с нарезным стволом, происходящему из иностранного государства.</text:p>
      <text:p text:style-name="s1"><text:bookmark text:name="anchor7"/>7. Установить, что для целей осуществлении закупок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text:p>
      <text:p text:style-name="s22header">Информация об изменениях:</text:p>
      <text:p text:style-name="s22"><text:bookmark text:name="anchor71"/>Подпункт "а" изменен с 1 сентября 2025 г. - <text:a xlink:type="simple" xlink:href="http://ivo.garant.ru/document/redirect/412615083/1021">Постановление</text:a> Правительства России от 29 августа 2025 г. № 1326</text:p>
      <text:p text:style-name="s22"><text:a xlink:type="simple" xlink:href="http://ivo.garant.ru/document/redirect/76849699/71">См. предыдущую редакцию</text:a></text:p>
      <text:p text:style-name="s1">а) особенностями описания объекта закупки, являющегося товаром (в том числе поставляемым при выполнении закупаемых работ, оказании закупаемых услуг), производство которого на территории Российской Федерации отсутствует, являются:</text:p>
      <text:p text:style-name="s1"><text:bookmark text:name="anchor712"/>для служебного пользования;</text:p>
      <text:p text:style-name="s1"><text:bookmark text:name="anchor7130"/>при осуществлении закупки товаров, указанных в <text:a xlink:type="simple" xlink:href="#anchor1001">позициях 1-145</text:a> приложения N 1 к настоящему постановлению, - декларирование в извещении об осуществлении закупки или в приглашении принять участие в определении поставщика (подрядчика, исполнителя) факта получения предусмотренного <text:a xlink:type="simple" xlink:href="#anchor51">подпунктом "а" пункта 5</text:a> настоящего постановления разрешения с указанием его реквизитов и характеристик товара, являющихся идентичными характеристикам, содержащимся в обращении, на основании которого выдано такое разрешение;</text:p>
      <text:p text:style-name="s1"><text:bookmark text:name="anchor713"/>при осуществлении закупки товаров, указанных в <text:a xlink:type="simple" xlink:href="#anchor2001">позициях 1 - 433</text:a> приложения № 2 к настоящему постановлению, - декларирование в извещении об осуществлении закупки или в приглашении принять участие в определении поставщика (подрядчика, исполнителя) факта отсутствия в реестре российской промышленной продукции такого товара с характеристиками, соответствующими потребности заказчика, указание в описании объекта закупки характеристик товара, потребность в котором имеется у заказчика и который отсутствует в реестре российской промышленной продукции, а также включение в описание объекта закупки копии направленного до начала осуществления закупки в Министерство промышленности и торговли Российской Федерации уведомления об отсутствии закупаемого товара в реестре российской промышленной продукции, которое должно содержать информацию о заказчике (место нахождения, почтовый адрес, адрес электронной почты, номер контактного телефона) и о товаре, потребность в котором имеется у заказчика и который отсутствует в реестре российской промышленной продукции (наименование товара, код товара по Общероссийскому классификатору продукции по видам экономической деятельности <text:a xlink:type="simple" xlink:href="http://ivo.garant.ru/document/redirect/70650730/0">ОК 034-2014 (КПЕС 2008)</text:a>, код товара по <text:a xlink:type="simple" xlink:href="http://ivo.garant.ru/document/redirect/402888401/100000">единой Товарной номенклатуре</text:a> внешнеэкономической деятельности Евразийского экономического союза, предусмотренной правом Евразийского экономического союза, и характеристики такого товара);</text:p>
      <text:p text:style-name="s1"><text:bookmark text:name="anchor714"/>при осуществлении закупки товаров, не указанных в <text:a xlink:type="simple" xlink:href="#anchor1001">позициях 1 - 145</text:a> приложения № 1 к настоящему постановлению, <text:a xlink:type="simple" xlink:href="#anchor2001">позициях 1 - 433</text:a> приложения № 2 к настоящему постановлению, - декларирование в извещении об осуществлении закупки или в приглашении принять участие в определении поставщика (подрядчика, исполнителя) факта отсутствия на территории Российской Федерации производства такого товара с характеристиками, соответствующими потребности заказчика, а также указание в описании объекта закупки характеристик товара, потребность в котором имеется у заказчика и производство которого на территории Российской Федерации отсутствует;</text:p>
      <text:p text:style-name="s22header">Информация об изменениях:</text:p>
      <text:p text:style-name="s22"><text:bookmark text:name="anchor72"/>Подпункт "б" изменен с 19 июня 2025 г. - <text:a xlink:type="simple" xlink:href="http://ivo.garant.ru/document/redirect/412162530/1551">Постановление</text:a> Правительства России от 10 июня 2025 г. № 879</text:p>
      <text:p text:style-name="s22"><text:a xlink:type="simple" xlink:href="http://ivo.garant.ru/document/redirect/483408352/72">См. предыдущую редакцию</text:a></text:p>
      <text:p text:style-name="s1">б) контракт должен содержать условие о том, что при его исполнении не допускается замена:</text:p>
      <text:p text:style-name="s1"><text:bookmark text:name="anchor722"/>радиоэлектронной продукции, признаваемой в соответствии с <text:a xlink:type="simple" xlink:href="http://ivo.garant.ru/document/redirect/71139412/0">постановлением</text:a> Правительства Российской Федерации от 17 июля 2015 г. № 719 "О подтверждении производства российской промышленной продукции" или правом Евразийского экономического союза радиоэлектронной продукцией первого уровня, на радиоэлектронную продукцию, не признаваемую радиоэлектронной продукцией первого уровня (если при осуществлении закупок товаров, указанных в <text:a xlink:type="simple" xlink:href="#anchor2195">позициях 195</text:a>, <text:a xlink:type="simple" xlink:href="#anchor2197">197 - 199</text:a> и <text:a xlink:type="simple" xlink:href="#anchor2203">203</text:a> приложения № 2 к настоящему постановлению, контракт предусматривает поставку радиоэлектронной продукции первого уровня);</text:p>
      <text:p text:style-name="s1"><text:bookmark text:name="anchor723"/>лекарственного препарата, все стадии производства которого (в том числе синтез молекулы действующего вещества при производстве фармацевтических субстанций) осуществляются на территориях государств - членов Евразийского экономического союза, на лекарственный препарат, не все стадии производства которого (в том числе синтез молекулы действующего вещества при производстве фармацевтических субстанций) осуществляются на территориях государств - членов Евразийского экономического союза (если при осуществлении закупок товара, указанного в <text:a xlink:type="simple" xlink:href="#anchor2433">позиции 433</text:a> приложения № 2 к настоящему постановлению, контракт предусматривает поставку лекарственного препарата, все стадии производства которого (в том числе синтез молекулы действующего вещества при производстве фармацевтических субстанций) осуществляются на территориях государств - членов Евразийского экономического союза);</text:p>
      <text:p text:style-name="s22header">Информация об изменениях:</text:p>
      <text:p text:style-name="s22"><text:bookmark text:name="anchor73"/>Подпункт "в" изменен с 1 сентября 2025 г. - <text:a xlink:type="simple" xlink:href="http://ivo.garant.ru/document/redirect/412615083/1022">Постановление</text:a> Правительства России от 29 августа 2025 г. № 1326</text:p>
      <text:p text:style-name="s22"><text:a xlink:type="simple" xlink:href="http://ivo.garant.ru/document/redirect/76849699/73">См. предыдущую редакцию</text:a></text:p>
      <text:p text:style-name="s1">в) особенности определе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в том числе товаров, поставляемых при выполнении закупаемых работ, оказании закупаемых услуг), начальной цены единицы работы, услуги при применени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метода сопоставимых рыночных цен (анализа рынка) для осуществления закупки, объект закупки которой включает товары, указанные в <text:a xlink:type="simple" xlink:href="#anchor1001">позициях 1 - 145</text:a> приложения № 1 к настоящему постановлению и (или) <text:a xlink:type="simple" xlink:href="#anchor2001">позициях 1 - 433</text:a> приложения № 2 к настоящему постановлению:</text:p>
      <text:p text:style-name="s1"><text:bookmark text:name="anchor732"/>при определении идентичности и однородности таких товаров в соответствии с <text:a xlink:type="simple" xlink:href="http://ivo.garant.ru/document/redirect/70353464/22130">частями 13</text:a> и <text:a xlink:type="simple" xlink:href="http://ivo.garant.ru/document/redirect/70353464/22140">14 статьи 22</text:a> Федерального закона "О контрактной системе в сфере закупок товаров, работ, услуг для обеспечения государственных и муниципальных нужд" подлежат учету исключительно товары, происходящие из государств - членов Евразийского экономического союза;</text:p>
      <text:p text:style-name="s1"><text:bookmark text:name="anchor733"/>заказчик направляет предусмотренный <text:a xlink:type="simple" xlink:href="http://ivo.garant.ru/document/redirect/70353464/225">частью 5 статьи 22</text:a> Федерального закона "О контрактной системе в сфере закупок товаров, работ, услуг для обеспечения государственных и муниципальных нужд" запрос о предоставлении информации о цене таких товаров не менее чем 3 субъектам деятельности в сфере промышленности, информация о которых включена в государственную информационную систему промышленности. Если в этой системе содержится информация менее чем о 3 субъектах деятельности в сфере промышленности, осуществляющих производство включенного в объект закупки товара из числа указанных товаров, заказчик также направляет такой запрос поставщикам, которые осуществляют поставку происходящих из государств - членов Евразийского экономического союза товаров, идентичных товарам, планируемым к закупкам (при их отсутствии - однородных товаров), и информация о которых и о поставленных ими товарах содержится на официальном сайте единой информационной системы в реестре контрактов, заключенных заказчиками;</text:p>
      <text:p text:style-name="s22header">Информация об изменениях:</text:p>
      <text:p text:style-name="s22"><text:bookmark text:name="anchor74"/>Подпункт "г" изменен с 1 января 2026 г. - <text:a xlink:type="simple" xlink:href="http://ivo.garant.ru/document/redirect/413396332/1013">Постановление</text:a> Правительства России от 30 декабря 2025 г. № 2225</text:p>
      <text:p text:style-name="s22"><text:a xlink:type="simple" xlink:href="http://ivo.garant.ru/document/redirect/76849700/74">См. предыдущую редакцию</text:a></text:p>
      <text:p text:style-name="s1">г) особенности, предусмотренные <text:a xlink:type="simple" xlink:href="#anchor73">подпунктом "в"</text:a> настоящего пункта, не применяются при наступлении одного из следующих случаев:</text:p>
      <text:p text:style-name="s1"><text:bookmark text:name="anchor742"/>осуществляется закупка товара, включенного в объект закупки, в отношении которого в соответствии с <text:a xlink:type="simple" xlink:href="http://ivo.garant.ru/document/redirect/70353464/2221">частями 21</text:a> и <text:a xlink:type="simple" xlink:href="http://ivo.garant.ru/document/redirect/70353464/2222">22 статьи 22</text:a> Федерального закона "О контрактной системе в сфере закупок товаров, работ, услуг для обеспечения государственных и муниципальных нужд" установлены соответственно особенности определе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работы, услуги при осуществлении включаемых в состав государственного оборонного заказа закупок товаров, работ, услуг для обеспечения федеральных нужд, порядок определе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text:p>
      <text:p text:style-name="s1"><text:bookmark text:name="anchor743"/>если при осуществлении закупки товара заказчиком в случаях, предусмотренных <text:a xlink:type="simple" xlink:href="#anchor49">подпунктами "и"</text:a> и <text:a xlink:type="simple" xlink:href="#anchor410">"к" пункта 4</text:a>, <text:a xlink:type="simple" xlink:href="#anchor5">пунктами 5</text:a> и <text:a xlink:type="simple" xlink:href="#anchor6">6</text:a> настоящего постановления, не применяются запреты, предусмотренные <text:a xlink:type="simple" xlink:href="#anchor112">абзацем вторым пункта 1</text:a> и <text:a xlink:type="simple" xlink:href="#anchor47">подпунктом "ж" пункта 4</text:a> настоящего постановления, ограничение, предусмотренное <text:a xlink:type="simple" xlink:href="#anchor113">абзацем третьим пункта 1</text:a> настоящего постановления;</text:p>
      <text:p text:style-name="s1"><text:bookmark text:name="anchor744"/>осуществляется закупка товара в количестве одной штуки и начальная (максимальная) цена контракта (начальная (максимальная) цена договора) или цена контракта, заключаемого с единственным поставщиком (подрядчиком, исполнителем) (цена, заключаемого с единственным поставщиком (исполнителем, подрядчиком) договора), не превышает 5 тыс. рублей;</text:p>
      <text:p text:style-name="s1"><text:bookmark text:name="anchor745"/>осуществляется закупка товаров, при которой начальная (максимальная) цена контракта (начальная (максимальная) цена договора) или цена контракта, заключаемого с единственным поставщиком (подрядчиком, исполнителем) (цена, заключаемого с единственным поставщиком (исполнителем, подрядчиком) договора), не превышает 1 млн. рублей и при этом ни одна из использованных при определении таких цен цена единицы товара не превышает 5 тыс. рублей;</text:p>
      <text:p text:style-name="s1"><text:bookmark text:name="anchor746"/>если в реестре российской промышленной продукции отсутствуют указанные в <text:a xlink:type="simple" xlink:href="#anchor2001">позициях 1 - 433</text:a> приложения № 2 к настоящему постановлению товары с характеристиками, соответствующими потребности заказчика, отсутствует производство на территории Российской Федерации товаров, указанных в <text:a xlink:type="simple" xlink:href="#anchor2434">позициях 434 - 465</text:a> приложения № 2 к настоящему постановлению, которые декларируются в обосновании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в том числе товаров, поставляемых при выполнении закупаемых работ, оказании закупаемых услуг), начальной цены единицы работы, услуги. В случаях, при которых такое обоснование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не составляется, отсутствие производства такого товара на территории Российской Федерации декларируется в контракте;</text:p>
      <text:p text:style-name="s1">осуществляется закупка товаров, работ, услуг в случаях, предусмотренных <text:a xlink:type="simple" xlink:href="http://ivo.garant.ru/document/redirect/70353464/240111">пунктами 1</text:a> или <text:a xlink:type="simple" xlink:href="http://ivo.garant.ru/document/redirect/70353464/240112">2 части 11 статьи 24</text:a> Федерального закона "О контрактной системе в сфере закупок товаров, работ, услуг для обеспечения государственных и муниципальных нужд".</text:p>
      <text:p text:style-name="s1"><text:bookmark text:name="anchor8"/>8. Утвердить прилагаемые:</text:p>
      <text:p text:style-name="s1"><text:a xlink:type="simple" xlink:href="#anchor5000">Положение</text:a> о требованиях к форме и содержанию отчета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о порядке формирования и размещения такого отчета в единой информационной системе в сфере закупок товаров, работ, услуг для обеспечения государственных и муниципальных нужд, на официальном сайте единой информационной системы в сфере закупок товаров, работ, услуг для обеспечения государственных и муниципальных нужд в информационно-телекоммуникационной сети "Интернет", о порядке предоставления федеральному органу исполнительной власти, указанному в части 7 статьи 14 Федерального закона "О контрактной системе в сфере закупок товаров, работ, услуг для обеспечения государственных и муниципальных нужд" и части 7 статьи 3<text:span text:style-name="upper"><text:span> 1-4</text:span></text:span> Федерального закона "О закупках товаров, работ, услуг отдельными видами юридических лиц", доступа к информации, содержащейся в таких отчетах, размещенных в единой информационной системе в сфере закупок товаров, работ, услуг для обеспечения государственных и муниципальных нужд, о порядке рассмотрения таких отчетов и оценки результатов осуществления в отчетном году указанных закупок этим федеральным органом исполнительной власти;</text:p>
      <text:p text:style-name="s1"><text:a xlink:type="simple" xlink:href="#anchor6000">изменения</text:a>, которые вносятся в акты Правительства Российской Федерации;</text:p>
      <text:p text:style-name="s1"><text:a xlink:type="simple" xlink:href="#anchor7000">перечень</text:a> утративших силу актов и отдельных положений актов Правительства Российской Федерации.</text:p>
      <text:p text:style-name="s1"><text:bookmark text:name="anchor9"/>9. Определить Министерство финансов Российской Федерации федеральным органом исполнительной власти, уполномоченным на рассмотрение отчетов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и оценку результатов осуществления в отчетном году таких закупок.</text:p>
      <text:p text:style-name="s1"><text:bookmark text:name="anchor10"/>10. Установить, что:</text:p>
      <text:p text:style-name="s1"><text:bookmark text:name="anchor101"/>а) настоящее постановление применяется к отношениям, связанным с осуществлением закупок,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после дня <text:a xlink:type="simple" xlink:href="http://ivo.garant.ru/document/redirect/411197448/0">вступления в силу</text:a> настоящего постановления, если иное не установлено настоящим постановлением;</text:p>
      <text:p text:style-name="s1"><text:bookmark text:name="anchor102"/>б) положения <text:a xlink:type="simple" xlink:href="#anchor31">подпунктов "а"</text:a> и <text:a xlink:type="simple" xlink:href="#anchor32">"б" пункта 3</text:a> настоящего постановления в части, касающейся товаров, указанных в <text:a xlink:type="simple" xlink:href="#anchor2400">позициях 400 - 432</text:a> приложения N 2 к настоящему постановлению, применяются с 1 сентября 2025 г.;</text:p>
      <text:p text:style-name="s22header">Информация об изменениях:</text:p>
      <text:p text:style-name="s22"><text:bookmark text:name="anchor103"/>Подпункт "в" изменен с 1 января 2026 г. - <text:a xlink:type="simple" xlink:href="http://ivo.garant.ru/document/redirect/413396332/1141">Постановление</text:a> Правительства России от 30 декабря 2025 г. № 2225</text:p>
      <text:p text:style-name="s22"><text:a xlink:type="simple" xlink:href="http://ivo.garant.ru/document/redirect/76849700/103">См. предыдущую редакцию</text:a></text:p>
      <text:p text:style-name="s1">в) при осуществлении закупок товаров из числа марли медицинской отбеленной хлопчатобумажной, включенной в код <text:a xlink:type="simple" xlink:href="http://ivo.garant.ru/document/redirect/70650730/1344120">13.20.44.120</text:a> по Общероссийскому классификатору продукции по видам экономической деятельности ОК 034-2014 (КПЕС 2008), медицинской одежды, включенной в коды <text:a xlink:type="simple" xlink:href="http://ivo.garant.ru/document/redirect/70650730/951110041">14.12.11</text:a>, <text:a xlink:type="simple" xlink:href="http://ivo.garant.ru/document/redirect/70650730/951110061">14.12.21</text:a>, <text:a xlink:type="simple" xlink:href="http://ivo.garant.ru/document/redirect/70650730/951110062">14.12.30.131</text:a>, <text:a xlink:type="simple" xlink:href="http://ivo.garant.ru/document/redirect/70650730/951110063">14.12.30.132</text:a>, <text:a xlink:type="simple" xlink:href="http://ivo.garant.ru/document/redirect/70650730/951110079">14.12.30.160</text:a> по Общероссийскому классификатору продукции по видам экономической деятельности ОК 034-2014 (КПЕС 2008), одежды специальной для поддержания физической формы, включенной в код <text:a xlink:type="simple" xlink:href="http://ivo.garant.ru/document/redirect/70650730/141230170">14.12.30.170</text:a> по Общероссийскому классификатору продукции по видам экономической деятельности ОК 034-2014 (КПЕС 2008), а также товаров, указанных в <text:a xlink:type="simple" xlink:href="#anchor2379">позициях 379 - 382</text:a> и <text:a xlink:type="simple" xlink:href="#anchor2389">389</text:a> приложения N 2 к настоящему постановлению,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по 31 августа 2025 г. включительно, при осуществлении закупок товаров из числа специальных хирургических одноразовых стерильных изделий из нетканых материалов для защиты пациента и медицинского персонала, включенных в код <text:a xlink:type="simple" xlink:href="http://ivo.garant.ru/document/redirect/70650730/951110067">14.19.32.120</text:a> по Общероссийскому классификатору продукции по видам экономической деятельности ОК 034-2014 (КПЕС 2008), мебели медицинской, включая хирургическую, стоматологическую или ветеринарную, и ее частей, включенных в коды <text:a xlink:type="simple" xlink:href="http://ivo.garant.ru/document/redirect/70650730/325030110">32.50.30.110</text:a>, <text:a xlink:type="simple" xlink:href="http://ivo.garant.ru/document/redirect/70650730/325030119">32.50.30.119</text:a>, <text:a xlink:type="simple" xlink:href="http://ivo.garant.ru/document/redirect/70650730/325050">32.50.50</text:a> по Общероссийскому классификатору продукции по видам экономической деятельности ОК 034-2014 (КПЕС 2008) (за исключением кровати больничной механической, соответствующей коду 120210 вида медицинского изделия в соответствии с <text:a xlink:type="simple" xlink:href="http://ivo.garant.ru/document/redirect/70199586/1000">номенклатурной классификацией</text:a> медицинских изделий, утвержденной Министерством здравоохранения Российской Федерации (далее - номенклатурная классификация), кровати больничной стандартной с электроприводом, соответствующей коду 136210 вида медицинского изделия в соответствии с номенклатурной классификацией, стеллажа для палаты пациента, соответствующего коду 156900 вида медицинского изделия в соответствии с номенклатурной классификацией, шкафа вытяжного, соответствующего коду 181470 вида медицинского изделия в соответствии с номенклатурной классификацией, ширмы прикроватной, соответствующей коду 184200 вида медицинского изделия в соответствии с номенклатурной классификацией, стеллажа общего назначения, соответствующего коду 260470 вида медицинского изделия в соответствии с номенклатурной классификацией, шкафа для сушки и хранения эндоскопов, соответствующего коду 271740 вида медицинского изделия в соответствии с номенклатурной классификацией), а также товаров, указанных в <text:a xlink:type="simple" xlink:href="#anchor2362">позициях 362 - 378</text:a>, <text:a xlink:type="simple" xlink:href="#anchor2383">383 - 388</text:a>, <text:a xlink:type="simple" xlink:href="#anchor2390">390 - 399</text:a> и <text:a xlink:type="simple" xlink:href="#anchor2433">433</text:a> приложения N 2 к настоящему постановлению,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по 30 июня 2026 г. включительно, документом, подтверждающим происхождение таких товаров из государств - членов Евразийского экономического союза, в том числе из Российской Федерации, наряду с информацией, предусмотренной <text:a xlink:type="simple" xlink:href="#anchor31">подпунктами "а"</text:a> и <text:a xlink:type="simple" xlink:href="#anchor32">"б" пункта 3</text:a> настоящего постановления, является сертификат о происхождении товара, <text:a xlink:type="simple" xlink:href="http://ivo.garant.ru/document/redirect/411874072/1000">выданный</text:a> уполномоченным органом (организацией) государства - члена Евразийского экономического союза по <text:a xlink:type="simple" xlink:href="http://ivo.garant.ru/document/redirect/2568717/1200">форме</text:a>, установленной Правилами определения страны происхождения товаров, являющимися неотъемлемой частью Соглашения о Правилах определения страны происхождения товаров в Содружестве Независимых Государств от 20 ноября 2009 г. (далее - Правила определения страны происхождения товаров), и в соответствии с <text:a xlink:type="simple" xlink:href="http://ivo.garant.ru/document/redirect/2568717/200">критериями</text:a> определения страны происхождения товаров, предусмотренными Правилами определения страны происхождения товаров;</text:p>
      <text:p text:style-name="s22header">Информация об изменениях:</text:p>
      <text:p text:style-name="s22"><text:bookmark text:name="anchor104"/>Подпункт "г" изменен с 1 января 2026 г. - <text:a xlink:type="simple" xlink:href="http://ivo.garant.ru/document/redirect/413396332/1141">Постановление</text:a> Правительства России от 30 декабря 2025 г. № 2225</text:p>
      <text:p text:style-name="s22"><text:a xlink:type="simple" xlink:href="http://ivo.garant.ru/document/redirect/76849700/104">См. предыдущую редакцию</text:a></text:p>
      <text:p text:style-name="s1">г) при осуществлении закупок товаров, указанных в <text:a xlink:type="simple" xlink:href="#anchor2416">позициях 416 - 428</text:a> приложения N 2 к настоящему постановлению,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по 31 августа 2025 г. включительно, при осуществлении закупок товаров, указанных в <text:a xlink:type="simple" xlink:href="#anchor2400">позициях 400 - 415</text:a> и <text:a xlink:type="simple" xlink:href="#anchor2429">429 - 432</text:a> приложения N 2 к настоящему постановлению,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по 30 июня 2026 г. включительно, информацией и документами, подтверждающими происхождение таких товаров из государств - членов Евразийского экономического союза, в том числе из Российской Федерации, являются следующие информация и документы в совокупности:</text:p>
      <text:p text:style-name="s1">сертификат о происхождении товара, <text:a xlink:type="simple" xlink:href="http://ivo.garant.ru/document/redirect/411874072/1000">выданный</text:a> уполномоченным органом (организацией) государства - члена Евразийского экономического союза по <text:a xlink:type="simple" xlink:href="http://ivo.garant.ru/document/redirect/2568717/1200">форме</text:a>, установленной Правилами определения страны происхождения товаров, и в соответствии с <text:a xlink:type="simple" xlink:href="http://ivo.garant.ru/document/redirect/2568717/200">критериями</text:a> определения страны происхождения товаров, предусмотренными Правилами определения страны происхождения товаров;</text:p>
      <text:p text:style-name="s1"><text:bookmark text:name="anchor10433"/><text:a xlink:type="simple" xlink:href="http://ivo.garant.ru/document/redirect/411874112/11000">акт</text:a> экспертизы Торгово-промышленной палаты Российской Федерации или аналогичный документ, выданный уполномоченным органом (организацией) государства - члена Евразийского экономического союза, содержащий информацию о рассчитанной в соответствии с <text:a xlink:type="simple" xlink:href="http://ivo.garant.ru/document/redirect/2568717/243">подпунктом "в" пункта 2.4</text:a> Правил определения страны происхождения товаров доле стоимости используемых для производства одной единицы медицинского изделия иностранных материалов (сырья) в цене конечной продукции, величина которой не превышает предельные значения согласно <text:a xlink:type="simple" xlink:href="#anchor4000">приложению N 4</text:a>;</text:p>
      <text:p text:style-name="s1">реквизиты (дата и номер) документа, подтверждающего соответствие производства медицинских изделий требованиям <text:a xlink:type="simple" xlink:href="http://ivo.garant.ru/document/redirect/71863404/0">ГОСТ ISO 13485-2017</text:a> "Межгосударственный стандарт. Изделия медицинские. Системы менеджмента качества. Требования для целей регулирования";</text:p>
      <text:p text:style-name="s22header">Информация об изменениях:</text:p>
      <text:p text:style-name="s22"><text:bookmark text:name="anchor105"/>Подпункт "д" изменен с 1 сентября 2025 г. - <text:a xlink:type="simple" xlink:href="http://ivo.garant.ru/document/redirect/412615083/1033">Постановление</text:a> Правительства России от 29 августа 2025 г. № 1326</text:p>
      <text:p text:style-name="s22"><text:a xlink:type="simple" xlink:href="http://ivo.garant.ru/document/redirect/76849699/105">См. предыдущую редакцию</text:a></text:p>
      <text:p text:style-name="s1">д) до внесения изменений в право Евразийского экономического союза, предусматривающих подтверждение страны происхождения товаров, указанных в <text:a xlink:type="simple" xlink:href="#anchor1000">приложениях N 1 - 3</text:a> к настоящему постановлению, путем предоставления информации из <text:a xlink:type="simple" xlink:href="https://goszakupki.eaeunion.org/erpt/ru/registers/products">евразийского реестра</text:a> промышленных товаров, документом, подтверждающим происхождение таких товаров из государств - членов Евразийского экономического союза, за исключением Российской Федерации, является сертификат о происхождении товара, выданный уполномоченным органом (организацией) государства - члена Евразийского экономического союза по <text:a xlink:type="simple" xlink:href="http://ivo.garant.ru/document/redirect/2568717/1200">форме</text:a>, установленной Правилами определения страны происхождения товаров, и в соответствии с критериями определения страны происхождения товаров, предусмотренными Правилами определения страны происхождения товаров;</text:p>
      <text:p text:style-name="s22header">Информация об изменениях:</text:p>
      <text:p text:style-name="s22"><text:bookmark text:name="anchor106"/>Подпункт "е" изменен с 1 января 2026 г. - <text:a xlink:type="simple" xlink:href="http://ivo.garant.ru/document/redirect/413396332/1141">Постановление</text:a> Правительства России от 30 декабря 2025 г. № 2225</text:p>
      <text:p text:style-name="s22"><text:a xlink:type="simple" xlink:href="http://ivo.garant.ru/document/redirect/76849700/106">См. предыдущую редакцию</text:a></text:p>
      <text:p text:style-name="s1">е) при осуществлении закупки товара, указанного в <text:a xlink:type="simple" xlink:href="#anchor2433">позиции 433</text:a> приложения N 2 к настоящему постановлению, извещение об осуществлении которой размещено в единой информационной системе и приглашение принять участие в которой направлено либо контракт (договор) с единственным поставщиком (подрядчиком, исполнителем) при осуществлении которой заключен по 30 июня 2026 г. включительно, положения <text:a xlink:type="simple" xlink:href="#anchor419">подпункта "у" пункта 4</text:a> настоящего постановления применяются также в отношении лекарственных препаратов, включенных в <text:a xlink:type="simple" xlink:href="http://ivo.garant.ru/document/redirect/12177114/1000">перечень</text:a> стратегически значимых лекарственных средств, производство которых должно быть обеспечено на территории Российской Федерации, утвержденный <text:a xlink:type="simple" xlink:href="http://ivo.garant.ru/document/redirect/12177114/0">распоряжением</text:a> Правительства Российской Федерации от 6 июля 2010 г. N 1141-р;</text:p>
      <text:p text:style-name="s1"><text:bookmark text:name="anchor107"/>ж) положения <text:a xlink:type="simple" xlink:href="#anchor420">подпункта "ф" пункта 4</text:a> настоящего постановления в части, касающейся лекарственных препаратов, включенных в <text:a xlink:type="simple" xlink:href="http://ivo.garant.ru/document/redirect/12177114/1000">перечень</text:a> стратегически значимых лекарственных средств, производство которых должно быть обеспечено на территории Российской Федерации, утвержденный <text:a xlink:type="simple" xlink:href="http://ivo.garant.ru/document/redirect/12177114/0">распоряжением</text:a> Правительства Российской Федерации от 6 июля 2010 г. N 1141-р, после дня <text:a xlink:type="simple" xlink:href="http://ivo.garant.ru/document/redirect/411197448/0">вступления в силу</text:a> настоящего постановления применяются при осуществлении закупок,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с 1 сентября 2-го года после года включения лекарственного препарата, являющегося объектом закупки (предметом закупки), в указанный перечень;</text:p>
      <text:p text:style-name="s1"><text:bookmark text:name="anchor108"/>з) положения <text:a xlink:type="simple" xlink:href="#anchor6001">пункта 1</text:a>, <text:a xlink:type="simple" xlink:href="#anchor6084">подпункта "в" пункта 8</text:a> изменений, утвержденных настоящим постановлением, применяются к отношениям, связанным с осуществлением закупок,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с 1 января 2026 г.;</text:p>
      <text:p text:style-name="s22header">Информация об изменениях:</text:p>
      <text:p text:style-name="s22"><text:bookmark text:name="anchor109"/>Подпункт "и" изменен с 16 марта 2026 г. - <text:a xlink:type="simple" xlink:href="http://ivo.garant.ru/document/redirect/413632116/1001">Постановление</text:a> Правительства России от 11 февраля 2026 г. № 119</text:p>
      <text:p text:style-name="s22"><text:a xlink:type="simple" xlink:href="http://ivo.garant.ru/document/redirect/483425373/109">См. предыдущую редакцию</text:a></text:p>
      <text:p text:style-name="s1">и) изменения в <text:a xlink:type="simple" xlink:href="#anchor1000">приложение N 1</text:a> к настоящему постановлению и <text:a xlink:type="simple" xlink:href="#anchor2000">приложение N 2</text:a> к настоящему постановлению, не связанные с исключением позиций из соответствующего приложения, подлежат применению с 1 января очередного календарного года, за исключением случаев их принятия с 1 октября текущего календарного года по 1 апреля очередного календарного года включительно, при которых такие изменения подлежат применению с 1 июля очередного календарного года. Изменения в <text:a xlink:type="simple" xlink:href="#anchor3000">приложение N 3</text:a> к настоящему постановлению, не связанные с исключением позиций из него, подлежат применению с 1 января очередного календарного года. Постановлением Правительства Российской Федерации, предусматривающим внесение изменений в приложения № 1, 2 и (или) 3 к настоящему постановлению, не связанных с исключением позиций из указанных приложений, может быть установлен иной срок применения таких изменений;</text:p>
      <text:p text:style-name="s1"><text:bookmark text:name="anchor110"/>к) запрет, предусмотренный <text:a xlink:type="simple" xlink:href="#anchor1">пунктом 1</text:a> настоящего постановления, может не применяться при осуществлении в соответствии с <text:a xlink:type="simple" xlink:href="http://ivo.garant.ru/document/redirect/12188083/0">Федеральным законом</text:a> "О закупках товаров, работ, услуг отдельными видами юридических лиц" закупок товаров, указанных в <text:a xlink:type="simple" xlink:href="#anchor1001">позициях 1 - 21</text:a>, <text:a xlink:type="simple" xlink:href="#anchor1030">30</text:a>, <text:a xlink:type="simple" xlink:href="#anchor1032">32</text:a>, <text:a xlink:type="simple" xlink:href="#anchor1045">45 - 47</text:a>, <text:a xlink:type="simple" xlink:href="#anchor1049">49 - 52</text:a>, <text:a xlink:type="simple" xlink:href="#anchor1055">55 - 60</text:a>, <text:a xlink:type="simple" xlink:href="#anchor1062">62</text:a>, <text:a xlink:type="simple" xlink:href="#anchor1069">69 - 86</text:a>, <text:a xlink:type="simple" xlink:href="#anchor1088">88</text:a>, <text:a xlink:type="simple" xlink:href="#anchor1092">92 - 128</text:a>, <text:a xlink:type="simple" xlink:href="#anchor1137">137</text:a>, <text:a xlink:type="simple" xlink:href="#anchor1138">138</text:a>, <text:a xlink:type="simple" xlink:href="#anchor1140">140 - 145</text:a> приложения N 1 к настоящему постановлению, извещение об осуществлении которых размещено в единой информационной системе и приглашение принять участие в которых направлено либо договор с единственным поставщиком (исполнителем, подрядчиком) при осуществлении которых заключен до 1 июля 2025 г.;</text:p>
      <text:p text:style-name="s1"><text:bookmark text:name="anchor111"/>л) в случае неприменения в соответствии с <text:a xlink:type="simple" xlink:href="#anchor110">подпунктом "к"</text:a> настоящего пункта запрета, предусмотренного <text:a xlink:type="simple" xlink:href="#anchor1">пунктом 1</text:a> настоящего постановления, при осуществлении закупок соответствующих товаров применяются положения настоящего постановления, касающиеся ограничения закупок товаров (в том числе поставляемых при выполнении закупаемых работ, оказании закупаемых услуг), происходящих из иностранных государств и указанных в <text:a xlink:type="simple" xlink:href="#anchor2001">позициях 1 - 433</text:a> приложения N 2 к настоящему постановлению;</text:p>
      <text:p text:style-name="s22header">Информация об изменениях:</text:p>
      <text:p text:style-name="s22"><text:bookmark text:name="anchor10012"/>Подпункт "м" изменен с 6 февраля 2026 г. - <text:a xlink:type="simple" xlink:href="http://ivo.garant.ru/document/redirect/413542462/1">Постановление</text:a> Правительства России от 28 января 2026 г. № 61</text:p>
      <text:p text:style-name="s22"><text:a xlink:type="simple" xlink:href="http://ivo.garant.ru/document/redirect/483425241/10012">См. предыдущую редакцию</text:a></text:p>
      <text:p text:style-name="s1">м) при осуществлении заказчиками, включенными в сводный реестр организаций оборонно-промышленного комплекса, предусмотренный <text:a xlink:type="simple" xlink:href="http://ivo.garant.ru/document/redirect/186770/0">постановлением</text:a> Правительства Российской Федерации от 20 февраля 2004 г. № 96 "О сводном реестре организаций оборонно-промышленного комплекса", закупок товаров, извещение об осуществлении которых размещено в единой информационной системе и приглашение принять участие в которых направлено либо контракт с единственным поставщиком (подрядчиком, исполнителем), договор с единственным поставщиком (исполнителем, подрядчиком) при осуществлении которых заключен до 31 декабря 2026 г. включительно, не применяются:</text:p>
      <text:p text:style-name="s1">предусмотренные <text:a xlink:type="simple" xlink:href="#anchor1">пунктом 1</text:a>, <text:a xlink:type="simple" xlink:href="#anchor47">подпунктом "ж" пункта 4</text:a> настоящего постановления запреты закупок товаров (в том числе поставляемых при выполнении закупаемых работ, оказании закупаемых услуг), указанных в <text:a xlink:type="simple" xlink:href="#anchor1011">позициях 11 - 18</text:a>, <text:a xlink:type="simple" xlink:href="#anchor1020">20 - 22</text:a>, <text:a xlink:type="simple" xlink:href="#anchor1024">24 - 26</text:a>, <text:a xlink:type="simple" xlink:href="#anchor1030">30 - 35</text:a>, <text:a xlink:type="simple" xlink:href="#anchor1042">42</text:a>, <text:a xlink:type="simple" xlink:href="#anchor1045">45 - 47</text:a>, <text:a xlink:type="simple" xlink:href="#anchor1049">49</text:a>, <text:a xlink:type="simple" xlink:href="#anchor1051">51 - 62</text:a>, <text:a xlink:type="simple" xlink:href="#anchor1069">69 - 88</text:a>, <text:a xlink:type="simple" xlink:href="#anchor1092">92 - 128</text:a>, <text:a xlink:type="simple" xlink:href="#anchor1133">133 - 136</text:a>, <text:a xlink:type="simple" xlink:href="#anchor1139">139 - 142</text:a> приложения № 1 к настоящему постановлению, а также товаров, не указанных в приложении № 1 к настоящему постановлению;</text:p>
      <text:p text:style-name="s1">предусмотренные <text:a xlink:type="simple" xlink:href="#anchor1">пунктом 1</text:a> настоящего постановления ограничение и преимущество;</text:p>
      <text:p text:style-name="s22header">Информация об изменениях:</text:p>
      <text:p text:style-name="s22"><text:bookmark text:name="anchor10013"/>Подпункт "н" изменен с 1 января 2026 г. - <text:a xlink:type="simple" xlink:href="http://ivo.garant.ru/document/redirect/413396332/1142">Постановление</text:a> Правительства России от 30 декабря 2025 г. № 2225</text:p>
      <text:p text:style-name="s22"><text:a xlink:type="simple" xlink:href="http://ivo.garant.ru/document/redirect/76849700/10013">См. предыдущую редакцию</text:a></text:p>
      <text:p text:style-name="s1">н) положения <text:a xlink:type="simple" xlink:href="#anchor312">абзаца второго подпункта "а" пункта 3</text:a> настоящего постановления не применяются:</text:p>
      <text:p text:style-name="s1"><text:bookmark text:name="anchor100132"/>для подтверждения происхождения из Российской Федерации товаров, указанных в <text:a xlink:type="simple" xlink:href="#anchor1139">позиции 139</text:a> приложения N 1 к настоящему постановлению, <text:a xlink:type="simple" xlink:href="#anchor2273">позициях 273</text:a>, <text:a xlink:type="simple" xlink:href="#anchor2276">276</text:a>, <text:a xlink:type="simple" xlink:href="#anchor2297">297 - 299</text:a>, <text:a xlink:type="simple" xlink:href="#anchor2304">304 - 306</text:a>, <text:a xlink:type="simple" xlink:href="#anchor2309">309 - 312</text:a>, <text:a xlink:type="simple" xlink:href="#anchor2314">314</text:a>, <text:a xlink:type="simple" xlink:href="#anchor2316">316</text:a>, <text:a xlink:type="simple" xlink:href="#anchor2318">318</text:a>, <text:a xlink:type="simple" xlink:href="#anchor2320">320</text:a>, <text:a xlink:type="simple" xlink:href="#anchor2334">334</text:a>, <text:a xlink:type="simple" xlink:href="#anchor2354">354</text:a> и <text:a xlink:type="simple" xlink:href="#anchor2382">382</text:a> приложения N 2 к настоящему постановлению, <text:a xlink:type="simple" xlink:href="#anchor3079">позициях 79 - 81</text:a>, <text:a xlink:type="simple" xlink:href="#anchor3083">83 - 87</text:a>, <text:a xlink:type="simple" xlink:href="#anchor3105">105</text:a>, <text:a xlink:type="simple" xlink:href="#anchor3272">272</text:a>, <text:a xlink:type="simple" xlink:href="#anchor3275">275</text:a> приложения N 3 к настоящему постановлению и реестровые записи в <text:a xlink:type="simple" xlink:href="https://gisp.gov.ru/pp719v2/pub/prod/">реестре</text:a> российской промышленной продукции в отношении которых сформированы по 10 октября 2023 г. включительно, при осуществлении закупок таких товаров (в том числе поставляемых при выполнении закупаемых работ, оказании закупаемых услуг),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по 31 декабря 2026 г. включительно;</text:p>
      <text:p text:style-name="s1"><text:bookmark text:name="anchor100133"/>для подтверждения происхождения из Российской Федерации товаров, указанных в <text:a xlink:type="simple" xlink:href="#anchor2205">позициях 205 - 210</text:a>, <text:a xlink:type="simple" xlink:href="#anchor2213">213 - 232</text:a>, <text:a xlink:type="simple" xlink:href="#anchor2235">235</text:a>, <text:a xlink:type="simple" xlink:href="#anchor2241">241</text:a>, <text:a xlink:type="simple" xlink:href="#anchor2248">248 - 251</text:a> приложения N 2 к настоящему постановлению, <text:a xlink:type="simple" xlink:href="#anchor3048">позициях 48 - 55</text:a>, <text:a xlink:type="simple" xlink:href="#anchor3057">57 - 62</text:a>, <text:a xlink:type="simple" xlink:href="#anchor3068">68 - 72</text:a> приложения N 3 к настоящему постановлению и реестровые записи в реестре российской промышленной продукции в отношении которых сформированы по 10 августа 2025 г. включительно, при осуществлении закупок таких товаров (в том числе поставляемых при выполнении закупаемых работ, оказании закупаемых услуг),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по 31 августа 2026 г. включительно;</text:p>
      <text:p text:style-name="s1"><text:bookmark text:name="anchor100134"/>для подтверждения происхождения из Российской Федерации товаров, указанных в <text:a xlink:type="simple" xlink:href="#anchor1016">позициях 16</text:a>, <text:a xlink:type="simple" xlink:href="#anchor1017">17</text:a>, <text:a xlink:type="simple" xlink:href="#anchor1140">140</text:a>, <text:a xlink:type="simple" xlink:href="#anchor1141">141</text:a> и <text:a xlink:type="simple" xlink:href="#anchor1144">144</text:a> приложения N 1 к настоящему постановлению, <text:a xlink:type="simple" xlink:href="#anchor2002">позициях 2</text:a>, <text:a xlink:type="simple" xlink:href="#anchor2172">172 - 179</text:a>, <text:a xlink:type="simple" xlink:href="#anchor2189">189</text:a>, <text:a xlink:type="simple" xlink:href="#anchor2362">362 - 364</text:a>, <text:a xlink:type="simple" xlink:href="#anchor2366">366 - 378</text:a>, <text:a xlink:type="simple" xlink:href="#anchor2383">383 - 388</text:a>, <text:a xlink:type="simple" xlink:href="#anchor2390">390 - 415</text:a>, <text:a xlink:type="simple" xlink:href="#anchor2429">429 - 433 </text:a>приложения N 2 к настоящему постановлению, <text:a xlink:type="simple" xlink:href="#anchor3271">позиции 271</text:a> приложения № 3 к настоящему постановлению и реестровые записи в реестре российской промышленной продукции в отношении которых сформированы по 30 июня 2026 г. включительно, при осуществлении закупок таких товаров (в том числе поставляемых при выполнении закупаемых работ, оказании закупаемых услуг),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по 30 ноября 2026 г. включительно.</text:p>
      <text:p text:style-name="s1"><text:bookmark text:name="anchor11"/>11. Рекомендовать юридическим лицам, указанным в <text:a xlink:type="simple" xlink:href="http://ivo.garant.ru/document/redirect/12188083/12">части 2 статьи 1</text:a> Федерального закона "О закупках товаров, работ, услуг отдельными видами юридических лиц", при осуществлении в соответствии с указанным Федеральным законом и настоящим постановлением закупок лекарственных препаратов и медицинских изделий руководствоваться положениями постановлений Правительства Российской Федерации <text:a xlink:type="simple" xlink:href="http://ivo.garant.ru/document/redirect/70479402/0">от 17 октября 2013 г. N 929</text:a> "Об установлении предельного значения начальной (максимальной) цены контракта (цены лота), при превышении которого не могут быть предметом одного контракта (одного лота) лекарственные средства с различными международными непатентованными наименованиями или при отсутствии таких наименований с химическими, группировочными наименованиями" и <text:a xlink:type="simple" xlink:href="http://ivo.garant.ru/document/redirect/400666092/0">от 19 апреля 2021 г. N 620</text:a> "О требовании к формированию лотов при осуществлении закупок медицинских изделий, являющихся объектом закупки для обеспечения государственных и муниципальных нужд".</text:p>
      <text:p text:style-name="s22header">Информация об изменениях:</text:p>
      <text:p text:style-name="s22"><text:bookmark text:name="anchor12"/>Пункт 12 изменен с 1 января 2026 г. - <text:a xlink:type="simple" xlink:href="http://ivo.garant.ru/document/redirect/413396332/1015">Постановление</text:a> Правительства России от 30 декабря 2025 г. № 2225</text:p>
      <text:p text:style-name="s22"><text:a xlink:type="simple" xlink:href="http://ivo.garant.ru/document/redirect/76849700/12">См. предыдущую редакцию</text:a></text:p>
      <text:p text:style-name="s1">12. Настоящее постановление вступает в силу с 1 января 2025 г., за исключением <text:a xlink:type="simple" xlink:href="#anchor420">подпункта "ф" пункта 4</text:a> настоящего постановления, который вступает в силу с 1 июля 2026 г.</text:p>
      <text:p text:style-name="s1"/>
      <table:table table:name="10204" table:style-name="10204">
        <table:table-column table:style-name="6803"/>
        <table:table-column table:style-name="3401"/>
        <table:table-row>
          <table:table-cell>
            <text:p text:style-name="s16_fi0">Председатель Правительства
Российской Федерации</text:p>
          </table:table-cell>
          <table:table-cell>
            <text:p text:style-name="s1_right_fi0">М. Мишустин</text:p>
          </table:table-cell>
        </table:table-row>
      </table:table>
      <text:p text:style-name="s1"/>
      <text:p text:style-name="s22header">Информация об изменениях:</text:p>
      <text:p text:style-name="s22"><text:bookmark text:name="anchor1000"/>Приложение 1 изменено с 1 июля 2026 г. - <text:a xlink:type="simple" xlink:href="http://ivo.garant.ru/document/redirect/413308835/1002">Постановление</text:a> Правительства России от 18 декабря 2025 г. № 2062</text:p>
      <text:p text:style-name="s22"><text:a xlink:type="simple" xlink:href="http://ivo.garant.ru/document/redirect/483414703/1000">См. будущую редакцию</text:a></text:p>
      <text:p text:style-name="s22">Приложение 1 изменено с 16 марта 2026 г. - <text:a xlink:type="simple" xlink:href="http://ivo.garant.ru/document/redirect/413632116/1002">Постановление</text:a> Правительства России от 11 февраля 2026 г. № 119</text:p>
      <text:p text:style-name="s22"><text:a xlink:type="simple" xlink:href="http://ivo.garant.ru/document/redirect/483425373/1000">См. предыдущую редакцию</text:a></text:p>
      <text:p text:style-name="s1_right_fi698"><text:span text:style-name="s10">ПРИЛОЖЕНИЕ N 1
к <text:a xlink:type="simple" xlink:href="#anchor0">постановлению</text:a> Правительства
Российской Федерации
от 23 декабря 2024 г. N 1875</text:span></text:p>
      <text:p text:style-name="s1"/>
      <text:h text:outline-level="1" text:style-name="s3">Перечень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гражданами, иностранными юридическими лицами, в отношении которых устанавливается запрет закупок для обеспечения государственных и муниципальных нужд, закупок отдельными видами юридических лиц</text:h>
      <text:p text:style-name="s52header">С изменениями и дополнениями от:</text:p>
      <text:p text:style-name="s52">10 июня 2025 г., 11 февраля 2026 г.</text:p>
      <text:p text:style-name="s1"/>
      <table:table table:name="10027" table:style-name="10027">
        <table:table-column table:style-name="681"/>
        <table:table-column table:style-name="6055"/>
        <table:table-column table:style-name="3291"/>
        <table:table-row>
          <table:table-cell table:style-name="13" table:number-columns-spanned="2">
            <table:covered-table-cell/>
            <text:p text:style-name="s1_center_fi0"><text:bookmark text:name="anchor10100"/>Наименование товара, работы, услуги</text:p>
          </table:table-cell>
          <table:table-cell table:style-name="9">
            <text:p text:style-name="s1_center_fi0">Код товара, работы, услуги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row>
        <table:table-row>
          <table:table-cell table:style-name="0">
            <text:p text:style-name="s1_center_fi0"><text:bookmark text:name="anchor1001"/>1.</text:p>
          </table:table-cell>
          <table:table-cell table:style-name="0">
            <text:p text:style-name="s16_fi0">Ткани текстильные</text:p>
          </table:table-cell>
          <table:table-cell table:style-name="0">
            <text:p text:style-name="s1_center_fi0"><text:a xlink:type="simple" xlink:href="http://ivo.garant.ru/document/redirect/70650730/132">13.2</text:a></text:p>
          </table:table-cell>
        </table:table-row>
        <table:table-row>
          <table:table-cell table:style-name="0">
            <text:p text:style-name="s1_center_fi0"><text:bookmark text:name="anchor1002"/>2.</text:p>
          </table:table-cell>
          <table:table-cell table:style-name="0">
            <text:p text:style-name="s16_fi0">Изделия текстильные прочие</text:p>
          </table:table-cell>
          <table:table-cell table:style-name="0">
            <text:p text:style-name="s1_center_fi0"><text:a xlink:type="simple" xlink:href="http://ivo.garant.ru/document/redirect/70650730/139">13.9</text:a></text:p>
          </table:table-cell>
        </table:table-row>
        <table:table-row>
          <table:table-cell table:style-name="0">
            <text:p text:style-name="s1_center_fi0"><text:bookmark text:name="anchor1003"/>3.</text:p>
          </table:table-cell>
          <table:table-cell table:style-name="0">
            <text:p text:style-name="s16_fi0">Одежда, кроме одежды из меха</text:p>
          </table:table-cell>
          <table:table-cell table:style-name="0">
            <text:p text:style-name="s1_center_fi0"><text:a xlink:type="simple" xlink:href="http://ivo.garant.ru/document/redirect/70650730/141">14.1</text:a></text:p>
          </table:table-cell>
        </table:table-row>
        <table:table-row>
          <table:table-cell table:style-name="0">
            <text:p text:style-name="s1_center_fi0"><text:bookmark text:name="anchor1004"/>4.</text:p>
          </table:table-cell>
          <table:table-cell table:style-name="0">
            <text:p text:style-name="s16_fi0">Изделия меховые</text:p>
          </table:table-cell>
          <table:table-cell table:style-name="0">
            <text:p text:style-name="s1_center_fi0"><text:a xlink:type="simple" xlink:href="http://ivo.garant.ru/document/redirect/70650730/14020">14.20</text:a></text:p>
          </table:table-cell>
        </table:table-row>
        <table:table-row>
          <table:table-cell table:style-name="0">
            <text:p text:style-name="s1_center_fi0"><text:bookmark text:name="anchor1005"/>5.</text:p>
          </table:table-cell>
          <table:table-cell table:style-name="0">
            <text:p text:style-name="s16_fi0">Предметы одежды трикотажные и вязаные</text:p>
          </table:table-cell>
          <table:table-cell table:style-name="0">
            <text:p text:style-name="s1_center_fi0"><text:a xlink:type="simple" xlink:href="http://ivo.garant.ru/document/redirect/70650730/143">14.3</text:a></text:p>
          </table:table-cell>
        </table:table-row>
        <table:table-row>
          <table:table-cell table:style-name="0">
            <text:p text:style-name="s1_center_fi0"><text:bookmark text:name="anchor1006"/>6.</text:p>
          </table:table-cell>
          <table:table-cell table:style-name="0">
            <text:p text:style-name="s16_fi0">Кожа дубленая и выделанная; чемоданы, сумки дамские, изделия шорно-седельные и упряжь; меха выделанные и окрашенные</text:p>
          </table:table-cell>
          <table:table-cell table:style-name="0">
            <text:p text:style-name="s1_center_fi0"><text:a xlink:type="simple" xlink:href="http://ivo.garant.ru/document/redirect/70650730/151">15.1</text:a></text:p>
          </table:table-cell>
        </table:table-row>
        <table:table-row>
          <table:table-cell table:style-name="0">
            <text:p text:style-name="s1_center_fi0"><text:bookmark text:name="anchor1007"/>7.</text:p>
          </table:table-cell>
          <table:table-cell table:style-name="0">
            <text:p text:style-name="s16_fi0">Обувь</text:p>
          </table:table-cell>
          <table:table-cell table:style-name="0">
            <text:p text:style-name="s1_center_fi0"><text:a xlink:type="simple" xlink:href="http://ivo.garant.ru/document/redirect/70650730/152">15.2</text:a></text:p>
          </table:table-cell>
        </table:table-row>
        <table:table-row>
          <table:table-cell table:style-name="0">
            <text:p text:style-name="s1_center_fi0"><text:bookmark text:name="anchor1008"/>8.</text:p>
          </table:table-cell>
          <table:table-cell table:style-name="0">
            <text:p text:style-name="s16_fi0">Плиты древесно-стружечные и аналогичные плиты из древесины или других одревесневших материалов</text:p>
          </table:table-cell>
          <table:table-cell table:style-name="0">
            <text:p text:style-name="s1_center_fi0"><text:a xlink:type="simple" xlink:href="http://ivo.garant.ru/document/redirect/70650730/162113">16.21.13</text:a></text:p>
          </table:table-cell>
        </table:table-row>
        <table:table-row>
          <table:table-cell table:style-name="0">
            <text:p text:style-name="s1_center_fi0"><text:bookmark text:name="anchor1009"/>9.</text:p>
          </table:table-cell>
          <table:table-cell table:style-name="0">
            <text:p text:style-name="s16_fi0">Плиты древесно-волокнистые из древесины или других одревесневших материалов</text:p>
          </table:table-cell>
          <table:table-cell table:style-name="0">
            <text:p text:style-name="s1_center_fi0"><text:a xlink:type="simple" xlink:href="http://ivo.garant.ru/document/redirect/70650730/162114">16.21.14</text:a></text:p>
          </table:table-cell>
        </table:table-row>
        <table:table-row>
          <table:table-cell table:style-name="0">
            <text:p text:style-name="s1_center_fi0"><text:bookmark text:name="anchor10010"/>10.</text:p>
          </table:table-cell>
          <table:table-cell table:style-name="0">
            <text:p text:style-name="s16_fi0">Бумага и картон</text:p>
          </table:table-cell>
          <table:table-cell table:style-name="0">
            <text:p text:style-name="s1_center_fi0"><text:a xlink:type="simple" xlink:href="http://ivo.garant.ru/document/redirect/70650730/1712">17.12</text:a></text:p>
          </table:table-cell>
        </table:table-row>
        <table:table-row>
          <table:table-cell table:style-name="0">
            <text:p text:style-name="s1_center_fi0"><text:bookmark text:name="anchor1011"/>11.</text:p>
          </table:table-cell>
          <table:table-cell table:style-name="0">
            <text:p text:style-name="s16_fi0">Материалы лакокрасочные и аналогичные для нанесения покрытий, полиграфические краски и мастики</text:p>
          </table:table-cell>
          <table:table-cell table:style-name="0">
            <text:p text:style-name="s1_center_fi0"><text:a xlink:type="simple" xlink:href="http://ivo.garant.ru/document/redirect/70650730/2030">20.30</text:a></text:p>
          </table:table-cell>
        </table:table-row>
        <table:table-row>
          <table:table-cell table:style-name="0">
            <text:p text:style-name="s1_center_fi0"><text:bookmark text:name="anchor1012"/>12.</text:p>
          </table:table-cell>
          <table:table-cell table:style-name="0">
            <text:p text:style-name="s16_fi0">Клеи</text:p>
          </table:table-cell>
          <table:table-cell table:style-name="0">
            <text:p text:style-name="s1_center_fi0"><text:a xlink:type="simple" xlink:href="http://ivo.garant.ru/document/redirect/70650730/2052">20.52</text:a></text:p>
          </table:table-cell>
        </table:table-row>
        <table:table-row>
          <table:table-cell table:style-name="0">
            <text:p text:style-name="s1_center_fi0"><text:bookmark text:name="anchor1013"/>13.</text:p>
          </table:table-cell>
          <table:table-cell table:style-name="0">
            <text:p text:style-name="s16_fi0">Фотопластинки и фотопленки; фотопленки для моментальных фотоснимков; составы химические и продукты несмешанные, используемые в фотографии</text:p>
          </table:table-cell>
          <table:table-cell table:style-name="0">
            <text:p text:style-name="s1_center_fi0"><text:a xlink:type="simple" xlink:href="http://ivo.garant.ru/document/redirect/70650730/20591">20.59.1</text:a></text:p>
          </table:table-cell>
        </table:table-row>
        <table:table-row>
          <table:table-cell table:style-name="0">
            <text:p text:style-name="s1_center_fi0"><text:bookmark text:name="anchor1014"/>14.</text:p>
          </table:table-cell>
          <table:table-cell table:style-name="0">
            <text:p text:style-name="s16_fi0">Шины, покрышки и камеры резиновые новые</text:p>
          </table:table-cell>
          <table:table-cell table:style-name="0">
            <text:p text:style-name="s1_center_fi0"><text:a xlink:type="simple" xlink:href="http://ivo.garant.ru/document/redirect/70650730/22111">22.11.1</text:a></text:p>
          </table:table-cell>
        </table:table-row>
        <table:table-row>
          <table:table-cell table:style-name="0">
            <text:p text:style-name="s1_center_fi0"><text:bookmark text:name="anchor1015"/>15.</text:p>
          </table:table-cell>
          <table:table-cell table:style-name="0">
            <text:p text:style-name="s16_fi0">Изделия из вулканизированной резины прочие, не включенные в другие группировки (только в отношении резиновых частей обуви)</text:p>
          </table:table-cell>
          <table:table-cell table:style-name="0">
            <text:p text:style-name="s1_center_fi0"><text:a xlink:type="simple" xlink:href="http://ivo.garant.ru/document/redirect/70650730/221973">22.19.73</text:a></text:p>
          </table:table-cell>
        </table:table-row>
        <table:table-row>
          <table:table-cell table:style-name="0">
            <text:p text:style-name="s1_center_fi0"><text:bookmark text:name="anchor1016"/>16.</text:p>
          </table:table-cell>
          <table:table-cell table:style-name="0">
            <text:p text:style-name="s16_fi0">Изделия пластмассовые прочие</text:p>
          </table:table-cell>
          <table:table-cell table:style-name="0">
            <text:p text:style-name="s1_center_fi0"><text:a xlink:type="simple" xlink:href="http://ivo.garant.ru/document/redirect/70650730/951110049">22.29.29</text:a></text:p>
          </table:table-cell>
        </table:table-row>
        <table:table-row>
          <table:table-cell table:style-name="0">
            <text:p text:style-name="s1_center_fi0"><text:bookmark text:name="anchor1017"/>17.</text:p>
          </table:table-cell>
          <table:table-cell table:style-name="0">
            <text:p text:style-name="s16_fi0">Пробирки вакуумные для взятия образцов крови ИВД, соответствующие кодам 293370, 293400, 293420, 293480, 293500, 293540, 293570, 293630, 293640, 293660, 293700, 293760, 293780, 334330 вида медицинского изделия в соответствии с <text:a xlink:type="simple" xlink:href="http://ivo.garant.ru/document/redirect/70199586/1000">номенклатурной классификацией</text:a> медицинских изделий, утвержденной Министерством здравоохранения Российской Федерации (далее - номенклатурная классификация)</text:p>
          </table:table-cell>
          <table:table-cell table:style-name="0">
            <text:p text:style-name="s1_center_fi0"><text:a xlink:type="simple" xlink:href="http://ivo.garant.ru/document/redirect/70650730/222929190">22.29.29.190</text:a></text:p>
            <text:p text:style-name="s1_center_fi0"><text:a xlink:type="simple" xlink:href="http://ivo.garant.ru/document/redirect/70650730/325013190">32.50.13.190</text:a></text:p>
            <text:p text:style-name="s1_center_fi0"><text:a xlink:type="simple" xlink:href="http://ivo.garant.ru/document/redirect/70650730/325050181">32.50.50.181</text:a></text:p>
            <text:p text:style-name="s1_center_fi0"><text:a xlink:type="simple" xlink:href="http://ivo.garant.ru/document/redirect/70650730/325050190">32.50.50.190</text:a></text:p>
          </table:table-cell>
        </table:table-row>
        <table:table-row>
          <table:table-cell table:style-name="0">
            <text:p text:style-name="s1_center_fi0"><text:bookmark text:name="anchor1018"/>18.</text:p>
          </table:table-cell>
          <table:table-cell table:style-name="0">
            <text:p text:style-name="s16_fi0">Изоляторы электрические стеклянные</text:p>
          </table:table-cell>
          <table:table-cell table:style-name="0">
            <text:p text:style-name="s1_center_fi0"><text:a xlink:type="simple" xlink:href="http://ivo.garant.ru/document/redirect/70650730/4527">23.19.25</text:a></text:p>
          </table:table-cell>
        </table:table-row>
        <table:table-row>
          <table:table-cell table:style-name="0">
            <text:p text:style-name="s1_center_fi0"><text:bookmark text:name="anchor1019"/>19.</text:p>
          </table:table-cell>
          <table:table-cell table:style-name="0">
            <text:p text:style-name="s16_fi0">Жернова, точильные камни, шлифовальные круги и аналогичные изделия без каркаса, для обработки камней, и их части, из природного камня, агломерированных природных или искусственных абразивов или керамики</text:p>
          </table:table-cell>
          <table:table-cell table:style-name="0">
            <text:p text:style-name="s1_center_fi0"><text:a xlink:type="simple" xlink:href="http://ivo.garant.ru/document/redirect/70650730/239111">23.91.11</text:a></text:p>
          </table:table-cell>
        </table:table-row>
        <table:table-row>
          <table:table-cell table:style-name="0">
            <text:p text:style-name="s1_center_fi0"><text:bookmark text:name="anchor1191"/>19<text:span text:style-name="upper"><text:span> 1</text:span></text:span>.</text:p>
          </table:table-cell>
          <table:table-cell table:style-name="0">
            <text:p text:style-name="s16_fi0">Башня (опора) из черных металлов, предназначенная для ветроэнергетических установок</text:p>
          </table:table-cell>
          <table:table-cell table:style-name="0">
            <text:p text:style-name="s1_center_fi0">из <text:a xlink:type="simple" xlink:href="http://ivo.garant.ru/document/redirect/70650730/25112311">25.11.23.110</text:a></text:p>
          </table:table-cell>
        </table:table-row>
        <table:table-row>
          <table:table-cell table:style-name="0">
            <text:p text:style-name="s1_center_fi0"><text:bookmark text:name="anchor1020"/>20.</text:p>
          </table:table-cell>
          <table:table-cell table:style-name="0">
            <text:p text:style-name="s16_fi0">Радиаторы центрального отопления и их секции из прочих металлов</text:p>
          </table:table-cell>
          <table:table-cell table:style-name="0">
            <text:p text:style-name="s1_center_fi0"><text:a xlink:type="simple" xlink:href="http://ivo.garant.ru/document/redirect/70650730/252111130">25.21.11.130</text:a></text:p>
          </table:table-cell>
        </table:table-row>
        <table:table-row>
          <table:table-cell table:style-name="0">
            <text:p text:style-name="s1_center_fi0"><text:bookmark text:name="anchor1021"/>21.</text:p>
          </table:table-cell>
          <table:table-cell table:style-name="0">
            <text:p text:style-name="s16_fi0">Ложки, вилки, половники, шумовки, лопаточки для тортов, ножи для рыбы, ножи для масла, щипцы для сахара и аналогичные кухонные и столовые приборы</text:p>
          </table:table-cell>
          <table:table-cell table:style-name="0">
            <text:p text:style-name="s1_center_fi0"><text:a xlink:type="simple" xlink:href="http://ivo.garant.ru/document/redirect/70650730/257114">25.71.14</text:a></text:p>
          </table:table-cell>
        </table:table-row>
        <table:table-row>
          <table:table-cell table:style-name="0">
            <text:p text:style-name="s1_center_fi0"><text:bookmark text:name="anchor1022"/>22.</text:p>
          </table:table-cell>
          <table:table-cell table:style-name="0">
            <text:p text:style-name="s16_fi0">Инструмент ручной прочий</text:p>
            <text:p text:style-name="s1"/>
          </table:table-cell>
          <table:table-cell table:style-name="0">
            <text:p text:style-name="s1_center_fi0"><text:a xlink:type="simple" xlink:href="http://ivo.garant.ru/document/redirect/70650730/73330">25.73.30</text:a></text:p>
          </table:table-cell>
        </table:table-row>
        <table:table-row>
          <table:table-cell table:style-name="0">
            <text:p text:style-name="s1_center_fi0"><text:bookmark text:name="anchor1023"/>23.</text:p>
          </table:table-cell>
          <table:table-cell table:style-name="0">
            <text:p text:style-name="s16_fi0">Инструменты рабочие сменные для станков или для ручного инструмента (с механическим приводом или без него)</text:p>
          </table:table-cell>
          <table:table-cell table:style-name="0">
            <text:p text:style-name="s1_center_fi0"><text:a xlink:type="simple" xlink:href="http://ivo.garant.ru/document/redirect/70650730/257340">25.73.40</text:a></text:p>
          </table:table-cell>
        </table:table-row>
        <table:table-row>
          <table:table-cell table:style-name="0">
            <text:p text:style-name="s1_center_fi0"><text:bookmark text:name="anchor1024"/>24.</text:p>
          </table:table-cell>
          <table:table-cell table:style-name="0">
            <text:p text:style-name="s16_fi0">Инструмент прочий</text:p>
          </table:table-cell>
          <table:table-cell table:style-name="0">
            <text:p text:style-name="s1_center_fi0"><text:a xlink:type="simple" xlink:href="http://ivo.garant.ru/document/redirect/70650730/257360">25.73.60</text:a></text:p>
          </table:table-cell>
        </table:table-row>
        <table:table-row>
          <table:table-cell table:style-name="0">
            <text:p text:style-name="s1_center_fi0"><text:bookmark text:name="anchor1025"/>25.</text:p>
          </table:table-cell>
          <table:table-cell table:style-name="0">
            <text:p text:style-name="s16_fi0">Схемы интегральные электронные</text:p>
          </table:table-cell>
          <table:table-cell table:style-name="0">
            <text:p text:style-name="s1_center_fi0"><text:a xlink:type="simple" xlink:href="http://ivo.garant.ru/document/redirect/70650730/26113">26.11.3</text:a></text:p>
          </table:table-cell>
        </table:table-row>
        <table:table-row>
          <table:table-cell table:style-name="0">
            <text:p text:style-name="s1_center_fi0"><text:bookmark text:name="anchor1026"/>26.</text:p>
          </table:table-cell>
          <table:table-cell table:style-name="0">
            <text:p text:style-name="s16_fi0">Карты со встроенными интегральными схемами (смарт-карты)</text:p>
          </table:table-cell>
          <table:table-cell table:style-name="0">
            <text:p text:style-name="s1_center_fi0"><text:a xlink:type="simple" xlink:href="http://ivo.garant.ru/document/redirect/70650730/26123">26.12.3</text:a></text:p>
          </table:table-cell>
        </table:table-row>
        <table:table-row>
          <table:table-cell table:style-name="0">
            <text:p text:style-name="s1_center_fi0"><text:bookmark text:name="anchor1027"/>27.</text:p>
          </table:table-cell>
          <table:table-cell table:style-name="0">
            <text:p text:style-name="s16_fi0">Устройства числового программного управления</text:p>
          </table:table-cell>
          <table:table-cell table:style-name="0">
            <text:p text:style-name="s1_center_fi0"><text:a xlink:type="simple" xlink:href="http://ivo.garant.ru/document/redirect/70650730/262040150">26.20.40.150</text:a></text:p>
          </table:table-cell>
        </table:table-row>
        <table:table-row>
          <table:table-cell table:style-name="0">
            <text:p text:style-name="s1_center_fi0"><text:bookmark text:name="anchor1028"/>28.</text:p>
          </table:table-cell>
          <table:table-cell table:style-name="0">
            <text:p text:style-name="s16_fi0">Счетчики производства или потребления электроэнергии</text:p>
          </table:table-cell>
          <table:table-cell table:style-name="0">
            <text:p text:style-name="s1_center_fi0"><text:a xlink:type="simple" xlink:href="http://ivo.garant.ru/document/redirect/70650730/26516313">26.51.63.130</text:a></text:p>
          </table:table-cell>
        </table:table-row>
        <table:table-row>
          <table:table-cell table:style-name="0">
            <text:p text:style-name="s1_center_fi0"><text:bookmark text:name="anchor1029"/>29.</text:p>
          </table:table-cell>
          <table:table-cell table:style-name="0">
            <text:p text:style-name="s16_fi0">Зарядные станции для электротранспорта</text:p>
          </table:table-cell>
          <table:table-cell table:style-name="0">
            <text:p text:style-name="s1_center_fi0"><text:a xlink:type="simple" xlink:href="http://ivo.garant.ru/document/redirect/70650730/271150120">27.11.50.120</text:a> <text:a xlink:type="simple" xlink:href="http://ivo.garant.ru/document/redirect/70650730/279011900">27.90.11.900</text:a></text:p>
            <text:p text:style-name="s1_center_fi0"><text:a xlink:type="simple" xlink:href="http://ivo.garant.ru/document/redirect/70650730/279419">27.90.40.190</text:a></text:p>
          </table:table-cell>
        </table:table-row>
        <table:table-row>
          <table:table-cell table:style-name="0">
            <text:p text:style-name="s1_center_fi0"><text:bookmark text:name="anchor1030"/>30.</text:p>
          </table:table-cell>
          <table:table-cell table:style-name="0">
            <text:p text:style-name="s16_fi0">Выключатели автоматические на напряжение не более 1 кВ</text:p>
          </table:table-cell>
          <table:table-cell table:style-name="0">
            <text:p text:style-name="s1_center_fi0"><text:a xlink:type="simple" xlink:href="http://ivo.garant.ru/document/redirect/70650730/271222">27.12.22</text:a></text:p>
          </table:table-cell>
        </table:table-row>
        <table:table-row>
          <table:table-cell table:style-name="0">
            <text:p text:style-name="s1_center_fi0"><text:bookmark text:name="anchor1031"/>31.</text:p>
          </table:table-cell>
          <table:table-cell table:style-name="0">
            <text:p text:style-name="s16_fi0">Аккумуляторы свинцовые для запуска поршневых двигателей</text:p>
          </table:table-cell>
          <table:table-cell table:style-name="0">
            <text:p text:style-name="s1_center_fi0"><text:a xlink:type="simple" xlink:href="http://ivo.garant.ru/document/redirect/70650730/272021">27.20.21</text:a></text:p>
          </table:table-cell>
        </table:table-row>
        <table:table-row>
          <table:table-cell table:style-name="0">
            <text:p text:style-name="s1_center_fi0"><text:bookmark text:name="anchor1032"/>32.</text:p>
          </table:table-cell>
          <table:table-cell table:style-name="0">
            <text:p text:style-name="s16_fi0">Светильники и осветительные устройства прочие, не включенные в другие группировки, за исключением медицинских изделий</text:p>
          </table:table-cell>
          <table:table-cell table:style-name="0">
            <text:p text:style-name="s1_center_fi0"><text:a xlink:type="simple" xlink:href="http://ivo.garant.ru/document/redirect/70650730/27439">27.40.39</text:a></text:p>
          </table:table-cell>
        </table:table-row>
        <table:table-row>
          <table:table-cell table:style-name="0">
            <text:p text:style-name="s1_center_fi0"><text:bookmark text:name="anchor1033"/>33.</text:p>
          </table:table-cell>
          <table:table-cell table:style-name="0">
            <text:p text:style-name="s16_fi0">Машины и оборудование электрические для пайки мягким и твердым припоем и сварки</text:p>
          </table:table-cell>
          <table:table-cell table:style-name="0">
            <text:p text:style-name="s1_center_fi0"><text:a xlink:type="simple" xlink:href="http://ivo.garant.ru/document/redirect/70650730/279031110">27.90.31.110</text:a></text:p>
          </table:table-cell>
        </table:table-row>
        <table:table-row>
          <table:table-cell table:style-name="0">
            <text:p text:style-name="s1_center_fi0"><text:bookmark text:name="anchor1034"/>34.</text:p>
          </table:table-cell>
          <table:table-cell table:style-name="0">
            <text:p text:style-name="s16_fi0">Насосы воздушные или вакуумные; воздушные или прочие газовые компрессоры</text:p>
          </table:table-cell>
          <table:table-cell table:style-name="0">
            <text:p text:style-name="s1_center_fi0"><text:a xlink:type="simple" xlink:href="http://ivo.garant.ru/document/redirect/70650730/28132">28.13.2</text:a></text:p>
          </table:table-cell>
        </table:table-row>
        <table:table-row>
          <table:table-cell table:style-name="0">
            <text:p text:style-name="s1_center_fi0"><text:bookmark text:name="anchor1035"/>35.</text:p>
          </table:table-cell>
          <table:table-cell table:style-name="0">
            <text:p text:style-name="s16_fi0">Подшипники шариковые или роликовые</text:p>
          </table:table-cell>
          <table:table-cell table:style-name="0">
            <text:p text:style-name="s1_center_fi0"><text:a xlink:type="simple" xlink:href="http://ivo.garant.ru/document/redirect/70650730/281510">28.15.10</text:a></text:p>
          </table:table-cell>
        </table:table-row>
        <table:table-row>
          <table:table-cell table:style-name="0">
            <text:p text:style-name="s1_center_fi0"><text:bookmark text:name="anchor1036"/>36.</text:p>
          </table:table-cell>
          <table:table-cell table:style-name="0">
            <text:p text:style-name="s16_fi0">Электропечи сопротивления</text:p>
          </table:table-cell>
          <table:table-cell table:style-name="0">
            <text:p text:style-name="s1_center_fi0"><text:a xlink:type="simple" xlink:href="http://ivo.garant.ru/document/redirect/70650730/282113111">28.21.13.111</text:a></text:p>
          </table:table-cell>
        </table:table-row>
        <table:table-row>
          <table:table-cell table:style-name="0">
            <text:p text:style-name="s1_center_fi0"><text:bookmark text:name="anchor1037"/>37.</text:p>
          </table:table-cell>
          <table:table-cell table:style-name="0">
            <text:p text:style-name="s16_fi0">Электропечи и камеры промышленные или лабораторные прочие, не включенные в другие группировки</text:p>
          </table:table-cell>
          <table:table-cell table:style-name="0">
            <text:p text:style-name="s1_center_fi0"><text:a xlink:type="simple" xlink:href="http://ivo.garant.ru/document/redirect/70650730/282113119">28.21.13.119</text:a></text:p>
          </table:table-cell>
        </table:table-row>
        <table:table-row>
          <table:table-cell table:style-name="0">
            <text:p text:style-name="s1_center_fi0"><text:bookmark text:name="anchor1038"/>38.</text:p>
          </table:table-cell>
          <table:table-cell table:style-name="0">
            <text:p text:style-name="s16_fi0">Тали электрические канатные</text:p>
          </table:table-cell>
          <table:table-cell table:style-name="0">
            <text:p text:style-name="s1_center_fi0"><text:a xlink:type="simple" xlink:href="http://ivo.garant.ru/document/redirect/70650730/6095">28.22.11.112</text:a></text:p>
          </table:table-cell>
        </table:table-row>
        <table:table-row>
          <table:table-cell table:style-name="0">
            <text:p text:style-name="s1_center_fi0"><text:bookmark text:name="anchor1039"/>39.</text:p>
          </table:table-cell>
          <table:table-cell table:style-name="0">
            <text:p text:style-name="s16_fi0">Подъемники, не включенные в другие группировки</text:p>
          </table:table-cell>
          <table:table-cell table:style-name="0">
            <text:p text:style-name="s1_center_fi0"><text:a xlink:type="simple" xlink:href="http://ivo.garant.ru/document/redirect/70650730/28221119">28.22.11.190</text:a></text:p>
          </table:table-cell>
        </table:table-row>
        <table:table-row>
          <table:table-cell table:style-name="0">
            <text:p text:style-name="s1_center_fi0"><text:bookmark text:name="anchor1040"/>40.</text:p>
          </table:table-cell>
          <table:table-cell table:style-name="0">
            <text:p text:style-name="s16_fi0">Краны мостовые электрические</text:p>
          </table:table-cell>
          <table:table-cell table:style-name="0">
            <text:p text:style-name="s1_center_fi0"><text:a xlink:type="simple" xlink:href="http://ivo.garant.ru/document/redirect/70650730/282214121">28.22.14.121</text:a></text:p>
          </table:table-cell>
        </table:table-row>
        <table:table-row>
          <table:table-cell table:style-name="0">
            <text:p text:style-name="s1_center_fi0"><text:bookmark text:name="anchor1041"/>41.</text:p>
          </table:table-cell>
          <table:table-cell table:style-name="0">
            <text:p text:style-name="s16_fi0">Краны козловые и полукозловые электрические</text:p>
          </table:table-cell>
          <table:table-cell table:style-name="0">
            <text:p text:style-name="s1_center_fi0"><text:a xlink:type="simple" xlink:href="http://ivo.garant.ru/document/redirect/70650730/28214122">28.22.14.122</text:a></text:p>
          </table:table-cell>
        </table:table-row>
        <table:table-row>
          <table:table-cell table:style-name="0">
            <text:p text:style-name="s1_center_fi0"><text:bookmark text:name="anchor1042"/>42.</text:p>
          </table:table-cell>
          <table:table-cell table:style-name="0">
            <text:p text:style-name="s16_fi0">Краны грузоподъемные стрелкового типа</text:p>
          </table:table-cell>
          <table:table-cell table:style-name="0">
            <text:p text:style-name="s1_center_fi0"><text:a xlink:type="simple" xlink:href="http://ivo.garant.ru/document/redirect/70650730/282214125">28.22.14.125</text:a></text:p>
          </table:table-cell>
        </table:table-row>
        <table:table-row>
          <table:table-cell table:style-name="0">
            <text:p text:style-name="s1_center_fi0"><text:bookmark text:name="anchor1043"/>43.</text:p>
          </table:table-cell>
          <table:table-cell table:style-name="0">
            <text:p text:style-name="s16_fi0">Краны портальные</text:p>
          </table:table-cell>
          <table:table-cell table:style-name="0">
            <text:p text:style-name="s1_center_fi0"><text:a xlink:type="simple" xlink:href="http://ivo.garant.ru/document/redirect/70650730/282214140">28.22.14.140</text:a></text:p>
          </table:table-cell>
        </table:table-row>
        <table:table-row>
          <table:table-cell table:style-name="0">
            <text:p text:style-name="s1_center_fi0"><text:bookmark text:name="anchor1044"/>44.</text:p>
          </table:table-cell>
          <table:table-cell table:style-name="0">
            <text:p text:style-name="s16_fi0">Краны на гусеничном ходу</text:p>
          </table:table-cell>
          <table:table-cell table:style-name="0">
            <text:p text:style-name="s1_center_fi0"><text:a xlink:type="simple" xlink:href="http://ivo.garant.ru/document/redirect/70650730/282214151">28.22.14.151</text:a></text:p>
          </table:table-cell>
        </table:table-row>
        <table:table-row>
          <table:table-cell table:style-name="0">
            <text:p text:style-name="s1_center_fi0"><text:bookmark text:name="anchor1045"/>45.</text:p>
          </table:table-cell>
          <table:table-cell table:style-name="0">
            <text:p text:style-name="s16_fi0">Машины самоходные и тележки, оснащенные подъемным краном, прочие, не включенные в другие группировки</text:p>
          </table:table-cell>
          <table:table-cell table:style-name="0">
            <text:p text:style-name="s1_center_fi0"><text:a xlink:type="simple" xlink:href="http://ivo.garant.ru/document/redirect/70650730/28214159">28.22.14.159</text:a></text:p>
          </table:table-cell>
        </table:table-row>
        <table:table-row>
          <table:table-cell table:style-name="0">
            <text:p text:style-name="s1_center_fi0"><text:bookmark text:name="anchor1046"/>46.</text:p>
          </table:table-cell>
          <table:table-cell table:style-name="0">
            <text:p text:style-name="s16_fi0">Автопогрузчики с вилочным захватом</text:p>
          </table:table-cell>
          <table:table-cell table:style-name="0">
            <text:p text:style-name="s1_center_fi0"><text:a xlink:type="simple" xlink:href="http://ivo.garant.ru/document/redirect/70650730/282215110">28.22.15.110</text:a></text:p>
          </table:table-cell>
        </table:table-row>
        <table:table-row>
          <table:table-cell table:style-name="0">
            <text:p text:style-name="s1_center_fi0"><text:bookmark text:name="anchor1047"/>47.</text:p>
          </table:table-cell>
          <table:table-cell table:style-name="0">
            <text:p text:style-name="s16_fi0">Погрузчики прочие</text:p>
          </table:table-cell>
          <table:table-cell table:style-name="0">
            <text:p text:style-name="s1_center_fi0"><text:a xlink:type="simple" xlink:href="http://ivo.garant.ru/document/redirect/70650730/282215120">28.22.15.120</text:a></text:p>
          </table:table-cell>
        </table:table-row>
        <table:table-row>
          <table:table-cell table:style-name="0">
            <text:p text:style-name="s1_center_fi0"><text:bookmark text:name="anchor1048"/>48.</text:p>
          </table:table-cell>
          <table:table-cell table:style-name="0">
            <text:p text:style-name="s16_fi0">Лифты пассажирские</text:p>
          </table:table-cell>
          <table:table-cell table:style-name="0">
            <text:p text:style-name="s1_center_fi0"><text:a xlink:type="simple" xlink:href="http://ivo.garant.ru/document/redirect/70650730/282216111">28.22.16.111</text:a></text:p>
          </table:table-cell>
        </table:table-row>
        <table:table-row>
          <table:table-cell table:style-name="0">
            <text:p text:style-name="s1_center_fi0"><text:bookmark text:name="anchor1049"/>49.</text:p>
          </table:table-cell>
          <table:table-cell table:style-name="0">
            <text:p text:style-name="s16_fi0">Конвейеры ленточные</text:p>
          </table:table-cell>
          <table:table-cell table:style-name="0">
            <text:p text:style-name="s1_center_fi0"><text:a xlink:type="simple" xlink:href="http://ivo.garant.ru/document/redirect/70650730/282217111">28.22.17.111</text:a></text:p>
          </table:table-cell>
        </table:table-row>
        <table:table-row>
          <table:table-cell table:style-name="0">
            <text:p text:style-name="s1_center_fi0"><text:bookmark text:name="anchor1491"/>49<text:span text:style-name="upper"><text:span> 1</text:span></text:span>.</text:p>
          </table:table-cell>
          <table:table-cell table:style-name="0">
            <text:p text:style-name="s16_fi0">Дороги канатные пассажирские и грузовые</text:p>
          </table:table-cell>
          <table:table-cell table:style-name="0">
            <text:p text:style-name="s1_center_fi0"><text:a xlink:type="simple" xlink:href="http://ivo.garant.ru/document/redirect/70650730/282218150">28.22.18.150</text:a></text:p>
          </table:table-cell>
        </table:table-row>
        <table:table-row>
          <table:table-cell table:style-name="0">
            <text:p text:style-name="s1_center_fi0"><text:bookmark text:name="anchor1050"/>50.</text:p>
          </table:table-cell>
          <table:table-cell table:style-name="0">
            <text:p text:style-name="s16_fi0">Склады - накопители механизированные</text:p>
          </table:table-cell>
          <table:table-cell table:style-name="0">
            <text:p text:style-name="s1_center_fi0"><text:a xlink:type="simple" xlink:href="http://ivo.garant.ru/document/redirect/70650730/282218261">28.22.18.261</text:a></text:p>
          </table:table-cell>
        </table:table-row>
        <table:table-row>
          <table:table-cell table:style-name="0">
            <text:p text:style-name="s1_center_fi0"><text:bookmark text:name="anchor1051"/>51.</text:p>
          </table:table-cell>
          <table:table-cell table:style-name="0">
            <text:p text:style-name="s16_fi0">Машины подъемные для механизации складов прочие, не включенные в другие группировки</text:p>
          </table:table-cell>
          <table:table-cell table:style-name="0">
            <text:p text:style-name="s1_center_fi0"><text:a xlink:type="simple" xlink:href="http://ivo.garant.ru/document/redirect/70650730/282218269">28.22.18.269</text:a></text:p>
          </table:table-cell>
        </table:table-row>
        <table:table-row>
          <table:table-cell table:style-name="0">
            <text:p text:style-name="s1_center_fi0"><text:bookmark text:name="anchor1052"/>52.</text:p>
          </table:table-cell>
          <table:table-cell table:style-name="0">
            <text:p text:style-name="s16_fi0">Манипуляторы погрузочные и разгрузочные</text:p>
          </table:table-cell>
          <table:table-cell table:style-name="0">
            <text:p text:style-name="s1_center_fi0"><text:a xlink:type="simple" xlink:href="http://ivo.garant.ru/document/redirect/70650730/28218314">28.22.18.314</text:a></text:p>
          </table:table-cell>
        </table:table-row>
        <table:table-row>
          <table:table-cell table:style-name="0">
            <text:p text:style-name="s1_center_fi0"><text:bookmark text:name="anchor1053"/>53.</text:p>
          </table:table-cell>
          <table:table-cell table:style-name="0">
            <text:p text:style-name="s16_fi0">Инструменты ручные электрические; инструменты ручные прочие с механизированным приводом</text:p>
          </table:table-cell>
          <table:table-cell table:style-name="0">
            <text:p text:style-name="s1_center_fi0"><text:a xlink:type="simple" xlink:href="http://ivo.garant.ru/document/redirect/70650730/28241">28.24.1</text:a></text:p>
          </table:table-cell>
        </table:table-row>
        <table:table-row>
          <table:table-cell table:style-name="0">
            <text:p text:style-name="s1_center_fi0"><text:bookmark text:name="anchor1054"/>54.</text:p>
          </table:table-cell>
          <table:table-cell table:style-name="0">
            <text:p text:style-name="s16_fi0">Части ручных инструментов с механизированным приводом</text:p>
          </table:table-cell>
          <table:table-cell table:style-name="0">
            <text:p text:style-name="s1_center_fi0"><text:a xlink:type="simple" xlink:href="http://ivo.garant.ru/document/redirect/70650730/28242">28.24.2</text:a></text:p>
          </table:table-cell>
        </table:table-row>
        <table:table-row>
          <table:table-cell table:style-name="0">
            <text:p text:style-name="s1_center_fi0"><text:bookmark text:name="anchor1055"/>55.</text:p>
          </table:table-cell>
          <table:table-cell table:style-name="0">
            <text:p text:style-name="s16_fi0">Кондиционеры промышленные</text:p>
          </table:table-cell>
          <table:table-cell table:style-name="0">
            <text:p text:style-name="s1_center_fi0"><text:a xlink:type="simple" xlink:href="http://ivo.garant.ru/document/redirect/70650730/282512110">28.25.12.110</text:a></text:p>
          </table:table-cell>
        </table:table-row>
        <table:table-row>
          <table:table-cell table:style-name="0">
            <text:p text:style-name="s1_center_fi0"><text:bookmark text:name="anchor1056"/>56.</text:p>
          </table:table-cell>
          <table:table-cell table:style-name="0">
            <text:p text:style-name="s16_fi0">Шкафы холодильные</text:p>
          </table:table-cell>
          <table:table-cell table:style-name="0">
            <text:p text:style-name="s1_center_fi0"><text:a xlink:type="simple" xlink:href="http://ivo.garant.ru/document/redirect/70650730/951110071">28.25.13.111</text:a></text:p>
          </table:table-cell>
        </table:table-row>
        <table:table-row>
          <table:table-cell table:style-name="0">
            <text:p text:style-name="s1_center_fi0"><text:bookmark text:name="anchor1057"/>57.</text:p>
          </table:table-cell>
          <table:table-cell table:style-name="0">
            <text:p text:style-name="s16_fi0">Камеры холодильные сборные</text:p>
          </table:table-cell>
          <table:table-cell table:style-name="0">
            <text:p text:style-name="s1_center_fi0"><text:a xlink:type="simple" xlink:href="http://ivo.garant.ru/document/redirect/70650730/282513112">28.25.13.112</text:a></text:p>
          </table:table-cell>
        </table:table-row>
        <table:table-row>
          <table:table-cell table:style-name="0">
            <text:p text:style-name="s1_center_fi0"><text:bookmark text:name="anchor1058"/>58.</text:p>
          </table:table-cell>
          <table:table-cell table:style-name="0">
            <text:p text:style-name="s16_fi0">Витрины холодильные</text:p>
          </table:table-cell>
          <table:table-cell table:style-name="0">
            <text:p text:style-name="s1_center_fi0"><text:a xlink:type="simple" xlink:href="http://ivo.garant.ru/document/redirect/70650730/282513114">28.25.13.114</text:a></text:p>
          </table:table-cell>
        </table:table-row>
        <table:table-row>
          <table:table-cell table:style-name="0">
            <text:p text:style-name="s1_center_fi0"><text:bookmark text:name="anchor1059"/>59.</text:p>
          </table:table-cell>
          <table:table-cell table:style-name="0">
            <text:p text:style-name="s16_fi0">Оборудование для охлаждения и заморозки жидкостей</text:p>
          </table:table-cell>
          <table:table-cell table:style-name="0">
            <text:p text:style-name="s1_center_fi0"><text:a xlink:type="simple" xlink:href="http://ivo.garant.ru/document/redirect/70650730/951110072">28.25.13.115</text:a></text:p>
          </table:table-cell>
        </table:table-row>
        <table:table-row>
          <table:table-cell table:style-name="0">
            <text:p text:style-name="s1_center_fi0"><text:bookmark text:name="anchor1060"/>60.</text:p>
          </table:table-cell>
          <table:table-cell table:style-name="0">
            <text:p text:style-name="s16_fi0">Машины посудомоечные промышленного типа</text:p>
          </table:table-cell>
          <table:table-cell table:style-name="0">
            <text:p text:style-name="s1_center_fi0"><text:a xlink:type="simple" xlink:href="http://ivo.garant.ru/document/redirect/70650730/282950000">28.29.50.000</text:a></text:p>
          </table:table-cell>
        </table:table-row>
        <table:table-row>
          <table:table-cell table:style-name="0">
            <text:p text:style-name="s1_center_fi0"><text:bookmark text:name="anchor1061"/>61.</text:p>
          </table:table-cell>
          <table:table-cell table:style-name="0">
            <text:p text:style-name="s16_fi0">Оборудование и инструменты неэлектрические для пайки мягким и твердым припоем или сварки, и их части; машины и аппараты для газотермического напыления</text:p>
          </table:table-cell>
          <table:table-cell table:style-name="0">
            <text:p text:style-name="s1_center_fi0"><text:a xlink:type="simple" xlink:href="http://ivo.garant.ru/document/redirect/70650730/282970">28.29.70</text:a></text:p>
          </table:table-cell>
        </table:table-row>
        <table:table-row>
          <table:table-cell table:style-name="0">
            <text:p text:style-name="s1_center_fi0"><text:bookmark text:name="anchor1062"/>62.</text:p>
          </table:table-cell>
          <table:table-cell table:style-name="0">
            <text:p text:style-name="s16_fi0">Машины и оборудование для сельского и лесного хозяйства</text:p>
          </table:table-cell>
          <table:table-cell table:style-name="0">
            <text:p text:style-name="s1_center_fi0"><text:a xlink:type="simple" xlink:href="http://ivo.garant.ru/document/redirect/70650730/2830">28.30</text:a></text:p>
          </table:table-cell>
        </table:table-row>
        <table:table-row>
          <table:table-cell table:style-name="0">
            <text:p text:style-name="s1_center_fi0"><text:bookmark text:name="anchor1063"/>63.</text:p>
          </table:table-cell>
          <table:table-cell table:style-name="0">
            <text:p text:style-name="s16_fi0">Станки для обработки металлов лазером и станки аналогичного типа; обрабатывающие центры и станки аналогичного типа</text:p>
          </table:table-cell>
          <table:table-cell table:style-name="0">
            <text:p text:style-name="s1_center_fi0"><text:a xlink:type="simple" xlink:href="http://ivo.garant.ru/document/redirect/70650730/28411">28.41.1</text:a></text:p>
          </table:table-cell>
        </table:table-row>
        <table:table-row>
          <table:table-cell table:style-name="0">
            <text:p text:style-name="s1_center_fi0"><text:bookmark text:name="anchor1064"/>64.</text:p>
          </table:table-cell>
          <table:table-cell table:style-name="0">
            <text:p text:style-name="s16_fi0">Станки токарные, расточные и фрезерные металлорежущие</text:p>
          </table:table-cell>
          <table:table-cell table:style-name="0">
            <text:p text:style-name="s1_center_fi0"><text:a xlink:type="simple" xlink:href="http://ivo.garant.ru/document/redirect/70650730/28412">28.41.2</text:a></text:p>
          </table:table-cell>
        </table:table-row>
        <table:table-row>
          <table:table-cell table:style-name="0">
            <text:p text:style-name="s1_center_fi0"><text:bookmark text:name="anchor1065"/>65.</text:p>
          </table:table-cell>
          <table:table-cell table:style-name="0">
            <text:p text:style-name="s16_fi0">Станки металлообрабатывающие прочие</text:p>
          </table:table-cell>
          <table:table-cell table:style-name="0">
            <text:p text:style-name="s1_center_fi0"><text:a xlink:type="simple" xlink:href="http://ivo.garant.ru/document/redirect/70650730/28413">28.41.3</text:a></text:p>
          </table:table-cell>
        </table:table-row>
        <table:table-row>
          <table:table-cell table:style-name="0">
            <text:p text:style-name="s1_center_fi0"><text:bookmark text:name="anchor1066"/>66.</text:p>
          </table:table-cell>
          <table:table-cell table:style-name="0">
            <text:p text:style-name="s16_fi0">Части и принадлежности станков для обработки металлов</text:p>
          </table:table-cell>
          <table:table-cell table:style-name="0">
            <text:p text:style-name="s1_center_fi0"><text:a xlink:type="simple" xlink:href="http://ivo.garant.ru/document/redirect/70650730/28414">28.41.4</text:a></text:p>
          </table:table-cell>
        </table:table-row>
        <table:table-row>
          <table:table-cell table:style-name="0">
            <text:p text:style-name="s1_center_fi0"><text:bookmark text:name="anchor1067"/>67.</text:p>
          </table:table-cell>
          <table:table-cell table:style-name="0">
            <text:p text:style-name="s16_fi0">Станки для обработки камня, дерева и аналогичных твердых материалов</text:p>
          </table:table-cell>
          <table:table-cell table:style-name="0">
            <text:p text:style-name="s1_center_fi0"><text:a xlink:type="simple" xlink:href="http://ivo.garant.ru/document/redirect/70650730/28491">28.49.1</text:a></text:p>
          </table:table-cell>
        </table:table-row>
        <table:table-row>
          <table:table-cell table:style-name="0">
            <text:p text:style-name="s1_center_fi0"><text:bookmark text:name="anchor1068"/>68.</text:p>
          </table:table-cell>
          <table:table-cell table:style-name="0">
            <text:p text:style-name="s16_fi0">Оправки для крепления инструмента</text:p>
          </table:table-cell>
          <table:table-cell table:style-name="0">
            <text:p text:style-name="s1_center_fi0"><text:a xlink:type="simple" xlink:href="http://ivo.garant.ru/document/redirect/70650730/28492">28.49.2</text:a></text:p>
          </table:table-cell>
        </table:table-row>
        <table:table-row>
          <table:table-cell table:style-name="0">
            <text:p text:style-name="s1_center_fi0"><text:bookmark text:name="anchor1069"/>69.</text:p>
          </table:table-cell>
          <table:table-cell table:style-name="0">
            <text:p text:style-name="s16_fi0">Бульдозеры и бульдозеры с поворотным отвалом</text:p>
          </table:table-cell>
          <table:table-cell table:style-name="0">
            <text:p text:style-name="s1_center_fi0"><text:a xlink:type="simple" xlink:href="http://ivo.garant.ru/document/redirect/70650730/289221">28.92.21</text:a></text:p>
          </table:table-cell>
        </table:table-row>
        <table:table-row>
          <table:table-cell table:style-name="0">
            <text:p text:style-name="s1_center_fi0"><text:bookmark text:name="anchor1070"/>70.</text:p>
          </table:table-cell>
          <table:table-cell table:style-name="0">
            <text:p text:style-name="s16_fi0">Грейдеры и планировщики самоходные</text:p>
          </table:table-cell>
          <table:table-cell table:style-name="0">
            <text:p text:style-name="s1_center_fi0"><text:a xlink:type="simple" xlink:href="http://ivo.garant.ru/document/redirect/70650730/289222">28.92.22</text:a></text:p>
          </table:table-cell>
        </table:table-row>
        <table:table-row>
          <table:table-cell table:style-name="0">
            <text:p text:style-name="s1_center_fi0"><text:bookmark text:name="anchor1071"/>71.</text:p>
          </table:table-cell>
          <table:table-cell table:style-name="0">
            <text:p text:style-name="s16_fi0">Машины трамбовочные и дорожные катки самоходные</text:p>
          </table:table-cell>
          <table:table-cell table:style-name="0">
            <text:p text:style-name="s1_center_fi0"><text:a xlink:type="simple" xlink:href="http://ivo.garant.ru/document/redirect/70650730/289224">28.92.24</text:a></text:p>
          </table:table-cell>
        </table:table-row>
        <table:table-row>
          <table:table-cell table:style-name="0">
            <text:p text:style-name="s1_center_fi0"><text:bookmark text:name="anchor1072"/>72.</text:p>
          </table:table-cell>
          <table:table-cell table:style-name="0">
            <text:p text:style-name="s16_fi0">Погрузчики фронтальные одноковшовые самоходные</text:p>
          </table:table-cell>
          <table:table-cell table:style-name="0">
            <text:p text:style-name="s1_center_fi0"><text:a xlink:type="simple" xlink:href="http://ivo.garant.ru/document/redirect/70650730/2892250">28.92.25.000</text:a></text:p>
          </table:table-cell>
        </table:table-row>
        <table:table-row>
          <table:table-cell table:style-name="0">
            <text:p text:style-name="s1_center_fi0"><text:bookmark text:name="anchor1073"/>73.</text:p>
          </table:table-cell>
          <table:table-cell table:style-name="0">
            <text:p text:style-name="s16_fi0">Экскаваторы одноковшовые и ковшовые погрузчики самоходные с поворотом кабины на 360° (полноповоротные машины), кроме фронтальных одноковшовых погрузчиков</text:p>
          </table:table-cell>
          <table:table-cell table:style-name="0">
            <text:p text:style-name="s1_center_fi0"><text:a xlink:type="simple" xlink:href="http://ivo.garant.ru/document/redirect/70650730/289226">28.92.26</text:a></text:p>
          </table:table-cell>
        </table:table-row>
        <table:table-row>
          <table:table-cell table:style-name="0">
            <text:p text:style-name="s1_center_fi0"><text:bookmark text:name="anchor1074"/>74.</text:p>
          </table:table-cell>
          <table:table-cell table:style-name="0">
            <text:p text:style-name="s16_fi0">Экскаваторы и одноковшовые погрузчики самоходные прочие; прочие самоходные машины для добычи полезных ископаемых</text:p>
          </table:table-cell>
          <table:table-cell table:style-name="0">
            <text:p text:style-name="s1_center_fi0"><text:a xlink:type="simple" xlink:href="http://ivo.garant.ru/document/redirect/70650730/289227">28.92.27</text:a></text:p>
          </table:table-cell>
        </table:table-row>
        <table:table-row>
          <table:table-cell table:style-name="0">
            <text:p text:style-name="s1_center_fi0"><text:bookmark text:name="anchor1075"/>75.</text:p>
          </table:table-cell>
          <table:table-cell table:style-name="0">
            <text:p text:style-name="s16_fi0">Отвалы бульдозеров неповоротные</text:p>
          </table:table-cell>
          <table:table-cell table:style-name="0">
            <text:p text:style-name="s1_center_fi0"><text:a xlink:type="simple" xlink:href="http://ivo.garant.ru/document/redirect/70650730/28922811">28.92.28.110</text:a></text:p>
          </table:table-cell>
        </table:table-row>
        <table:table-row>
          <table:table-cell table:style-name="0">
            <text:p text:style-name="s1_center_fi0"><text:bookmark text:name="anchor1076"/>76.</text:p>
          </table:table-cell>
          <table:table-cell table:style-name="0">
            <text:p text:style-name="s16_fi0">Отвалы бульдозеров поворотные</text:p>
          </table:table-cell>
          <table:table-cell table:style-name="0">
            <text:p text:style-name="s1_center_fi0"><text:a xlink:type="simple" xlink:href="http://ivo.garant.ru/document/redirect/70650730/28922812">28.92.28.120</text:a></text:p>
          </table:table-cell>
        </table:table-row>
        <table:table-row>
          <table:table-cell table:style-name="0">
            <text:p text:style-name="s1_center_fi0"><text:bookmark text:name="anchor1077"/>77.</text:p>
          </table:table-cell>
          <table:table-cell table:style-name="0">
            <text:p text:style-name="s16_fi0">Автомобили-самосвалы, предназначенные для использования в условиях бездорожья</text:p>
          </table:table-cell>
          <table:table-cell table:style-name="0">
            <text:p text:style-name="s1_center_fi0"><text:a xlink:type="simple" xlink:href="http://ivo.garant.ru/document/redirect/70650730/289229">28.92.29</text:a></text:p>
          </table:table-cell>
        </table:table-row>
        <table:table-row>
          <table:table-cell table:style-name="0">
            <text:p text:style-name="s1_center_fi0"><text:bookmark text:name="anchor1078"/>78.</text:p>
          </table:table-cell>
          <table:table-cell table:style-name="0">
            <text:p text:style-name="s16_fi0">Копры и копровое оборудование для свайных работ</text:p>
          </table:table-cell>
          <table:table-cell table:style-name="0">
            <text:p text:style-name="s1_center_fi0"><text:a xlink:type="simple" xlink:href="http://ivo.garant.ru/document/redirect/70650730/289230110">28.92.30.110</text:a></text:p>
          </table:table-cell>
        </table:table-row>
        <table:table-row>
          <table:table-cell table:style-name="0">
            <text:p text:style-name="s1_center_fi0"><text:bookmark text:name="anchor1079"/>79.</text:p>
          </table:table-cell>
          <table:table-cell table:style-name="0">
            <text:p text:style-name="s16_fi0">Машины для распределения строительного раствора или бетона</text:p>
          </table:table-cell>
          <table:table-cell table:style-name="0">
            <text:p text:style-name="s1_center_fi0"><text:a xlink:type="simple" xlink:href="http://ivo.garant.ru/document/redirect/70650730/289230150">28.92.30.150</text:a></text:p>
          </table:table-cell>
        </table:table-row>
        <table:table-row>
          <table:table-cell table:style-name="0">
            <text:p text:style-name="s1_center_fi0"><text:bookmark text:name="anchor1080"/>80.</text:p>
          </table:table-cell>
          <table:table-cell table:style-name="0">
            <text:p text:style-name="s16_fi0">Машины для укладки гравия на дороге или аналогичных поверхностях, для поливки и пропитки поверхностей дорог битумными материалами</text:p>
          </table:table-cell>
          <table:table-cell table:style-name="0">
            <text:p text:style-name="s1_center_fi0"><text:a xlink:type="simple" xlink:href="http://ivo.garant.ru/document/redirect/70650730/289230160">28.92.30.160</text:a></text:p>
          </table:table-cell>
        </table:table-row>
        <table:table-row>
          <table:table-cell table:style-name="0">
            <text:p text:style-name="s1_center_fi0"><text:bookmark text:name="anchor1081"/>81.</text:p>
          </table:table-cell>
          <table:table-cell table:style-name="0">
            <text:p text:style-name="s16_fi0">Асфальтоукладчики</text:p>
          </table:table-cell>
          <table:table-cell table:style-name="0">
            <text:p text:style-name="s1_center_fi0"><text:a xlink:type="simple" xlink:href="http://ivo.garant.ru/document/redirect/70650730/289230170">28.92.30.170</text:a></text:p>
          </table:table-cell>
        </table:table-row>
        <table:table-row>
          <table:table-cell table:style-name="0">
            <text:p text:style-name="s1_center_fi0"><text:bookmark text:name="anchor1082"/>82.</text:p>
          </table:table-cell>
          <table:table-cell table:style-name="0">
            <text:p text:style-name="s16_fi0">Машины для выемки грунта и строительства прочие, не включенные в другие группировки</text:p>
          </table:table-cell>
          <table:table-cell table:style-name="0">
            <text:p text:style-name="s1_center_fi0"><text:a xlink:type="simple" xlink:href="http://ivo.garant.ru/document/redirect/70650730/289030190">28.92.30.190</text:a></text:p>
          </table:table-cell>
        </table:table-row>
        <table:table-row>
          <table:table-cell table:style-name="0">
            <text:p text:style-name="s1_center_fi0"><text:bookmark text:name="anchor1083"/>83.</text:p>
          </table:table-cell>
          <table:table-cell table:style-name="0">
            <text:p text:style-name="s16_fi0">Машины для смешивания и аналогичной обработки грунта, камня, руды и прочих минеральных веществ</text:p>
          </table:table-cell>
          <table:table-cell table:style-name="0">
            <text:p text:style-name="s1_center_fi0"><text:a xlink:type="simple" xlink:href="http://ivo.garant.ru/document/redirect/70650730/289240130">28.92.40.130</text:a></text:p>
          </table:table-cell>
        </table:table-row>
        <table:table-row>
          <table:table-cell table:style-name="0">
            <text:p text:style-name="s1_center_fi0"><text:bookmark text:name="anchor1084"/>84.</text:p>
          </table:table-cell>
          <table:table-cell table:style-name="0">
            <text:p text:style-name="s16_fi0">Тракторы гусеничные</text:p>
          </table:table-cell>
          <table:table-cell table:style-name="0">
            <text:p text:style-name="s1_center_fi0"><text:a xlink:type="simple" xlink:href="http://ivo.garant.ru/document/redirect/70650730/289250">28.92.50.000</text:a></text:p>
          </table:table-cell>
        </table:table-row>
        <table:table-row>
          <table:table-cell table:style-name="0">
            <text:p text:style-name="s1_center_fi0"><text:bookmark text:name="anchor1085"/>85.</text:p>
          </table:table-cell>
          <table:table-cell table:style-name="0">
            <text:p text:style-name="s16_fi0">Печи хлебопекарные неэлектрические</text:p>
          </table:table-cell>
          <table:table-cell table:style-name="0">
            <text:p text:style-name="s1_center_fi0"><text:a xlink:type="simple" xlink:href="http://ivo.garant.ru/document/redirect/70650730/289315110">28.93.15.110</text:a></text:p>
          </table:table-cell>
        </table:table-row>
        <table:table-row>
          <table:table-cell table:style-name="0">
            <text:p text:style-name="s1_center_fi0"><text:bookmark text:name="anchor1086"/>86.</text:p>
          </table:table-cell>
          <table:table-cell table:style-name="0">
            <text:p text:style-name="s16_fi0">Оборудование для промышленного приготовления или подогрева пищи</text:p>
          </table:table-cell>
          <table:table-cell table:style-name="0">
            <text:p text:style-name="s1_center_fi0"><text:a xlink:type="simple" xlink:href="http://ivo.garant.ru/document/redirect/70650730/289315120">28.93.15.120</text:a></text:p>
          </table:table-cell>
        </table:table-row>
        <table:table-row>
          <table:table-cell table:style-name="0">
            <text:p text:style-name="s1_center_fi0"><text:bookmark text:name="anchor1087"/>87.</text:p>
          </table:table-cell>
          <table:table-cell table:style-name="0">
            <text:p text:style-name="s16_fi0">Машины для переработки мяса, овощей и теста (оборудование для механической обработки продуктов на предприятиях общественного питания)</text:p>
          </table:table-cell>
          <table:table-cell table:style-name="0">
            <text:p text:style-name="s1_center_fi0"><text:a xlink:type="simple" xlink:href="http://ivo.garant.ru/document/redirect/70650730/289317110">28.93.17.110</text:a></text:p>
          </table:table-cell>
        </table:table-row>
        <table:table-row>
          <table:table-cell table:style-name="0">
            <text:p text:style-name="s1_center_fi0"><text:bookmark text:name="anchor1088"/>88.</text:p>
          </table:table-cell>
          <table:table-cell table:style-name="0">
            <text:p text:style-name="s16_fi0">Оборудование для производства хлебобулочных изделий</text:p>
          </table:table-cell>
          <table:table-cell table:style-name="0">
            <text:p text:style-name="s1_center_fi0"><text:a xlink:type="simple" xlink:href="http://ivo.garant.ru/document/redirect/70650730/289317120">28.93.17.120</text:a></text:p>
          </table:table-cell>
        </table:table-row>
        <table:table-row>
          <table:table-cell table:style-name="0">
            <text:p text:style-name="s1_center_fi0"><text:bookmark text:name="anchor1089"/>89.</text:p>
          </table:table-cell>
          <table:table-cell table:style-name="0">
            <text:p text:style-name="s16_fi0">Аддитивные установки экструзии материала</text:p>
          </table:table-cell>
          <table:table-cell table:style-name="0">
            <text:p text:style-name="s1_center_fi0"><text:a xlink:type="simple" xlink:href="http://ivo.garant.ru/document/redirect/70650730/289610122">28.96.10.122</text:a></text:p>
          </table:table-cell>
        </table:table-row>
        <table:table-row>
          <table:table-cell table:style-name="0">
            <text:p text:style-name="s1_center_fi0"><text:bookmark text:name="anchor1090"/>90.</text:p>
          </table:table-cell>
          <table:table-cell table:style-name="0">
            <text:p text:style-name="s16_fi0">Аддитивные установки струйного связывающего нанесения</text:p>
          </table:table-cell>
          <table:table-cell table:style-name="0">
            <text:p text:style-name="s1_center_fi0"><text:a xlink:type="simple" xlink:href="http://ivo.garant.ru/document/redirect/70650730/289610123">28.96.10.123</text:a></text:p>
          </table:table-cell>
        </table:table-row>
        <table:table-row>
          <table:table-cell table:style-name="0">
            <text:p text:style-name="s1_center_fi0"><text:bookmark text:name="anchor1091"/>91.</text:p>
          </table:table-cell>
          <table:table-cell table:style-name="0">
            <text:p text:style-name="s16_fi0">Промышленные роботы и робототехнические устройства</text:p>
          </table:table-cell>
          <table:table-cell table:style-name="0">
            <text:p text:style-name="s1_center_fi0"><text:a xlink:type="simple" xlink:href="http://ivo.garant.ru/document/redirect/70650730/2899392">28.99.39.200</text:a></text:p>
          </table:table-cell>
        </table:table-row>
        <table:table-row>
          <table:table-cell table:style-name="0">
            <text:p text:style-name="s1_center_fi0"><text:bookmark text:name="anchor1092"/>92.</text:p>
          </table:table-cell>
          <table:table-cell table:style-name="0">
            <text:p text:style-name="s16_fi0">Автомобили легковые</text:p>
          </table:table-cell>
          <table:table-cell table:style-name="0">
            <text:p text:style-name="s1_center_fi0"><text:a xlink:type="simple" xlink:href="http://ivo.garant.ru/document/redirect/70650730/29102">29.10.2</text:a></text:p>
          </table:table-cell>
        </table:table-row>
        <table:table-row>
          <table:table-cell table:style-name="0">
            <text:p text:style-name="s1_center_fi0"><text:bookmark text:name="anchor1093"/>93.</text:p>
          </table:table-cell>
          <table:table-cell table:style-name="0">
            <text:p text:style-name="s16_fi0">Средства автотранспортные для перевозки 10 или более человек</text:p>
          </table:table-cell>
          <table:table-cell table:style-name="0">
            <text:p text:style-name="s1_center_fi0"><text:a xlink:type="simple" xlink:href="http://ivo.garant.ru/document/redirect/70650730/29103">29.10.3</text:a></text:p>
          </table:table-cell>
        </table:table-row>
        <table:table-row>
          <table:table-cell table:style-name="0">
            <text:p text:style-name="s1_center_fi0"><text:bookmark text:name="anchor1094"/>94.</text:p>
          </table:table-cell>
          <table:table-cell table:style-name="0">
            <text:p text:style-name="s16_fi0">Средства автотранспортные грузовые</text:p>
          </table:table-cell>
          <table:table-cell table:style-name="0">
            <text:p text:style-name="s1_center_fi0"><text:a xlink:type="simple" xlink:href="http://ivo.garant.ru/document/redirect/70650730/29104">29.10.4</text:a></text:p>
          </table:table-cell>
        </table:table-row>
        <table:table-row>
          <table:table-cell table:style-name="0">
            <text:p text:style-name="s1_center_fi0"><text:bookmark text:name="anchor1095"/>95.</text:p>
          </table:table-cell>
          <table:table-cell table:style-name="0">
            <text:p text:style-name="s16_fi0">Автокраны</text:p>
          </table:table-cell>
          <table:table-cell table:style-name="0">
            <text:p text:style-name="s1_center_fi0"><text:a xlink:type="simple" xlink:href="http://ivo.garant.ru/document/redirect/70650730/2910510">29.10.51.000</text:a></text:p>
          </table:table-cell>
        </table:table-row>
        <table:table-row>
          <table:table-cell table:style-name="0">
            <text:p text:style-name="s1_center_fi0"><text:bookmark text:name="anchor1096"/>96.</text:p>
          </table:table-cell>
          <table:table-cell table:style-name="0">
            <text:p text:style-name="s16_fi0">Средства транспортные для движения по снегу, автомобили для перевозки игроков в гольф и аналогичные транспортные средства, оснащенные двигателями</text:p>
          </table:table-cell>
          <table:table-cell table:style-name="0">
            <text:p text:style-name="s1_center_fi0"><text:a xlink:type="simple" xlink:href="http://ivo.garant.ru/document/redirect/70650730/291052">29.10.52</text:a></text:p>
          </table:table-cell>
        </table:table-row>
        <table:table-row>
          <table:table-cell table:style-name="0">
            <text:p text:style-name="s1_center_fi0"><text:bookmark text:name="anchor1097"/>97.</text:p>
          </table:table-cell>
          <table:table-cell table:style-name="0">
            <text:p text:style-name="s16_fi0">Средства автотранспортные для транспортирования строительных материалов</text:p>
          </table:table-cell>
          <table:table-cell table:style-name="0">
            <text:p text:style-name="s1_center_fi0"><text:a xlink:type="simple" xlink:href="http://ivo.garant.ru/document/redirect/70650730/2915911">29.10.59.110</text:a></text:p>
          </table:table-cell>
        </table:table-row>
        <table:table-row>
          <table:table-cell table:style-name="0">
            <text:p text:style-name="s1_center_fi0"><text:bookmark text:name="anchor1098"/>98.</text:p>
          </table:table-cell>
          <table:table-cell table:style-name="0">
            <text:p text:style-name="s16_fi0">Средства транспортные для коммунального хозяйства и содержания дорог</text:p>
          </table:table-cell>
          <table:table-cell table:style-name="0">
            <text:p text:style-name="s1_center_fi0"><text:a xlink:type="simple" xlink:href="http://ivo.garant.ru/document/redirect/70650730/291059130">29.10.59.130</text:a></text:p>
          </table:table-cell>
        </table:table-row>
        <table:table-row>
          <table:table-cell table:style-name="0">
            <text:p text:style-name="s1_center_fi0"><text:bookmark text:name="anchor1099"/>99.</text:p>
          </table:table-cell>
          <table:table-cell table:style-name="0">
            <text:p text:style-name="s16_fi0">Автомобили пожарные</text:p>
          </table:table-cell>
          <table:table-cell table:style-name="0">
            <text:p text:style-name="s1_center_fi0"><text:a xlink:type="simple" xlink:href="http://ivo.garant.ru/document/redirect/70650730/291059140">29.10.59.140</text:a></text:p>
          </table:table-cell>
        </table:table-row>
        <table:table-row>
          <table:table-cell table:style-name="0">
            <text:p text:style-name="s1_center_fi0"><text:bookmark text:name="anchor1100"/>100.</text:p>
          </table:table-cell>
          <table:table-cell table:style-name="0">
            <text:p text:style-name="s16_fi0">Средства транспортные для аварийно-спасательных служб и полиции</text:p>
          </table:table-cell>
          <table:table-cell table:style-name="0">
            <text:p text:style-name="s1_center_fi0"><text:a xlink:type="simple" xlink:href="http://ivo.garant.ru/document/redirect/70650730/291059150">29.10.59.150</text:a></text:p>
          </table:table-cell>
        </table:table-row>
        <table:table-row>
          <table:table-cell table:style-name="0">
            <text:p text:style-name="s1_center_fi0"><text:bookmark text:name="anchor1101"/>101.</text:p>
          </table:table-cell>
          <table:table-cell table:style-name="0">
            <text:p text:style-name="s16_fi0">Автомобили скорой медицинской помощи</text:p>
          </table:table-cell>
          <table:table-cell table:style-name="0">
            <text:p text:style-name="s1_center_fi0"><text:a xlink:type="simple" xlink:href="http://ivo.garant.ru/document/redirect/70650730/291059160">29.10.59.160</text:a></text:p>
          </table:table-cell>
        </table:table-row>
        <table:table-row>
          <table:table-cell table:style-name="0">
            <text:p text:style-name="s1_center_fi0"><text:bookmark text:name="anchor1102"/>102.</text:p>
          </table:table-cell>
          <table:table-cell table:style-name="0">
            <text:p text:style-name="s16_fi0">Средства транспортные для обслуживания нефтяных и газовых скважин</text:p>
          </table:table-cell>
          <table:table-cell table:style-name="0">
            <text:p text:style-name="s1_center_fi0"><text:a xlink:type="simple" xlink:href="http://ivo.garant.ru/document/redirect/70650730/2915918">29.10.59.180</text:a></text:p>
          </table:table-cell>
        </table:table-row>
        <table:table-row>
          <table:table-cell table:style-name="0">
            <text:p text:style-name="s1_center_fi0"><text:bookmark text:name="anchor1103"/>103.</text:p>
          </table:table-cell>
          <table:table-cell table:style-name="0">
            <text:p text:style-name="s16_fi0">Средства транспортные для перевозки нефтепродуктов</text:p>
          </table:table-cell>
          <table:table-cell table:style-name="0">
            <text:p text:style-name="s1_center_fi0"><text:a xlink:type="simple" xlink:href="http://ivo.garant.ru/document/redirect/70650730/291059230">29.10.59.230</text:a></text:p>
          </table:table-cell>
        </table:table-row>
        <table:table-row>
          <table:table-cell table:style-name="0">
            <text:p text:style-name="s1_center_fi0"><text:bookmark text:name="anchor1104"/>104.</text:p>
          </table:table-cell>
          <table:table-cell table:style-name="0">
            <text:p text:style-name="s16_fi0">Средства транспортные для перевозки пищевых жидкостей</text:p>
          </table:table-cell>
          <table:table-cell table:style-name="0">
            <text:p text:style-name="s1_center_fi0"><text:a xlink:type="simple" xlink:href="http://ivo.garant.ru/document/redirect/70650730/2915924">29.10.59.240</text:a></text:p>
          </table:table-cell>
        </table:table-row>
        <table:table-row>
          <table:table-cell table:style-name="0">
            <text:p text:style-name="s1_center_fi0"><text:bookmark text:name="anchor1105"/>105.</text:p>
          </table:table-cell>
          <table:table-cell table:style-name="0">
            <text:p text:style-name="s16_fi0">Средства транспортные для перевозки сжиженных углеводородных газов на давление до 1,8 МПа</text:p>
          </table:table-cell>
          <table:table-cell table:style-name="0">
            <text:p text:style-name="s1_center_fi0"><text:a xlink:type="simple" xlink:href="http://ivo.garant.ru/document/redirect/70650730/2915925">29.10.59.250</text:a></text:p>
          </table:table-cell>
        </table:table-row>
        <table:table-row>
          <table:table-cell table:style-name="0">
            <text:p text:style-name="s1_center_fi0"><text:bookmark text:name="anchor1106"/>106.</text:p>
          </table:table-cell>
          <table:table-cell table:style-name="0">
            <text:p text:style-name="s16_fi0">Средства транспортные, оснащенные подъемниками с рабочими платформами</text:p>
          </table:table-cell>
          <table:table-cell table:style-name="0">
            <text:p text:style-name="s1_center_fi0"><text:a xlink:type="simple" xlink:href="http://ivo.garant.ru/document/redirect/70650730/2915927">29.10.59.270</text:a></text:p>
          </table:table-cell>
        </table:table-row>
        <table:table-row>
          <table:table-cell table:style-name="0">
            <text:p text:style-name="s1_center_fi0"><text:bookmark text:name="anchor1107"/>107.</text:p>
          </table:table-cell>
          <table:table-cell table:style-name="0">
            <text:p text:style-name="s16_fi0">Средства транспортные - фургоны для перевозки пищевых продуктов</text:p>
          </table:table-cell>
          <table:table-cell table:style-name="0">
            <text:p text:style-name="s1_center_fi0"><text:a xlink:type="simple" xlink:href="http://ivo.garant.ru/document/redirect/70650730/2915928">29.10.59.280</text:a></text:p>
          </table:table-cell>
        </table:table-row>
        <table:table-row>
          <table:table-cell table:style-name="0">
            <text:p text:style-name="s1_center_fi0"><text:bookmark text:name="anchor1108"/>108.</text:p>
          </table:table-cell>
          <table:table-cell table:style-name="0">
            <text:p text:style-name="s16_fi0">Средства транспортные, оснащенные кранами-манипуляторами</text:p>
          </table:table-cell>
          <table:table-cell table:style-name="0">
            <text:p text:style-name="s1_center_fi0"><text:a xlink:type="simple" xlink:href="http://ivo.garant.ru/document/redirect/70650730/2915931">29.10.59.310</text:a></text:p>
          </table:table-cell>
        </table:table-row>
        <table:table-row>
          <table:table-cell table:style-name="0">
            <text:p text:style-name="s1_center_fi0"><text:bookmark text:name="anchor1109"/>109.</text:p>
          </table:table-cell>
          <table:table-cell table:style-name="0">
            <text:p text:style-name="s16_fi0">Снегоочистители</text:p>
          </table:table-cell>
          <table:table-cell table:style-name="0">
            <text:p text:style-name="s1_center_fi0"><text:a xlink:type="simple" xlink:href="http://ivo.garant.ru/document/redirect/70650730/2915932">29.10.59.320</text:a></text:p>
          </table:table-cell>
        </table:table-row>
        <table:table-row>
          <table:table-cell table:style-name="0">
            <text:p text:style-name="s1_center_fi0"><text:bookmark text:name="anchor1110"/>110.</text:p>
          </table:table-cell>
          <table:table-cell table:style-name="0">
            <text:p text:style-name="s16_fi0">Снегоболотоходы</text:p>
          </table:table-cell>
          <table:table-cell table:style-name="0">
            <text:p text:style-name="s1_center_fi0"><text:a xlink:type="simple" xlink:href="http://ivo.garant.ru/document/redirect/70650730/29159330">29.10.59.330</text:a></text:p>
          </table:table-cell>
        </table:table-row>
        <table:table-row>
          <table:table-cell table:style-name="0">
            <text:p text:style-name="s1_center_fi0"><text:bookmark text:name="anchor1111"/>111.</text:p>
          </table:table-cell>
          <table:table-cell table:style-name="0">
            <text:p text:style-name="s16_fi0">Вездеходы</text:p>
          </table:table-cell>
          <table:table-cell table:style-name="0">
            <text:p text:style-name="s1_center_fi0"><text:a xlink:type="simple" xlink:href="http://ivo.garant.ru/document/redirect/70650730/291059340">29.10.59.340</text:a></text:p>
          </table:table-cell>
        </table:table-row>
        <table:table-row>
          <table:table-cell table:style-name="0">
            <text:p text:style-name="s1_center_fi0"><text:bookmark text:name="anchor1112"/>112.</text:p>
          </table:table-cell>
          <table:table-cell table:style-name="0">
            <text:p text:style-name="s16_fi0">Средства автотранспортные специального назначения прочие, не включенные в другие группировки</text:p>
          </table:table-cell>
          <table:table-cell table:style-name="0">
            <text:p text:style-name="s1_center_fi0"><text:a xlink:type="simple" xlink:href="http://ivo.garant.ru/document/redirect/70650730/291059390">29.10.59.390</text:a></text:p>
          </table:table-cell>
        </table:table-row>
        <table:table-row>
          <table:table-cell table:style-name="0">
            <text:p text:style-name="s1_center_fi0"><text:bookmark text:name="anchor1113"/>113.</text:p>
          </table:table-cell>
          <table:table-cell table:style-name="0">
            <text:p text:style-name="s16_fi0">Контейнеры общего назначения (универсальные)</text:p>
          </table:table-cell>
          <table:table-cell table:style-name="0">
            <text:p text:style-name="s1_center_fi0"><text:a xlink:type="simple" xlink:href="http://ivo.garant.ru/document/redirect/70650730/292021110">29.20.21.110</text:a></text:p>
          </table:table-cell>
        </table:table-row>
        <table:table-row>
          <table:table-cell table:style-name="0">
            <text:p text:style-name="s1_center_fi0"><text:bookmark text:name="anchor1114"/>114.</text:p>
          </table:table-cell>
          <table:table-cell table:style-name="0">
            <text:p text:style-name="s16_fi0">Контейнеры специализированные</text:p>
          </table:table-cell>
          <table:table-cell table:style-name="0">
            <text:p text:style-name="s1_center_fi0"><text:a xlink:type="simple" xlink:href="http://ivo.garant.ru/document/redirect/70650730/292021120">29.20.21.120</text:a></text:p>
          </table:table-cell>
        </table:table-row>
        <table:table-row>
          <table:table-cell table:style-name="0">
            <text:p text:style-name="s1_center_fi0"><text:bookmark text:name="anchor1115"/>115.</text:p>
          </table:table-cell>
          <table:table-cell table:style-name="0">
            <text:p text:style-name="s16_fi0">Прицепы (полуприцепы) к легковым и грузовым автомобилям, мотоциклам, мотороллерам и квадрициклам</text:p>
          </table:table-cell>
          <table:table-cell table:style-name="0">
            <text:p text:style-name="s1_center_fi0"><text:a xlink:type="simple" xlink:href="http://ivo.garant.ru/document/redirect/70650730/292023110">29.20.23.110</text:a></text:p>
          </table:table-cell>
        </table:table-row>
        <table:table-row>
          <table:table-cell table:style-name="0">
            <text:p text:style-name="s1_center_fi0"><text:bookmark text:name="anchor1116"/>116.</text:p>
          </table:table-cell>
          <table:table-cell table:style-name="0">
            <text:p text:style-name="s16_fi0">Прицепы-цистерны и полуприцепы-цистерны для перевозки нефтепродуктов, воды и прочих жидкостей</text:p>
          </table:table-cell>
          <table:table-cell table:style-name="0">
            <text:p text:style-name="s1_center_fi0"><text:a xlink:type="simple" xlink:href="http://ivo.garant.ru/document/redirect/70650730/292023120">29.20.23.120</text:a></text:p>
          </table:table-cell>
        </table:table-row>
        <table:table-row>
          <table:table-cell table:style-name="0">
            <text:p text:style-name="s1_center_fi0"><text:bookmark text:name="anchor1117"/>117.</text:p>
          </table:table-cell>
          <table:table-cell table:style-name="0">
            <text:p text:style-name="s16_fi0">Прицепы и полуприцепы тракторные</text:p>
          </table:table-cell>
          <table:table-cell table:style-name="0">
            <text:p text:style-name="s1_center_fi0"><text:a xlink:type="simple" xlink:href="http://ivo.garant.ru/document/redirect/70650730/292023130">29.20.23.130</text:a></text:p>
          </table:table-cell>
        </table:table-row>
        <table:table-row>
          <table:table-cell table:style-name="0">
            <text:p text:style-name="s1_center_fi0"><text:bookmark text:name="anchor1118"/>118.</text:p>
          </table:table-cell>
          <table:table-cell table:style-name="0">
            <text:p text:style-name="s16_fi0">Прицепы и полуприцепы прочие, не включенные в другие группировки</text:p>
          </table:table-cell>
          <table:table-cell table:style-name="0">
            <text:p text:style-name="s1_center_fi0"><text:a xlink:type="simple" xlink:href="http://ivo.garant.ru/document/redirect/70650730/292023190">29.20.23.190</text:a></text:p>
          </table:table-cell>
        </table:table-row>
        <table:table-row>
          <table:table-cell table:style-name="0">
            <text:p text:style-name="s1_center_fi0"><text:bookmark text:name="anchor1119"/>119.</text:p>
          </table:table-cell>
          <table:table-cell table:style-name="0">
            <text:p text:style-name="s16_fi0">Суда круизные, суда экскурсионные и аналогичные плавучие средства для перевозки пассажиров; паромы всех типов</text:p>
          </table:table-cell>
          <table:table-cell table:style-name="0">
            <text:p text:style-name="s1_center_fi0"><text:a xlink:type="simple" xlink:href="http://ivo.garant.ru/document/redirect/70650730/301121">30.11.21</text:a></text:p>
          </table:table-cell>
        </table:table-row>
        <table:table-row>
          <table:table-cell table:style-name="0">
            <text:p text:style-name="s1_center_fi0"><text:bookmark text:name="anchor1120"/>120.</text:p>
          </table:table-cell>
          <table:table-cell table:style-name="0">
            <text:p text:style-name="s16_fi0">Танкеры для перевозки нефти, нефтепродуктов, химических продуктов, сжиженного газа</text:p>
          </table:table-cell>
          <table:table-cell table:style-name="0">
            <text:p text:style-name="s1_center_fi0"><text:a xlink:type="simple" xlink:href="http://ivo.garant.ru/document/redirect/70650730/301122">30.11.22</text:a></text:p>
          </table:table-cell>
        </table:table-row>
        <table:table-row>
          <table:table-cell table:style-name="0">
            <text:p text:style-name="s1_center_fi0"><text:bookmark text:name="anchor1121"/>121.</text:p>
          </table:table-cell>
          <table:table-cell table:style-name="0">
            <text:p text:style-name="s16_fi0">Суда рефрижераторные, кроме танкеров</text:p>
          </table:table-cell>
          <table:table-cell table:style-name="0">
            <text:p text:style-name="s1_center_fi0"><text:a xlink:type="simple" xlink:href="http://ivo.garant.ru/document/redirect/70650730/301123">30.11.23</text:a></text:p>
          </table:table-cell>
        </table:table-row>
        <table:table-row>
          <table:table-cell table:style-name="0">
            <text:p text:style-name="s1_center_fi0"><text:bookmark text:name="anchor1122"/>122.</text:p>
          </table:table-cell>
          <table:table-cell table:style-name="0">
            <text:p text:style-name="s16_fi0">Суда сухогрузные</text:p>
          </table:table-cell>
          <table:table-cell table:style-name="0">
            <text:p text:style-name="s1_center_fi0"><text:a xlink:type="simple" xlink:href="http://ivo.garant.ru/document/redirect/70650730/301124">30.11.24</text:a></text:p>
          </table:table-cell>
        </table:table-row>
        <table:table-row>
          <table:table-cell table:style-name="0">
            <text:p text:style-name="s1_center_fi0"><text:bookmark text:name="anchor1123"/>123.</text:p>
          </table:table-cell>
          <table:table-cell table:style-name="0">
            <text:p text:style-name="s16_fi0">Суда рыболовные; суда-рыбозаводы и прочие суда для переработки или консервирования рыбных продуктов</text:p>
          </table:table-cell>
          <table:table-cell table:style-name="0">
            <text:p text:style-name="s1_center_fi0"><text:a xlink:type="simple" xlink:href="http://ivo.garant.ru/document/redirect/70650730/301131">30.11.31</text:a></text:p>
          </table:table-cell>
        </table:table-row>
        <table:table-row>
          <table:table-cell table:style-name="0">
            <text:p text:style-name="s1_center_fi0"><text:bookmark text:name="anchor1124"/>124.</text:p>
          </table:table-cell>
          <table:table-cell table:style-name="0">
            <text:p text:style-name="s16_fi0">Буксиры и суда-толкачи</text:p>
          </table:table-cell>
          <table:table-cell table:style-name="0">
            <text:p text:style-name="s1_center_fi0"><text:a xlink:type="simple" xlink:href="http://ivo.garant.ru/document/redirect/70650730/301132">30.11.32</text:a></text:p>
          </table:table-cell>
        </table:table-row>
        <table:table-row>
          <table:table-cell table:style-name="0">
            <text:p text:style-name="s1_center_fi0"><text:bookmark text:name="anchor1125"/>125.</text:p>
          </table:table-cell>
          <table:table-cell table:style-name="0">
            <text:p text:style-name="s16_fi0">Земснаряды; плавучие маяки, плавучие краны; прочие суда</text:p>
          </table:table-cell>
          <table:table-cell table:style-name="0">
            <text:p text:style-name="s1_center_fi0"><text:a xlink:type="simple" xlink:href="http://ivo.garant.ru/document/redirect/70650730/301133">30.11.33</text:a></text:p>
          </table:table-cell>
        </table:table-row>
        <table:table-row>
          <table:table-cell table:style-name="0">
            <text:p text:style-name="s1_center_fi0"><text:bookmark text:name="anchor1126"/>126.</text:p>
          </table:table-cell>
          <table:table-cell table:style-name="0">
            <text:p text:style-name="s16_fi0">Платформы плавучие или погружные и инфраструктура</text:p>
          </table:table-cell>
          <table:table-cell table:style-name="0">
            <text:p text:style-name="s1_center_fi0"><text:a xlink:type="simple" xlink:href="http://ivo.garant.ru/document/redirect/70650730/301140">30.11.40</text:a></text:p>
          </table:table-cell>
        </table:table-row>
        <table:table-row>
          <table:table-cell table:style-name="0">
            <text:p text:style-name="s1_center_fi0"><text:bookmark text:name="anchor1127"/>127.</text:p>
          </table:table-cell>
          <table:table-cell table:style-name="0">
            <text:p text:style-name="s16_fi0">Конструкции плавучие прочие (включая плоты, понтоны, кессоны, дебаркадеры, буи и бакены)</text:p>
          </table:table-cell>
          <table:table-cell table:style-name="0">
            <text:p text:style-name="s1_center_fi0"><text:a xlink:type="simple" xlink:href="http://ivo.garant.ru/document/redirect/70650730/301150">30.11.50</text:a></text:p>
          </table:table-cell>
        </table:table-row>
        <table:table-row>
          <table:table-cell table:style-name="0">
            <text:p text:style-name="s1_center_fi0"><text:bookmark text:name="anchor1128"/>128.</text:p>
          </table:table-cell>
          <table:table-cell table:style-name="0">
            <text:p text:style-name="s16_fi0">Суда прогулочные и спортивные</text:p>
          </table:table-cell>
          <table:table-cell table:style-name="0">
            <text:p text:style-name="s1_center_fi0"><text:a xlink:type="simple" xlink:href="http://ivo.garant.ru/document/redirect/70650730/3012">30.12</text:a></text:p>
          </table:table-cell>
        </table:table-row>
        <table:table-row>
          <table:table-cell table:style-name="0">
            <text:p text:style-name="s1_center_fi0"><text:bookmark text:name="anchor1129"/>129.</text:p>
          </table:table-cell>
          <table:table-cell table:style-name="0">
            <text:p text:style-name="s16_fi0">Локомотивы железнодорожные и тендеры локомотивов</text:p>
          </table:table-cell>
          <table:table-cell table:style-name="0">
            <text:p text:style-name="s1_center_fi0"><text:a xlink:type="simple" xlink:href="http://ivo.garant.ru/document/redirect/70650730/30201">30.20.1</text:a></text:p>
          </table:table-cell>
        </table:table-row>
        <table:table-row>
          <table:table-cell table:style-name="0">
            <text:p text:style-name="s1_center_fi0"><text:bookmark text:name="anchor1130"/>130.</text:p>
          </table:table-cell>
          <table:table-cell table:style-name="0">
            <text:p text:style-name="s16_fi0">Вагоны железнодорожные или трамвайные пассажирские самоходные (моторные), вагоны товарные (багажные) и платформы открытые, кроме транспортных средств, предназначенных для технического обслуживания или ремонта</text:p>
          </table:table-cell>
          <table:table-cell table:style-name="0">
            <text:p text:style-name="s1_center_fi0"><text:a xlink:type="simple" xlink:href="http://ivo.garant.ru/document/redirect/70650730/30202">30.20.2</text:a></text:p>
          </table:table-cell>
        </table:table-row>
        <table:table-row>
          <table:table-cell table:style-name="0">
            <text:p text:style-name="s1_center_fi0"><text:bookmark text:name="anchor1131"/>131.</text:p>
          </table:table-cell>
          <table:table-cell table:style-name="0">
            <text:p text:style-name="s16_fi0">Состав подвижной прочий</text:p>
          </table:table-cell>
          <table:table-cell table:style-name="0">
            <text:p text:style-name="s1_center_fi0"><text:a xlink:type="simple" xlink:href="http://ivo.garant.ru/document/redirect/70650730/30203">30.20.3</text:a></text:p>
          </table:table-cell>
        </table:table-row>
        <table:table-row>
          <table:table-cell table:style-name="0">
            <text:p text:style-name="s1_center_fi0"><text:bookmark text:name="anchor1132"/>132.</text:p>
          </table:table-cell>
          <table:table-cell table:style-name="0">
            <text:p text:style-name="s16_fi0">Части железнодорожных локомотивов или трамвайных моторных вагонов или прочего подвижного состава; путевое оборудование и устройства и их части; механическое оборудование для управления движением</text:p>
          </table:table-cell>
          <table:table-cell table:style-name="0">
            <text:p text:style-name="s1_center_fi0"><text:a xlink:type="simple" xlink:href="http://ivo.garant.ru/document/redirect/70650730/30204">30.20.4</text:a></text:p>
          </table:table-cell>
        </table:table-row>
        <table:table-row>
          <table:table-cell table:style-name="0">
            <text:p text:style-name="s1_center_fi0"><text:bookmark text:name="anchor1133"/>133.</text:p>
          </table:table-cell>
          <table:table-cell table:style-name="0">
            <text:p text:style-name="s16_fi0">Вертолеты пассажирские</text:p>
          </table:table-cell>
          <table:table-cell table:style-name="0">
            <text:p text:style-name="s1_center_fi0"><text:a xlink:type="simple" xlink:href="http://ivo.garant.ru/document/redirect/70650730/6731">30.30.31.110</text:a></text:p>
          </table:table-cell>
        </table:table-row>
        <table:table-row>
          <table:table-cell table:style-name="0">
            <text:p text:style-name="s1_center_fi0"><text:bookmark text:name="anchor1134"/>134.</text:p>
          </table:table-cell>
          <table:table-cell table:style-name="0">
            <text:p text:style-name="s16_fi0">Вертолеты грузовые</text:p>
          </table:table-cell>
          <table:table-cell table:style-name="0">
            <text:p text:style-name="s1_center_fi0"><text:a xlink:type="simple" xlink:href="http://ivo.garant.ru/document/redirect/70650730/6732">30.30.31.120</text:a></text:p>
          </table:table-cell>
        </table:table-row>
        <table:table-row>
          <table:table-cell table:style-name="0">
            <text:p text:style-name="s1_center_fi0"><text:bookmark text:name="anchor1135"/>135.</text:p>
          </table:table-cell>
          <table:table-cell table:style-name="0">
            <text:p text:style-name="s16_fi0">Аппараты летательные прочие с массой пустого снаряженного аппарата не более 2000 кг</text:p>
          </table:table-cell>
          <table:table-cell table:style-name="0">
            <text:p text:style-name="s1_center_fi0"><text:a xlink:type="simple" xlink:href="http://ivo.garant.ru/document/redirect/70650730/30303212">30.30.32.120</text:a></text:p>
          </table:table-cell>
        </table:table-row>
        <table:table-row>
          <table:table-cell table:style-name="0">
            <text:p text:style-name="s1_center_fi0"><text:bookmark text:name="anchor1136"/>136.</text:p>
          </table:table-cell>
          <table:table-cell table:style-name="0">
            <text:p text:style-name="s16_fi0">Самолеты и прочие летательные аппараты с массой пустого снаряженного аппарата свыше 15000 кг</text:p>
          </table:table-cell>
          <table:table-cell table:style-name="0">
            <text:p text:style-name="s1_center_fi0"><text:a xlink:type="simple" xlink:href="http://ivo.garant.ru/document/redirect/70650730/303034">30.30.34</text:a></text:p>
          </table:table-cell>
        </table:table-row>
        <table:table-row>
          <table:table-cell table:style-name="0">
            <text:p text:style-name="s1_center_fi0"><text:bookmark text:name="anchor1137"/>137.</text:p>
          </table:table-cell>
          <table:table-cell table:style-name="0">
            <text:p text:style-name="s16_fi0">Матрасы</text:p>
          </table:table-cell>
          <table:table-cell table:style-name="0">
            <text:p text:style-name="s1_center_fi0"><text:a xlink:type="simple" xlink:href="http://ivo.garant.ru/document/redirect/70650730/31031">31.03.1</text:a></text:p>
          </table:table-cell>
        </table:table-row>
        <table:table-row>
          <table:table-cell table:style-name="0">
            <text:p text:style-name="s1_center_fi0"><text:bookmark text:name="anchor1138"/>138.</text:p>
          </table:table-cell>
          <table:table-cell table:style-name="0">
            <text:p text:style-name="s16_fi0">Мебель металлическая, не включенная в другие группировки</text:p>
          </table:table-cell>
          <table:table-cell table:style-name="0">
            <text:p text:style-name="s1_center_fi0"><text:a xlink:type="simple" xlink:href="http://ivo.garant.ru/document/redirect/70650730/310911">31.09.11</text:a></text:p>
          </table:table-cell>
        </table:table-row>
        <table:table-row>
          <table:table-cell table:style-name="0">
            <text:p text:style-name="s1_center_fi0"><text:bookmark text:name="anchor1139"/>139.</text:p>
          </table:table-cell>
          <table:table-cell table:style-name="0">
            <text:p text:style-name="s16_fi0">Аппараты искусственной вентиляции легких, соответствующие кодам 232870, 23289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21">32.50.21.121</text:a> <text:a xlink:type="simple" xlink:href="http://ivo.garant.ru/document/redirect/70650730/325021122">32.50.21.122</text:a> <text:a xlink:type="simple" xlink:href="http://ivo.garant.ru/document/redirect/70650730/305021123">32.50.21.123</text:a></text:p>
          </table:table-cell>
        </table:table-row>
        <table:table-row>
          <table:table-cell table:style-name="0">
            <text:p text:style-name="s1_center_fi0"><text:bookmark text:name="anchor1140"/>140.</text:p>
          </table:table-cell>
          <table:table-cell table:style-name="0">
            <text:p text:style-name="s16_fi0">Мебель медицинская в части:</text:p>
            <text:p text:style-name="s16_fi0">кровати больничной механической, соответствующей коду 120210 вида медицинского изделия в соответствии с <text:a xlink:type="simple" xlink:href="http://ivo.garant.ru/document/redirect/70199586/1000">номенклатурной классификацией</text:a>; кровати больничной стандартной с электроприводом, соответствующей коду 136210 вида медицинского изделия в соответствии с номенклатурной классификацией; стеллажа для палаты пациента, соответствующего коду 156900 вида медицинского изделия в соответствии с номенклатурной классификацией; шкафа вытяжного, соответствующего коду 181470 вида медицинского изделия в соответствии с номенклатурной классификацией; ширмы прикроватной, соответствующей коду 184200 вида медицинского изделия в соответствии с номенклатурной классификацией; стеллажа общего назначения, соответствующего коду 260470 вида медицинского изделия в соответствии с номенклатурной классификацией; шкафа для сушки и хранения эндоскопов, соответствующего коду 271740 вида медицинского изделия в соответствии с номенклатурной классификацией</text:p>
          </table:table-cell>
          <table:table-cell table:style-name="0">
            <text:p text:style-name="s1_center_fi0"><text:a xlink:type="simple" xlink:href="http://ivo.garant.ru/document/redirect/70650730/325030119">32.50.30.119</text:a></text:p>
            <text:p text:style-name="s1_center_fi0"><text:a xlink:type="simple" xlink:href="http://ivo.garant.ru/document/redirect/70650730/325030111">32.50.30.111</text:a></text:p>
            <text:p text:style-name="s1_center_fi0"><text:a xlink:type="simple" xlink:href="http://ivo.garant.ru/document/redirect/70650730/325030110">32.50.30.110</text:a></text:p>
            <text:p text:style-name="s1_center_fi0"><text:a xlink:type="simple" xlink:href="http://ivo.garant.ru/document/redirect/70650730/325050">32.50.50</text:a></text:p>
            <text:p text:style-name="s1_center_fi0"><text:a xlink:type="simple" xlink:href="http://ivo.garant.ru/document/redirect/70650730/325050190">32.50.50.190</text:a></text:p>
          </table:table-cell>
        </table:table-row>
        <table:table-row>
          <table:table-cell table:style-name="0">
            <text:p text:style-name="s1_center_fi0"><text:bookmark text:name="anchor1141"/>141.</text:p>
          </table:table-cell>
          <table:table-cell table:style-name="0">
            <text:p text:style-name="s16_fi0">Изделия медицинские, в том числе хирургические, прочие, не включенные в другие группировки (только в отношении медицинских масок)</text:p>
          </table:table-cell>
          <table:table-cell table:style-name="0">
            <text:p text:style-name="s1_center_fi0"><text:a xlink:type="simple" xlink:href="http://ivo.garant.ru/document/redirect/70650730/325050190">32.50.50.190</text:a></text:p>
          </table:table-cell>
        </table:table-row>
        <table:table-row>
          <table:table-cell table:style-name="0">
            <text:p text:style-name="s1_center_fi0"><text:bookmark text:name="anchor1142"/>142.</text:p>
          </table:table-cell>
          <table:table-cell table:style-name="0">
            <text:p text:style-name="s16_fi0">Аппараты дыхательные автономные</text:p>
          </table:table-cell>
          <table:table-cell table:style-name="0">
            <text:p text:style-name="s1_center_fi0"><text:a xlink:type="simple" xlink:href="http://ivo.garant.ru/document/redirect/70650730/329911130">32.99.11.130</text:a></text:p>
          </table:table-cell>
        </table:table-row>
        <table:table-row>
          <table:table-cell table:style-name="0">
            <text:p text:style-name="s1_center_fi0"><text:bookmark text:name="anchor1143"/>143.</text:p>
          </table:table-cell>
          <table:table-cell table:style-name="0">
            <text:p text:style-name="s16_fi0">Одежда защитная огнестойкая</text:p>
          </table:table-cell>
          <table:table-cell table:style-name="0">
            <text:p text:style-name="s1_center_fi0"><text:a xlink:type="simple" xlink:href="http://ivo.garant.ru/document/redirect/70650730/329911140">32.99.11.140</text:a></text:p>
          </table:table-cell>
        </table:table-row>
        <table:table-row>
          <table:table-cell table:style-name="0">
            <text:p text:style-name="s1_center_fi0"><text:bookmark text:name="anchor1144"/>144.</text:p>
          </table:table-cell>
          <table:table-cell table:style-name="0">
            <text:p text:style-name="s16_fi0">Средства защиты головы и лица (только в отношении медицинских масок)</text:p>
          </table:table-cell>
          <table:table-cell table:style-name="0">
            <text:p text:style-name="s1_center_fi0"><text:a xlink:type="simple" xlink:href="http://ivo.garant.ru/document/redirect/70650730/329911160">32.99.11.160</text:a></text:p>
          </table:table-cell>
        </table:table-row>
        <table:table-row>
          <table:table-cell table:style-name="0">
            <text:p text:style-name="s1_center_fi0"><text:bookmark text:name="anchor1145"/>145.</text:p>
          </table:table-cell>
          <table:table-cell table:style-name="0">
            <text:p text:style-name="s16_fi0">Уборы головные защитные и средства защиты прочие, не включенные в другие группировки (только в отношении головных уборов из текстильных материалов)</text:p>
          </table:table-cell>
          <table:table-cell table:style-name="0">
            <text:p text:style-name="s1_center_fi0"><text:a xlink:type="simple" xlink:href="http://ivo.garant.ru/document/redirect/70650730/329911190">32.99.11.190</text:a></text:p>
          </table:table-cell>
        </table:table-row>
        <table:table-row>
          <table:table-cell table:style-name="0">
            <text:p text:style-name="s1_center_fi0"><text:bookmark text:name="anchor1146"/>146.</text:p>
          </table:table-cell>
          <table:table-cell table:style-name="0">
            <text:p text:style-name="s16_fi0">Программа для электронной вычислительной машины и (или) базы данных</text:p>
          </table:table-cell>
          <table:table-cell table:style-name="0">
            <text:p text:style-name="s1_center_fi0"><text:a xlink:type="simple" xlink:href="http://ivo.garant.ru/document/redirect/70650730/582">58.2</text:a>, <text:a xlink:type="simple" xlink:href="http://ivo.garant.ru/document/redirect/70650730/61">61</text:a>, <text:a xlink:type="simple" xlink:href="http://ivo.garant.ru/document/redirect/70650730/62">62</text:a>, <text:a xlink:type="simple" xlink:href="http://ivo.garant.ru/document/redirect/70650730/63">63</text:a>, <text:a xlink:type="simple" xlink:href="http://ivo.garant.ru/document/redirect/70650730/9109">64</text:a></text:p>
          </table:table-cell>
        </table:table-row>
        <table:table-row>
          <table:table-cell table:style-name="0">
            <text:p text:style-name="s1_center_fi0"><text:bookmark text:name="anchor1147"/>147.</text:p>
          </table:table-cell>
          <table:table-cell table:style-name="0">
            <text:p text:style-name="s16_fi0">Аудиторские услуги</text:p>
          </table:table-cell>
          <table:table-cell table:style-name="0">
            <text:p text:style-name="s1_center_fi0"><text:a xlink:type="simple" xlink:href="http://ivo.garant.ru/document/redirect/70650730/69201">69.20.1</text:a></text:p>
          </table:table-cell>
        </table:table-row>
        <table:table-row>
          <table:table-cell table:style-name="0">
            <text:p text:style-name="s1_center_fi0"><text:bookmark text:name="anchor1148"/>148.</text:p>
          </table:table-cell>
          <table:table-cell table:style-name="0">
            <text:p text:style-name="s16_fi0">Услуги по финансовым консультациям</text:p>
          </table:table-cell>
          <table:table-cell table:style-name="0">
            <text:p text:style-name="s1_center_fi0"><text:a xlink:type="simple" xlink:href="http://ivo.garant.ru/document/redirect/70650730/661991">66.19.91</text:a></text:p>
          </table:table-cell>
        </table:table-row>
        <table:table-row>
          <table:table-cell table:style-name="0">
            <text:p text:style-name="s1_center_fi0"><text:bookmark text:name="anchor1149"/>149.</text:p>
          </table:table-cell>
          <table:table-cell table:style-name="0">
            <text:p text:style-name="s16_fi0">Услуги в области бухгалтерского учета</text:p>
          </table:table-cell>
          <table:table-cell table:style-name="0">
            <text:p text:style-name="s1_center_fi0"><text:a xlink:type="simple" xlink:href="http://ivo.garant.ru/document/redirect/70650730/9390">69.20.2</text:a></text:p>
          </table:table-cell>
        </table:table-row>
        <table:table-row>
          <table:table-cell table:style-name="0">
            <text:p text:style-name="s1_center_fi0"><text:bookmark text:name="anchor1150"/>150.</text:p>
          </table:table-cell>
          <table:table-cell table:style-name="0">
            <text:p text:style-name="s16_fi0">Услуги в области налогового консультирования</text:p>
          </table:table-cell>
          <table:table-cell table:style-name="0">
            <text:p text:style-name="s1_center_fi0"><text:a xlink:type="simple" xlink:href="http://ivo.garant.ru/document/redirect/70650730/69203">69.20.3</text:a></text:p>
          </table:table-cell>
        </table:table-row>
        <table:table-row>
          <table:table-cell table:style-name="0">
            <text:p text:style-name="s1_center_fi0"><text:bookmark text:name="anchor1151"/>151.</text:p>
          </table:table-cell>
          <table:table-cell table:style-name="0">
            <text:p text:style-name="s16_fi0">Услуги консультативные по вопросам финансового управления (кроме вопросов корпоративного налогообложения)</text:p>
          </table:table-cell>
          <table:table-cell table:style-name="0">
            <text:p text:style-name="s1_center_fi0"><text:a xlink:type="simple" xlink:href="http://ivo.garant.ru/document/redirect/70650730/702212">70.22.12</text:a></text:p>
          </table:table-cell>
        </table:table-row>
      </table:table>
      <text:p text:style-name="s1"/>
      <text:p text:style-name="s22header">Информация об изменениях:</text:p>
      <text:p text:style-name="s22"><text:bookmark text:name="anchor2000"/>Приложение 2 изменено с 1 июля 2026 г. - Постановления Правительства России <text:a xlink:type="simple" xlink:href="http://ivo.garant.ru/document/redirect/413308835/1003">от 18 декабря 2025 г. № 2062</text:a>, <text:a xlink:type="simple" xlink:href="http://ivo.garant.ru/document/redirect/413370510/1">от 23 декабря 2025 г. № 2098</text:a>, <text:a xlink:type="simple" xlink:href="http://ivo.garant.ru/document/redirect/414186645/1001">от 4 мая 2026 г. № 513</text:a></text:p>
      <text:p text:style-name="s22"><text:a xlink:type="simple" xlink:href="http://ivo.garant.ru/document/redirect/483414703/2000">См. будущую редакцию</text:a></text:p>
      <text:p text:style-name="s22">Приложение 2 изменено с 1 января 2026 г. - <text:a xlink:type="simple" xlink:href="http://ivo.garant.ru/document/redirect/412615083/1005">Постановление</text:a> Правительства России от 29 августа 2025 г. № 1326</text:p>
      <text:p text:style-name="s22"><text:a xlink:type="simple" xlink:href="http://ivo.garant.ru/document/redirect/76849700/2000">См. предыдущую редакцию</text:a></text:p>
      <text:p text:style-name="s1_right_fi698"><text:span text:style-name="s10">ПРИЛОЖЕНИЕ N 2
к <text:a xlink:type="simple" xlink:href="#anchor0">постановлению</text:a> Правительства
Российской Федерации
от 23 декабря 2024 г. N 1875</text:span></text:p>
      <text:p text:style-name="s1"/>
      <text:h text:outline-level="1" text:style-name="s3">Перечень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гражданами, иностранными юридическими лицами, в отношении которых устанавливается ограничение закупок для обеспечения государственных и муниципальных нужд, закупок отдельными видами юридических лиц</text:h>
      <text:p text:style-name="s52header">С изменениями и дополнениями от:</text:p>
      <text:p text:style-name="s52">10 июня, 29 августа 2025 г.</text:p>
      <text:p text:style-name="s1"/>
      <table:table table:name="10027" table:style-name="10027">
        <table:table-column table:style-name="1000"/>
        <table:table-column table:style-name="5550"/>
        <table:table-column table:style-name="3477"/>
        <table:table-row>
          <table:table-cell table:style-name="13" table:number-columns-spanned="2">
            <table:covered-table-cell/>
            <text:p text:style-name="s1_center_fi0"><text:bookmark text:name="anchor20100"/>Наименование товара</text:p>
          </table:table-cell>
          <table:table-cell table:style-name="9">
            <text:p text:style-name="s1_center_fi0">Код товара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row>
        <table:table-row>
          <table:table-cell table:style-name="0">
            <text:p text:style-name="s1_center_fi0"><text:bookmark text:name="anchor2001"/>1.</text:p>
          </table:table-cell>
          <table:table-cell table:style-name="0">
            <text:p text:style-name="s16_fi0">Щебень</text:p>
          </table:table-cell>
          <table:table-cell table:style-name="0">
            <text:p text:style-name="s1_center_fi0"><text:a xlink:type="simple" xlink:href="http://ivo.garant.ru/document/redirect/70650730/81212140">08.12.12.140</text:a></text:p>
          </table:table-cell>
        </table:table-row>
        <table:table-row>
          <table:table-cell table:style-name="0">
            <text:p text:style-name="s1_center_fi0"><text:bookmark text:name="anchor2002"/>2.</text:p>
          </table:table-cell>
          <table:table-cell table:style-name="0">
            <text:p text:style-name="s16_fi0">Подгузники и пеленки детские из бумажной массы, бумаги, целлюлозной ваты и полотна из целлюлозных волокон</text:p>
          </table:table-cell>
          <table:table-cell table:style-name="0">
            <text:p text:style-name="s1_center_fi0"><text:a xlink:type="simple" xlink:href="http://ivo.garant.ru/document/redirect/70650730/17221212">17.22.12.120</text:a></text:p>
          </table:table-cell>
        </table:table-row>
        <table:table-row>
          <table:table-cell table:style-name="0">
            <text:p text:style-name="s1_center_fi0"><text:bookmark text:name="anchor2003"/>3.</text:p>
          </table:table-cell>
          <table:table-cell table:style-name="0">
            <text:p text:style-name="s16_fi0">Блокноты, записные книжки и книги для записей</text:p>
          </table:table-cell>
          <table:table-cell table:style-name="0">
            <text:p text:style-name="s1_center_fi0"><text:a xlink:type="simple" xlink:href="http://ivo.garant.ru/document/redirect/70650730/172313191">17.23.13.191</text:a></text:p>
          </table:table-cell>
        </table:table-row>
        <table:table-row>
          <table:table-cell table:style-name="0">
            <text:p text:style-name="s1_center_fi0"><text:bookmark text:name="anchor2004"/>4.</text:p>
          </table:table-cell>
          <table:table-cell table:style-name="0">
            <text:p text:style-name="s16_fi0">Альбомы и папки с бумагой (включая блоки)</text:p>
          </table:table-cell>
          <table:table-cell table:style-name="0">
            <text:p text:style-name="s1_center_fi0"><text:a xlink:type="simple" xlink:href="http://ivo.garant.ru/document/redirect/70650730/172313192">17.23.13.192</text:a></text:p>
          </table:table-cell>
        </table:table-row>
        <table:table-row>
          <table:table-cell table:style-name="0">
            <text:p text:style-name="s1_center_fi0"><text:bookmark text:name="anchor2005"/>5.</text:p>
          </table:table-cell>
          <table:table-cell table:style-name="0">
            <text:p text:style-name="s16_fi0">Папки и обложки из бумаги или картона</text:p>
          </table:table-cell>
          <table:table-cell table:style-name="0">
            <text:p text:style-name="s1_center_fi0"><text:a xlink:type="simple" xlink:href="http://ivo.garant.ru/document/redirect/70650730/172313193">17.23.13.193</text:a></text:p>
          </table:table-cell>
        </table:table-row>
        <table:table-row>
          <table:table-cell table:style-name="0">
            <text:p text:style-name="s1_center_fi0"><text:bookmark text:name="anchor2006"/>6.</text:p>
          </table:table-cell>
          <table:table-cell table:style-name="0">
            <text:p text:style-name="s16_fi0">Тетради школьные ученические</text:p>
          </table:table-cell>
          <table:table-cell table:style-name="0">
            <text:p text:style-name="s1_center_fi0"><text:a xlink:type="simple" xlink:href="http://ivo.garant.ru/document/redirect/70650730/1723194">17.23.13.194</text:a></text:p>
          </table:table-cell>
        </table:table-row>
        <table:table-row>
          <table:table-cell table:style-name="0">
            <text:p text:style-name="s1_center_fi0"><text:bookmark text:name="anchor2007"/>7.</text:p>
          </table:table-cell>
          <table:table-cell table:style-name="0">
            <text:p text:style-name="s16_fi0">Тетради различного назначения</text:p>
          </table:table-cell>
          <table:table-cell table:style-name="0">
            <text:p text:style-name="s1_center_fi0"><text:a xlink:type="simple" xlink:href="http://ivo.garant.ru/document/redirect/70650730/172319196">17.23.13.196</text:a></text:p>
          </table:table-cell>
        </table:table-row>
        <table:table-row>
          <table:table-cell table:style-name="0">
            <text:p text:style-name="s1_center_fi0"><text:bookmark text:name="anchor2008"/>8.</text:p>
          </table:table-cell>
          <table:table-cell table:style-name="0">
            <text:p text:style-name="s16_fi0">Принадлежности канцелярские прочие из бумаги или картона, не включенные в другие группировки</text:p>
          </table:table-cell>
          <table:table-cell table:style-name="0">
            <text:p text:style-name="s1_center_fi0"><text:a xlink:type="simple" xlink:href="http://ivo.garant.ru/document/redirect/70650730/172313199">17.23.13.199</text:a></text:p>
          </table:table-cell>
        </table:table-row>
        <table:table-row>
          <table:table-cell table:style-name="0">
            <text:p text:style-name="s1_center_fi0"><text:bookmark text:name="anchor2009"/>9.</text:p>
          </table:table-cell>
          <table:table-cell table:style-name="0">
            <text:p text:style-name="s16_fi0">Оксиды, пероксиды и гидроксиды металлов</text:p>
          </table:table-cell>
          <table:table-cell table:style-name="0">
            <text:p text:style-name="s1_center_fi0"><text:a xlink:type="simple" xlink:href="http://ivo.garant.ru/document/redirect/70650730/201211">20.12.1</text:a></text:p>
          </table:table-cell>
        </table:table-row>
        <table:table-row>
          <table:table-cell table:style-name="0">
            <text:p text:style-name="s1_center_fi0"><text:bookmark text:name="anchor2010"/>10.</text:p>
          </table:table-cell>
          <table:table-cell table:style-name="0">
            <text:p text:style-name="s16_fi0">Красители органические синтетические и составы на их основе; продукты синтетические органические, используемые в качестве препаратов флуоресцентных отбеливающих или люминофоров; лаки цветные (пигментные) и препараты на их основе</text:p>
          </table:table-cell>
          <table:table-cell table:style-name="0">
            <text:p text:style-name="s1_center_fi0"><text:a xlink:type="simple" xlink:href="http://ivo.garant.ru/document/redirect/70650730/201221">20.12.21</text:a></text:p>
          </table:table-cell>
        </table:table-row>
        <table:table-row>
          <table:table-cell table:style-name="0">
            <text:p text:style-name="s1_center_fi0"><text:bookmark text:name="anchor2011"/>11.</text:p>
          </table:table-cell>
          <table:table-cell table:style-name="0">
            <text:p text:style-name="s16_fi0">Вещества дубильные синтетические органические; вещества дубильные неорганические; составы дубильные; препараты ферментные для предварительного дубления</text:p>
          </table:table-cell>
          <table:table-cell table:style-name="0">
            <text:p text:style-name="s1_center_fi0"><text:a xlink:type="simple" xlink:href="http://ivo.garant.ru/document/redirect/70650730/201223">20.12.23</text:a></text:p>
          </table:table-cell>
        </table:table-row>
        <table:table-row>
          <table:table-cell table:style-name="0">
            <text:p text:style-name="s1_center_fi0"><text:bookmark text:name="anchor2012"/>12.</text:p>
          </table:table-cell>
          <table:table-cell table:style-name="0">
            <text:p text:style-name="s16_fi0">Пигменты и красители, не включенные в другие группировки; вещества неорганические, применяемые в качестве люминофоров</text:p>
          </table:table-cell>
          <table:table-cell table:style-name="0">
            <text:p text:style-name="s1_center_fi0"><text:a xlink:type="simple" xlink:href="http://ivo.garant.ru/document/redirect/70650730/201224">20.12.24</text:a></text:p>
          </table:table-cell>
        </table:table-row>
        <table:table-row>
          <table:table-cell table:style-name="0">
            <text:p text:style-name="s1_center_fi0"><text:bookmark text:name="anchor2013"/>13.</text:p>
          </table:table-cell>
          <table:table-cell table:style-name="0">
            <text:p text:style-name="s16_fi0">Элементы химические, не включенные в другие группировки; неорганические кислоты и соединения</text:p>
          </table:table-cell>
          <table:table-cell table:style-name="0">
            <text:p text:style-name="s1_center_fi0"><text:a xlink:type="simple" xlink:href="http://ivo.garant.ru/document/redirect/70650730/20132">20.13.2</text:a></text:p>
          </table:table-cell>
        </table:table-row>
        <table:table-row>
          <table:table-cell table:style-name="0">
            <text:p text:style-name="s1_center_fi0"><text:bookmark text:name="anchor2014"/>14.</text:p>
          </table:table-cell>
          <table:table-cell table:style-name="0">
            <text:p text:style-name="s16_fi0">Галогениды металлов; гипохлориты, хлораты и перхлораты</text:p>
          </table:table-cell>
          <table:table-cell table:style-name="0">
            <text:p text:style-name="s1_center_fi0"><text:a xlink:type="simple" xlink:href="http://ivo.garant.ru/document/redirect/70650730/20133">20.13.3</text:a></text:p>
          </table:table-cell>
        </table:table-row>
        <table:table-row>
          <table:table-cell table:style-name="0">
            <text:p text:style-name="s1_center_fi0"><text:bookmark text:name="anchor2015"/>15.</text:p>
          </table:table-cell>
          <table:table-cell table:style-name="0">
            <text:p text:style-name="s16_fi0">Сульфиды, сульфаты; нитраты, фосфаты и карбонаты</text:p>
          </table:table-cell>
          <table:table-cell table:style-name="0">
            <text:p text:style-name="s1_center_fi0"><text:a xlink:type="simple" xlink:href="http://ivo.garant.ru/document/redirect/70650730/20134">20.13.4</text:a></text:p>
          </table:table-cell>
        </table:table-row>
        <table:table-row>
          <table:table-cell table:style-name="0">
            <text:p text:style-name="s1_center_fi0"><text:bookmark text:name="anchor2016"/>16.</text:p>
          </table:table-cell>
          <table:table-cell table:style-name="0">
            <text:p text:style-name="s16_fi0">Соли прочих металлов</text:p>
          </table:table-cell>
          <table:table-cell table:style-name="0">
            <text:p text:style-name="s1_center_fi0"><text:a xlink:type="simple" xlink:href="http://ivo.garant.ru/document/redirect/70650730/20135">20.13.5</text:a></text:p>
          </table:table-cell>
        </table:table-row>
        <table:table-row>
          <table:table-cell table:style-name="0">
            <text:p text:style-name="s1_center_fi0"><text:bookmark text:name="anchor2017"/>17.</text:p>
          </table:table-cell>
          <table:table-cell table:style-name="0">
            <text:p text:style-name="s16_fi0">Цианиды, цианидоксиды и комплексные цианиды; фульминаты, цианаты и тиоцианаты;</text:p>
            <text:p text:style-name="s16_fi0">силикаты; бораты; пербораты; прочие соли неорганических кислот или пероксикислот</text:p>
          </table:table-cell>
          <table:table-cell table:style-name="0">
            <text:p text:style-name="s1_center_fi0"><text:a xlink:type="simple" xlink:href="http://ivo.garant.ru/document/redirect/70650730/201362">20.13.62</text:a></text:p>
          </table:table-cell>
        </table:table-row>
        <table:table-row>
          <table:table-cell table:style-name="0">
            <text:p text:style-name="s1_center_fi0"><text:bookmark text:name="anchor2018"/>18.</text:p>
          </table:table-cell>
          <table:table-cell table:style-name="0">
            <text:p text:style-name="s16_fi0">Пероксид водорода (перекись водорода)</text:p>
          </table:table-cell>
          <table:table-cell table:style-name="0">
            <text:p text:style-name="s1_center_fi0"><text:a xlink:type="simple" xlink:href="http://ivo.garant.ru/document/redirect/70650730/201363">20.13.63</text:a></text:p>
          </table:table-cell>
        </table:table-row>
        <table:table-row>
          <table:table-cell table:style-name="0">
            <text:p text:style-name="s1_center_fi0"><text:bookmark text:name="anchor2019"/>19.</text:p>
          </table:table-cell>
          <table:table-cell table:style-name="0">
            <text:p text:style-name="s16_fi0">Фосфиды, карбиды, гидриды, нитриды, азиды, силициды и бориды</text:p>
          </table:table-cell>
          <table:table-cell table:style-name="0">
            <text:p text:style-name="s1_center_fi0"><text:a xlink:type="simple" xlink:href="http://ivo.garant.ru/document/redirect/70650730/201364">20.13.64</text:a></text:p>
          </table:table-cell>
        </table:table-row>
        <table:table-row>
          <table:table-cell table:style-name="0">
            <text:p text:style-name="s1_center_fi0"><text:bookmark text:name="anchor2020"/>20.</text:p>
          </table:table-cell>
          <table:table-cell table:style-name="0">
            <text:p text:style-name="s16_fi0">Производные ациклических углеводородов хлорированные</text:p>
          </table:table-cell>
          <table:table-cell table:style-name="0">
            <text:p text:style-name="s1_center_fi0"><text:a xlink:type="simple" xlink:href="http://ivo.garant.ru/document/redirect/70650730/201413">20.14.13</text:a></text:p>
          </table:table-cell>
        </table:table-row>
        <table:table-row>
          <table:table-cell table:style-name="0">
            <text:p text:style-name="s1_center_fi0"><text:bookmark text:name="anchor2021"/>21.</text:p>
          </table:table-cell>
          <table:table-cell table:style-name="0">
            <text:p text:style-name="s16_fi0">Производные углеводородов сульфированные, нитрованные или нитрозированные, галогенированные и негалогенированные</text:p>
          </table:table-cell>
          <table:table-cell table:style-name="0">
            <text:p text:style-name="s1_center_fi0"><text:a xlink:type="simple" xlink:href="http://ivo.garant.ru/document/redirect/70650730/201414">20.14.14</text:a></text:p>
          </table:table-cell>
        </table:table-row>
        <table:table-row>
          <table:table-cell table:style-name="0">
            <text:p text:style-name="s1_center_fi0"><text:bookmark text:name="anchor2022"/>22.</text:p>
          </table:table-cell>
          <table:table-cell table:style-name="0">
            <text:p text:style-name="s16_fi0">Производные углеводородов прочие</text:p>
          </table:table-cell>
          <table:table-cell table:style-name="0">
            <text:p text:style-name="s1_center_fi0"><text:a xlink:type="simple" xlink:href="http://ivo.garant.ru/document/redirect/70650730/201419">20.14.19</text:a></text:p>
          </table:table-cell>
        </table:table-row>
        <table:table-row>
          <table:table-cell table:style-name="0">
            <text:p text:style-name="s1_center_fi0"><text:bookmark text:name="anchor2023"/>23.</text:p>
          </table:table-cell>
          <table:table-cell table:style-name="0">
            <text:p text:style-name="s16_fi0">Спирты, фенолы, фенолоспирты и их галогенированные, сульфированные, нитрованные или нитрозированные производные; спирты жирные промышленные</text:p>
          </table:table-cell>
          <table:table-cell table:style-name="0">
            <text:p text:style-name="s1_center_fi0"><text:a xlink:type="simple" xlink:href="http://ivo.garant.ru/document/redirect/70650730/20142">20.14.2</text:a></text:p>
          </table:table-cell>
        </table:table-row>
        <table:table-row>
          <table:table-cell table:style-name="0">
            <text:p text:style-name="s1_center_fi0"><text:bookmark text:name="anchor2024"/>24.</text:p>
          </table:table-cell>
          <table:table-cell table:style-name="0">
            <text:p text:style-name="s16_fi0">Кислоты промышленные монокарбоновые жирные, кислоты карбоновые и их производные</text:p>
          </table:table-cell>
          <table:table-cell table:style-name="0">
            <text:p text:style-name="s1_center_fi0"><text:a xlink:type="simple" xlink:href="http://ivo.garant.ru/document/redirect/70650730/20143">20.14.3</text:a></text:p>
          </table:table-cell>
        </table:table-row>
        <table:table-row>
          <table:table-cell table:style-name="0">
            <text:p text:style-name="s1_center_fi0"><text:bookmark text:name="anchor2025"/>25.</text:p>
          </table:table-cell>
          <table:table-cell table:style-name="0">
            <text:p text:style-name="s16_fi0">Органические соединения с азотсодержащими функциональными группами</text:p>
          </table:table-cell>
          <table:table-cell table:style-name="0">
            <text:p text:style-name="s1_center_fi0"><text:a xlink:type="simple" xlink:href="http://ivo.garant.ru/document/redirect/70650730/20144">20.14.4</text:a></text:p>
          </table:table-cell>
        </table:table-row>
        <table:table-row>
          <table:table-cell table:style-name="0">
            <text:p text:style-name="s1_center_fi0"><text:bookmark text:name="anchor2026"/>26.</text:p>
          </table:table-cell>
          <table:table-cell table:style-name="0">
            <text:p text:style-name="s16_fi0">Соединения сераорганические и прочие соединения элементоорганические; соединения гетероциклические, не включенные в другие группировки</text:p>
          </table:table-cell>
          <table:table-cell table:style-name="0">
            <text:p text:style-name="s1_center_fi0"><text:a xlink:type="simple" xlink:href="http://ivo.garant.ru/document/redirect/70650730/20145">20.14.5</text:a></text:p>
          </table:table-cell>
        </table:table-row>
        <table:table-row>
          <table:table-cell table:style-name="0">
            <text:p text:style-name="s1_center_fi0"><text:bookmark text:name="anchor2027"/>27.</text:p>
          </table:table-cell>
          <table:table-cell table:style-name="0">
            <text:p text:style-name="s16_fi0">Эфиры простые, пероксиды органические, эпоксиды, ацетали и полуацетали; соединения органические прочие</text:p>
          </table:table-cell>
          <table:table-cell table:style-name="0">
            <text:p text:style-name="s1_center_fi0"><text:a xlink:type="simple" xlink:href="http://ivo.garant.ru/document/redirect/70650730/20146">20.14.6</text:a></text:p>
          </table:table-cell>
        </table:table-row>
        <table:table-row>
          <table:table-cell table:style-name="0">
            <text:p text:style-name="s1_center_fi0"><text:bookmark text:name="anchor2028"/>28.</text:p>
          </table:table-cell>
          <table:table-cell table:style-name="0">
            <text:p text:style-name="s16_fi0">Кислота азотная; кислоты сульфоазотные; аммиак</text:p>
          </table:table-cell>
          <table:table-cell table:style-name="0">
            <text:p text:style-name="s1_center_fi0"><text:a xlink:type="simple" xlink:href="http://ivo.garant.ru/document/redirect/70650730/201511">20.15.1</text:a></text:p>
          </table:table-cell>
        </table:table-row>
        <table:table-row>
          <table:table-cell table:style-name="0">
            <text:p text:style-name="s1_center_fi0"><text:bookmark text:name="anchor2029"/>29.</text:p>
          </table:table-cell>
          <table:table-cell table:style-name="0">
            <text:p text:style-name="s16_fi0">Хлорид аммония; нитриты</text:p>
          </table:table-cell>
          <table:table-cell table:style-name="0">
            <text:p text:style-name="s1_center_fi0"><text:a xlink:type="simple" xlink:href="http://ivo.garant.ru/document/redirect/70650730/20152">20.15.2</text:a></text:p>
          </table:table-cell>
        </table:table-row>
        <table:table-row>
          <table:table-cell table:style-name="0">
            <text:p text:style-name="s1_center_fi0"><text:bookmark text:name="anchor2030"/>30.</text:p>
          </table:table-cell>
          <table:table-cell table:style-name="0">
            <text:p text:style-name="s16_fi0">Удобрения азотные минеральные или химические</text:p>
          </table:table-cell>
          <table:table-cell table:style-name="0">
            <text:p text:style-name="s1_center_fi0"><text:a xlink:type="simple" xlink:href="http://ivo.garant.ru/document/redirect/70650730/20153">20.15.3</text:a></text:p>
          </table:table-cell>
        </table:table-row>
        <table:table-row>
          <table:table-cell table:style-name="0">
            <text:p text:style-name="s1_center_fi0"><text:bookmark text:name="anchor2031"/>31.</text:p>
          </table:table-cell>
          <table:table-cell table:style-name="0">
            <text:p text:style-name="s16_fi0">Удобрения фосфорные минеральные или химические</text:p>
          </table:table-cell>
          <table:table-cell table:style-name="0">
            <text:p text:style-name="s1_center_fi0"><text:a xlink:type="simple" xlink:href="http://ivo.garant.ru/document/redirect/70650730/20154">20.15.4</text:a></text:p>
          </table:table-cell>
        </table:table-row>
        <table:table-row>
          <table:table-cell table:style-name="0">
            <text:p text:style-name="s1_center_fi0"><text:bookmark text:name="anchor2032"/>32.</text:p>
          </table:table-cell>
          <table:table-cell table:style-name="0">
            <text:p text:style-name="s16_fi0">Удобрения калийные минеральные или химические</text:p>
          </table:table-cell>
          <table:table-cell table:style-name="0">
            <text:p text:style-name="s1_center_fi0"><text:a xlink:type="simple" xlink:href="http://ivo.garant.ru/document/redirect/70650730/20155">20.15.5</text:a></text:p>
          </table:table-cell>
        </table:table-row>
        <table:table-row>
          <table:table-cell table:style-name="0">
            <text:p text:style-name="s1_center_fi0"><text:bookmark text:name="anchor2033"/>33.</text:p>
          </table:table-cell>
          <table:table-cell table:style-name="0">
            <text:p text:style-name="s16_fi0">Нитрат натрия</text:p>
          </table:table-cell>
          <table:table-cell table:style-name="0">
            <text:p text:style-name="s1_center_fi0"><text:a xlink:type="simple" xlink:href="http://ivo.garant.ru/document/redirect/70650730/20156">20.15.6</text:a></text:p>
          </table:table-cell>
        </table:table-row>
        <table:table-row>
          <table:table-cell table:style-name="0">
            <text:p text:style-name="s1_center_fi0"><text:bookmark text:name="anchor2034"/>34.</text:p>
          </table:table-cell>
          <table:table-cell table:style-name="0">
            <text:p text:style-name="s16_fi0">Удобрения, не включенные в другие группировки</text:p>
          </table:table-cell>
          <table:table-cell table:style-name="0">
            <text:p text:style-name="s1_center_fi0"><text:a xlink:type="simple" xlink:href="http://ivo.garant.ru/document/redirect/70650730/20157">20.15.7</text:a></text:p>
          </table:table-cell>
        </table:table-row>
        <table:table-row>
          <table:table-cell table:style-name="0">
            <text:p text:style-name="s1_center_fi0"><text:bookmark text:name="anchor2035"/>35.</text:p>
          </table:table-cell>
          <table:table-cell table:style-name="0">
            <text:p text:style-name="s16_fi0">Специальные виды полиэтилена, которые используются для создания специальных строительных материалов: сшитый полиэтилен, вспененный полиэтилен, хлорсульфированный полиэтилен, сверхвысокомолекулярный полиэтилен, прочие виды полиэтилена</text:p>
          </table:table-cell>
          <table:table-cell table:style-name="0">
            <text:p text:style-name="s1_center_fi0"><text:a xlink:type="simple" xlink:href="http://ivo.garant.ru/document/redirect/70650730/201610119">20.16.10.119</text:a></text:p>
          </table:table-cell>
        </table:table-row>
        <table:table-row>
          <table:table-cell table:style-name="0">
            <text:p text:style-name="s1_center_fi0"><text:bookmark text:name="anchor2036"/>36.</text:p>
          </table:table-cell>
          <table:table-cell table:style-name="0">
            <text:p text:style-name="s16_fi0">Полиацетали в первичных формах</text:p>
          </table:table-cell>
          <table:table-cell table:style-name="0">
            <text:p text:style-name="s1_center_fi0"><text:a xlink:type="simple" xlink:href="http://ivo.garant.ru/document/redirect/70650730/201640110">20.16.40.110</text:a></text:p>
          </table:table-cell>
        </table:table-row>
        <table:table-row>
          <table:table-cell table:style-name="0">
            <text:p text:style-name="s1_center_fi0"><text:bookmark text:name="anchor2037"/>37.</text:p>
          </table:table-cell>
          <table:table-cell table:style-name="0">
            <text:p text:style-name="s16_fi0">Полиэфиры в первичных формах</text:p>
          </table:table-cell>
          <table:table-cell table:style-name="0">
            <text:p text:style-name="s1_center_fi0"><text:a xlink:type="simple" xlink:href="http://ivo.garant.ru/document/redirect/70650730/201640120">20.16.40.120</text:a></text:p>
          </table:table-cell>
        </table:table-row>
        <table:table-row>
          <table:table-cell table:style-name="0">
            <text:p text:style-name="s1_center_fi0"><text:bookmark text:name="anchor2038"/>38.</text:p>
          </table:table-cell>
          <table:table-cell table:style-name="0">
            <text:p text:style-name="s16_fi0">Смолы эпоксидные в первичных формах</text:p>
          </table:table-cell>
          <table:table-cell table:style-name="0">
            <text:p text:style-name="s1_center_fi0"><text:a xlink:type="simple" xlink:href="http://ivo.garant.ru/document/redirect/70650730/201640130">20.16.40.130</text:a></text:p>
          </table:table-cell>
        </table:table-row>
        <table:table-row>
          <table:table-cell table:style-name="0">
            <text:p text:style-name="s1_center_fi0"><text:bookmark text:name="anchor2039"/>39.</text:p>
          </table:table-cell>
          <table:table-cell table:style-name="0">
            <text:p text:style-name="s16_fi0">Смолы алкидные в первичных формах</text:p>
          </table:table-cell>
          <table:table-cell table:style-name="0">
            <text:p text:style-name="s1_center_fi0"><text:a xlink:type="simple" xlink:href="http://ivo.garant.ru/document/redirect/70650730/201640150">20.16.40.150</text:a></text:p>
          </table:table-cell>
        </table:table-row>
        <table:table-row>
          <table:table-cell table:style-name="0">
            <text:p text:style-name="s1_center_fi0"><text:bookmark text:name="anchor2040"/>40.</text:p>
          </table:table-cell>
          <table:table-cell table:style-name="0">
            <text:p text:style-name="s16_fi0">Полимеры сложных эфиров аллилового спирта в первичных формах</text:p>
          </table:table-cell>
          <table:table-cell table:style-name="0">
            <text:p text:style-name="s1_center_fi0"><text:a xlink:type="simple" xlink:href="http://ivo.garant.ru/document/redirect/70650730/201640160">20.16.40.160</text:a></text:p>
          </table:table-cell>
        </table:table-row>
        <table:table-row>
          <table:table-cell table:style-name="0">
            <text:p text:style-name="s1_center_fi0"><text:bookmark text:name="anchor2041"/>41.</text:p>
          </table:table-cell>
          <table:table-cell table:style-name="0">
            <text:p text:style-name="s16_fi0">Полиэфиры прочие в первичных формах</text:p>
          </table:table-cell>
          <table:table-cell table:style-name="0">
            <text:p text:style-name="s1_center_fi0"><text:a xlink:type="simple" xlink:href="http://ivo.garant.ru/document/redirect/70650730/201640190">20.16.40.190</text:a></text:p>
          </table:table-cell>
        </table:table-row>
        <table:table-row>
          <table:table-cell table:style-name="0">
            <text:p text:style-name="s1_center_fi0"><text:bookmark text:name="anchor2042"/>42.</text:p>
          </table:table-cell>
          <table:table-cell table:style-name="0">
            <text:p text:style-name="s16_fi0">Полиакрилаты в первичных формах</text:p>
          </table:table-cell>
          <table:table-cell table:style-name="0">
            <text:p text:style-name="s1_center_fi0"><text:a xlink:type="simple" xlink:href="http://ivo.garant.ru/document/redirect/70650730/201653">20.16.53</text:a></text:p>
          </table:table-cell>
        </table:table-row>
        <table:table-row>
          <table:table-cell table:style-name="0">
            <text:p text:style-name="s1_center_fi0"><text:bookmark text:name="anchor2043"/>43.</text:p>
          </table:table-cell>
          <table:table-cell table:style-name="0">
            <text:p text:style-name="s16_fi0">Полиамиды в первичных формах</text:p>
          </table:table-cell>
          <table:table-cell table:style-name="0">
            <text:p text:style-name="s1_center_fi0"><text:a xlink:type="simple" xlink:href="http://ivo.garant.ru/document/redirect/70650730/2016541">20.16.54</text:a></text:p>
          </table:table-cell>
        </table:table-row>
        <table:table-row>
          <table:table-cell table:style-name="0">
            <text:p text:style-name="s1_center_fi0"><text:bookmark text:name="anchor2044"/>44.</text:p>
          </table:table-cell>
          <table:table-cell table:style-name="0">
            <text:p text:style-name="s16_fi0">Смолы карбамидоформальдегидные, тиокарбамидоформальдегидные и меламиноформальдегидные смолы в первичных формах</text:p>
          </table:table-cell>
          <table:table-cell table:style-name="0">
            <text:p text:style-name="s1_center_fi0"><text:a xlink:type="simple" xlink:href="http://ivo.garant.ru/document/redirect/70650730/201655">20.16.55</text:a></text:p>
          </table:table-cell>
        </table:table-row>
        <table:table-row>
          <table:table-cell table:style-name="0">
            <text:p text:style-name="s1_center_fi0"><text:bookmark text:name="anchor2045"/>45.</text:p>
          </table:table-cell>
          <table:table-cell table:style-name="0">
            <text:p text:style-name="s16_fi0">Смолы аминоальдегидные, смолы фенолоальдегидные и прочие полиуретановые смолы в первичных формах</text:p>
          </table:table-cell>
          <table:table-cell table:style-name="0">
            <text:p text:style-name="s1_center_fi0"><text:a xlink:type="simple" xlink:href="http://ivo.garant.ru/document/redirect/70650730/201656">20.16.56</text:a></text:p>
          </table:table-cell>
        </table:table-row>
        <table:table-row>
          <table:table-cell table:style-name="0">
            <text:p text:style-name="s1_center_fi0"><text:bookmark text:name="anchor2046"/>46.</text:p>
          </table:table-cell>
          <table:table-cell table:style-name="0">
            <text:p text:style-name="s16_fi0">Полимеры кремнийорганические (силиконы) в первичных формах</text:p>
          </table:table-cell>
          <table:table-cell table:style-name="0">
            <text:p text:style-name="s1_center_fi0"><text:a xlink:type="simple" xlink:href="http://ivo.garant.ru/document/redirect/70650730/2016571">20.16.57</text:a></text:p>
          </table:table-cell>
        </table:table-row>
        <table:table-row>
          <table:table-cell table:style-name="0">
            <text:p text:style-name="s1_center_fi0"><text:bookmark text:name="anchor2047"/>47.</text:p>
          </table:table-cell>
          <table:table-cell table:style-name="0">
            <text:p text:style-name="s16_fi0">Полимеры акриловой кислоты в первичных формах</text:p>
          </table:table-cell>
          <table:table-cell table:style-name="0">
            <text:p text:style-name="s1_center_fi0"><text:a xlink:type="simple" xlink:href="http://ivo.garant.ru/document/redirect/70650730/201659170">20.16.59.170</text:a></text:p>
          </table:table-cell>
        </table:table-row>
        <table:table-row>
          <table:table-cell table:style-name="0">
            <text:p text:style-name="s1_center_fi0"><text:bookmark text:name="anchor2048"/>48.</text:p>
          </table:table-cell>
          <table:table-cell table:style-name="0">
            <text:p text:style-name="s16_fi0">Смолы ионообменные на основе синтетических или природных полимеров в первичных формах</text:p>
          </table:table-cell>
          <table:table-cell table:style-name="0">
            <text:p text:style-name="s1_center_fi0"><text:a xlink:type="simple" xlink:href="http://ivo.garant.ru/document/redirect/70650730/201659320">20.16.59.320</text:a></text:p>
          </table:table-cell>
        </table:table-row>
        <table:table-row>
          <table:table-cell table:style-name="0">
            <text:p text:style-name="s1_center_fi0"><text:bookmark text:name="anchor2049"/>49.</text:p>
          </table:table-cell>
          <table:table-cell table:style-name="0">
            <text:p text:style-name="s16_fi0">Пестициды и агрохимические продукты прочие, за исключением медицинских изделий, содержащих антисептические и дезинфицирующие препараты, из числа товаров, относящихся к коду <text:a xlink:type="simple" xlink:href="http://ivo.garant.ru/document/redirect/70650730/202014000">20.20.14.000</text:a> по Общероссийскому классификатору продукции по видам экономической деятельности ОК 034-2014 (КПЕС 2008)</text:p>
          </table:table-cell>
          <table:table-cell table:style-name="0">
            <text:p text:style-name="s1_center_fi0"><text:a xlink:type="simple" xlink:href="http://ivo.garant.ru/document/redirect/70650730/20201">20.20.1</text:a></text:p>
          </table:table-cell>
        </table:table-row>
        <table:table-row>
          <table:table-cell table:style-name="0">
            <text:p text:style-name="s1_center_fi0"><text:bookmark text:name="anchor2050"/>50.</text:p>
          </table:table-cell>
          <table:table-cell table:style-name="0">
            <text:p text:style-name="s16_fi0">Вещества органические поверхностно-активные, кроме мыла</text:p>
          </table:table-cell>
          <table:table-cell table:style-name="0">
            <text:p text:style-name="s1_center_fi0"><text:a xlink:type="simple" xlink:href="http://ivo.garant.ru/document/redirect/70650730/20412">20.41.2</text:a></text:p>
          </table:table-cell>
        </table:table-row>
        <table:table-row>
          <table:table-cell table:style-name="0">
            <text:p text:style-name="s1_center_fi0"><text:bookmark text:name="anchor2051"/>51.</text:p>
          </table:table-cell>
          <table:table-cell table:style-name="0">
            <text:p text:style-name="s16_fi0">Мыло туалетное марки "Детское"</text:p>
          </table:table-cell>
          <table:table-cell table:style-name="0">
            <text:p text:style-name="s1_center_fi0"><text:a xlink:type="simple" xlink:href="http://ivo.garant.ru/document/redirect/70650730/20413113">20.41.31.113</text:a></text:p>
          </table:table-cell>
        </table:table-row>
        <table:table-row>
          <table:table-cell table:style-name="0">
            <text:p text:style-name="s1_center_fi0"><text:bookmark text:name="anchor2052"/>52.</text:p>
          </table:table-cell>
          <table:table-cell table:style-name="0">
            <text:p text:style-name="s16_fi0">Средства моющие и стиральные</text:p>
          </table:table-cell>
          <table:table-cell table:style-name="0">
            <text:p text:style-name="s1_center_fi0"><text:a xlink:type="simple" xlink:href="http://ivo.garant.ru/document/redirect/70650730/2041">20.41.32</text:a></text:p>
          </table:table-cell>
        </table:table-row>
        <table:table-row>
          <table:table-cell table:style-name="0">
            <text:p text:style-name="s1_center_fi0"><text:bookmark text:name="anchor2053"/>53.</text:p>
          </table:table-cell>
          <table:table-cell table:style-name="0">
            <text:p text:style-name="s16_fi0">Тальк и прочие присыпки для детей</text:p>
          </table:table-cell>
          <table:table-cell table:style-name="0">
            <text:p text:style-name="s1_center_fi0"><text:a xlink:type="simple" xlink:href="http://ivo.garant.ru/document/redirect/70650730/204214130">20.42.14.130</text:a></text:p>
          </table:table-cell>
        </table:table-row>
        <table:table-row>
          <table:table-cell table:style-name="0">
            <text:p text:style-name="s1_center_fi0"><text:bookmark text:name="anchor2054"/>54.</text:p>
          </table:table-cell>
          <table:table-cell table:style-name="0">
            <text:p text:style-name="s16_fi0">Кремы детские</text:p>
          </table:table-cell>
          <table:table-cell table:style-name="0">
            <text:p text:style-name="s1_center_fi0"><text:a xlink:type="simple" xlink:href="http://ivo.garant.ru/document/redirect/70650730/204215143">20.42.15.143</text:a></text:p>
          </table:table-cell>
        </table:table-row>
        <table:table-row>
          <table:table-cell table:style-name="0">
            <text:p text:style-name="s1_center_fi0"><text:bookmark text:name="anchor2055"/>55.</text:p>
          </table:table-cell>
          <table:table-cell table:style-name="0">
            <text:p text:style-name="s16_fi0">Чернила для письма или рисования и прочие чернила</text:p>
          </table:table-cell>
          <table:table-cell table:style-name="0">
            <text:p text:style-name="s1_center_fi0"><text:a xlink:type="simple" xlink:href="http://ivo.garant.ru/document/redirect/70650730/20593">20.59.3</text:a></text:p>
          </table:table-cell>
        </table:table-row>
        <table:table-row>
          <table:table-cell table:style-name="0">
            <text:p text:style-name="s1_center_fi0"><text:bookmark text:name="anchor2056"/>56.</text:p>
          </table:table-cell>
          <table:table-cell table:style-name="0">
            <text:p text:style-name="s16_fi0">Антидетонаторы; присадки к топливу и смазочным материалам и аналогичные продукты</text:p>
          </table:table-cell>
          <table:table-cell table:style-name="0">
            <text:p text:style-name="s1_center_fi0"><text:a xlink:type="simple" xlink:href="http://ivo.garant.ru/document/redirect/70650730/205942">20.59.42</text:a></text:p>
          </table:table-cell>
        </table:table-row>
        <table:table-row>
          <table:table-cell table:style-name="0">
            <text:p text:style-name="s1_center_fi0"><text:bookmark text:name="anchor2057"/>57.</text:p>
          </table:table-cell>
          <table:table-cell table:style-name="0">
            <text:p text:style-name="s16_fi0">Антиобледенители</text:p>
          </table:table-cell>
          <table:table-cell table:style-name="0">
            <text:p text:style-name="s1_center_fi0"><text:a xlink:type="simple" xlink:href="http://ivo.garant.ru/document/redirect/70650730/205943130">20.59.43.130</text:a></text:p>
          </table:table-cell>
        </table:table-row>
        <table:table-row>
          <table:table-cell table:style-name="0">
            <text:p text:style-name="s1_center_fi0"><text:bookmark text:name="anchor2058"/>58.</text:p>
          </table:table-cell>
          <table:table-cell table:style-name="0">
            <text:p text:style-name="s16_fi0">Реактивы химические общелабораторного назначения</text:p>
          </table:table-cell>
          <table:table-cell table:style-name="0">
            <text:p text:style-name="s1_center_fi0"><text:a xlink:type="simple" xlink:href="http://ivo.garant.ru/document/redirect/70650730/205952194">20.59.52.194</text:a></text:p>
          </table:table-cell>
        </table:table-row>
        <table:table-row>
          <table:table-cell table:style-name="0">
            <text:p text:style-name="s1_center_fi0"><text:bookmark text:name="anchor2059"/>59.</text:p>
          </table:table-cell>
          <table:table-cell table:style-name="0">
            <text:p text:style-name="s16_fi0">Составы для травления металлических поверхностей; флюсы; ускорители вулканизации каучука готовые, пластификаторы составные и стабилизаторы для резин и пластмасс; катализаторы, не включенные в другие группировки; алкилбензолы смешанные и алкилнафталины смешанные, не включенные в другие группировки</text:p>
          </table:table-cell>
          <table:table-cell table:style-name="0">
            <text:p text:style-name="s1_center_fi0"><text:a xlink:type="simple" xlink:href="http://ivo.garant.ru/document/redirect/70650730/205956">20.59.56</text:a></text:p>
          </table:table-cell>
        </table:table-row>
        <table:table-row>
          <table:table-cell table:style-name="0">
            <text:p text:style-name="s1_center_fi0"><text:bookmark text:name="anchor2060"/>60.</text:p>
          </table:table-cell>
          <table:table-cell table:style-name="0">
            <text:p text:style-name="s16_fi0">Продукты разные химические, не включенные в другие группировки</text:p>
          </table:table-cell>
          <table:table-cell table:style-name="0">
            <text:p text:style-name="s1_center_fi0"><text:a xlink:type="simple" xlink:href="http://ivo.garant.ru/document/redirect/70650730/205959">20.59.59</text:a></text:p>
          </table:table-cell>
        </table:table-row>
        <table:table-row>
          <table:table-cell table:style-name="0">
            <text:p text:style-name="s1_center_fi0"><text:bookmark text:name="anchor2061"/>61.</text:p>
          </table:table-cell>
          <table:table-cell table:style-name="0">
            <text:p text:style-name="s16_fi0">Волокна синтетические</text:p>
          </table:table-cell>
          <table:table-cell table:style-name="0">
            <text:p text:style-name="s1_center_fi0"><text:a xlink:type="simple" xlink:href="http://ivo.garant.ru/document/redirect/70650730/20601">20.60.1</text:a></text:p>
          </table:table-cell>
        </table:table-row>
        <table:table-row>
          <table:table-cell table:style-name="0">
            <text:p text:style-name="s1_center_fi0"><text:bookmark text:name="anchor2062"/>62.</text:p>
          </table:table-cell>
          <table:table-cell table:style-name="0">
            <text:p text:style-name="s16_fi0">Волокна искусственные</text:p>
          </table:table-cell>
          <table:table-cell table:style-name="0">
            <text:p text:style-name="s1_center_fi0"><text:a xlink:type="simple" xlink:href="http://ivo.garant.ru/document/redirect/70650730/20602">20.60.2</text:a></text:p>
          </table:table-cell>
        </table:table-row>
        <table:table-row>
          <table:table-cell table:style-name="0">
            <text:p text:style-name="s1_center_fi0"><text:bookmark text:name="anchor2063"/>63.</text:p>
          </table:table-cell>
          <table:table-cell table:style-name="0">
            <text:p text:style-name="s16_fi0">Шины и покрышки пневматические резиновые восстановленные</text:p>
          </table:table-cell>
          <table:table-cell table:style-name="0">
            <text:p text:style-name="s1_center_fi0"><text:a xlink:type="simple" xlink:href="http://ivo.garant.ru/document/redirect/70650730/22112">22.11.2</text:a></text:p>
          </table:table-cell>
        </table:table-row>
        <table:table-row>
          <table:table-cell table:style-name="0">
            <text:p text:style-name="s1_center_fi0"><text:bookmark text:name="anchor2064"/>64.</text:p>
          </table:table-cell>
          <table:table-cell table:style-name="0">
            <text:p text:style-name="s16_fi0">Резина регенерированная (девулканизированная) в первичных формах или в виде пластин, листов или полос (лент)</text:p>
          </table:table-cell>
          <table:table-cell table:style-name="0">
            <text:p text:style-name="s1_center_fi0"><text:a xlink:type="simple" xlink:href="http://ivo.garant.ru/document/redirect/70650730/22191">22.19.1</text:a></text:p>
          </table:table-cell>
        </table:table-row>
        <table:table-row>
          <table:table-cell table:style-name="0">
            <text:p text:style-name="s1_center_fi0"><text:bookmark text:name="anchor2065"/>65.</text:p>
          </table:table-cell>
          <table:table-cell table:style-name="0">
            <text:p text:style-name="s16_fi0">Смесь резиновая и изделия из нее; резина вулканизированная, кроме твердой резины (эбонита), в виде нити, корда, пластин, листов, полос (лент), прутков и профилей</text:p>
          </table:table-cell>
          <table:table-cell table:style-name="0">
            <text:p text:style-name="s1_center_fi0"><text:a xlink:type="simple" xlink:href="http://ivo.garant.ru/document/redirect/70650730/22192">22.19.2</text:a></text:p>
          </table:table-cell>
        </table:table-row>
        <table:table-row>
          <table:table-cell table:style-name="0">
            <text:p text:style-name="s1_center_fi0"><text:bookmark text:name="anchor2066"/>66.</text:p>
          </table:table-cell>
          <table:table-cell table:style-name="0">
            <text:p text:style-name="s16_fi0">Трубы, трубки, шланги и рукава из вулканизированной резины, кроме твердой резины (эбонита)</text:p>
          </table:table-cell>
          <table:table-cell table:style-name="0">
            <text:p text:style-name="s1_center_fi0"><text:a xlink:type="simple" xlink:href="http://ivo.garant.ru/document/redirect/70650730/22193">22.19.3</text:a></text:p>
          </table:table-cell>
        </table:table-row>
        <table:table-row>
          <table:table-cell table:style-name="0">
            <text:p text:style-name="s1_center_fi0"><text:bookmark text:name="anchor2067"/>67.</text:p>
          </table:table-cell>
          <table:table-cell table:style-name="0">
            <text:p text:style-name="s16_fi0">Ленты конвейерные, или приводные ремни, или бельтинг из вулканизированной резины</text:p>
          </table:table-cell>
          <table:table-cell table:style-name="0">
            <text:p text:style-name="s1_center_fi0"><text:a xlink:type="simple" xlink:href="http://ivo.garant.ru/document/redirect/70650730/22194">22.19.4</text:a></text:p>
          </table:table-cell>
        </table:table-row>
        <table:table-row>
          <table:table-cell table:style-name="0">
            <text:p text:style-name="s1_center_fi0"><text:bookmark text:name="anchor2068"/>68.</text:p>
          </table:table-cell>
          <table:table-cell table:style-name="0">
            <text:p text:style-name="s16_fi0">Материалы прорезиненные текстильные, кроме кордных тканей</text:p>
          </table:table-cell>
          <table:table-cell table:style-name="0">
            <text:p text:style-name="s1_center_fi0"><text:a xlink:type="simple" xlink:href="http://ivo.garant.ru/document/redirect/70650730/22195">22.19.5</text:a></text:p>
          </table:table-cell>
        </table:table-row>
        <table:table-row>
          <table:table-cell table:style-name="0">
            <text:p text:style-name="s1_center_fi0"><text:bookmark text:name="anchor2069"/>69.</text:p>
          </table:table-cell>
          <table:table-cell table:style-name="0">
            <text:p text:style-name="s16_fi0">Предметы одежды и ее аксессуары из вулканизированной резины, кроме твердой резины (эбонита)</text:p>
          </table:table-cell>
          <table:table-cell table:style-name="0">
            <text:p text:style-name="s1_center_fi0"><text:a xlink:type="simple" xlink:href="http://ivo.garant.ru/document/redirect/70650730/22196">22.19.6</text:a></text:p>
          </table:table-cell>
        </table:table-row>
        <table:table-row>
          <table:table-cell table:style-name="0">
            <text:p text:style-name="s1_center_fi0"><text:bookmark text:name="anchor2070"/>70.</text:p>
          </table:table-cell>
          <table:table-cell table:style-name="0">
            <text:p text:style-name="s16_fi0">Мононити с размером поперечного сечения более 1 мм; прутки, стержни и фасонные профили пластмассовые</text:p>
          </table:table-cell>
          <table:table-cell table:style-name="0">
            <text:p text:style-name="s1_center_fi0"><text:a xlink:type="simple" xlink:href="http://ivo.garant.ru/document/redirect/70650730/22211">22.21.1</text:a></text:p>
          </table:table-cell>
        </table:table-row>
        <table:table-row>
          <table:table-cell table:style-name="0">
            <text:p text:style-name="s1_center_fi0"><text:bookmark text:name="anchor2071"/>71.</text:p>
          </table:table-cell>
          <table:table-cell table:style-name="0">
            <text:p text:style-name="s16_fi0">Трубы, трубки и шланги и их фитинги пластмассовые</text:p>
          </table:table-cell>
          <table:table-cell table:style-name="0">
            <text:p text:style-name="s1_center_fi0"><text:a xlink:type="simple" xlink:href="http://ivo.garant.ru/document/redirect/70650730/22212">22.21.2</text:a></text:p>
          </table:table-cell>
        </table:table-row>
        <table:table-row>
          <table:table-cell table:style-name="0">
            <text:p text:style-name="s1_center_fi0"><text:bookmark text:name="anchor2072"/>72.</text:p>
          </table:table-cell>
          <table:table-cell table:style-name="0">
            <text:p text:style-name="s16_fi0">Плиты, листы, пленка и полосы (ленты) полимерные, неармированные или не комбинированные с другими материалами</text:p>
          </table:table-cell>
          <table:table-cell table:style-name="0">
            <text:p text:style-name="s1_center_fi0"><text:a xlink:type="simple" xlink:href="http://ivo.garant.ru/document/redirect/70650730/22213">22.21.3</text:a></text:p>
          </table:table-cell>
        </table:table-row>
        <table:table-row>
          <table:table-cell table:style-name="0">
            <text:p text:style-name="s1_center_fi0"><text:bookmark text:name="anchor2073"/>73.</text:p>
          </table:table-cell>
          <table:table-cell table:style-name="0">
            <text:p text:style-name="s16_fi0">Плиты, листы, пленка и полосы (ленты) прочие пластмассовые</text:p>
          </table:table-cell>
          <table:table-cell table:style-name="0">
            <text:p text:style-name="s1_center_fi0"><text:a xlink:type="simple" xlink:href="http://ivo.garant.ru/document/redirect/70650730/22214">22.21.4</text:a></text:p>
          </table:table-cell>
        </table:table-row>
        <table:table-row>
          <table:table-cell table:style-name="0">
            <text:p text:style-name="s1_center_fi0"><text:bookmark text:name="anchor2074"/>74.</text:p>
          </table:table-cell>
          <table:table-cell table:style-name="0">
            <text:p text:style-name="s16_fi0">Изделия пластмассовые упаковочные, за исключением контейнеров для биопроб полимерных, предусмотренных в позиции 378 настоящего перечня</text:p>
          </table:table-cell>
          <table:table-cell table:style-name="0">
            <text:p text:style-name="s1_center_fi0"><text:a xlink:type="simple" xlink:href="http://ivo.garant.ru/document/redirect/70650730/22221">22.22.1</text:a></text:p>
          </table:table-cell>
        </table:table-row>
        <table:table-row>
          <table:table-cell table:style-name="0">
            <text:p text:style-name="s1_center_fi0"><text:bookmark text:name="anchor2075"/>75.</text:p>
          </table:table-cell>
          <table:table-cell table:style-name="0">
            <text:p text:style-name="s16_fi0">Плиты, листы, пленка, лента и прочие плоские полимерные самоклеящиеся формы в рулонах шириной не более 20 см</text:p>
          </table:table-cell>
          <table:table-cell table:style-name="0">
            <text:p text:style-name="s1_center_fi0"><text:a xlink:type="simple" xlink:href="http://ivo.garant.ru/document/redirect/70650730/222921">22.29.21</text:a></text:p>
          </table:table-cell>
        </table:table-row>
        <table:table-row>
          <table:table-cell table:style-name="0">
            <text:p text:style-name="s1_center_fi0"><text:bookmark text:name="anchor2076"/>76.</text:p>
          </table:table-cell>
          <table:table-cell table:style-name="0">
            <text:p text:style-name="s16_fi0">Плиты, листы, пленка, лента и прочие плоские пластмассовые самоклеящиеся формы, прочие</text:p>
          </table:table-cell>
          <table:table-cell table:style-name="0">
            <text:p text:style-name="s1_center_fi0"><text:a xlink:type="simple" xlink:href="http://ivo.garant.ru/document/redirect/70650730/222922">22.29.22</text:a></text:p>
          </table:table-cell>
        </table:table-row>
        <table:table-row>
          <table:table-cell table:style-name="0">
            <text:p text:style-name="s1_center_fi0"><text:bookmark text:name="anchor2077"/>77.</text:p>
          </table:table-cell>
          <table:table-cell table:style-name="0">
            <text:p text:style-name="s16_fi0">Посуда столовая и кухонная, прочие предметы домашнего обихода и предметы туалета пластмассовые</text:p>
          </table:table-cell>
          <table:table-cell table:style-name="0">
            <text:p text:style-name="s1_center_fi0"><text:a xlink:type="simple" xlink:href="http://ivo.garant.ru/document/redirect/70650730/222923">22.29.23</text:a></text:p>
          </table:table-cell>
        </table:table-row>
        <table:table-row>
          <table:table-cell table:style-name="0">
            <text:p text:style-name="s1_center_fi0"><text:bookmark text:name="anchor2078"/>78.</text:p>
          </table:table-cell>
          <table:table-cell table:style-name="0">
            <text:p text:style-name="s16_fi0">Части ламп и осветительной арматуры, световых указателей и аналогичных изделий пластмассовые</text:p>
          </table:table-cell>
          <table:table-cell table:style-name="0">
            <text:p text:style-name="s1_center_fi0"><text:a xlink:type="simple" xlink:href="http://ivo.garant.ru/document/redirect/70650730/222924">22.29.24</text:a></text:p>
          </table:table-cell>
        </table:table-row>
        <table:table-row>
          <table:table-cell table:style-name="0">
            <text:p text:style-name="s1_center_fi0"><text:bookmark text:name="anchor2079"/>79.</text:p>
          </table:table-cell>
          <table:table-cell table:style-name="0">
            <text:p text:style-name="s16_fi0">Принадлежности канцелярские или школьные пластмассовые</text:p>
          </table:table-cell>
          <table:table-cell table:style-name="0">
            <text:p text:style-name="s1_center_fi0"><text:a xlink:type="simple" xlink:href="http://ivo.garant.ru/document/redirect/70650730/222925">22.29.25</text:a></text:p>
          </table:table-cell>
        </table:table-row>
        <table:table-row>
          <table:table-cell table:style-name="0">
            <text:p text:style-name="s1_center_fi0"><text:bookmark text:name="anchor2080"/>80.</text:p>
          </table:table-cell>
          <table:table-cell table:style-name="0">
            <text:p text:style-name="s16_fi0">Фурнитура для мебели, транспортных средств и аналогичные пластмассовые изделия; статуэтки и прочие декоративные изделия пластмассовые</text:p>
          </table:table-cell>
          <table:table-cell table:style-name="0">
            <text:p text:style-name="s1_center_fi0"><text:a xlink:type="simple" xlink:href="http://ivo.garant.ru/document/redirect/70650730/951110048">22.29.26</text:a></text:p>
          </table:table-cell>
        </table:table-row>
        <table:table-row>
          <table:table-cell table:style-name="0">
            <text:p text:style-name="s1_center_fi0"><text:bookmark text:name="anchor2081"/>81.</text:p>
          </table:table-cell>
          <table:table-cell table:style-name="0">
            <text:p text:style-name="s16_fi0">Бутылочки стеклянные для детского питания из закаленного стекла</text:p>
          </table:table-cell>
          <table:table-cell table:style-name="0">
            <text:p text:style-name="s1_center_fi0"><text:a xlink:type="simple" xlink:href="http://ivo.garant.ru/document/redirect/70650730/231311116">23.13.11.116</text:a></text:p>
          </table:table-cell>
        </table:table-row>
        <table:table-row>
          <table:table-cell table:style-name="0">
            <text:p text:style-name="s1_center_fi0"><text:bookmark text:name="anchor2082"/>82.</text:p>
          </table:table-cell>
          <table:table-cell table:style-name="0">
            <text:p text:style-name="s16_fi0">Пеностекло в форме блоков, плит или аналогичных форм</text:p>
          </table:table-cell>
          <table:table-cell table:style-name="0">
            <text:p text:style-name="s1_center_fi0"><text:a xlink:type="simple" xlink:href="http://ivo.garant.ru/document/redirect/70650730/231912160">23.19.12.160</text:a></text:p>
          </table:table-cell>
        </table:table-row>
        <table:table-row>
          <table:table-cell table:style-name="0">
            <text:p text:style-name="s1_center_fi0"><text:bookmark text:name="anchor2083"/>83.</text:p>
          </table:table-cell>
          <table:table-cell table:style-name="0">
            <text:p text:style-name="s16_fi0">Цемент</text:p>
          </table:table-cell>
          <table:table-cell table:style-name="0">
            <text:p text:style-name="s1_center_fi0"><text:a xlink:type="simple" xlink:href="http://ivo.garant.ru/document/redirect/70650730/2351">23.51</text:a></text:p>
          </table:table-cell>
        </table:table-row>
        <table:table-row>
          <table:table-cell table:style-name="0">
            <text:p text:style-name="s1_center_fi0"><text:bookmark text:name="anchor2084"/>84.</text:p>
          </table:table-cell>
          <table:table-cell table:style-name="0">
            <text:p text:style-name="s16_fi0">Продукция минеральная неметаллическая, не включенная в другие группировки</text:p>
          </table:table-cell>
          <table:table-cell table:style-name="0">
            <text:p text:style-name="s1_center_fi0"><text:a xlink:type="simple" xlink:href="http://ivo.garant.ru/document/redirect/70650730/239919">23.99.19</text:a></text:p>
          </table:table-cell>
        </table:table-row>
        <table:table-row>
          <table:table-cell table:style-name="0">
            <text:p text:style-name="s1_center_fi0"><text:bookmark text:name="anchor2085"/>85.</text:p>
          </table:table-cell>
          <table:table-cell table:style-name="0">
            <text:p text:style-name="s16_fi0">Прутки, катанка и профили из алюминия или алюминиевых сплавов</text:p>
          </table:table-cell>
          <table:table-cell table:style-name="0">
            <text:p text:style-name="s1_center_fi0"><text:a xlink:type="simple" xlink:href="http://ivo.garant.ru/document/redirect/70650730/244222">24.42.22</text:a></text:p>
          </table:table-cell>
        </table:table-row>
        <table:table-row>
          <table:table-cell table:style-name="0">
            <text:p text:style-name="s1_center_fi0"><text:bookmark text:name="anchor2086"/>86.</text:p>
          </table:table-cell>
          <table:table-cell table:style-name="0">
            <text:p text:style-name="s16_fi0">Проволока алюминиевая</text:p>
          </table:table-cell>
          <table:table-cell table:style-name="0">
            <text:p text:style-name="s1_center_fi0"><text:a xlink:type="simple" xlink:href="http://ivo.garant.ru/document/redirect/70650730/244223">24.42.23</text:a></text:p>
          </table:table-cell>
        </table:table-row>
        <table:table-row>
          <table:table-cell table:style-name="0">
            <text:p text:style-name="s1_center_fi0"><text:bookmark text:name="anchor2087"/>87.</text:p>
          </table:table-cell>
          <table:table-cell table:style-name="0">
            <text:p text:style-name="s16_fi0">Плиты, листы, полосы и ленты алюминиевые толщиной более 0,2 мм</text:p>
          </table:table-cell>
          <table:table-cell table:style-name="0">
            <text:p text:style-name="s1_center_fi0"><text:a xlink:type="simple" xlink:href="http://ivo.garant.ru/document/redirect/70650730/244224">24.42.24</text:a></text:p>
          </table:table-cell>
        </table:table-row>
        <table:table-row>
          <table:table-cell table:style-name="0">
            <text:p text:style-name="s1_center_fi0"><text:bookmark text:name="anchor2088"/>88.</text:p>
          </table:table-cell>
          <table:table-cell table:style-name="0">
            <text:p text:style-name="s16_fi0">Фольга алюминиевая толщиной не более 0,2 мм</text:p>
          </table:table-cell>
          <table:table-cell table:style-name="0">
            <text:p text:style-name="s1_center_fi0"><text:a xlink:type="simple" xlink:href="http://ivo.garant.ru/document/redirect/70650730/244">24.42.25</text:a></text:p>
          </table:table-cell>
        </table:table-row>
        <table:table-row>
          <table:table-cell table:style-name="0">
            <text:p text:style-name="s1_center_fi0"><text:bookmark text:name="anchor2089"/>89.</text:p>
          </table:table-cell>
          <table:table-cell table:style-name="0">
            <text:p text:style-name="s16_fi0">Трубы и трубки, фитинги для труб и трубок, алюминиевые</text:p>
          </table:table-cell>
          <table:table-cell table:style-name="0">
            <text:p text:style-name="s1_center_fi0"><text:a xlink:type="simple" xlink:href="http://ivo.garant.ru/document/redirect/70650730/244226">24.42.26</text:a></text:p>
          </table:table-cell>
        </table:table-row>
        <table:table-row>
          <table:table-cell table:style-name="0">
            <text:p text:style-name="s1_center_fi0"><text:bookmark text:name="anchor2090"/>90.</text:p>
          </table:table-cell>
          <table:table-cell table:style-name="0">
            <text:p text:style-name="s16_fi0">Конструкции и детали конструкций из алюминия прочие</text:p>
          </table:table-cell>
          <table:table-cell table:style-name="0">
            <text:p text:style-name="s1_center_fi0"><text:a xlink:type="simple" xlink:href="http://ivo.garant.ru/document/redirect/70650730/252111120">25.11.23.120</text:a></text:p>
          </table:table-cell>
        </table:table-row>
        <table:table-row>
          <table:table-cell table:style-name="0">
            <text:p text:style-name="s1_center_fi0"><text:bookmark text:name="anchor2091"/>91.</text:p>
          </table:table-cell>
          <table:table-cell table:style-name="0">
            <text:p text:style-name="s16_fi0">Двери, окна и их рамы и пороги для дверей из металлов</text:p>
          </table:table-cell>
          <table:table-cell table:style-name="0">
            <text:p text:style-name="s1_center_fi0"><text:a xlink:type="simple" xlink:href="http://ivo.garant.ru/document/redirect/70650730/251210">25.12.10</text:a></text:p>
          </table:table-cell>
        </table:table-row>
        <table:table-row>
          <table:table-cell table:style-name="0">
            <text:p text:style-name="s1_center_fi0"><text:bookmark text:name="anchor2092"/>92.</text:p>
          </table:table-cell>
          <table:table-cell table:style-name="0">
            <text:p text:style-name="s16_fi0">Радиаторы центрального отопления и их секции чугунные</text:p>
          </table:table-cell>
          <table:table-cell table:style-name="0">
            <text:p text:style-name="s1_center_fi0"><text:a xlink:type="simple" xlink:href="http://ivo.garant.ru/document/redirect/70650730/252111110">25.21.11.110</text:a></text:p>
          </table:table-cell>
        </table:table-row>
        <table:table-row>
          <table:table-cell table:style-name="0">
            <text:p text:style-name="s1_center_fi0"><text:bookmark text:name="anchor2093"/>93.</text:p>
          </table:table-cell>
          <table:table-cell table:style-name="0">
            <text:p text:style-name="s16_fi0">Радиаторы центрального отопления и их секции стальные</text:p>
          </table:table-cell>
          <table:table-cell table:style-name="0">
            <text:p text:style-name="s1_center_fi0"><text:a xlink:type="simple" xlink:href="http://ivo.garant.ru/document/redirect/70650730/25211120">25.21.11.120</text:a></text:p>
          </table:table-cell>
        </table:table-row>
        <table:table-row>
          <table:table-cell table:style-name="0">
            <text:p text:style-name="s1_center_fi0"><text:bookmark text:name="anchor2094"/>94.</text:p>
          </table:table-cell>
          <table:table-cell table:style-name="0">
            <text:p text:style-name="s16_fi0">Конвекторы отопительные стальные</text:p>
          </table:table-cell>
          <table:table-cell table:style-name="0">
            <text:p text:style-name="s1_center_fi0"><text:a xlink:type="simple" xlink:href="http://ivo.garant.ru/document/redirect/70650730/25102">25.21.11.150</text:a></text:p>
          </table:table-cell>
        </table:table-row>
        <table:table-row>
          <table:table-cell table:style-name="0">
            <text:p text:style-name="s1_center_fi0"><text:bookmark text:name="anchor2095"/>95.</text:p>
          </table:table-cell>
          <table:table-cell table:style-name="0">
            <text:p text:style-name="s16_fi0">Конвекторы отопительные из прочих металлов</text:p>
          </table:table-cell>
          <table:table-cell table:style-name="0">
            <text:p text:style-name="s1_center_fi0"><text:a xlink:type="simple" xlink:href="http://ivo.garant.ru/document/redirect/70650730/252111160">25.21.11.160</text:a></text:p>
          </table:table-cell>
        </table:table-row>
        <table:table-row>
          <table:table-cell table:style-name="0">
            <text:p text:style-name="s1_center_fi0"><text:bookmark text:name="anchor2096"/>96.</text:p>
          </table:table-cell>
          <table:table-cell table:style-name="0">
            <text:p text:style-name="s16_fi0">Котлы водогрейные центрального отопления для производства горячей воды или пара низкого давления</text:p>
          </table:table-cell>
          <table:table-cell table:style-name="0">
            <text:p text:style-name="s1_center_fi0"><text:a xlink:type="simple" xlink:href="http://ivo.garant.ru/document/redirect/70650730/252112">25.21.12</text:a></text:p>
          </table:table-cell>
        </table:table-row>
        <table:table-row>
          <table:table-cell table:style-name="0">
            <text:p text:style-name="s1_center_fi0"><text:bookmark text:name="anchor2097"/>97.</text:p>
          </table:table-cell>
          <table:table-cell table:style-name="0">
            <text:p text:style-name="s16_fi0">Резервуары, цистерны, баки и аналогичные емкости (кроме емкостей для сжатых или сжиженных газов) из чугуна, стали или алюминия вместимостью более 300 л, без механического или теплотехнического оборудования</text:p>
          </table:table-cell>
          <table:table-cell table:style-name="0">
            <text:p text:style-name="s1_center_fi0"><text:a xlink:type="simple" xlink:href="http://ivo.garant.ru/document/redirect/70650730/25291">25.29.11</text:a></text:p>
          </table:table-cell>
        </table:table-row>
        <table:table-row>
          <table:table-cell table:style-name="0">
            <text:p text:style-name="s1_center_fi0"><text:bookmark text:name="anchor2098"/>98.</text:p>
          </table:table-cell>
          <table:table-cell table:style-name="0">
            <text:p text:style-name="s16_fi0">Емкости металлические для сжатых или сжиженных газов</text:p>
          </table:table-cell>
          <table:table-cell table:style-name="0">
            <text:p text:style-name="s1_center_fi0"><text:a xlink:type="simple" xlink:href="http://ivo.garant.ru/document/redirect/70650730/252912">25.29.12</text:a></text:p>
          </table:table-cell>
        </table:table-row>
        <table:table-row>
          <table:table-cell table:style-name="0">
            <text:p text:style-name="s1_center_fi0"><text:bookmark text:name="anchor2099"/>99.</text:p>
          </table:table-cell>
          <table:table-cell table:style-name="0">
            <text:p text:style-name="s16_fi0">Котлы паровые и котлы паропроизводящие прочие; котлы, работающие с высокотемпературными органическими теплоносителями (ВОТ)</text:p>
          </table:table-cell>
          <table:table-cell table:style-name="0">
            <text:p text:style-name="s1_center_fi0"><text:a xlink:type="simple" xlink:href="http://ivo.garant.ru/document/redirect/70650730/253011">25.30.11</text:a></text:p>
          </table:table-cell>
        </table:table-row>
        <table:table-row>
          <table:table-cell table:style-name="0">
            <text:p text:style-name="s1_center_fi0"><text:bookmark text:name="anchor2100"/>100.</text:p>
          </table:table-cell>
          <table:table-cell table:style-name="0">
            <text:p text:style-name="s16_fi0">Оружие спортивное огнестрельное с нарезным стволом</text:p>
          </table:table-cell>
          <table:table-cell table:style-name="0">
            <text:p text:style-name="s1_center_fi0"><text:a xlink:type="simple" xlink:href="http://ivo.garant.ru/document/redirect/70650730/2541241">25.40.12.410</text:a></text:p>
          </table:table-cell>
        </table:table-row>
        <table:table-row>
          <table:table-cell table:style-name="0">
            <text:p text:style-name="s1_center_fi0"><text:bookmark text:name="anchor2101"/>101.</text:p>
          </table:table-cell>
          <table:table-cell table:style-name="0">
            <text:p text:style-name="s16_fi0">Патроны и боеприпасы прочие и их детали</text:p>
          </table:table-cell>
          <table:table-cell table:style-name="0">
            <text:p text:style-name="s1_center_fi0"><text:a xlink:type="simple" xlink:href="http://ivo.garant.ru/document/redirect/70650730/2541319">25.40.13.190</text:a></text:p>
          </table:table-cell>
        </table:table-row>
        <table:table-row>
          <table:table-cell table:style-name="0">
            <text:p text:style-name="s1_center_fi0"><text:bookmark text:name="anchor2102"/>102.</text:p>
          </table:table-cell>
          <table:table-cell table:style-name="0">
            <text:p text:style-name="s16_fi0">Ножи (кроме ножей для машин) и ножницы; лезвия для них</text:p>
          </table:table-cell>
          <table:table-cell table:style-name="0">
            <text:p text:style-name="s1_center_fi0"><text:a xlink:type="simple" xlink:href="http://ivo.garant.ru/document/redirect/70650730/5339">25.71.11</text:a></text:p>
          </table:table-cell>
        </table:table-row>
        <table:table-row>
          <table:table-cell table:style-name="0">
            <text:p text:style-name="s1_center_fi0"><text:bookmark text:name="anchor2103"/>103.</text:p>
          </table:table-cell>
          <table:table-cell table:style-name="0">
            <text:p text:style-name="s16_fi0">Петли, арматура крепежная, фурнитура и аналогичные изделия для дверей и окон из недрагоценных металлов</text:p>
          </table:table-cell>
          <table:table-cell table:style-name="0">
            <text:p text:style-name="s1_center_fi0"><text:a xlink:type="simple" xlink:href="http://ivo.garant.ru/document/redirect/70650730/257214120">25.72.14.120</text:a></text:p>
          </table:table-cell>
        </table:table-row>
        <table:table-row>
          <table:table-cell table:style-name="0">
            <text:p text:style-name="s1_center_fi0"><text:bookmark text:name="anchor2104"/>104.</text:p>
          </table:table-cell>
          <table:table-cell table:style-name="0">
            <text:p text:style-name="s16_fi0">Бочки, барабаны, банки, ящики и аналогичные емкости алюминиевые для любых веществ (кроме газов) вместимостью не более 300 л</text:p>
          </table:table-cell>
          <table:table-cell table:style-name="0">
            <text:p text:style-name="s1_center_fi0"><text:a xlink:type="simple" xlink:href="http://ivo.garant.ru/document/redirect/70650730/259212">25.92.12</text:a></text:p>
          </table:table-cell>
        </table:table-row>
        <table:table-row>
          <table:table-cell table:style-name="0">
            <text:p text:style-name="s1_center_fi0"><text:bookmark text:name="anchor2105"/>105.</text:p>
          </table:table-cell>
          <table:table-cell table:style-name="0">
            <text:p text:style-name="s16_fi0">Изделия столовые, кухонные и бытовые и их детали из нержавеющей стали</text:p>
          </table:table-cell>
          <table:table-cell table:style-name="0">
            <text:p text:style-name="s1_center_fi0"><text:a xlink:type="simple" xlink:href="http://ivo.garant.ru/document/redirect/70650730/259912112">25.99.12.112</text:a></text:p>
          </table:table-cell>
        </table:table-row>
        <table:table-row>
          <table:table-cell table:style-name="0">
            <text:p text:style-name="s1_center_fi0"><text:bookmark text:name="anchor2106"/>106.</text:p>
          </table:table-cell>
          <table:table-cell table:style-name="0">
            <text:p text:style-name="s16_fi0">Электродвигатели мощностью не более 37,5 Вт; электродвигатели постоянного тока прочие; генераторы постоянного тока</text:p>
          </table:table-cell>
          <table:table-cell table:style-name="0">
            <text:p text:style-name="s1_center_fi0"><text:a xlink:type="simple" xlink:href="http://ivo.garant.ru/document/redirect/70650730/27111">27.11.1</text:a></text:p>
          </table:table-cell>
        </table:table-row>
        <table:table-row>
          <table:table-cell table:style-name="0">
            <text:p text:style-name="s1_center_fi0"><text:bookmark text:name="anchor2107"/>107.</text:p>
          </table:table-cell>
          <table:table-cell table:style-name="0">
            <text:p text:style-name="s16_fi0">Электродвигатели переменного и постоянного тока универсальные мощностью более 37,5 Вт; электродвигатели переменного тока прочие; генераторы (синхронные генераторы) переменного тока</text:p>
          </table:table-cell>
          <table:table-cell table:style-name="0">
            <text:p text:style-name="s1_center_fi0"><text:a xlink:type="simple" xlink:href="http://ivo.garant.ru/document/redirect/70650730/27112">27.11.2</text:a></text:p>
          </table:table-cell>
        </table:table-row>
        <table:table-row>
          <table:table-cell table:style-name="0">
            <text:p text:style-name="s1_center_fi0"><text:bookmark text:name="anchor2108"/>108.</text:p>
          </table:table-cell>
          <table:table-cell table:style-name="0">
            <text:p text:style-name="s16_fi0">Установки генераторные электрические и вращающиеся преобразователи</text:p>
          </table:table-cell>
          <table:table-cell table:style-name="0">
            <text:p text:style-name="s1_center_fi0"><text:a xlink:type="simple" xlink:href="http://ivo.garant.ru/document/redirect/70650730/27113">27.11.3</text:a></text:p>
          </table:table-cell>
        </table:table-row>
        <table:table-row>
          <table:table-cell table:style-name="0">
            <text:p text:style-name="s1_center_fi0"><text:bookmark text:name="anchor2109"/>109.</text:p>
          </table:table-cell>
          <table:table-cell table:style-name="0">
            <text:p text:style-name="s16_fi0">Трансформаторы электрические</text:p>
          </table:table-cell>
          <table:table-cell table:style-name="0">
            <text:p text:style-name="s1_center_fi0"><text:a xlink:type="simple" xlink:href="http://ivo.garant.ru/document/redirect/70650730/27114">27.11.4</text:a></text:p>
          </table:table-cell>
        </table:table-row>
        <table:table-row>
          <table:table-cell table:style-name="0">
            <text:p text:style-name="s1_center_fi0"><text:bookmark text:name="anchor2110"/>110.</text:p>
          </table:table-cell>
          <table:table-cell table:style-name="0">
            <text:p text:style-name="s16_fi0">Устройства для коммутации или защиты электрических цепей на напряжение более 1 кВ прочие, не включенные в другие группировки</text:p>
          </table:table-cell>
          <table:table-cell table:style-name="0">
            <text:p text:style-name="s1_center_fi0"><text:a xlink:type="simple" xlink:href="http://ivo.garant.ru/document/redirect/70650730/271210190">27.12.10.190</text:a></text:p>
          </table:table-cell>
        </table:table-row>
        <table:table-row>
          <table:table-cell table:style-name="0">
            <text:p text:style-name="s1_center_fi0"><text:bookmark text:name="anchor2111"/>111.</text:p>
          </table:table-cell>
          <table:table-cell table:style-name="0">
            <text:p text:style-name="s16_fi0">Панели и прочие комплекты электрической аппаратуры коммутации или защиты на напряжение не более 1 кВ</text:p>
          </table:table-cell>
          <table:table-cell table:style-name="0">
            <text:p text:style-name="s1_center_fi0"><text:a xlink:type="simple" xlink:href="http://ivo.garant.ru/document/redirect/70650730/271231">27.12.31</text:a></text:p>
          </table:table-cell>
        </table:table-row>
        <table:table-row>
          <table:table-cell table:style-name="0">
            <text:p text:style-name="s1_center_fi0"><text:bookmark text:name="anchor2112"/>112.</text:p>
          </table:table-cell>
          <table:table-cell table:style-name="0">
            <text:p text:style-name="s16_fi0">Панели и прочие комплекты электрической аппаратуры коммутации или защиты на напряжение более 1 кВ</text:p>
          </table:table-cell>
          <table:table-cell table:style-name="0">
            <text:p text:style-name="s1_center_fi0"><text:a xlink:type="simple" xlink:href="http://ivo.garant.ru/document/redirect/70650730/271232">27.12.32</text:a></text:p>
          </table:table-cell>
        </table:table-row>
        <table:table-row>
          <table:table-cell table:style-name="0">
            <text:p text:style-name="s1_center_fi0"><text:bookmark text:name="anchor2113"/>113.</text:p>
          </table:table-cell>
          <table:table-cell table:style-name="0">
            <text:p text:style-name="s16_fi0">Провода и кабели электронные и электрические прочие</text:p>
          </table:table-cell>
          <table:table-cell table:style-name="0">
            <text:p text:style-name="s1_center_fi0"><text:a xlink:type="simple" xlink:href="http://ivo.garant.ru/document/redirect/70650730/27320">27.32</text:a></text:p>
          </table:table-cell>
        </table:table-row>
        <table:table-row>
          <table:table-cell table:style-name="0">
            <text:p text:style-name="s1_center_fi0"><text:bookmark text:name="anchor2114"/>114.</text:p>
          </table:table-cell>
          <table:table-cell table:style-name="0">
            <text:p text:style-name="s16_fi0">Турбины</text:p>
          </table:table-cell>
          <table:table-cell table:style-name="0">
            <text:p text:style-name="s1_center_fi0"><text:a xlink:type="simple" xlink:href="http://ivo.garant.ru/document/redirect/70650730/28112">28.11.2</text:a></text:p>
          </table:table-cell>
        </table:table-row>
        <table:table-row>
          <table:table-cell table:style-name="0">
            <text:p text:style-name="s1_center_fi0"><text:bookmark text:name="anchor2115"/>115.</text:p>
          </table:table-cell>
          <table:table-cell table:style-name="0">
            <text:p text:style-name="s16_fi0">Насосы возвратно-поступательные объемного действия прочие для перекачки жидкостей</text:p>
          </table:table-cell>
          <table:table-cell table:style-name="0">
            <text:p text:style-name="s1_center_fi0"><text:a xlink:type="simple" xlink:href="http://ivo.garant.ru/document/redirect/70650730/281312">28.13.12</text:a></text:p>
          </table:table-cell>
        </table:table-row>
        <table:table-row>
          <table:table-cell table:style-name="0">
            <text:p text:style-name="s1_center_fi0"><text:bookmark text:name="anchor2116"/>116.</text:p>
          </table:table-cell>
          <table:table-cell table:style-name="0">
            <text:p text:style-name="s16_fi0">Насосы роторные объемные прочие для перекачки жидкостей</text:p>
          </table:table-cell>
          <table:table-cell table:style-name="0">
            <text:p text:style-name="s1_center_fi0"><text:a xlink:type="simple" xlink:href="http://ivo.garant.ru/document/redirect/70650730/281313">28.13.13</text:a></text:p>
          </table:table-cell>
        </table:table-row>
        <table:table-row>
          <table:table-cell table:style-name="0">
            <text:p text:style-name="s1_center_fi0"><text:bookmark text:name="anchor2117"/>117.</text:p>
          </table:table-cell>
          <table:table-cell table:style-name="0">
            <text:p text:style-name="s16_fi0">Насосы центробежные подачи жидкостей прочие; насосы прочие</text:p>
          </table:table-cell>
          <table:table-cell table:style-name="0">
            <text:p text:style-name="s1_center_fi0"><text:a xlink:type="simple" xlink:href="http://ivo.garant.ru/document/redirect/70650730/281314">28.13.14</text:a></text:p>
          </table:table-cell>
        </table:table-row>
        <table:table-row>
          <table:table-cell table:style-name="0">
            <text:p text:style-name="s1_center_fi0"><text:bookmark text:name="anchor2118"/>118.</text:p>
          </table:table-cell>
          <table:table-cell table:style-name="0">
            <text:p text:style-name="s16_fi0">Части насосов и компрессоров</text:p>
          </table:table-cell>
          <table:table-cell table:style-name="0">
            <text:p text:style-name="s1_center_fi0"><text:a xlink:type="simple" xlink:href="http://ivo.garant.ru/document/redirect/70650730/28133">28.13.3</text:a></text:p>
          </table:table-cell>
        </table:table-row>
        <table:table-row>
          <table:table-cell table:style-name="0">
            <text:p text:style-name="s1_center_fi0"><text:bookmark text:name="anchor2119"/>119.</text:p>
          </table:table-cell>
          <table:table-cell table:style-name="0">
            <text:p text:style-name="s16_fi0">Арматура регулирующая, обратная, предохранительная, распределительно-смесительная, разделительная, комбинированная, клапаны редукционные</text:p>
          </table:table-cell>
          <table:table-cell table:style-name="0">
            <text:p text:style-name="s1_center_fi0"><text:a xlink:type="simple" xlink:href="http://ivo.garant.ru/document/redirect/70650730/2814">28.14.11</text:a></text:p>
          </table:table-cell>
        </table:table-row>
        <table:table-row>
          <table:table-cell table:style-name="0">
            <text:p text:style-name="s1_center_fi0"><text:bookmark text:name="anchor2120"/>120.</text:p>
          </table:table-cell>
          <table:table-cell table:style-name="0">
            <text:p text:style-name="s16_fi0">Арматура запорная для управления процессом (задвижки, краны, клапаны запорные, затворы дисковые и другая арматура)</text:p>
          </table:table-cell>
          <table:table-cell table:style-name="0">
            <text:p text:style-name="s1_center_fi0"><text:a xlink:type="simple" xlink:href="http://ivo.garant.ru/document/redirect/70650730/281413">28.14.13</text:a></text:p>
          </table:table-cell>
        </table:table-row>
        <table:table-row>
          <table:table-cell table:style-name="0">
            <text:p text:style-name="s1_center_fi0"><text:bookmark text:name="anchor2121"/>121.</text:p>
          </table:table-cell>
          <table:table-cell table:style-name="0">
            <text:p text:style-name="s16_fi0">Краны башенные строительные</text:p>
          </table:table-cell>
          <table:table-cell table:style-name="0">
            <text:p text:style-name="s1_center_fi0"><text:a xlink:type="simple" xlink:href="http://ivo.garant.ru/document/redirect/70650730/2821426">28.22.14.126</text:a></text:p>
          </table:table-cell>
        </table:table-row>
        <table:table-row>
          <table:table-cell table:style-name="0">
            <text:p text:style-name="s1_center_fi0"><text:bookmark text:name="anchor2122"/>122.</text:p>
          </table:table-cell>
          <table:table-cell table:style-name="0">
            <text:p text:style-name="s16_fi0">Лифты грузовые</text:p>
          </table:table-cell>
          <table:table-cell table:style-name="0">
            <text:p text:style-name="s1_center_fi0"><text:a xlink:type="simple" xlink:href="http://ivo.garant.ru/document/redirect/70650730/282216112">28.22.16.112</text:a></text:p>
          </table:table-cell>
        </table:table-row>
        <table:table-row>
          <table:table-cell table:style-name="0">
            <text:p text:style-name="s1_center_fi0"><text:bookmark text:name="anchor2123"/>123.</text:p>
          </table:table-cell>
          <table:table-cell table:style-name="0">
            <text:p text:style-name="s16_fi0">Оборудование подъемно-транспортное и погрузочно-разгрузочное прочее, не включенное в другие группировки</text:p>
          </table:table-cell>
          <table:table-cell table:style-name="0">
            <text:p text:style-name="s1_center_fi0"><text:a xlink:type="simple" xlink:href="http://ivo.garant.ru/document/redirect/70650730/282218390">28.22.18.390</text:a></text:p>
          </table:table-cell>
        </table:table-row>
        <table:table-row>
          <table:table-cell table:style-name="0">
            <text:p text:style-name="s1_center_fi0"><text:bookmark text:name="anchor2124"/>124.</text:p>
          </table:table-cell>
          <table:table-cell table:style-name="0">
            <text:p text:style-name="s16_fi0">Теплообменники и машины для сжижения воздуха или прочих газов</text:p>
          </table:table-cell>
          <table:table-cell table:style-name="0">
            <text:p text:style-name="s1_center_fi0"><text:a xlink:type="simple" xlink:href="http://ivo.garant.ru/document/redirect/70650730/282511">28.25.11</text:a></text:p>
          </table:table-cell>
        </table:table-row>
        <table:table-row>
          <table:table-cell table:style-name="0">
            <text:p text:style-name="s1_center_fi0"><text:bookmark text:name="anchor2125"/>125.</text:p>
          </table:table-cell>
          <table:table-cell table:style-name="0">
            <text:p text:style-name="s16_fi0">Оборудование и установки для фильтрования или очистки газов, не включенные в другие группировки. Эта группировка не включает машины и аппараты для разделения жидких и газовых неоднородных систем в радиохимическом производстве и изготовлении тепловыделяющих элементов</text:p>
          </table:table-cell>
          <table:table-cell table:style-name="0">
            <text:p text:style-name="s1_center_fi0"><text:a xlink:type="simple" xlink:href="http://ivo.garant.ru/document/redirect/70650730/282514">28.25.14</text:a></text:p>
          </table:table-cell>
        </table:table-row>
        <table:table-row>
          <table:table-cell table:style-name="0">
            <text:p text:style-name="s1_center_fi0"><text:bookmark text:name="anchor2126"/>126.</text:p>
          </table:table-cell>
          <table:table-cell table:style-name="0">
            <text:p text:style-name="s16_fi0">Оборудование и установки для фильтрования или очистки жидкостей</text:p>
          </table:table-cell>
          <table:table-cell table:style-name="0">
            <text:p text:style-name="s1_center_fi0"><text:a xlink:type="simple" xlink:href="http://ivo.garant.ru/document/redirect/70650730/282912">28.29.12</text:a></text:p>
          </table:table-cell>
        </table:table-row>
        <table:table-row>
          <table:table-cell table:style-name="0">
            <text:p text:style-name="s1_center_fi0"><text:bookmark text:name="anchor2127"/>127.</text:p>
          </table:table-cell>
          <table:table-cell table:style-name="0">
            <text:p text:style-name="s16_fi0">Оборудование весовое промышленное</text:p>
          </table:table-cell>
          <table:table-cell table:style-name="0">
            <text:p text:style-name="s1_center_fi0"><text:a xlink:type="simple" xlink:href="http://ivo.garant.ru/document/redirect/70650730/28293111">28.29.31.110</text:a></text:p>
          </table:table-cell>
        </table:table-row>
        <table:table-row>
          <table:table-cell table:style-name="0">
            <text:p text:style-name="s1_center_fi0"><text:bookmark text:name="anchor2128"/>128.</text:p>
          </table:table-cell>
          <table:table-cell table:style-name="0">
            <text:p text:style-name="s16_fi0">Машины бурильные</text:p>
          </table:table-cell>
          <table:table-cell table:style-name="0">
            <text:p text:style-name="s1_center_fi0"><text:a xlink:type="simple" xlink:href="http://ivo.garant.ru/document/redirect/70650730/2892113">28.92.12.130</text:a></text:p>
          </table:table-cell>
        </table:table-row>
        <table:table-row>
          <table:table-cell table:style-name="0">
            <text:p text:style-name="s1_center_fi0"><text:bookmark text:name="anchor2129"/>129.</text:p>
          </table:table-cell>
          <table:table-cell table:style-name="0">
            <text:p text:style-name="s16_fi0">Комплектующие (запасные части) бурильных и проходческих машин, не имеющие самостоятельных группировок</text:p>
          </table:table-cell>
          <table:table-cell table:style-name="0">
            <text:p text:style-name="s1_center_fi0"><text:a xlink:type="simple" xlink:href="http://ivo.garant.ru/document/redirect/70650730/2896111">28.92.61.110</text:a></text:p>
          </table:table-cell>
        </table:table-row>
        <table:table-row>
          <table:table-cell table:style-name="0">
            <text:p text:style-name="s1_center_fi0"><text:bookmark text:name="anchor2130"/>130.</text:p>
          </table:table-cell>
          <table:table-cell table:style-name="0">
            <text:p text:style-name="s16_fi0">Машина для очистки, сортировки или калибровки семян, зерна или сухих бобовых культур</text:p>
          </table:table-cell>
          <table:table-cell table:style-name="0">
            <text:p text:style-name="s1_center_fi0"><text:a xlink:type="simple" xlink:href="http://ivo.garant.ru/document/redirect/70650730/28932">28.93.2</text:a></text:p>
          </table:table-cell>
        </table:table-row>
        <table:table-row>
          <table:table-cell table:style-name="0">
            <text:p text:style-name="s1_center_fi0"><text:bookmark text:name="anchor2131"/>131.</text:p>
          </table:table-cell>
          <table:table-cell table:style-name="0">
            <text:p text:style-name="s16_fi0">Оборудование специального назначения прочее, не включенное в другие группировки</text:p>
          </table:table-cell>
          <table:table-cell table:style-name="0">
            <text:p text:style-name="s1_center_fi0"><text:a xlink:type="simple" xlink:href="http://ivo.garant.ru/document/redirect/70650730/289939190">28.99.39.190</text:a></text:p>
          </table:table-cell>
        </table:table-row>
        <table:table-row>
          <table:table-cell table:style-name="0">
            <text:p text:style-name="s1_center_fi0"><text:bookmark text:name="anchor2132"/>132.</text:p>
          </table:table-cell>
          <table:table-cell table:style-name="0">
            <text:p text:style-name="s16_fi0">Устройства удерживающие для детей</text:p>
          </table:table-cell>
          <table:table-cell table:style-name="0">
            <text:p text:style-name="s1_center_fi0"><text:a xlink:type="simple" xlink:href="http://ivo.garant.ru/document/redirect/70650730/293220130">29.32.20.130</text:a></text:p>
          </table:table-cell>
        </table:table-row>
        <table:table-row>
          <table:table-cell table:style-name="0">
            <text:p text:style-name="s1_center_fi0"><text:bookmark text:name="anchor2133"/>133.</text:p>
          </table:table-cell>
          <table:table-cell table:style-name="0">
            <text:p text:style-name="s16_fi0">Беспилотные авиационные системы в составе с беспилотным воздушным судном вертолетного типа</text:p>
          </table:table-cell>
          <table:table-cell table:style-name="0">
            <text:p text:style-name="s1_center_fi0"><text:a xlink:type="simple" xlink:href="http://ivo.garant.ru/document/redirect/70650730/303031130">30.30.31.130</text:a></text:p>
          </table:table-cell>
        </table:table-row>
        <table:table-row>
          <table:table-cell table:style-name="0">
            <text:p text:style-name="s1_center_fi0"><text:bookmark text:name="anchor2134"/>134.</text:p>
          </table:table-cell>
          <table:table-cell table:style-name="0">
            <text:p text:style-name="s16_fi0">Беспилотные авиационные системы в составе с беспилотным воздушным судном самолетного типа</text:p>
          </table:table-cell>
          <table:table-cell table:style-name="0">
            <text:p text:style-name="s1_center_fi0"><text:a xlink:type="simple" xlink:href="http://ivo.garant.ru/document/redirect/70650730/333213">30.30.32.130</text:a></text:p>
          </table:table-cell>
        </table:table-row>
        <table:table-row>
          <table:table-cell table:style-name="0">
            <text:p text:style-name="s1_center_fi0"><text:bookmark text:name="anchor2135"/>135.</text:p>
          </table:table-cell>
          <table:table-cell table:style-name="0">
            <text:p text:style-name="s16_fi0">Беспилотные авиационные системы в составе с беспилотным воздушным судном самолетного типа с вертикальным взлетом и посадкой</text:p>
          </table:table-cell>
          <table:table-cell table:style-name="0">
            <text:p text:style-name="s1_center_fi0"><text:a xlink:type="simple" xlink:href="http://ivo.garant.ru/document/redirect/70650730/333214">30.30.32.140</text:a></text:p>
          </table:table-cell>
        </table:table-row>
        <table:table-row>
          <table:table-cell table:style-name="0">
            <text:p text:style-name="s1_center_fi0"><text:bookmark text:name="anchor2136"/>136.</text:p>
          </table:table-cell>
          <table:table-cell table:style-name="0">
            <text:p text:style-name="s16_fi0">Беспилотные авиационные системы в составе с беспилотным воздушным судном мультироторного типа</text:p>
          </table:table-cell>
          <table:table-cell table:style-name="0">
            <text:p text:style-name="s1_center_fi0"><text:a xlink:type="simple" xlink:href="http://ivo.garant.ru/document/redirect/70650730/333215">30.30.32.150</text:a></text:p>
          </table:table-cell>
        </table:table-row>
        <table:table-row>
          <table:table-cell table:style-name="0">
            <text:p text:style-name="s1_center_fi0"><text:bookmark text:name="anchor2137"/>137.</text:p>
          </table:table-cell>
          <table:table-cell table:style-name="0">
            <text:p text:style-name="s16_fi0">Беспилотные авиационные системы в составе с беспилотным воздушным судном других типов, не включенные в другие группировки</text:p>
          </table:table-cell>
          <table:table-cell table:style-name="0">
            <text:p text:style-name="s1_center_fi0"><text:a xlink:type="simple" xlink:href="http://ivo.garant.ru/document/redirect/70650730/333219">30.30.32.190</text:a></text:p>
          </table:table-cell>
        </table:table-row>
        <table:table-row>
          <table:table-cell table:style-name="0">
            <text:p text:style-name="s1_center_fi0"><text:bookmark text:name="anchor2138"/>138.</text:p>
          </table:table-cell>
          <table:table-cell table:style-name="0">
            <text:p text:style-name="s16_fi0">Коляски детские и их части</text:p>
          </table:table-cell>
          <table:table-cell table:style-name="0">
            <text:p text:style-name="s1_center_fi0"><text:a xlink:type="simple" xlink:href="http://ivo.garant.ru/document/redirect/70650730/309240">30.92.40</text:a></text:p>
          </table:table-cell>
        </table:table-row>
        <table:table-row>
          <table:table-cell table:style-name="0">
            <text:p text:style-name="s1_center_fi0"><text:bookmark text:name="anchor2139"/>139.</text:p>
          </table:table-cell>
          <table:table-cell table:style-name="0">
            <text:p text:style-name="s16_fi0">Мебель для офисов и предприятий торговли</text:p>
          </table:table-cell>
          <table:table-cell table:style-name="0">
            <text:p text:style-name="s1_center_fi0"><text:a xlink:type="simple" xlink:href="http://ivo.garant.ru/document/redirect/70650730/31011">31.01.1</text:a></text:p>
          </table:table-cell>
        </table:table-row>
        <table:table-row>
          <table:table-cell table:style-name="0">
            <text:p text:style-name="s1_center_fi0"><text:bookmark text:name="anchor2140"/>140.</text:p>
          </table:table-cell>
          <table:table-cell table:style-name="0">
            <text:p text:style-name="s16_fi0">Мебель кухонная</text:p>
          </table:table-cell>
          <table:table-cell table:style-name="0">
            <text:p text:style-name="s1_center_fi0"><text:a xlink:type="simple" xlink:href="http://ivo.garant.ru/document/redirect/70650730/310210">31.02.10</text:a></text:p>
          </table:table-cell>
        </table:table-row>
        <table:table-row>
          <table:table-cell table:style-name="0">
            <text:p text:style-name="s1_center_fi0"><text:bookmark text:name="anchor2141"/>141.</text:p>
          </table:table-cell>
          <table:table-cell table:style-name="0">
            <text:p text:style-name="s16_fi0">Мебель деревянная для спальни, столовой и гостиной</text:p>
          </table:table-cell>
          <table:table-cell table:style-name="0">
            <text:p text:style-name="s1_center_fi0"><text:a xlink:type="simple" xlink:href="http://ivo.garant.ru/document/redirect/70650730/310912">31.09.12</text:a></text:p>
          </table:table-cell>
        </table:table-row>
        <table:table-row>
          <table:table-cell table:style-name="0">
            <text:p text:style-name="s1_center_fi0"><text:bookmark text:name="anchor2142"/>142.</text:p>
          </table:table-cell>
          <table:table-cell table:style-name="0">
            <text:p text:style-name="s16_fi0">Мебель деревянная, не включенная в другие группировки</text:p>
          </table:table-cell>
          <table:table-cell table:style-name="0">
            <text:p text:style-name="s1_center_fi0"><text:a xlink:type="simple" xlink:href="http://ivo.garant.ru/document/redirect/70650730/310913">31.09.13</text:a></text:p>
          </table:table-cell>
        </table:table-row>
        <table:table-row>
          <table:table-cell table:style-name="0">
            <text:p text:style-name="s1_center_fi0"><text:bookmark text:name="anchor2143"/>143.</text:p>
          </table:table-cell>
          <table:table-cell table:style-name="0">
            <text:p text:style-name="s16_fi0">Пианино</text:p>
          </table:table-cell>
          <table:table-cell table:style-name="0">
            <text:p text:style-name="s1_center_fi0"><text:a xlink:type="simple" xlink:href="http://ivo.garant.ru/document/redirect/70650730/322011120">32.20.11.120</text:a></text:p>
          </table:table-cell>
        </table:table-row>
        <table:table-row>
          <table:table-cell table:style-name="0">
            <text:p text:style-name="s1_center_fi0"><text:bookmark text:name="anchor2144"/>144.</text:p>
          </table:table-cell>
          <table:table-cell table:style-name="0">
            <text:p text:style-name="s16_fi0">Рояли</text:p>
          </table:table-cell>
          <table:table-cell table:style-name="0">
            <text:p text:style-name="s1_center_fi0"><text:a xlink:type="simple" xlink:href="http://ivo.garant.ru/document/redirect/70650730/322011130">32.20.11.130</text:a></text:p>
          </table:table-cell>
        </table:table-row>
        <table:table-row>
          <table:table-cell table:style-name="0">
            <text:p text:style-name="s1_center_fi0"><text:bookmark text:name="anchor2145"/>145.</text:p>
          </table:table-cell>
          <table:table-cell table:style-name="0">
            <text:p text:style-name="s16_fi0">Инструменты музыкальные струнные смычковые</text:p>
          </table:table-cell>
          <table:table-cell table:style-name="0">
            <text:p text:style-name="s1_center_fi0"><text:a xlink:type="simple" xlink:href="http://ivo.garant.ru/document/redirect/70650730/322012110">32.20.12.110</text:a></text:p>
          </table:table-cell>
        </table:table-row>
        <table:table-row>
          <table:table-cell table:style-name="0">
            <text:p text:style-name="s1_center_fi0"><text:bookmark text:name="anchor2146"/>146.</text:p>
          </table:table-cell>
          <table:table-cell table:style-name="0">
            <text:p text:style-name="s16_fi0">Балалайки</text:p>
          </table:table-cell>
          <table:table-cell table:style-name="0">
            <text:p text:style-name="s1_center_fi0"><text:a xlink:type="simple" xlink:href="http://ivo.garant.ru/document/redirect/70650730/322012121">32.20.12.121</text:a></text:p>
          </table:table-cell>
        </table:table-row>
        <table:table-row>
          <table:table-cell table:style-name="0">
            <text:p text:style-name="s1_center_fi0"><text:bookmark text:name="anchor2147"/>147.</text:p>
          </table:table-cell>
          <table:table-cell table:style-name="0">
            <text:p text:style-name="s16_fi0">Гитары</text:p>
          </table:table-cell>
          <table:table-cell table:style-name="0">
            <text:p text:style-name="s1_center_fi0"><text:a xlink:type="simple" xlink:href="http://ivo.garant.ru/document/redirect/70650730/322012122">32.20.12.122</text:a></text:p>
          </table:table-cell>
        </table:table-row>
        <table:table-row>
          <table:table-cell table:style-name="0">
            <text:p text:style-name="s1_center_fi0"><text:bookmark text:name="anchor2148"/>148.</text:p>
          </table:table-cell>
          <table:table-cell table:style-name="0">
            <text:p text:style-name="s16_fi0">Домры</text:p>
          </table:table-cell>
          <table:table-cell table:style-name="0">
            <text:p text:style-name="s1_center_fi0"><text:a xlink:type="simple" xlink:href="http://ivo.garant.ru/document/redirect/70650730/302012124">32.20.12.124</text:a></text:p>
          </table:table-cell>
        </table:table-row>
        <table:table-row>
          <table:table-cell table:style-name="0">
            <text:p text:style-name="s1_center_fi0"><text:bookmark text:name="anchor2149"/>149.</text:p>
          </table:table-cell>
          <table:table-cell table:style-name="0">
            <text:p text:style-name="s16_fi0">Арфы</text:p>
          </table:table-cell>
          <table:table-cell table:style-name="0">
            <text:p text:style-name="s1_center_fi0"><text:a xlink:type="simple" xlink:href="http://ivo.garant.ru/document/redirect/70650730/322012125">32.20.12.125</text:a></text:p>
          </table:table-cell>
        </table:table-row>
        <table:table-row>
          <table:table-cell table:style-name="0">
            <text:p text:style-name="s1_center_fi0"><text:bookmark text:name="anchor2150"/>150.</text:p>
          </table:table-cell>
          <table:table-cell table:style-name="0">
            <text:p text:style-name="s16_fi0">Инструменты струнные щипковые национальные</text:p>
          </table:table-cell>
          <table:table-cell table:style-name="0">
            <text:p text:style-name="s1_center_fi0"><text:a xlink:type="simple" xlink:href="http://ivo.garant.ru/document/redirect/70650730/322012126">32.20.12.126</text:a></text:p>
          </table:table-cell>
        </table:table-row>
        <table:table-row>
          <table:table-cell table:style-name="0">
            <text:p text:style-name="s1_center_fi0"><text:bookmark text:name="anchor2151"/>151.</text:p>
          </table:table-cell>
          <table:table-cell table:style-name="0">
            <text:p text:style-name="s16_fi0">Аккордеоны</text:p>
          </table:table-cell>
          <table:table-cell table:style-name="0">
            <text:p text:style-name="s1_center_fi0"><text:a xlink:type="simple" xlink:href="http://ivo.garant.ru/document/redirect/70650730/322013131">32.20.13.131</text:a></text:p>
          </table:table-cell>
        </table:table-row>
        <table:table-row>
          <table:table-cell table:style-name="0">
            <text:p text:style-name="s1_center_fi0"><text:bookmark text:name="anchor2152"/>152.</text:p>
          </table:table-cell>
          <table:table-cell table:style-name="0">
            <text:p text:style-name="s16_fi0">Баяны</text:p>
          </table:table-cell>
          <table:table-cell table:style-name="0">
            <text:p text:style-name="s1_center_fi0"><text:a xlink:type="simple" xlink:href="http://ivo.garant.ru/document/redirect/70650730/322013132">32.20.13.132</text:a></text:p>
          </table:table-cell>
        </table:table-row>
        <table:table-row>
          <table:table-cell table:style-name="0">
            <text:p text:style-name="s1_center_fi0"><text:bookmark text:name="anchor2153"/>153.</text:p>
          </table:table-cell>
          <table:table-cell table:style-name="0">
            <text:p text:style-name="s16_fi0">Гармони</text:p>
          </table:table-cell>
          <table:table-cell table:style-name="0">
            <text:p text:style-name="s1_center_fi0"><text:a xlink:type="simple" xlink:href="http://ivo.garant.ru/document/redirect/70650730/322013133">32.20.13.133</text:a></text:p>
          </table:table-cell>
        </table:table-row>
        <table:table-row>
          <table:table-cell table:style-name="0">
            <text:p text:style-name="s1_center_fi0"><text:bookmark text:name="anchor2154"/>154.</text:p>
          </table:table-cell>
          <table:table-cell table:style-name="0">
            <text:p text:style-name="s16_fi0">Инструменты музыкальные духовые</text:p>
          </table:table-cell>
          <table:table-cell table:style-name="0">
            <text:p text:style-name="s1_center_fi0"><text:a xlink:type="simple" xlink:href="http://ivo.garant.ru/document/redirect/70650730/322013160">32.20.13.160</text:a></text:p>
          </table:table-cell>
        </table:table-row>
        <table:table-row>
          <table:table-cell table:style-name="0">
            <text:p text:style-name="s1_center_fi0"><text:bookmark text:name="anchor2155"/>155.</text:p>
          </table:table-cell>
          <table:table-cell table:style-name="0">
            <text:p text:style-name="s16_fi0">Флейты</text:p>
          </table:table-cell>
          <table:table-cell table:style-name="0">
            <text:p text:style-name="s1_center_fi0"><text:a xlink:type="simple" xlink:href="http://ivo.garant.ru/document/redirect/70650730/322013173">32.20.13.173</text:a></text:p>
          </table:table-cell>
        </table:table-row>
        <table:table-row>
          <table:table-cell table:style-name="0">
            <text:p text:style-name="s1_center_fi0"><text:bookmark text:name="anchor2156"/>156.</text:p>
          </table:table-cell>
          <table:table-cell table:style-name="0">
            <text:p text:style-name="s16_fi0">Кларнеты</text:p>
          </table:table-cell>
          <table:table-cell table:style-name="0">
            <text:p text:style-name="s1_center_fi0"><text:a xlink:type="simple" xlink:href="http://ivo.garant.ru/document/redirect/70650730/322013174">32.20.13.174</text:a></text:p>
          </table:table-cell>
        </table:table-row>
        <table:table-row>
          <table:table-cell table:style-name="0">
            <text:p text:style-name="s1_center_fi0"><text:bookmark text:name="anchor2157"/>157.</text:p>
          </table:table-cell>
          <table:table-cell table:style-name="0">
            <text:p text:style-name="s16_fi0">Саксофоны</text:p>
          </table:table-cell>
          <table:table-cell table:style-name="0">
            <text:p text:style-name="s1_center_fi0"><text:a xlink:type="simple" xlink:href="http://ivo.garant.ru/document/redirect/70650730/322013175">32.20.13.175</text:a></text:p>
          </table:table-cell>
        </table:table-row>
        <table:table-row>
          <table:table-cell table:style-name="0">
            <text:p text:style-name="s1_center_fi0"><text:bookmark text:name="anchor2158"/>158.</text:p>
          </table:table-cell>
          <table:table-cell table:style-name="0">
            <text:p text:style-name="s16_fi0">Гобои</text:p>
          </table:table-cell>
          <table:table-cell table:style-name="0">
            <text:p text:style-name="s1_center_fi0"><text:a xlink:type="simple" xlink:href="http://ivo.garant.ru/document/redirect/70650730/322013176">32.20.13.176</text:a></text:p>
          </table:table-cell>
        </table:table-row>
        <table:table-row>
          <table:table-cell table:style-name="0">
            <text:p text:style-name="s1_center_fi0"><text:bookmark text:name="anchor2159"/>159.</text:p>
          </table:table-cell>
          <table:table-cell table:style-name="0">
            <text:p text:style-name="s16_fi0">Фаготы</text:p>
          </table:table-cell>
          <table:table-cell table:style-name="0">
            <text:p text:style-name="s1_center_fi0"><text:a xlink:type="simple" xlink:href="http://ivo.garant.ru/document/redirect/70650730/322013177">32.20.13.177</text:a></text:p>
          </table:table-cell>
        </table:table-row>
        <table:table-row>
          <table:table-cell table:style-name="0">
            <text:p text:style-name="s1_center_fi0"><text:bookmark text:name="anchor2160"/>160.</text:p>
          </table:table-cell>
          <table:table-cell table:style-name="0">
            <text:p text:style-name="s16_fi0">Инструменты национальные духовые</text:p>
          </table:table-cell>
          <table:table-cell table:style-name="0">
            <text:p text:style-name="s1_center_fi0"><text:a xlink:type="simple" xlink:href="http://ivo.garant.ru/document/redirect/70650730/322013178">32.20.13.178</text:a></text:p>
          </table:table-cell>
        </table:table-row>
        <table:table-row>
          <table:table-cell table:style-name="0">
            <text:p text:style-name="s1_center_fi0"><text:bookmark text:name="anchor2161"/>161.</text:p>
          </table:table-cell>
          <table:table-cell table:style-name="0">
            <text:p text:style-name="s16_fi0">Инструменты электромузыкальные адаптиризованные струнные щипковые</text:p>
          </table:table-cell>
          <table:table-cell table:style-name="0">
            <text:p text:style-name="s1_center_fi0"><text:a xlink:type="simple" xlink:href="http://ivo.garant.ru/document/redirect/70650730/322014120">32.20.14.120</text:a></text:p>
          </table:table-cell>
        </table:table-row>
        <table:table-row>
          <table:table-cell table:style-name="0">
            <text:p text:style-name="s1_center_fi0"><text:bookmark text:name="anchor2162"/>162.</text:p>
          </table:table-cell>
          <table:table-cell table:style-name="0">
            <text:p text:style-name="s16_fi0">Инструменты электромузыкальные адаптиризованные язычковые</text:p>
          </table:table-cell>
          <table:table-cell table:style-name="0">
            <text:p text:style-name="s1_center_fi0"><text:a xlink:type="simple" xlink:href="http://ivo.garant.ru/document/redirect/70650730/322014140">32.20.14.140</text:a></text:p>
          </table:table-cell>
        </table:table-row>
        <table:table-row>
          <table:table-cell table:style-name="0">
            <text:p text:style-name="s1_center_fi0"><text:bookmark text:name="anchor2163"/>163.</text:p>
          </table:table-cell>
          <table:table-cell table:style-name="0">
            <text:p text:style-name="s16_fi0">Инструменты музыкальные ударные</text:p>
          </table:table-cell>
          <table:table-cell table:style-name="0">
            <text:p text:style-name="s1_center_fi0"><text:a xlink:type="simple" xlink:href="http://ivo.garant.ru/document/redirect/70650730/322015110">32.20.15.110</text:a></text:p>
          </table:table-cell>
        </table:table-row>
        <table:table-row>
          <table:table-cell table:style-name="0">
            <text:p text:style-name="s1_center_fi0"><text:bookmark text:name="anchor2164"/>164.</text:p>
          </table:table-cell>
          <table:table-cell table:style-name="0">
            <text:p text:style-name="s16_fi0">Лыжи</text:p>
          </table:table-cell>
          <table:table-cell table:style-name="0">
            <text:p text:style-name="s1_center_fi0"><text:a xlink:type="simple" xlink:href="http://ivo.garant.ru/document/redirect/70650730/32301111">32.30.11.110</text:a></text:p>
          </table:table-cell>
        </table:table-row>
        <table:table-row>
          <table:table-cell table:style-name="0">
            <text:p text:style-name="s1_center_fi0"><text:bookmark text:name="anchor2165"/>165.</text:p>
          </table:table-cell>
          <table:table-cell table:style-name="0">
            <text:p text:style-name="s16_fi0">Снаряжение лыжное, кроме обуви</text:p>
          </table:table-cell>
          <table:table-cell table:style-name="0">
            <text:p text:style-name="s1_center_fi0"><text:a xlink:type="simple" xlink:href="http://ivo.garant.ru/document/redirect/70650730/323011120">32.30.11.120</text:a></text:p>
          </table:table-cell>
        </table:table-row>
        <table:table-row>
          <table:table-cell table:style-name="0">
            <text:p text:style-name="s1_center_fi0"><text:bookmark text:name="anchor2166"/>166.</text:p>
          </table:table-cell>
          <table:table-cell table:style-name="0">
            <text:p text:style-name="s16_fi0">Коньки ледовые, включая коньки с ботинками</text:p>
          </table:table-cell>
          <table:table-cell table:style-name="0">
            <text:p text:style-name="s1_center_fi0"><text:a xlink:type="simple" xlink:href="http://ivo.garant.ru/document/redirect/70650730/323011131">32.30.11.131</text:a></text:p>
          </table:table-cell>
        </table:table-row>
        <table:table-row>
          <table:table-cell table:style-name="0">
            <text:p text:style-name="s1_center_fi0"><text:bookmark text:name="anchor2167"/>167.</text:p>
          </table:table-cell>
          <table:table-cell table:style-name="0">
            <text:p text:style-name="s16_fi0">Ботинки лыжные</text:p>
          </table:table-cell>
          <table:table-cell table:style-name="0">
            <text:p text:style-name="s1_center_fi0"><text:a xlink:type="simple" xlink:href="http://ivo.garant.ru/document/redirect/70650730/32301211">32.30.12.110</text:a></text:p>
          </table:table-cell>
        </table:table-row>
        <table:table-row>
          <table:table-cell table:style-name="0">
            <text:p text:style-name="s1_center_fi0"><text:bookmark text:name="anchor2168"/>168.</text:p>
          </table:table-cell>
          <table:table-cell table:style-name="0">
            <text:p text:style-name="s16_fi0">Инвентарь и оборудование для занятий физкультурой, гимнастикой и атлетикой</text:p>
          </table:table-cell>
          <table:table-cell table:style-name="0">
            <text:p text:style-name="s1_center_fi0"><text:a xlink:type="simple" xlink:href="http://ivo.garant.ru/document/redirect/70650730/323014110">32.30.14.110</text:a></text:p>
          </table:table-cell>
        </table:table-row>
        <table:table-row>
          <table:table-cell table:style-name="0">
            <text:p text:style-name="s1_center_fi0"><text:bookmark text:name="anchor2169"/>169.</text:p>
          </table:table-cell>
          <table:table-cell table:style-name="0">
            <text:p text:style-name="s16_fi0">Оборудование для занятий физкультурой, гимнастикой и атлетикой, занятий в спортзалах, фитнес-центрах</text:p>
          </table:table-cell>
          <table:table-cell table:style-name="0">
            <text:p text:style-name="s1_center_fi0"><text:a xlink:type="simple" xlink:href="http://ivo.garant.ru/document/redirect/70650730/323014120">32.30.14.120</text:a></text:p>
          </table:table-cell>
        </table:table-row>
        <table:table-row>
          <table:table-cell table:style-name="0">
            <text:p text:style-name="s1_center_fi0"><text:bookmark text:name="anchor2170"/>170.</text:p>
          </table:table-cell>
          <table:table-cell table:style-name="0">
            <text:p text:style-name="s16_fi0">Инвентарь для игры в хоккей с шайбой и мячом</text:p>
          </table:table-cell>
          <table:table-cell table:style-name="0">
            <text:p text:style-name="s1_center_fi0"><text:a xlink:type="simple" xlink:href="http://ivo.garant.ru/document/redirect/70650730/323015117">32.30.15.117</text:a></text:p>
          </table:table-cell>
        </table:table-row>
        <table:table-row>
          <table:table-cell table:style-name="0">
            <text:p text:style-name="s1_center_fi0"><text:bookmark text:name="anchor2171"/>171.</text:p>
          </table:table-cell>
          <table:table-cell table:style-name="0">
            <text:p text:style-name="s16_fi0">Игры и игрушки</text:p>
          </table:table-cell>
          <table:table-cell table:style-name="0">
            <text:p text:style-name="s1_center_fi0"><text:a xlink:type="simple" xlink:href="http://ivo.garant.ru/document/redirect/70650730/324">32.4</text:a></text:p>
          </table:table-cell>
        </table:table-row>
        <table:table-row>
          <table:table-cell table:style-name="0">
            <text:p text:style-name="s1_center_fi0"><text:bookmark text:name="anchor2172"/>172.</text:p>
          </table:table-cell>
          <table:table-cell table:style-name="0">
            <text:p text:style-name="s16_fi0">Протезы внешние</text:p>
          </table:table-cell>
          <table:table-cell table:style-name="0">
            <text:p text:style-name="s1_center_fi0"><text:a xlink:type="simple" xlink:href="http://ivo.garant.ru/document/redirect/70650730/32522121">32.50.22.121</text:a></text:p>
          </table:table-cell>
        </table:table-row>
        <table:table-row>
          <table:table-cell table:style-name="0">
            <text:p text:style-name="s1_center_fi0"><text:bookmark text:name="anchor2173"/>173.</text:p>
          </table:table-cell>
          <table:table-cell table:style-name="0">
            <text:p text:style-name="s16_fi0">Туторы верхних конечностей</text:p>
          </table:table-cell>
          <table:table-cell table:style-name="0">
            <text:p text:style-name="s1_center_fi0"><text:a xlink:type="simple" xlink:href="http://ivo.garant.ru/document/redirect/70650730/325022123">32.50.22.123</text:a></text:p>
          </table:table-cell>
        </table:table-row>
        <table:table-row>
          <table:table-cell table:style-name="0">
            <text:p text:style-name="s1_center_fi0"><text:bookmark text:name="anchor2174"/>174.</text:p>
          </table:table-cell>
          <table:table-cell table:style-name="0">
            <text:p text:style-name="s16_fi0">Туторы нижних конечностей</text:p>
          </table:table-cell>
          <table:table-cell table:style-name="0">
            <text:p text:style-name="s1_center_fi0"><text:a xlink:type="simple" xlink:href="http://ivo.garant.ru/document/redirect/70650730/325022124">32.50.22.124</text:a></text:p>
          </table:table-cell>
        </table:table-row>
        <table:table-row>
          <table:table-cell table:style-name="0">
            <text:p text:style-name="s1_center_fi0"><text:bookmark text:name="anchor2175"/>175.</text:p>
          </table:table-cell>
          <table:table-cell table:style-name="0">
            <text:p text:style-name="s16_fi0">Корсеты, реклинаторы, обтураторы</text:p>
          </table:table-cell>
          <table:table-cell table:style-name="0">
            <text:p text:style-name="s1_center_fi0"><text:a xlink:type="simple" xlink:href="http://ivo.garant.ru/document/redirect/70650730/325022125">32.50.22.125</text:a></text:p>
          </table:table-cell>
        </table:table-row>
        <table:table-row>
          <table:table-cell table:style-name="0">
            <text:p text:style-name="s1_center_fi0"><text:bookmark text:name="anchor2176"/>176.</text:p>
          </table:table-cell>
          <table:table-cell table:style-name="0">
            <text:p text:style-name="s16_fi0">Бандажи и изделия к протезно-ортопедической продукции</text:p>
          </table:table-cell>
          <table:table-cell table:style-name="0">
            <text:p text:style-name="s1_center_fi0"><text:a xlink:type="simple" xlink:href="http://ivo.garant.ru/document/redirect/70650730/325022126">32.50.22.126</text:a></text:p>
          </table:table-cell>
        </table:table-row>
        <table:table-row>
          <table:table-cell table:style-name="0">
            <text:p text:style-name="s1_center_fi0"><text:bookmark text:name="anchor2177"/>177.</text:p>
          </table:table-cell>
          <table:table-cell table:style-name="0">
            <text:p text:style-name="s16_fi0">Приспособления ортопедические прочие</text:p>
          </table:table-cell>
          <table:table-cell table:style-name="0">
            <text:p text:style-name="s1_center_fi0"><text:a xlink:type="simple" xlink:href="http://ivo.garant.ru/document/redirect/70650730/3252129">32.50.22.129</text:a></text:p>
          </table:table-cell>
        </table:table-row>
        <table:table-row>
          <table:table-cell table:style-name="0">
            <text:p text:style-name="s1_center_fi0"><text:bookmark text:name="anchor2178"/>178.</text:p>
          </table:table-cell>
          <table:table-cell table:style-name="0">
            <text:p text:style-name="s16_fi0">Вкладные корригирующие элементы для ортопедической обуви (в том числе стельки, полустельки)</text:p>
          </table:table-cell>
          <table:table-cell table:style-name="0">
            <text:p text:style-name="s1_center_fi0"><text:a xlink:type="simple" xlink:href="http://ivo.garant.ru/document/redirect/70650730/325022157">32.50.22.157</text:a></text:p>
          </table:table-cell>
        </table:table-row>
        <table:table-row>
          <table:table-cell table:style-name="0">
            <text:p text:style-name="s1_center_fi0"><text:bookmark text:name="anchor21781"/>178<text:span text:style-name="upper"><text:span> 1</text:span></text:span>.</text:p>
          </table:table-cell>
          <table:table-cell table:style-name="0">
            <text:p text:style-name="s16_fi0">Стопа полиуретановая</text:p>
          </table:table-cell>
          <table:table-cell table:style-name="0">
            <text:p text:style-name="s1_center_fi0"><text:a xlink:type="simple" xlink:href="http://ivo.garant.ru/document/redirect/70650730/325023131">32.50.23.131</text:a></text:p>
          </table:table-cell>
        </table:table-row>
        <table:table-row>
          <table:table-cell table:style-name="0">
            <text:p text:style-name="s1_center_fi0"><text:bookmark text:name="anchor21782"/>178<text:span text:style-name="upper"><text:span> 2</text:span></text:span>.</text:p>
          </table:table-cell>
          <table:table-cell table:style-name="0">
            <text:p text:style-name="s16_fi0">Стопа из композитных материалов</text:p>
          </table:table-cell>
          <table:table-cell table:style-name="0">
            <text:p text:style-name="s1_center_fi0"><text:a xlink:type="simple" xlink:href="http://ivo.garant.ru/document/redirect/70650730/325023132">32.50.23.132</text:a></text:p>
          </table:table-cell>
        </table:table-row>
        <table:table-row>
          <table:table-cell table:style-name="0">
            <text:p text:style-name="s1_center_fi0"><text:bookmark text:name="anchor21783"/>178<text:span text:style-name="upper"><text:span> 3</text:span></text:span>.</text:p>
          </table:table-cell>
          <table:table-cell table:style-name="0">
            <text:p text:style-name="s16_fi0">Коленный модуль с механическим управлением</text:p>
          </table:table-cell>
          <table:table-cell table:style-name="0">
            <text:p text:style-name="s1_center_fi0"><text:a xlink:type="simple" xlink:href="http://ivo.garant.ru/document/redirect/70650730/325023141">32.50.23.141</text:a></text:p>
          </table:table-cell>
        </table:table-row>
        <table:table-row>
          <table:table-cell table:style-name="0">
            <text:p text:style-name="s1_center_fi0"><text:bookmark text:name="anchor21784"/>178<text:span text:style-name="upper"><text:span> 4</text:span></text:span>.</text:p>
          </table:table-cell>
          <table:table-cell table:style-name="0">
            <text:p text:style-name="s16_fi0">Коленный модуль с пневматическим управлением</text:p>
          </table:table-cell>
          <table:table-cell table:style-name="0">
            <text:p text:style-name="s1_center_fi0"><text:a xlink:type="simple" xlink:href="http://ivo.garant.ru/document/redirect/70650730/325023142">32.50.23.142</text:a></text:p>
          </table:table-cell>
        </table:table-row>
        <table:table-row>
          <table:table-cell table:style-name="0">
            <text:p text:style-name="s1_center_fi0"><text:bookmark text:name="anchor21785"/>178<text:span text:style-name="upper"><text:span> 5</text:span></text:span>.</text:p>
          </table:table-cell>
          <table:table-cell table:style-name="0">
            <text:p text:style-name="s16_fi0">Коленный модуль с гидравлическим управлением</text:p>
          </table:table-cell>
          <table:table-cell table:style-name="0">
            <text:p text:style-name="s1_center_fi0"><text:a xlink:type="simple" xlink:href="http://ivo.garant.ru/document/redirect/70650730/325023143">32.50.23.143</text:a></text:p>
          </table:table-cell>
        </table:table-row>
        <table:table-row>
          <table:table-cell table:style-name="0">
            <text:p text:style-name="s1_center_fi0"><text:bookmark text:name="anchor21786"/>178<text:span text:style-name="upper"><text:span> 6</text:span></text:span>.</text:p>
          </table:table-cell>
          <table:table-cell table:style-name="0">
            <text:p text:style-name="s16_fi0">Коленный модуль с микропроцессорным управлением</text:p>
          </table:table-cell>
          <table:table-cell table:style-name="0">
            <text:p text:style-name="s1_center_fi0"><text:a xlink:type="simple" xlink:href="http://ivo.garant.ru/document/redirect/70650730/325023144">32.50.23.144</text:a></text:p>
          </table:table-cell>
        </table:table-row>
        <table:table-row>
          <table:table-cell table:style-name="0">
            <text:p text:style-name="s1_center_fi0"><text:bookmark text:name="anchor21787"/>178<text:span text:style-name="upper"><text:span> 7</text:span></text:span>.</text:p>
          </table:table-cell>
          <table:table-cell table:style-name="0">
            <text:p text:style-name="s16_fi0">Тазобедренный модуль с механическим управлением</text:p>
          </table:table-cell>
          <table:table-cell table:style-name="0">
            <text:p text:style-name="s1_center_fi0"><text:a xlink:type="simple" xlink:href="http://ivo.garant.ru/document/redirect/70650730/325023151">32.50.23.151</text:a></text:p>
          </table:table-cell>
        </table:table-row>
        <table:table-row>
          <table:table-cell table:style-name="0">
            <text:p text:style-name="s1_center_fi0"><text:bookmark text:name="anchor522311"/>178<text:span text:style-name="upper"><text:span> 8</text:span></text:span>.</text:p>
          </table:table-cell>
          <table:table-cell table:style-name="0">
            <text:p text:style-name="s16_fi0">Узел кисти пассивный</text:p>
          </table:table-cell>
          <table:table-cell table:style-name="0">
            <text:p text:style-name="s1_center_fi0"><text:a xlink:type="simple" xlink:href="http://ivo.garant.ru/document/redirect/70650730/325023161">32.50.23.161</text:a></text:p>
          </table:table-cell>
        </table:table-row>
        <table:table-row>
          <table:table-cell table:style-name="0">
            <text:p text:style-name="s1_center_fi0"><text:bookmark text:name="anchor522312"/>178<text:span text:style-name="upper"><text:span> 9</text:span></text:span>.</text:p>
          </table:table-cell>
          <table:table-cell table:style-name="0">
            <text:p text:style-name="s16_fi0">Узел кисти активный</text:p>
          </table:table-cell>
          <table:table-cell table:style-name="0">
            <text:p text:style-name="s1_center_fi0"><text:a xlink:type="simple" xlink:href="http://ivo.garant.ru/document/redirect/70650730/325023162">32.50.23.162</text:a></text:p>
          </table:table-cell>
        </table:table-row>
        <table:table-row>
          <table:table-cell table:style-name="0">
            <text:p text:style-name="s1_center_fi0"><text:bookmark text:name="anchor217810"/>178<text:span text:style-name="upper"><text:span> 10</text:span></text:span>.</text:p>
          </table:table-cell>
          <table:table-cell table:style-name="0">
            <text:p text:style-name="s16_fi0">Узел кисти с микропроцессорным управлением</text:p>
          </table:table-cell>
          <table:table-cell table:style-name="0">
            <text:p text:style-name="s1_center_fi0"><text:a xlink:type="simple" xlink:href="http://ivo.garant.ru/document/redirect/70650730/325023163">32.50.23.163</text:a></text:p>
          </table:table-cell>
        </table:table-row>
        <table:table-row>
          <table:table-cell table:style-name="0">
            <text:p text:style-name="s1_center_fi0"><text:bookmark text:name="anchor217811"/>178<text:span text:style-name="upper"><text:span> 11</text:span></text:span>.</text:p>
          </table:table-cell>
          <table:table-cell table:style-name="0">
            <text:p text:style-name="s16_fi0">Локтевой узел пассивный</text:p>
          </table:table-cell>
          <table:table-cell table:style-name="0">
            <text:p text:style-name="s1_center_fi0"><text:a xlink:type="simple" xlink:href="http://ivo.garant.ru/document/redirect/70650730/325023171">32.50.23.171</text:a></text:p>
          </table:table-cell>
        </table:table-row>
        <table:table-row>
          <table:table-cell table:style-name="0">
            <text:p text:style-name="s1_center_fi0"><text:bookmark text:name="anchor2179"/>179.</text:p>
          </table:table-cell>
          <table:table-cell table:style-name="0">
            <text:p text:style-name="s16_fi0">Мебель медицинская, включая хирургическую, стоматологическую или ветеринарную, и ее части, за исключением: кровати больничной механической, соответствующей коду 120210 вида медицинского изделия в соответствии с <text:a xlink:type="simple" xlink:href="http://ivo.garant.ru/document/redirect/70199586/1000">номенклатурной классификацией</text:a> медицинских изделий, утвержденной Министерством здравоохранения Российской Федерации (далее - номенклатурная классификация); кровати больничной стандартной с электроприводом, соответствующей коду 136210 вида медицинского изделия в соответствии с номенклатурной классификацией; стеллажа для палаты пациента, соответствующего коду 156900 вида медицинского изделия в соответствии с номенклатурной классификацией; шкафа вытяжного, соответствующего коду 181470 вида медицинского изделия в соответствии с номенклатурной классификацией; ширмы прикроватной, соответствующей коду 184200 вида медицинского изделия в соответствии с номенклатурной классификацией; стеллажа общего назначения, соответствующего коду 260470 вида медицинского изделия в соответствии с номенклатурной классификацией; шкафа для сушки и хранения эндоскопов, соответствующего коду 271740 вида медицинского изделия в соответствии с номенклатурной классификацией</text:p>
          </table:table-cell>
          <table:table-cell table:style-name="0">
            <text:p text:style-name="s1_center_fi0"><text:a xlink:type="simple" xlink:href="http://ivo.garant.ru/document/redirect/70650730/325030110">32.50.30.110</text:a></text:p>
            <text:p text:style-name="s1_center_fi0"><text:a xlink:type="simple" xlink:href="http://ivo.garant.ru/document/redirect/70650730/325030119">32.50.30.119</text:a></text:p>
            <text:p text:style-name="s1_center_fi0"><text:a xlink:type="simple" xlink:href="http://ivo.garant.ru/document/redirect/70650730/325050">32.50.50</text:a></text:p>
          </table:table-cell>
        </table:table-row>
        <table:table-row>
          <table:table-cell table:style-name="0">
            <text:p text:style-name="s1_center_fi0"><text:bookmark text:name="anchor2180"/>180.</text:p>
          </table:table-cell>
          <table:table-cell table:style-name="0">
            <text:p text:style-name="s16_fi0">Кисти художественные, кисточки для письма</text:p>
          </table:table-cell>
          <table:table-cell table:style-name="0">
            <text:p text:style-name="s1_center_fi0"><text:a xlink:type="simple" xlink:href="http://ivo.garant.ru/document/redirect/70650730/329112140">32.91.12.140</text:a></text:p>
          </table:table-cell>
        </table:table-row>
        <table:table-row>
          <table:table-cell table:style-name="0">
            <text:p text:style-name="s1_center_fi0"><text:bookmark text:name="anchor2181"/>181.</text:p>
          </table:table-cell>
          <table:table-cell table:style-name="0">
            <text:p text:style-name="s16_fi0">Средства индивидуальной защиты прочие, не включенные в другие группировки</text:p>
          </table:table-cell>
          <table:table-cell table:style-name="0">
            <text:p text:style-name="s1_center_fi0"><text:a xlink:type="simple" xlink:href="http://ivo.garant.ru/document/redirect/70650730/329911199">32.99.11.199</text:a></text:p>
          </table:table-cell>
        </table:table-row>
        <table:table-row>
          <table:table-cell table:style-name="0">
            <text:p text:style-name="s1_center_fi0"><text:bookmark text:name="anchor2182"/>182.</text:p>
          </table:table-cell>
          <table:table-cell table:style-name="0">
            <text:p text:style-name="s16_fi0">Мелки для письма и рисования, мелки для портных</text:p>
          </table:table-cell>
          <table:table-cell table:style-name="0">
            <text:p text:style-name="s1_center_fi0"><text:a xlink:type="simple" xlink:href="http://ivo.garant.ru/document/redirect/70650730/329915140">32.99.15.140</text:a></text:p>
          </table:table-cell>
        </table:table-row>
        <table:table-row>
          <table:table-cell table:style-name="0">
            <text:p text:style-name="s1_center_fi0"><text:bookmark text:name="anchor2183"/>183.</text:p>
          </table:table-cell>
          <table:table-cell table:style-name="0">
            <text:p text:style-name="s16_fi0">Доски грифельные</text:p>
          </table:table-cell>
          <table:table-cell table:style-name="0">
            <text:p text:style-name="s1_center_fi0"><text:a xlink:type="simple" xlink:href="http://ivo.garant.ru/document/redirect/70650730/329916110">32.99.16.110</text:a></text:p>
          </table:table-cell>
        </table:table-row>
        <table:table-row>
          <table:table-cell table:style-name="0">
            <text:p text:style-name="s1_center_fi0"><text:bookmark text:name="anchor2184"/>184.</text:p>
          </table:table-cell>
          <table:table-cell table:style-name="0">
            <text:p text:style-name="s16_fi0">Оборудование для обучения трудовым процессам</text:p>
          </table:table-cell>
          <table:table-cell table:style-name="0">
            <text:p text:style-name="s1_center_fi0"><text:a xlink:type="simple" xlink:href="http://ivo.garant.ru/document/redirect/70650730/329953110">32.99.53.110</text:a></text:p>
          </table:table-cell>
        </table:table-row>
        <table:table-row>
          <table:table-cell table:style-name="0">
            <text:p text:style-name="s1_center_fi0"><text:bookmark text:name="anchor2185"/>185.</text:p>
          </table:table-cell>
          <table:table-cell table:style-name="0">
            <text:p text:style-name="s16_fi0">Тренажеры для профессионального обучения</text:p>
          </table:table-cell>
          <table:table-cell table:style-name="0">
            <text:p text:style-name="s1_center_fi0"><text:a xlink:type="simple" xlink:href="http://ivo.garant.ru/document/redirect/70650730/329953120">32.99.53.120</text:a></text:p>
          </table:table-cell>
        </table:table-row>
        <table:table-row>
          <table:table-cell table:style-name="0">
            <text:p text:style-name="s1_center_fi0"><text:bookmark text:name="anchor2186"/>186.</text:p>
          </table:table-cell>
          <table:table-cell table:style-name="0">
            <text:p text:style-name="s16_fi0">Приборы, аппаратура и устройства учебные демонстрационные</text:p>
          </table:table-cell>
          <table:table-cell table:style-name="0">
            <text:p text:style-name="s1_center_fi0"><text:a xlink:type="simple" xlink:href="http://ivo.garant.ru/document/redirect/70650730/329953130">32.99.53.130</text:a></text:p>
          </table:table-cell>
        </table:table-row>
        <table:table-row>
          <table:table-cell table:style-name="0">
            <text:p text:style-name="s1_center_fi0"><text:bookmark text:name="anchor2187"/>187.</text:p>
          </table:table-cell>
          <table:table-cell table:style-name="0">
            <text:p text:style-name="s16_fi0">Модели, макеты и аналогичные изделия демонстрационные прочие</text:p>
          </table:table-cell>
          <table:table-cell table:style-name="0">
            <text:p text:style-name="s1_center_fi0"><text:a xlink:type="simple" xlink:href="http://ivo.garant.ru/document/redirect/70650730/7166">32.99.53.190</text:a></text:p>
          </table:table-cell>
        </table:table-row>
        <table:table-row>
          <table:table-cell table:style-name="0">
            <text:p text:style-name="s1_center_fi0"><text:bookmark text:name="anchor2188"/>188.</text:p>
          </table:table-cell>
          <table:table-cell table:style-name="0">
            <text:p text:style-name="s16_fi0">Площадки спортивные для спортивных игр на открытом воздухе</text:p>
          </table:table-cell>
          <table:table-cell table:style-name="0">
            <text:p text:style-name="s1_center_fi0"><text:a xlink:type="simple" xlink:href="http://ivo.garant.ru/document/redirect/70650730/429912110">42.99.12.110</text:a></text:p>
          </table:table-cell>
        </table:table-row>
        <table:table-row>
          <table:table-cell table:style-name="0">
            <text:p text:style-name="s1_center_fi0"><text:bookmark text:name="anchor2189"/>189.</text:p>
          </table:table-cell>
          <table:table-cell table:style-name="0">
            <text:p text:style-name="s16_fi0">Коляски инвалидные, кроме частей и принадлежностей</text:p>
          </table:table-cell>
          <table:table-cell table:style-name="0">
            <text:p text:style-name="s1_center_fi0"><text:a xlink:type="simple" xlink:href="http://ivo.garant.ru/document/redirect/70650730/30922">30.92.2</text:a></text:p>
          </table:table-cell>
        </table:table-row>
        <table:table-row>
          <table:table-cell table:style-name="0">
            <text:p text:style-name="s1_center_fi0"><text:bookmark text:name="anchor2190"/>190.</text:p>
          </table:table-cell>
          <table:table-cell table:style-name="0">
            <text:p text:style-name="s16_fi0">Аккумуляторы свинцовые, кроме используемых для запуска поршневых двигателей</text:p>
          </table:table-cell>
          <table:table-cell table:style-name="0">
            <text:p text:style-name="s1_center_fi0"><text:a xlink:type="simple" xlink:href="http://ivo.garant.ru/document/redirect/70650730/272022">27.20.22</text:a></text:p>
          </table:table-cell>
        </table:table-row>
        <table:table-row>
          <table:table-cell table:style-name="0">
            <text:p text:style-name="s1_center_fi0"><text:bookmark text:name="anchor2191"/>191.</text:p>
          </table:table-cell>
          <table:table-cell table:style-name="0">
            <text:p text:style-name="s16_fi0">Лампы и трубки электронные вакуумные или газонаполненные с термокатодом, холодным катодом, фотокатодом, включая трубки электронно-лучевые</text:p>
          </table:table-cell>
          <table:table-cell table:style-name="0">
            <text:p text:style-name="s1_center_fi0"><text:a xlink:type="simple" xlink:href="http://ivo.garant.ru/document/redirect/70650730/5487">26.11.1</text:a></text:p>
          </table:table-cell>
        </table:table-row>
        <table:table-row>
          <table:table-cell table:style-name="0">
            <text:p text:style-name="s1_center_fi0"><text:bookmark text:name="anchor2192"/>192.</text:p>
          </table:table-cell>
          <table:table-cell table:style-name="0">
            <text:p text:style-name="s16_fi0">Диоды и транзисторы</text:p>
          </table:table-cell>
          <table:table-cell table:style-name="0">
            <text:p text:style-name="s1_center_fi0"><text:a xlink:type="simple" xlink:href="http://ivo.garant.ru/document/redirect/70650730/26112">26.11.2</text:a></text:p>
          </table:table-cell>
        </table:table-row>
        <table:table-row>
          <table:table-cell table:style-name="0">
            <text:p text:style-name="s1_center_fi0"><text:bookmark text:name="anchor2193"/>193.</text:p>
          </table:table-cell>
          <table:table-cell table:style-name="0">
            <text:p text:style-name="s16_fi0">Платы печатные смонтированные</text:p>
          </table:table-cell>
          <table:table-cell table:style-name="0">
            <text:p text:style-name="s1_center_fi0"><text:a xlink:type="simple" xlink:href="http://ivo.garant.ru/document/redirect/70650730/26121">26.12.1</text:a></text:p>
          </table:table-cell>
        </table:table-row>
        <table:table-row>
          <table:table-cell table:style-name="0">
            <text:p text:style-name="s1_center_fi0"><text:bookmark text:name="anchor2194"/>194.</text:p>
          </table:table-cell>
          <table:table-cell table:style-name="0">
            <text:p text:style-name="s16_fi0">Платы звуковые, видеоплаты, сетевые и аналогичные платы для машин автоматической обработки информации</text:p>
          </table:table-cell>
          <table:table-cell table:style-name="0">
            <text:p text:style-name="s1_center_fi0"><text:a xlink:type="simple" xlink:href="http://ivo.garant.ru/document/redirect/70650730/5500">26.12.2</text:a></text:p>
          </table:table-cell>
        </table:table-row>
        <table:table-row>
          <table:table-cell table:style-name="0">
            <text:p text:style-name="s1_center_fi0"><text:bookmark text:name="anchor2195"/>195.</text:p>
          </table:table-cell>
          <table:table-cell table:style-name="0">
            <text:p text:style-name="s16_fi0">Компьютеры портативные массой не более 10 кг, такие как ноутбуки, планшетные компьютеры, карманные компьютеры, в том числе совмещающие функции мобильного телефонного аппарата, электронные записные книжки и аналогичная компьютерная техника</text:p>
          </table:table-cell>
          <table:table-cell table:style-name="0">
            <text:p text:style-name="s1_center_fi0"><text:a xlink:type="simple" xlink:href="http://ivo.garant.ru/document/redirect/70650730/262011">26.20.11</text:a></text:p>
          </table:table-cell>
        </table:table-row>
        <table:table-row>
          <table:table-cell table:style-name="0">
            <text:p text:style-name="s1_center_fi0"><text:bookmark text:name="anchor2196"/>196.</text:p>
          </table:table-cell>
          <table:table-cell table:style-name="0">
            <text:p text:style-name="s16_fi0">Терминалы кассовые, банкоматы и аналогичное оборудование, подключаемое к компьютеру или сети передачи данных</text:p>
          </table:table-cell>
          <table:table-cell table:style-name="0">
            <text:p text:style-name="s1_center_fi0"><text:a xlink:type="simple" xlink:href="http://ivo.garant.ru/document/redirect/70650730/26212">26.20.12</text:a></text:p>
          </table:table-cell>
        </table:table-row>
        <table:table-row>
          <table:table-cell table:style-name="0">
            <text:p text:style-name="s1_center_fi0"><text:bookmark text:name="anchor2197"/>197.</text:p>
          </table:table-cell>
          <table:table-cell table:style-name="0">
            <text:p text:style-name="s16_fi0">Машины вычислительные электронные цифровые, содержащие в одном корпусе центральный процессор и устройство ввода и вывода, объединенные или нет для автоматической обработки данных</text:p>
          </table:table-cell>
          <table:table-cell table:style-name="0">
            <text:p text:style-name="s1_center_fi0"><text:a xlink:type="simple" xlink:href="http://ivo.garant.ru/document/redirect/70650730/262013">26.20.13</text:a></text:p>
          </table:table-cell>
        </table:table-row>
        <table:table-row>
          <table:table-cell table:style-name="0">
            <text:p text:style-name="s1_center_fi0"><text:bookmark text:name="anchor2198"/>198.</text:p>
          </table:table-cell>
          <table:table-cell table:style-name="0">
            <text:p text:style-name="s16_fi0">Машины вычислительные электронные цифровые, поставляемые в виде систем для автоматической обработки данных</text:p>
          </table:table-cell>
          <table:table-cell table:style-name="0">
            <text:p text:style-name="s1_center_fi0"><text:a xlink:type="simple" xlink:href="http://ivo.garant.ru/document/redirect/70650730/262014">26.20.14</text:a></text:p>
          </table:table-cell>
        </table:table-row>
        <table:table-row>
          <table:table-cell table:style-name="0">
            <text:p text:style-name="s1_center_fi0"><text:bookmark text:name="anchor2199"/>199.</text:p>
          </table:table-cell>
          <table:table-cell table:style-name="0">
            <text:p text:style-name="s16_fi0">Машины вычислительные электронные цифровые прочие, содержащие или не содержащие в одном корпусе одно или два из следующих устройств для автоматической обработки данных: запоминающие устройства, устройства ввода, устройства вывода</text:p>
          </table:table-cell>
          <table:table-cell table:style-name="0">
            <text:p text:style-name="s1_center_fi0"><text:a xlink:type="simple" xlink:href="http://ivo.garant.ru/document/redirect/70650730/262015">26.20.15</text:a></text:p>
          </table:table-cell>
        </table:table-row>
        <table:table-row>
          <table:table-cell table:style-name="0">
            <text:p text:style-name="s1_center_fi0"><text:bookmark text:name="anchor2200"/>200.</text:p>
          </table:table-cell>
          <table:table-cell table:style-name="0">
            <text:p text:style-name="s16_fi0">Устройства ввода или вывода, содержащие или не содержащие в одном корпусе запоминающие устройства</text:p>
          </table:table-cell>
          <table:table-cell table:style-name="0">
            <text:p text:style-name="s1_center_fi0"><text:a xlink:type="simple" xlink:href="http://ivo.garant.ru/document/redirect/70650730/262016">26.20.16</text:a></text:p>
          </table:table-cell>
        </table:table-row>
        <table:table-row>
          <table:table-cell table:style-name="0">
            <text:p text:style-name="s1_center_fi0"><text:bookmark text:name="anchor2201"/>201.</text:p>
          </table:table-cell>
          <table:table-cell table:style-name="0">
            <text:p text:style-name="s16_fi0">Мониторы и проекторы, преимущественно используемые в системах автоматической обработки данных</text:p>
          </table:table-cell>
          <table:table-cell table:style-name="0">
            <text:p text:style-name="s1_center_fi0"><text:a xlink:type="simple" xlink:href="http://ivo.garant.ru/document/redirect/70650730/262017">26.20.17</text:a></text:p>
          </table:table-cell>
        </table:table-row>
        <table:table-row>
          <table:table-cell table:style-name="0">
            <text:p text:style-name="s1_center_fi0"><text:bookmark text:name="anchor2202"/>202.</text:p>
          </table:table-cell>
          <table:table-cell table:style-name="0">
            <text:p text:style-name="s16_fi0">Устройства периферийные с двумя или более функциями: печать данных, копирование, сканирование, прием и передача факсимильных сообщений</text:p>
          </table:table-cell>
          <table:table-cell table:style-name="0">
            <text:p text:style-name="s1_center_fi0"><text:a xlink:type="simple" xlink:href="http://ivo.garant.ru/document/redirect/70650730/262018">26.20.18</text:a></text:p>
          </table:table-cell>
        </table:table-row>
        <table:table-row>
          <table:table-cell table:style-name="0">
            <text:p text:style-name="s1_center_fi0"><text:bookmark text:name="anchor2203"/>203.</text:p>
          </table:table-cell>
          <table:table-cell table:style-name="0">
            <text:p text:style-name="s16_fi0">Устройства запоминающие и прочие устройства хранения данных</text:p>
          </table:table-cell>
          <table:table-cell table:style-name="0">
            <text:p text:style-name="s1_center_fi0"><text:a xlink:type="simple" xlink:href="http://ivo.garant.ru/document/redirect/70650730/26202">26.20.2</text:a></text:p>
          </table:table-cell>
        </table:table-row>
        <table:table-row>
          <table:table-cell table:style-name="0">
            <text:p text:style-name="s1_center_fi0"><text:bookmark text:name="anchor2204"/>204.</text:p>
          </table:table-cell>
          <table:table-cell table:style-name="0">
            <text:p text:style-name="s16_fi0">Устройства автоматической обработки данных прочие</text:p>
          </table:table-cell>
          <table:table-cell table:style-name="0">
            <text:p text:style-name="s1_center_fi0"><text:a xlink:type="simple" xlink:href="http://ivo.garant.ru/document/redirect/70650730/26203">26.20.3</text:a></text:p>
          </table:table-cell>
        </table:table-row>
        <table:table-row>
          <table:table-cell table:style-name="0">
            <text:p text:style-name="s1_center_fi0"><text:bookmark text:name="anchor2205"/>205.</text:p>
          </table:table-cell>
          <table:table-cell table:style-name="0">
            <text:p text:style-name="s16_fi0">Блоки, части и принадлежности вычислительных машин, за исключением устройств числового программного управления, соответствующих коду <text:a xlink:type="simple" xlink:href="http://ivo.garant.ru/document/redirect/70650730/262040150">26.20.40.150</text:a> по Общероссийскому классификатору продукции по видам экономической деятельности ОК 034-2014 (КПЕС 2008)</text:p>
          </table:table-cell>
          <table:table-cell table:style-name="0">
            <text:p text:style-name="s1_center_fi0"><text:a xlink:type="simple" xlink:href="http://ivo.garant.ru/document/redirect/70650730/26204">26.20.4</text:a></text:p>
          </table:table-cell>
        </table:table-row>
        <table:table-row>
          <table:table-cell table:style-name="0">
            <text:p text:style-name="s1_center_fi0"><text:bookmark text:name="anchor2206"/>206.</text:p>
          </table:table-cell>
          <table:table-cell table:style-name="0">
            <text:p text:style-name="s16_fi0">Средства связи, выполняющие функцию систем коммутации</text:p>
          </table:table-cell>
          <table:table-cell table:style-name="0">
            <text:p text:style-name="s1_center_fi0"><text:a xlink:type="simple" xlink:href="http://ivo.garant.ru/document/redirect/70650730/263011110">26.30.11.110</text:a></text:p>
          </table:table-cell>
        </table:table-row>
        <table:table-row>
          <table:table-cell table:style-name="0">
            <text:p text:style-name="s1_center_fi0"><text:bookmark text:name="anchor2207"/>207.</text:p>
          </table:table-cell>
          <table:table-cell table:style-name="0">
            <text:p text:style-name="s16_fi0">Средства связи, выполняющие функцию цифровых транспортных систем</text:p>
          </table:table-cell>
          <table:table-cell table:style-name="0">
            <text:p text:style-name="s1_center_fi0"><text:a xlink:type="simple" xlink:href="http://ivo.garant.ru/document/redirect/70650730/263011120">26.30.11.120</text:a></text:p>
          </table:table-cell>
        </table:table-row>
        <table:table-row>
          <table:table-cell table:style-name="0">
            <text:p text:style-name="s1_center_fi0"><text:bookmark text:name="anchor2208"/>208.</text:p>
          </table:table-cell>
          <table:table-cell table:style-name="0">
            <text:p text:style-name="s16_fi0">Средства связи, выполняющие функцию систем управления и мониторинга</text:p>
          </table:table-cell>
          <table:table-cell table:style-name="0">
            <text:p text:style-name="s1_center_fi0"><text:a xlink:type="simple" xlink:href="http://ivo.garant.ru/document/redirect/70650730/263011">26.30.11.130</text:a></text:p>
          </table:table-cell>
        </table:table-row>
        <table:table-row>
          <table:table-cell table:style-name="0">
            <text:p text:style-name="s1_center_fi0"><text:bookmark text:name="anchor2209"/>209.</text:p>
          </table:table-cell>
          <table:table-cell table:style-name="0">
            <text:p text:style-name="s16_fi0">Средства связи радиоэлектронные</text:p>
          </table:table-cell>
          <table:table-cell table:style-name="0">
            <text:p text:style-name="s1_center_fi0"><text:a xlink:type="simple" xlink:href="http://ivo.garant.ru/document/redirect/70650730/263011150">26.30.11.150</text:a></text:p>
          </table:table-cell>
        </table:table-row>
        <table:table-row>
          <table:table-cell table:style-name="0">
            <text:p text:style-name="s1_center_fi0"><text:bookmark text:name="anchor2210"/>210.</text:p>
          </table:table-cell>
          <table:table-cell table:style-name="0">
            <text:p text:style-name="s16_fi0">Аппаратура коммуникационная передающая с приемными устройствами прочая, не включенная в другие группировки</text:p>
          </table:table-cell>
          <table:table-cell table:style-name="0">
            <text:p text:style-name="s1_center_fi0"><text:a xlink:type="simple" xlink:href="http://ivo.garant.ru/document/redirect/70650730/263011190">26.30.11.190</text:a></text:p>
          </table:table-cell>
        </table:table-row>
        <table:table-row>
          <table:table-cell table:style-name="0">
            <text:p text:style-name="s1_center_fi0"><text:bookmark text:name="anchor2211"/>211.</text:p>
          </table:table-cell>
          <table:table-cell table:style-name="0">
            <text:p text:style-name="s16_fi0">Камеры телевизионные</text:p>
          </table:table-cell>
          <table:table-cell table:style-name="0">
            <text:p text:style-name="s1_center_fi0"><text:a xlink:type="simple" xlink:href="http://ivo.garant.ru/document/redirect/70650730/2630130">26.30.13</text:a></text:p>
          </table:table-cell>
        </table:table-row>
        <table:table-row>
          <table:table-cell table:style-name="0">
            <text:p text:style-name="s1_center_fi0"><text:bookmark text:name="anchor2212"/>212.</text:p>
          </table:table-cell>
          <table:table-cell table:style-name="0">
            <text:p text:style-name="s16_fi0">Аппараты телефонные для сотовых сетей связи (ПРТС), включая смартфоны</text:p>
          </table:table-cell>
          <table:table-cell table:style-name="0">
            <text:p text:style-name="s1_center_fi0"><text:a xlink:type="simple" xlink:href="http://ivo.garant.ru/document/redirect/70650730/263022">26.30.22</text:a></text:p>
          </table:table-cell>
        </table:table-row>
        <table:table-row>
          <table:table-cell table:style-name="0">
            <text:p text:style-name="s1_center_fi0"><text:bookmark text:name="anchor2213"/>213.</text:p>
          </table:table-cell>
          <table:table-cell table:style-name="0">
            <text:p text:style-name="s16_fi0">Аппараты телефонные прочие, устройства и аппаратура для передачи и приема речи, изображений или других данных, включая оборудование коммуникационное для работы в проводных или беспроводных сетях связи (например, локальных и глобальных сетях)</text:p>
          </table:table-cell>
          <table:table-cell table:style-name="0">
            <text:p text:style-name="s1_center_fi0"><text:a xlink:type="simple" xlink:href="http://ivo.garant.ru/document/redirect/70650730/263023">26.30.23</text:a></text:p>
          </table:table-cell>
        </table:table-row>
        <table:table-row>
          <table:table-cell table:style-name="0">
            <text:p text:style-name="s1_center_fi0"><text:bookmark text:name="anchor2214"/>214.</text:p>
          </table:table-cell>
          <table:table-cell table:style-name="0">
            <text:p text:style-name="s16_fi0">Части и комплектующие коммуникационного оборудования</text:p>
          </table:table-cell>
          <table:table-cell table:style-name="0">
            <text:p text:style-name="s1_center_fi0"><text:a xlink:type="simple" xlink:href="http://ivo.garant.ru/document/redirect/70650730/5514">26.30.30</text:a></text:p>
          </table:table-cell>
        </table:table-row>
        <table:table-row>
          <table:table-cell table:style-name="0">
            <text:p text:style-name="s1_center_fi0"><text:bookmark text:name="anchor2215"/>215.</text:p>
          </table:table-cell>
          <table:table-cell table:style-name="0">
            <text:p text:style-name="s16_fi0">Антенны и отражатели антенные всех видов и их части</text:p>
          </table:table-cell>
          <table:table-cell table:style-name="0">
            <text:p text:style-name="s1_center_fi0"><text:a xlink:type="simple" xlink:href="http://ivo.garant.ru/document/redirect/70650730/263040110">26.30.40.110</text:a></text:p>
          </table:table-cell>
        </table:table-row>
        <table:table-row>
          <table:table-cell table:style-name="0">
            <text:p text:style-name="s1_center_fi0"><text:bookmark text:name="anchor2216"/>216.</text:p>
          </table:table-cell>
          <table:table-cell table:style-name="0">
            <text:p text:style-name="s16_fi0">Приборы и аппаратура для систем охранной сигнализации</text:p>
          </table:table-cell>
          <table:table-cell table:style-name="0">
            <text:p text:style-name="s1_center_fi0"><text:a xlink:type="simple" xlink:href="http://ivo.garant.ru/document/redirect/70650730/263050110">26.30.50.110</text:a></text:p>
          </table:table-cell>
        </table:table-row>
        <table:table-row>
          <table:table-cell table:style-name="0">
            <text:p text:style-name="s1_center_fi0"><text:bookmark text:name="anchor2217"/>217.</text:p>
          </table:table-cell>
          <table:table-cell table:style-name="0">
            <text:p text:style-name="s16_fi0">Извещатели охранные и охранно-пожарные</text:p>
          </table:table-cell>
          <table:table-cell table:style-name="0">
            <text:p text:style-name="s1_center_fi0"><text:a xlink:type="simple" xlink:href="http://ivo.garant.ru/document/redirect/70650730/5517">26.30.50.111</text:a></text:p>
          </table:table-cell>
        </table:table-row>
        <table:table-row>
          <table:table-cell table:style-name="0">
            <text:p text:style-name="s1_center_fi0"><text:bookmark text:name="anchor2218"/>218.</text:p>
          </table:table-cell>
          <table:table-cell table:style-name="0">
            <text:p text:style-name="s16_fi0">Устройства приемно-контрольные охранные и охранно-пожарные</text:p>
          </table:table-cell>
          <table:table-cell table:style-name="0">
            <text:p text:style-name="s1_center_fi0"><text:a xlink:type="simple" xlink:href="http://ivo.garant.ru/document/redirect/70650730/263050112">26.30.50.112</text:a></text:p>
          </table:table-cell>
        </table:table-row>
        <table:table-row>
          <table:table-cell table:style-name="0">
            <text:p text:style-name="s1_center_fi0"><text:bookmark text:name="anchor2219"/>219.</text:p>
          </table:table-cell>
          <table:table-cell table:style-name="0">
            <text:p text:style-name="s16_fi0">Устройства сигнально-пусковые охранные и охранно-пожарные</text:p>
          </table:table-cell>
          <table:table-cell table:style-name="0">
            <text:p text:style-name="s1_center_fi0"><text:a xlink:type="simple" xlink:href="http://ivo.garant.ru/document/redirect/70650730/5518">26.30.50.113</text:a></text:p>
          </table:table-cell>
        </table:table-row>
        <table:table-row>
          <table:table-cell table:style-name="0">
            <text:p text:style-name="s1_center_fi0"><text:bookmark text:name="anchor2220"/>220.</text:p>
          </table:table-cell>
          <table:table-cell table:style-name="0">
            <text:p text:style-name="s16_fi0">Приборы управления, приемно-контрольные и оповещатели охранные и охранно-пожарные</text:p>
          </table:table-cell>
          <table:table-cell table:style-name="0">
            <text:p text:style-name="s1_center_fi0"><text:a xlink:type="simple" xlink:href="http://ivo.garant.ru/document/redirect/70650730/5519">26.30.50.114</text:a></text:p>
          </table:table-cell>
        </table:table-row>
        <table:table-row>
          <table:table-cell table:style-name="0">
            <text:p text:style-name="s1_center_fi0"><text:bookmark text:name="anchor2221"/>221.</text:p>
          </table:table-cell>
          <table:table-cell table:style-name="0">
            <text:p text:style-name="s16_fi0">Системы тревожной сигнализации, противоугонные и охранные устройства для транспортных средств</text:p>
          </table:table-cell>
          <table:table-cell table:style-name="0">
            <text:p text:style-name="s1_center_fi0"><text:a xlink:type="simple" xlink:href="http://ivo.garant.ru/document/redirect/70650730/263050115">26.30.50.115</text:a></text:p>
          </table:table-cell>
        </table:table-row>
        <table:table-row>
          <table:table-cell table:style-name="0">
            <text:p text:style-name="s1_center_fi0"><text:bookmark text:name="anchor2222"/>222.</text:p>
          </table:table-cell>
          <table:table-cell table:style-name="0">
            <text:p text:style-name="s16_fi0">Приборы и аппаратура для систем охранной сигнализации прочие, не включенные в другие группировки</text:p>
          </table:table-cell>
          <table:table-cell table:style-name="0">
            <text:p text:style-name="s1_center_fi0"><text:a xlink:type="simple" xlink:href="http://ivo.garant.ru/document/redirect/70650730/5521">26.30.50.119</text:a></text:p>
          </table:table-cell>
        </table:table-row>
        <table:table-row>
          <table:table-cell table:style-name="0">
            <text:p text:style-name="s1_center_fi0"><text:bookmark text:name="anchor2223"/>223.</text:p>
          </table:table-cell>
          <table:table-cell table:style-name="0">
            <text:p text:style-name="s16_fi0">Приборы и аппаратура для систем автоматического пожаротушения и пожарной сигнализации</text:p>
          </table:table-cell>
          <table:table-cell table:style-name="0">
            <text:p text:style-name="s1_center_fi0"><text:a xlink:type="simple" xlink:href="http://ivo.garant.ru/document/redirect/70650730/5522">26.30.50.120</text:a></text:p>
          </table:table-cell>
        </table:table-row>
        <table:table-row>
          <table:table-cell table:style-name="0">
            <text:p text:style-name="s1_center_fi0"><text:bookmark text:name="anchor2224"/>224.</text:p>
          </table:table-cell>
          <table:table-cell table:style-name="0">
            <text:p text:style-name="s16_fi0">Извещатели пожарные</text:p>
          </table:table-cell>
          <table:table-cell table:style-name="0">
            <text:p text:style-name="s1_center_fi0"><text:a xlink:type="simple" xlink:href="http://ivo.garant.ru/document/redirect/70650730/5523">26.30.50.121</text:a></text:p>
          </table:table-cell>
        </table:table-row>
        <table:table-row>
          <table:table-cell table:style-name="0">
            <text:p text:style-name="s1_center_fi0"><text:bookmark text:name="anchor2225"/>225.</text:p>
          </table:table-cell>
          <table:table-cell table:style-name="0">
            <text:p text:style-name="s16_fi0">Устройства сигнально-пусковые пожарные</text:p>
          </table:table-cell>
          <table:table-cell table:style-name="0">
            <text:p text:style-name="s1_center_fi0"><text:a xlink:type="simple" xlink:href="http://ivo.garant.ru/document/redirect/70650730/5524">26.30.50.122</text:a></text:p>
          </table:table-cell>
        </table:table-row>
        <table:table-row>
          <table:table-cell table:style-name="0">
            <text:p text:style-name="s1_center_fi0"><text:bookmark text:name="anchor2226"/>226.</text:p>
          </table:table-cell>
          <table:table-cell table:style-name="0">
            <text:p text:style-name="s16_fi0">Станции пожарной сигнализации, приборы управления и оповещатели пожарные</text:p>
          </table:table-cell>
          <table:table-cell table:style-name="0">
            <text:p text:style-name="s1_center_fi0"><text:a xlink:type="simple" xlink:href="http://ivo.garant.ru/document/redirect/70650730/5525">26.30.50.123</text:a></text:p>
          </table:table-cell>
        </table:table-row>
        <table:table-row>
          <table:table-cell table:style-name="0">
            <text:p text:style-name="s1_center_fi0"><text:bookmark text:name="anchor2227"/>227.</text:p>
          </table:table-cell>
          <table:table-cell table:style-name="0">
            <text:p text:style-name="s16_fi0">Приборы и аппаратура для систем автоматического пожаротушения и пожарной сигнализации прочие, не включенные в другие группировки</text:p>
          </table:table-cell>
          <table:table-cell table:style-name="0">
            <text:p text:style-name="s1_center_fi0"><text:a xlink:type="simple" xlink:href="http://ivo.garant.ru/document/redirect/70650730/5526">26.30.50.129</text:a></text:p>
          </table:table-cell>
        </table:table-row>
        <table:table-row>
          <table:table-cell table:style-name="0">
            <text:p text:style-name="s1_center_fi0"><text:bookmark text:name="anchor2228"/>228.</text:p>
          </table:table-cell>
          <table:table-cell table:style-name="0">
            <text:p text:style-name="s16_fi0">Система сбора и обработки информации с каналом передачи проводным</text:p>
          </table:table-cell>
          <table:table-cell table:style-name="0">
            <text:p text:style-name="s1_center_fi0"><text:a xlink:type="simple" xlink:href="http://ivo.garant.ru/document/redirect/70650730/263050133">26.30.50.133</text:a></text:p>
          </table:table-cell>
        </table:table-row>
        <table:table-row>
          <table:table-cell table:style-name="0">
            <text:p text:style-name="s1_center_fi0"><text:bookmark text:name="anchor2229"/>229.</text:p>
          </table:table-cell>
          <table:table-cell table:style-name="0">
            <text:p text:style-name="s16_fi0">Средства обнаружения активные</text:p>
          </table:table-cell>
          <table:table-cell table:style-name="0">
            <text:p text:style-name="s1_center_fi0"><text:a xlink:type="simple" xlink:href="http://ivo.garant.ru/document/redirect/70650730/263050142">26.30.50.142</text:a></text:p>
          </table:table-cell>
        </table:table-row>
        <table:table-row>
          <table:table-cell table:style-name="0">
            <text:p text:style-name="s1_center_fi0"><text:bookmark text:name="anchor2230"/>230.</text:p>
          </table:table-cell>
          <table:table-cell table:style-name="0">
            <text:p text:style-name="s16_fi0">Средства обнаружения пассивные</text:p>
          </table:table-cell>
          <table:table-cell table:style-name="0">
            <text:p text:style-name="s1_center_fi0"><text:a xlink:type="simple" xlink:href="http://ivo.garant.ru/document/redirect/70650730/263050143">26.30.50.143</text:a></text:p>
          </table:table-cell>
        </table:table-row>
        <table:table-row>
          <table:table-cell table:style-name="0">
            <text:p text:style-name="s1_center_fi0"><text:bookmark text:name="anchor2231"/>231.</text:p>
          </table:table-cell>
          <table:table-cell table:style-name="0">
            <text:p text:style-name="s16_fi0">Средства управления в системах физической защиты, применяемые в области использования атомной энергии</text:p>
          </table:table-cell>
          <table:table-cell table:style-name="0">
            <text:p text:style-name="s1_center_fi0"><text:a xlink:type="simple" xlink:href="http://ivo.garant.ru/document/redirect/70650730/263050150">26.30.50.150</text:a></text:p>
          </table:table-cell>
        </table:table-row>
        <table:table-row>
          <table:table-cell table:style-name="0">
            <text:p text:style-name="s1_center_fi0"><text:bookmark text:name="anchor2232"/>232.</text:p>
          </table:table-cell>
          <table:table-cell table:style-name="0">
            <text:p text:style-name="s16_fi0">Средства управления запирающие специальные без дистанционного контроля и управления</text:p>
          </table:table-cell>
          <table:table-cell table:style-name="0">
            <text:p text:style-name="s1_center_fi0"><text:a xlink:type="simple" xlink:href="http://ivo.garant.ru/document/redirect/70650730/263050153">26.30.50.153</text:a></text:p>
          </table:table-cell>
        </table:table-row>
        <table:table-row>
          <table:table-cell table:style-name="0">
            <text:p text:style-name="s1_center_fi0"><text:bookmark text:name="anchor2233"/>233.</text:p>
          </table:table-cell>
          <table:table-cell table:style-name="0">
            <text:p text:style-name="s16_fi0">Части устройств охранной или пожарной сигнализации и аналогичной аппаратуры</text:p>
          </table:table-cell>
          <table:table-cell table:style-name="0">
            <text:p text:style-name="s1_center_fi0"><text:a xlink:type="simple" xlink:href="http://ivo.garant.ru/document/redirect/70650730/5527">26.30.60</text:a></text:p>
          </table:table-cell>
        </table:table-row>
        <table:table-row>
          <table:table-cell table:style-name="0">
            <text:p text:style-name="s1_center_fi0"><text:bookmark text:name="anchor2234"/>234.</text:p>
          </table:table-cell>
          <table:table-cell table:style-name="0">
            <text:p text:style-name="s16_fi0">Радиоприемники широковещательные</text:p>
          </table:table-cell>
          <table:table-cell table:style-name="0">
            <text:p text:style-name="s1_center_fi0"><text:a xlink:type="simple" xlink:href="http://ivo.garant.ru/document/redirect/70650730/5529">26.40.1</text:a></text:p>
          </table:table-cell>
        </table:table-row>
        <table:table-row>
          <table:table-cell table:style-name="0">
            <text:p text:style-name="s1_center_fi0"><text:bookmark text:name="anchor2235"/>235.</text:p>
          </table:table-cell>
          <table:table-cell table:style-name="0">
            <text:p text:style-name="s16_fi0">Приемники телевизионные (телевизоры) цветного изображения с устройствами записи и воспроизведения звука и изображения</text:p>
          </table:table-cell>
          <table:table-cell table:style-name="0">
            <text:p text:style-name="s1_center_fi0"><text:a xlink:type="simple" xlink:href="http://ivo.garant.ru/document/redirect/70650730/264020110">26.40.20.110</text:a></text:p>
          </table:table-cell>
        </table:table-row>
        <table:table-row>
          <table:table-cell table:style-name="0">
            <text:p text:style-name="s1_center_fi0"><text:bookmark text:name="anchor2236"/>236.</text:p>
          </table:table-cell>
          <table:table-cell table:style-name="0">
            <text:p text:style-name="s16_fi0">Приемники телевизионные (телевизоры) цветного изображения без устройств записи и воспроизведения звука и изображения</text:p>
          </table:table-cell>
          <table:table-cell table:style-name="0">
            <text:p text:style-name="s1_center_fi0"><text:a xlink:type="simple" xlink:href="http://ivo.garant.ru/document/redirect/70650730/264020120">26.40.20.120</text:a></text:p>
          </table:table-cell>
        </table:table-row>
        <table:table-row>
          <table:table-cell table:style-name="0">
            <text:p text:style-name="s1_center_fi0"><text:bookmark text:name="anchor2237"/>237.</text:p>
          </table:table-cell>
          <table:table-cell table:style-name="0">
            <text:p text:style-name="s16_fi0">Аппаратура для воспроизведения звука прочая</text:p>
          </table:table-cell>
          <table:table-cell table:style-name="0">
            <text:p text:style-name="s1_center_fi0"><text:a xlink:type="simple" xlink:href="http://ivo.garant.ru/document/redirect/70650730/264031190">26.40.31.190</text:a></text:p>
          </table:table-cell>
        </table:table-row>
        <table:table-row>
          <table:table-cell table:style-name="0">
            <text:p text:style-name="s1_center_fi0"><text:bookmark text:name="anchor2238"/>238.</text:p>
          </table:table-cell>
          <table:table-cell table:style-name="0">
            <text:p text:style-name="s16_fi0">Аппаратура для записи звука прочая</text:p>
          </table:table-cell>
          <table:table-cell table:style-name="0">
            <text:p text:style-name="s1_center_fi0"><text:a xlink:type="simple" xlink:href="http://ivo.garant.ru/document/redirect/70650730/264032190">26.40.32.190</text:a></text:p>
          </table:table-cell>
        </table:table-row>
        <table:table-row>
          <table:table-cell table:style-name="0">
            <text:p text:style-name="s1_center_fi0"><text:bookmark text:name="anchor2239"/>239.</text:p>
          </table:table-cell>
          <table:table-cell table:style-name="0">
            <text:p text:style-name="s16_fi0">Видеокамеры для записи и прочая аппаратура для записи или воспроизведения изображения</text:p>
          </table:table-cell>
          <table:table-cell table:style-name="0">
            <text:p text:style-name="s1_center_fi0"><text:a xlink:type="simple" xlink:href="http://ivo.garant.ru/document/redirect/70650730/264033">26.40.33</text:a></text:p>
          </table:table-cell>
        </table:table-row>
        <table:table-row>
          <table:table-cell table:style-name="0">
            <text:p text:style-name="s1_center_fi0"><text:bookmark text:name="anchor2240"/>240.</text:p>
          </table:table-cell>
          <table:table-cell table:style-name="0">
            <text:p text:style-name="s16_fi0">Мониторы, не предназначенные специально для использования в качестве периферийного оборудования</text:p>
          </table:table-cell>
          <table:table-cell table:style-name="0">
            <text:p text:style-name="s1_center_fi0"><text:a xlink:type="simple" xlink:href="http://ivo.garant.ru/document/redirect/70650730/26403411">26.40.34.110</text:a></text:p>
          </table:table-cell>
        </table:table-row>
        <table:table-row>
          <table:table-cell table:style-name="0">
            <text:p text:style-name="s1_center_fi0"><text:bookmark text:name="anchor2241"/>241.</text:p>
          </table:table-cell>
          <table:table-cell table:style-name="0">
            <text:p text:style-name="s16_fi0">Микрофоны, громкоговорители, приемная аппаратура для радиотелефонной или радиотелеграфной связи</text:p>
          </table:table-cell>
          <table:table-cell table:style-name="0">
            <text:p text:style-name="s1_center_fi0"><text:a xlink:type="simple" xlink:href="http://ivo.garant.ru/document/redirect/70650730/26404">26.40.4</text:a></text:p>
          </table:table-cell>
        </table:table-row>
        <table:table-row>
          <table:table-cell table:style-name="0">
            <text:p text:style-name="s1_center_fi0"><text:bookmark text:name="anchor2242"/>242.</text:p>
          </table:table-cell>
          <table:table-cell table:style-name="0">
            <text:p text:style-name="s16_fi0">Части звукового и видеооборудования</text:p>
          </table:table-cell>
          <table:table-cell table:style-name="0">
            <text:p text:style-name="s1_center_fi0"><text:a xlink:type="simple" xlink:href="http://ivo.garant.ru/document/redirect/70650730/5538">26.40.5</text:a></text:p>
          </table:table-cell>
        </table:table-row>
        <table:table-row>
          <table:table-cell table:style-name="0">
            <text:p text:style-name="s1_center_fi0"><text:bookmark text:name="anchor2243"/>243.</text:p>
          </table:table-cell>
          <table:table-cell table:style-name="0">
            <text:p text:style-name="s16_fi0">Приборы и инструменты навигационные прочие</text:p>
          </table:table-cell>
          <table:table-cell table:style-name="0">
            <text:p text:style-name="s1_center_fi0"><text:a xlink:type="simple" xlink:href="http://ivo.garant.ru/document/redirect/70650730/5545">26.51.11.190</text:a></text:p>
          </table:table-cell>
        </table:table-row>
        <table:table-row>
          <table:table-cell table:style-name="0">
            <text:p text:style-name="s1_center_fi0"><text:bookmark text:name="anchor2244"/>244.</text:p>
          </table:table-cell>
          <table:table-cell table:style-name="0">
            <text:p text:style-name="s16_fi0">Дальномеры, теодолиты и тахиметры (тахеометры)</text:p>
          </table:table-cell>
          <table:table-cell table:style-name="0">
            <text:p text:style-name="s1_center_fi0"><text:a xlink:type="simple" xlink:href="http://ivo.garant.ru/document/redirect/70650730/26511211">26.51.12.110</text:a></text:p>
          </table:table-cell>
        </table:table-row>
        <table:table-row>
          <table:table-cell table:style-name="0">
            <text:p text:style-name="s1_center_fi0"><text:bookmark text:name="anchor2245"/>245.</text:p>
          </table:table-cell>
          <table:table-cell table:style-name="0">
            <text:p text:style-name="s16_fi0">Инструменты и приборы геодезические</text:p>
          </table:table-cell>
          <table:table-cell table:style-name="0">
            <text:p text:style-name="s1_center_fi0"><text:a xlink:type="simple" xlink:href="http://ivo.garant.ru/document/redirect/70650730/265112120">26.51.12.120</text:a></text:p>
          </table:table-cell>
        </table:table-row>
        <table:table-row>
          <table:table-cell table:style-name="0">
            <text:p text:style-name="s1_center_fi0"><text:bookmark text:name="anchor2246"/>246.</text:p>
          </table:table-cell>
          <table:table-cell table:style-name="0">
            <text:p text:style-name="s16_fi0">Инструменты и приборы гидрографические</text:p>
          </table:table-cell>
          <table:table-cell table:style-name="0">
            <text:p text:style-name="s1_center_fi0"><text:a xlink:type="simple" xlink:href="http://ivo.garant.ru/document/redirect/70650730/265112130">26.51.12.130</text:a></text:p>
          </table:table-cell>
        </table:table-row>
        <table:table-row>
          <table:table-cell table:style-name="0">
            <text:p text:style-name="s1_center_fi0"><text:bookmark text:name="anchor2247"/>247.</text:p>
          </table:table-cell>
          <table:table-cell table:style-name="0">
            <text:p text:style-name="s16_fi0">Инструменты и приборы прочие</text:p>
          </table:table-cell>
          <table:table-cell table:style-name="0">
            <text:p text:style-name="s1_center_fi0"><text:a xlink:type="simple" xlink:href="http://ivo.garant.ru/document/redirect/70650730/265112190">26.51.12.190</text:a></text:p>
          </table:table-cell>
        </table:table-row>
        <table:table-row>
          <table:table-cell table:style-name="0">
            <text:p text:style-name="s1_center_fi0"><text:bookmark text:name="anchor2248"/>248.</text:p>
          </table:table-cell>
          <table:table-cell table:style-name="0">
            <text:p text:style-name="s16_fi0">Аппаратура радиолокационная</text:p>
          </table:table-cell>
          <table:table-cell table:style-name="0">
            <text:p text:style-name="s1_center_fi0"><text:a xlink:type="simple" xlink:href="http://ivo.garant.ru/document/redirect/70650730/5547">26.51.20.110</text:a></text:p>
          </table:table-cell>
        </table:table-row>
        <table:table-row>
          <table:table-cell table:style-name="0">
            <text:p text:style-name="s1_center_fi0"><text:bookmark text:name="anchor2249"/>249.</text:p>
          </table:table-cell>
          <table:table-cell table:style-name="0">
            <text:p text:style-name="s16_fi0">Аппаратура радионавигационная для работы в системе спутниковой навигации ГЛОНАСС или ГЛОНАСС/GPS</text:p>
          </table:table-cell>
          <table:table-cell table:style-name="0">
            <text:p text:style-name="s1_center_fi0"><text:a xlink:type="simple" xlink:href="http://ivo.garant.ru/document/redirect/70650730/26512121">26.51.20.121</text:a></text:p>
          </table:table-cell>
        </table:table-row>
        <table:table-row>
          <table:table-cell table:style-name="0">
            <text:p text:style-name="s1_center_fi0"><text:bookmark text:name="anchor2250"/>250.</text:p>
          </table:table-cell>
          <table:table-cell table:style-name="0">
            <text:p text:style-name="s16_fi0">Аппаратура радионавигационная прочая</text:p>
          </table:table-cell>
          <table:table-cell table:style-name="0">
            <text:p text:style-name="s1_center_fi0"><text:a xlink:type="simple" xlink:href="http://ivo.garant.ru/document/redirect/70650730/5550">26.51.20.129</text:a></text:p>
          </table:table-cell>
        </table:table-row>
        <table:table-row>
          <table:table-cell table:style-name="0">
            <text:p text:style-name="s1_center_fi0"><text:bookmark text:name="anchor2251"/>251.</text:p>
          </table:table-cell>
          <table:table-cell table:style-name="0">
            <text:p text:style-name="s16_fi0">Радиоаппаратура дистанционного управления</text:p>
          </table:table-cell>
          <table:table-cell table:style-name="0">
            <text:p text:style-name="s1_center_fi0"><text:a xlink:type="simple" xlink:href="http://ivo.garant.ru/document/redirect/70650730/5551">26.51.20.130</text:a></text:p>
          </table:table-cell>
        </table:table-row>
        <table:table-row>
          <table:table-cell table:style-name="0">
            <text:p text:style-name="s1_center_fi0"><text:bookmark text:name="anchor2252"/>252.</text:p>
          </table:table-cell>
          <table:table-cell table:style-name="0">
            <text:p text:style-name="s16_fi0">Микрометры</text:p>
          </table:table-cell>
          <table:table-cell table:style-name="0">
            <text:p text:style-name="s1_center_fi0"><text:a xlink:type="simple" xlink:href="http://ivo.garant.ru/document/redirect/70650730/5559">26.51.33.131</text:a></text:p>
          </table:table-cell>
        </table:table-row>
        <table:table-row>
          <table:table-cell table:style-name="0">
            <text:p text:style-name="s1_center_fi0"><text:bookmark text:name="anchor2253"/>253.</text:p>
          </table:table-cell>
          <table:table-cell table:style-name="0">
            <text:p text:style-name="s16_fi0">Глубиномеры микрометрические</text:p>
          </table:table-cell>
          <table:table-cell table:style-name="0">
            <text:p text:style-name="s1_center_fi0"><text:a xlink:type="simple" xlink:href="http://ivo.garant.ru/document/redirect/70650730/5561">26.51.33.133</text:a></text:p>
          </table:table-cell>
        </table:table-row>
        <table:table-row>
          <table:table-cell table:style-name="0">
            <text:p text:style-name="s1_center_fi0"><text:bookmark text:name="anchor2254"/>254.</text:p>
          </table:table-cell>
          <table:table-cell table:style-name="0">
            <text:p text:style-name="s16_fi0">Нутромеры микрометрические</text:p>
          </table:table-cell>
          <table:table-cell table:style-name="0">
            <text:p text:style-name="s1_center_fi0"><text:a xlink:type="simple" xlink:href="http://ivo.garant.ru/document/redirect/70650730/5562">26.51.33.134</text:a></text:p>
          </table:table-cell>
        </table:table-row>
        <table:table-row>
          <table:table-cell table:style-name="0">
            <text:p text:style-name="s1_center_fi0"><text:bookmark text:name="anchor2255"/>255.</text:p>
          </table:table-cell>
          <table:table-cell table:style-name="0">
            <text:p text:style-name="s16_fi0">Приборы, установки, системы дозиметрические</text:p>
          </table:table-cell>
          <table:table-cell table:style-name="0">
            <text:p text:style-name="s1_center_fi0"><text:a xlink:type="simple" xlink:href="http://ivo.garant.ru/document/redirect/70650730/5573">26.51.41.110</text:a></text:p>
          </table:table-cell>
        </table:table-row>
        <table:table-row>
          <table:table-cell table:style-name="0">
            <text:p text:style-name="s1_center_fi0"><text:bookmark text:name="anchor2256"/>256.</text:p>
          </table:table-cell>
          <table:table-cell table:style-name="0">
            <text:p text:style-name="s16_fi0">Приборы, установки, системы радиометрические</text:p>
          </table:table-cell>
          <table:table-cell table:style-name="0">
            <text:p text:style-name="s1_center_fi0"><text:a xlink:type="simple" xlink:href="http://ivo.garant.ru/document/redirect/70650730/5574">26.51.41.120</text:a></text:p>
          </table:table-cell>
        </table:table-row>
        <table:table-row>
          <table:table-cell table:style-name="0">
            <text:p text:style-name="s1_center_fi0"><text:bookmark text:name="anchor2257"/>257.</text:p>
          </table:table-cell>
          <table:table-cell table:style-name="0">
            <text:p text:style-name="s16_fi0">Приборы, установки, системы спектрометрические</text:p>
          </table:table-cell>
          <table:table-cell table:style-name="0">
            <text:p text:style-name="s1_center_fi0"><text:a xlink:type="simple" xlink:href="http://ivo.garant.ru/document/redirect/70650730/265141130">26.51.41.130</text:a></text:p>
          </table:table-cell>
        </table:table-row>
        <table:table-row>
          <table:table-cell table:style-name="0">
            <text:p text:style-name="s1_center_fi0"><text:bookmark text:name="anchor2258"/>258.</text:p>
          </table:table-cell>
          <table:table-cell table:style-name="0">
            <text:p text:style-name="s16_fi0">Приборы, установки, системы комбинированные</text:p>
          </table:table-cell>
          <table:table-cell table:style-name="0">
            <text:p text:style-name="s1_center_fi0"><text:a xlink:type="simple" xlink:href="http://ivo.garant.ru/document/redirect/70650730/5575">26.51.41.140</text:a></text:p>
          </table:table-cell>
        </table:table-row>
        <table:table-row>
          <table:table-cell table:style-name="0">
            <text:p text:style-name="s1_center_fi0"><text:bookmark text:name="anchor2259"/>259.</text:p>
          </table:table-cell>
          <table:table-cell table:style-name="0">
            <text:p text:style-name="s16_fi0">Детекторы ионизирующих излучений</text:p>
          </table:table-cell>
          <table:table-cell table:style-name="0">
            <text:p text:style-name="s1_center_fi0"><text:a xlink:type="simple" xlink:href="http://ivo.garant.ru/document/redirect/70650730/265141160">26.51.41.160</text:a></text:p>
          </table:table-cell>
        </table:table-row>
        <table:table-row>
          <table:table-cell table:style-name="0">
            <text:p text:style-name="s1_center_fi0"><text:bookmark text:name="anchor2260"/>260.</text:p>
          </table:table-cell>
          <table:table-cell table:style-name="0">
            <text:p text:style-name="s16_fi0">Осциллоскопы и осциллографы электронно-лучевые</text:p>
          </table:table-cell>
          <table:table-cell table:style-name="0">
            <text:p text:style-name="s1_center_fi0"><text:a xlink:type="simple" xlink:href="http://ivo.garant.ru/document/redirect/70650730/265142">26.51.42</text:a></text:p>
          </table:table-cell>
        </table:table-row>
        <table:table-row>
          <table:table-cell table:style-name="0">
            <text:p text:style-name="s1_center_fi0"><text:bookmark text:name="anchor2261"/>261.</text:p>
          </table:table-cell>
          <table:table-cell table:style-name="0">
            <text:p text:style-name="s16_fi0">Приборы цифровые электроизмерительные</text:p>
          </table:table-cell>
          <table:table-cell table:style-name="0">
            <text:p text:style-name="s1_center_fi0"><text:a xlink:type="simple" xlink:href="http://ivo.garant.ru/document/redirect/70650730/26514311">26.51.43.110</text:a></text:p>
          </table:table-cell>
        </table:table-row>
        <table:table-row>
          <table:table-cell table:style-name="0">
            <text:p text:style-name="s1_center_fi0"><text:bookmark text:name="anchor2262"/>262.</text:p>
          </table:table-cell>
          <table:table-cell table:style-name="0">
            <text:p text:style-name="s16_fi0">Системы информационные электроизмерительные, комплексы измерительно-вычислительные и установки для измерения электрических и магнитных величин</text:p>
          </table:table-cell>
          <table:table-cell table:style-name="0">
            <text:p text:style-name="s1_center_fi0"><text:a xlink:type="simple" xlink:href="http://ivo.garant.ru/document/redirect/70650730/265143120">26.51.43.120</text:a></text:p>
          </table:table-cell>
        </table:table-row>
        <table:table-row>
          <table:table-cell table:style-name="0">
            <text:p text:style-name="s1_center_fi0"><text:bookmark text:name="anchor2263"/>263.</text:p>
          </table:table-cell>
          <table:table-cell table:style-name="0">
            <text:p text:style-name="s16_fi0">Приборы и аппаратура для телекоммуникаций</text:p>
          </table:table-cell>
          <table:table-cell table:style-name="0">
            <text:p text:style-name="s1_center_fi0"><text:a xlink:type="simple" xlink:href="http://ivo.garant.ru/document/redirect/70650730/5615">26.51.44</text:a></text:p>
          </table:table-cell>
        </table:table-row>
        <table:table-row>
          <table:table-cell table:style-name="0">
            <text:p text:style-name="s1_center_fi0"><text:bookmark text:name="anchor2264"/>264.</text:p>
          </table:table-cell>
          <table:table-cell table:style-name="0">
            <text:p text:style-name="s16_fi0">Приборы и аппаратура для измерения или контроля электрических величин, не включенные в другие группировки</text:p>
          </table:table-cell>
          <table:table-cell table:style-name="0">
            <text:p text:style-name="s1_center_fi0"><text:a xlink:type="simple" xlink:href="http://ivo.garant.ru/document/redirect/70650730/265145">26.51.45</text:a></text:p>
          </table:table-cell>
        </table:table-row>
        <table:table-row>
          <table:table-cell table:style-name="0">
            <text:p text:style-name="s1_center_fi0"><text:bookmark text:name="anchor2265"/>265.</text:p>
          </table:table-cell>
          <table:table-cell table:style-name="0">
            <text:p text:style-name="s16_fi0">Гидрометры, термометры, пирометры, барометры, гигрометры и психрометры</text:p>
          </table:table-cell>
          <table:table-cell table:style-name="0">
            <text:p text:style-name="s1_center_fi0"><text:a xlink:type="simple" xlink:href="http://ivo.garant.ru/document/redirect/70650730/5624">26.51.51</text:a></text:p>
          </table:table-cell>
        </table:table-row>
        <table:table-row>
          <table:table-cell table:style-name="0">
            <text:p text:style-name="s1_center_fi0"><text:bookmark text:name="anchor2266"/>266.</text:p>
          </table:table-cell>
          <table:table-cell table:style-name="0">
            <text:p text:style-name="s16_fi0">Приборы для измерения или контроля расхода жидкостей и газов</text:p>
          </table:table-cell>
          <table:table-cell table:style-name="0">
            <text:p text:style-name="s1_center_fi0"><text:a xlink:type="simple" xlink:href="http://ivo.garant.ru/document/redirect/70650730/5152110">26.51.52.110</text:a></text:p>
          </table:table-cell>
        </table:table-row>
        <table:table-row>
          <table:table-cell table:style-name="0">
            <text:p text:style-name="s1_center_fi0"><text:bookmark text:name="anchor2267"/>267.</text:p>
          </table:table-cell>
          <table:table-cell table:style-name="0">
            <text:p text:style-name="s16_fi0">Приборы для измерения или контроля уровня жидкостей и газов</text:p>
          </table:table-cell>
          <table:table-cell table:style-name="0">
            <text:p text:style-name="s1_center_fi0"><text:a xlink:type="simple" xlink:href="http://ivo.garant.ru/document/redirect/70650730/5152120">26.51.52.120</text:a></text:p>
          </table:table-cell>
        </table:table-row>
        <table:table-row>
          <table:table-cell table:style-name="0">
            <text:p text:style-name="s1_center_fi0"><text:bookmark text:name="anchor2268"/>268.</text:p>
          </table:table-cell>
          <table:table-cell table:style-name="0">
            <text:p text:style-name="s16_fi0">Приборы для измерения или контроля давления жидкостей и газов (электронные)</text:p>
          </table:table-cell>
          <table:table-cell table:style-name="0">
            <text:p text:style-name="s1_center_fi0"><text:a xlink:type="simple" xlink:href="http://ivo.garant.ru/document/redirect/70650730/26515213">26.51.52.130</text:a></text:p>
          </table:table-cell>
        </table:table-row>
        <table:table-row>
          <table:table-cell table:style-name="0">
            <text:p text:style-name="s1_center_fi0"><text:bookmark text:name="anchor2269"/>269.</text:p>
          </table:table-cell>
          <table:table-cell table:style-name="0">
            <text:p text:style-name="s16_fi0">Приборы для измерения или контроля прочих переменных характеристик жидкостей и газов</text:p>
          </table:table-cell>
          <table:table-cell table:style-name="0">
            <text:p text:style-name="s1_center_fi0"><text:a xlink:type="simple" xlink:href="http://ivo.garant.ru/document/redirect/70650730/5631">26.51.52.190</text:a></text:p>
          </table:table-cell>
        </table:table-row>
        <table:table-row>
          <table:table-cell table:style-name="0">
            <text:p text:style-name="s1_center_fi0"><text:bookmark text:name="anchor2270"/>270.</text:p>
          </table:table-cell>
          <table:table-cell table:style-name="0">
            <text:p text:style-name="s16_fi0">Газоанализаторы или дымоанализаторы</text:p>
          </table:table-cell>
          <table:table-cell table:style-name="0">
            <text:p text:style-name="s1_center_fi0"><text:a xlink:type="simple" xlink:href="http://ivo.garant.ru/document/redirect/70650730/265153110">26.51.53.110</text:a></text:p>
          </table:table-cell>
        </table:table-row>
        <table:table-row>
          <table:table-cell table:style-name="0">
            <text:p text:style-name="s1_center_fi0"><text:bookmark text:name="anchor2271"/>271.</text:p>
          </table:table-cell>
          <table:table-cell table:style-name="0">
            <text:p text:style-name="s16_fi0">Анализаторы жидкостей</text:p>
          </table:table-cell>
          <table:table-cell table:style-name="0">
            <text:p text:style-name="s1_center_fi0"><text:a xlink:type="simple" xlink:href="http://ivo.garant.ru/document/redirect/70650730/265153120">26.51.53.120</text:a></text:p>
          </table:table-cell>
        </table:table-row>
        <table:table-row>
          <table:table-cell table:style-name="0">
            <text:p text:style-name="s1_center_fi0"><text:bookmark text:name="anchor2272"/>272.</text:p>
          </table:table-cell>
          <table:table-cell table:style-name="0">
            <text:p text:style-name="s16_fi0">Анализаторы аэрозолей, твердых и сыпучих веществ</text:p>
          </table:table-cell>
          <table:table-cell table:style-name="0">
            <text:p text:style-name="s1_center_fi0"><text:a xlink:type="simple" xlink:href="http://ivo.garant.ru/document/redirect/70650730/5632">26.51.53.130</text:a></text:p>
          </table:table-cell>
        </table:table-row>
        <table:table-row>
          <table:table-cell table:style-name="0">
            <text:p text:style-name="s1_center_fi0"><text:bookmark text:name="anchor2273"/>273.</text:p>
          </table:table-cell>
          <table:table-cell table:style-name="0">
            <text:p text:style-name="s16_fi0">Приборы универсальные для определения состава и физико-химических свойств газов, жидкостей и твердых веществ</text:p>
          </table:table-cell>
          <table:table-cell table:style-name="0">
            <text:p text:style-name="s1_center_fi0"><text:a xlink:type="simple" xlink:href="http://ivo.garant.ru/document/redirect/70650730/951110082">26.51.53.140</text:a></text:p>
          </table:table-cell>
        </table:table-row>
        <table:table-row>
          <table:table-cell table:style-name="0">
            <text:p text:style-name="s1_center_fi0"><text:bookmark text:name="anchor2274"/>274.</text:p>
          </table:table-cell>
          <table:table-cell table:style-name="0">
            <text:p text:style-name="s16_fi0">Приборы и аппаратура для спектрального анализа, основанные на действии оптического излучения (ультрафиолетового, видимой части спектра, инфракрасного)</text:p>
          </table:table-cell>
          <table:table-cell table:style-name="0">
            <text:p text:style-name="s1_center_fi0"><text:a xlink:type="simple" xlink:href="http://ivo.garant.ru/document/redirect/70650730/265153150">26.51.53.150</text:a></text:p>
          </table:table-cell>
        </table:table-row>
        <table:table-row>
          <table:table-cell table:style-name="0">
            <text:p text:style-name="s1_center_fi0"><text:bookmark text:name="anchor2275"/>275.</text:p>
          </table:table-cell>
          <table:table-cell table:style-name="0">
            <text:p text:style-name="s16_fi0">Экспонометры и прочие приборы для измерения или контроля количества тепла, звука или света</text:p>
          </table:table-cell>
          <table:table-cell table:style-name="0">
            <text:p text:style-name="s1_center_fi0"><text:a xlink:type="simple" xlink:href="http://ivo.garant.ru/document/redirect/70650730/265153160">26.51.53.160</text:a></text:p>
          </table:table-cell>
        </table:table-row>
        <table:table-row>
          <table:table-cell table:style-name="0">
            <text:p text:style-name="s1_center_fi0"><text:bookmark text:name="anchor2276"/>276.</text:p>
          </table:table-cell>
          <table:table-cell table:style-name="0">
            <text:p text:style-name="s16_fi0">Приборы и аппаратура для физического или химического анализа прочие, не включенные в другие группировки</text:p>
          </table:table-cell>
          <table:table-cell table:style-name="0">
            <text:p text:style-name="s1_center_fi0"><text:a xlink:type="simple" xlink:href="http://ivo.garant.ru/document/redirect/70650730/951110083">26.51.53.190</text:a></text:p>
          </table:table-cell>
        </table:table-row>
        <table:table-row>
          <table:table-cell table:style-name="0">
            <text:p text:style-name="s1_center_fi0"><text:bookmark text:name="anchor2277"/>277.</text:p>
          </table:table-cell>
          <table:table-cell table:style-name="0">
            <text:p text:style-name="s16_fi0">Микроскопы (кроме микроскопов оптических), за исключением микроскопов медицинских, микроскопов для клинической лабораторной диагностики, микроскопов биологических</text:p>
          </table:table-cell>
          <table:table-cell table:style-name="0">
            <text:p text:style-name="s1_center_fi0"><text:a xlink:type="simple" xlink:href="http://ivo.garant.ru/document/redirect/70650730/5634">26.51.61.110</text:a></text:p>
          </table:table-cell>
        </table:table-row>
        <table:table-row>
          <table:table-cell table:style-name="0">
            <text:p text:style-name="s1_center_fi0"><text:bookmark text:name="anchor2278"/>278.</text:p>
          </table:table-cell>
          <table:table-cell table:style-name="0">
            <text:p text:style-name="s16_fi0">Счетчики производства или потребления газа</text:p>
          </table:table-cell>
          <table:table-cell table:style-name="0">
            <text:p text:style-name="s1_center_fi0"><text:a xlink:type="simple" xlink:href="http://ivo.garant.ru/document/redirect/70650730/5163110">26.51.63.110</text:a></text:p>
          </table:table-cell>
        </table:table-row>
        <table:table-row>
          <table:table-cell table:style-name="0">
            <text:p text:style-name="s1_center_fi0"><text:bookmark text:name="anchor2279"/>279.</text:p>
          </table:table-cell>
          <table:table-cell table:style-name="0">
            <text:p text:style-name="s16_fi0">Счетчики производства или потребления жидкости</text:p>
          </table:table-cell>
          <table:table-cell table:style-name="0">
            <text:p text:style-name="s1_center_fi0"><text:a xlink:type="simple" xlink:href="http://ivo.garant.ru/document/redirect/70650730/5163120">26.51.63.120</text:a></text:p>
          </table:table-cell>
        </table:table-row>
        <table:table-row>
          <table:table-cell table:style-name="0">
            <text:p text:style-name="s1_center_fi0"><text:bookmark text:name="anchor2280"/>280.</text:p>
          </table:table-cell>
          <table:table-cell table:style-name="0">
            <text:p text:style-name="s16_fi0">Скоростемеры</text:p>
          </table:table-cell>
          <table:table-cell table:style-name="0">
            <text:p text:style-name="s1_center_fi0"><text:a xlink:type="simple" xlink:href="http://ivo.garant.ru/document/redirect/70650730/5649">26.51.64.170</text:a></text:p>
          </table:table-cell>
        </table:table-row>
        <table:table-row>
          <table:table-cell table:style-name="0">
            <text:p text:style-name="s1_center_fi0"><text:bookmark text:name="anchor2281"/>281.</text:p>
          </table:table-cell>
          <table:table-cell table:style-name="0">
            <text:p text:style-name="s16_fi0">Приборы для измерения параметров движения и количества прочие</text:p>
          </table:table-cell>
          <table:table-cell table:style-name="0">
            <text:p text:style-name="s1_center_fi0"><text:a xlink:type="simple" xlink:href="http://ivo.garant.ru/document/redirect/70650730/26516419">26.51.64.190</text:a></text:p>
          </table:table-cell>
        </table:table-row>
        <table:table-row>
          <table:table-cell table:style-name="0">
            <text:p text:style-name="s1_center_fi0"><text:bookmark text:name="anchor2282"/>282.</text:p>
          </table:table-cell>
          <table:table-cell table:style-name="0">
            <text:p text:style-name="s16_fi0">Динамометры общего назначения</text:p>
          </table:table-cell>
          <table:table-cell table:style-name="0">
            <text:p text:style-name="s1_center_fi0"><text:a xlink:type="simple" xlink:href="http://ivo.garant.ru/document/redirect/70650730/5651">26.51.66.111</text:a></text:p>
          </table:table-cell>
        </table:table-row>
        <table:table-row>
          <table:table-cell table:style-name="0">
            <text:p text:style-name="s1_center_fi0"><text:bookmark text:name="anchor2283"/>283.</text:p>
          </table:table-cell>
          <table:table-cell table:style-name="0">
            <text:p text:style-name="s16_fi0">Приборы для измерения деформации</text:p>
          </table:table-cell>
          <table:table-cell table:style-name="0">
            <text:p text:style-name="s1_center_fi0"><text:a xlink:type="simple" xlink:href="http://ivo.garant.ru/document/redirect/70650730/5654">26.51.66.114</text:a></text:p>
          </table:table-cell>
        </table:table-row>
        <table:table-row>
          <table:table-cell table:style-name="0">
            <text:p text:style-name="s1_center_fi0"><text:bookmark text:name="anchor2284"/>284.</text:p>
          </table:table-cell>
          <table:table-cell table:style-name="0">
            <text:p text:style-name="s16_fi0">Приборы акустического неразрушающего контроля</text:p>
          </table:table-cell>
          <table:table-cell table:style-name="0">
            <text:p text:style-name="s1_center_fi0"><text:a xlink:type="simple" xlink:href="http://ivo.garant.ru/document/redirect/70650730/265166121">26.51.66.121</text:a></text:p>
          </table:table-cell>
        </table:table-row>
        <table:table-row>
          <table:table-cell table:style-name="0">
            <text:p text:style-name="s1_center_fi0"><text:bookmark text:name="anchor2285"/>285.</text:p>
          </table:table-cell>
          <table:table-cell table:style-name="0">
            <text:p text:style-name="s16_fi0">Приборы радиоволнового неразрушающего контроля</text:p>
          </table:table-cell>
          <table:table-cell table:style-name="0">
            <text:p text:style-name="s1_center_fi0"><text:a xlink:type="simple" xlink:href="http://ivo.garant.ru/document/redirect/70650730/5661">26.51.66.126</text:a></text:p>
          </table:table-cell>
        </table:table-row>
        <table:table-row>
          <table:table-cell table:style-name="0">
            <text:p text:style-name="s1_center_fi0"><text:bookmark text:name="anchor2286"/>286.</text:p>
          </table:table-cell>
          <table:table-cell table:style-name="0">
            <text:p text:style-name="s16_fi0">Приборы электромагнитного (вихревых токов) и электрического неразрушающего контроля</text:p>
          </table:table-cell>
          <table:table-cell table:style-name="0">
            <text:p text:style-name="s1_center_fi0"><text:a xlink:type="simple" xlink:href="http://ivo.garant.ru/document/redirect/70650730/265166127">26.51.66.127</text:a></text:p>
          </table:table-cell>
        </table:table-row>
        <table:table-row>
          <table:table-cell table:style-name="0">
            <text:p text:style-name="s1_center_fi0"><text:bookmark text:name="anchor2287"/>287.</text:p>
          </table:table-cell>
          <table:table-cell table:style-name="0">
            <text:p text:style-name="s16_fi0">Приборы неразрушающего контроля прочие</text:p>
          </table:table-cell>
          <table:table-cell table:style-name="0">
            <text:p text:style-name="s1_center_fi0"><text:a xlink:type="simple" xlink:href="http://ivo.garant.ru/document/redirect/70650730/5662">26.51.66.129</text:a></text:p>
          </table:table-cell>
        </table:table-row>
        <table:table-row>
          <table:table-cell table:style-name="0">
            <text:p text:style-name="s1_center_fi0"><text:bookmark text:name="anchor2288"/>288.</text:p>
          </table:table-cell>
          <table:table-cell table:style-name="0">
            <text:p text:style-name="s16_fi0">Аппаратура общего назначения для определения основных параметров вибрационных процессов</text:p>
          </table:table-cell>
          <table:table-cell table:style-name="0">
            <text:p text:style-name="s1_center_fi0"><text:a xlink:type="simple" xlink:href="http://ivo.garant.ru/document/redirect/70650730/5664">26.51.66.131</text:a></text:p>
          </table:table-cell>
        </table:table-row>
        <table:table-row>
          <table:table-cell table:style-name="0">
            <text:p text:style-name="s1_center_fi0"><text:bookmark text:name="anchor2289"/>289.</text:p>
          </table:table-cell>
          <table:table-cell table:style-name="0">
            <text:p text:style-name="s16_fi0">Аппаратура контрольно-сигнальная для автоматической защиты агрегатов от опасных вибраций</text:p>
          </table:table-cell>
          <table:table-cell table:style-name="0">
            <text:p text:style-name="s1_center_fi0"><text:a xlink:type="simple" xlink:href="http://ivo.garant.ru/document/redirect/70650730/5666">26.51.66.133</text:a></text:p>
          </table:table-cell>
        </table:table-row>
        <table:table-row>
          <table:table-cell table:style-name="0">
            <text:p text:style-name="s1_center_fi0"><text:bookmark text:name="anchor2290"/>290.</text:p>
          </table:table-cell>
          <table:table-cell table:style-name="0">
            <text:p text:style-name="s16_fi0">Аппаратура виброизмерительная специальная</text:p>
          </table:table-cell>
          <table:table-cell table:style-name="0">
            <text:p text:style-name="s1_center_fi0"><text:a xlink:type="simple" xlink:href="http://ivo.garant.ru/document/redirect/70650730/5668">26.51.66.135</text:a></text:p>
          </table:table-cell>
        </table:table-row>
        <table:table-row>
          <table:table-cell table:style-name="0">
            <text:p text:style-name="s1_center_fi0"><text:bookmark text:name="anchor2291"/>291.</text:p>
          </table:table-cell>
          <table:table-cell table:style-name="0">
            <text:p text:style-name="s16_fi0">Средства автоматизации и механизации контроля размеров</text:p>
          </table:table-cell>
          <table:table-cell table:style-name="0">
            <text:p text:style-name="s1_center_fi0"><text:a xlink:type="simple" xlink:href="http://ivo.garant.ru/document/redirect/70650730/5669">26.51.66.140</text:a></text:p>
          </table:table-cell>
        </table:table-row>
        <table:table-row>
          <table:table-cell table:style-name="0">
            <text:p text:style-name="s1_center_fi0"><text:bookmark text:name="anchor2292"/>292.</text:p>
          </table:table-cell>
          <table:table-cell table:style-name="0">
            <text:p text:style-name="s16_fi0">Инструменты, приборы и машины для измерения или контроля прочие, не включенные в другие группировки</text:p>
          </table:table-cell>
          <table:table-cell table:style-name="0">
            <text:p text:style-name="s1_center_fi0"><text:a xlink:type="simple" xlink:href="http://ivo.garant.ru/document/redirect/70650730/5166190">26.51.66.190</text:a></text:p>
          </table:table-cell>
        </table:table-row>
        <table:table-row>
          <table:table-cell table:style-name="0">
            <text:p text:style-name="s1_center_fi0"><text:bookmark text:name="anchor2293"/>293.</text:p>
          </table:table-cell>
          <table:table-cell table:style-name="0">
            <text:p text:style-name="s16_fi0">Термостаты</text:p>
          </table:table-cell>
          <table:table-cell table:style-name="0">
            <text:p text:style-name="s1_center_fi0"><text:a xlink:type="simple" xlink:href="http://ivo.garant.ru/document/redirect/70650730/265170110">26.51.70.110</text:a></text:p>
          </table:table-cell>
        </table:table-row>
        <table:table-row>
          <table:table-cell table:style-name="0">
            <text:p text:style-name="s1_center_fi0"><text:bookmark text:name="anchor2294"/>294.</text:p>
          </table:table-cell>
          <table:table-cell table:style-name="0">
            <text:p text:style-name="s16_fi0">Приборы автоматические регулирующие и контрольно-измерительные прочие</text:p>
          </table:table-cell>
          <table:table-cell table:style-name="0">
            <text:p text:style-name="s1_center_fi0"><text:a xlink:type="simple" xlink:href="http://ivo.garant.ru/document/redirect/70650730/70190">26.51.70.190</text:a></text:p>
          </table:table-cell>
        </table:table-row>
        <table:table-row>
          <table:table-cell table:style-name="0">
            <text:p text:style-name="s1_center_fi0"><text:bookmark text:name="anchor2295"/>295.</text:p>
          </table:table-cell>
          <table:table-cell table:style-name="0">
            <text:p text:style-name="s16_fi0">Части и принадлежности аппаратуры радиолокационной, радионавигационной и радиоаппаратуры дистанционного управления</text:p>
          </table:table-cell>
          <table:table-cell table:style-name="0">
            <text:p text:style-name="s1_center_fi0"><text:a xlink:type="simple" xlink:href="http://ivo.garant.ru/document/redirect/70650730/265181">26.51.81</text:a></text:p>
          </table:table-cell>
        </table:table-row>
        <table:table-row>
          <table:table-cell table:style-name="0">
            <text:p text:style-name="s1_center_fi0"><text:bookmark text:name="anchor2296"/>296.</text:p>
          </table:table-cell>
          <table:table-cell table:style-name="0">
            <text:p text:style-name="s16_fi0">Комплектующие (запасные части), не включенные в другие группировки, не имеющие самостоятельных группировок</text:p>
          </table:table-cell>
          <table:table-cell table:style-name="0">
            <text:p text:style-name="s1_center_fi0"><text:a xlink:type="simple" xlink:href="http://ivo.garant.ru/document/redirect/70650730/5678">26.51.82.190</text:a></text:p>
          </table:table-cell>
        </table:table-row>
        <table:table-row>
          <table:table-cell table:style-name="0">
            <text:p text:style-name="s1_center_fi0"><text:bookmark text:name="anchor2297"/>297.</text:p>
          </table:table-cell>
          <table:table-cell table:style-name="0">
            <text:p text:style-name="s16_fi0">Томографы компьютерные</text:p>
          </table:table-cell>
          <table:table-cell table:style-name="0">
            <text:p text:style-name="s1_center_fi0"><text:a xlink:type="simple" xlink:href="http://ivo.garant.ru/document/redirect/70650730/951110073">26.60.11.111</text:a></text:p>
          </table:table-cell>
        </table:table-row>
        <table:table-row>
          <table:table-cell table:style-name="0">
            <text:p text:style-name="s1_center_fi0"><text:bookmark text:name="anchor2298"/>298.</text:p>
          </table:table-cell>
          <table:table-cell table:style-name="0">
            <text:p text:style-name="s16_fi0">Аппараты рентгеноскопические (флуороскопические)</text:p>
          </table:table-cell>
          <table:table-cell table:style-name="0">
            <text:p text:style-name="s1_center_fi0"><text:a xlink:type="simple" xlink:href="http://ivo.garant.ru/document/redirect/70650730/951110074">26.60.11.112</text:a></text:p>
          </table:table-cell>
        </table:table-row>
        <table:table-row>
          <table:table-cell table:style-name="0">
            <text:p text:style-name="s1_center_fi0"><text:bookmark text:name="anchor2299"/>299.</text:p>
          </table:table-cell>
          <table:table-cell table:style-name="0">
            <text:p text:style-name="s16_fi0">Аппараты рентгенографические</text:p>
          </table:table-cell>
          <table:table-cell table:style-name="0">
            <text:p text:style-name="s1_center_fi0"><text:a xlink:type="simple" xlink:href="http://ivo.garant.ru/document/redirect/70650730/951110075">26.60.11.113</text:a></text:p>
          </table:table-cell>
        </table:table-row>
        <table:table-row>
          <table:table-cell table:style-name="0">
            <text:p text:style-name="s1_center_fi0"><text:bookmark text:name="anchor2300"/>300.</text:p>
          </table:table-cell>
          <table:table-cell table:style-name="0">
            <text:p text:style-name="s16_fi0">Эндоскопические комплексы, соответствующие кодам 271710, 271720, 271740, 271780, 271790, 271800, 271830, 271850, 2829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951110075">26.60.11.113</text:a></text:p>
            <text:p text:style-name="s1_center_fi0"><text:a xlink:type="simple" xlink:href="http://ivo.garant.ru/document/redirect/70650730/26601210">26.60.12.110</text:a></text:p>
            <text:p text:style-name="s1_center_fi0"><text:a xlink:type="simple" xlink:href="http://ivo.garant.ru/document/redirect/70650730/32501">32.50.1</text:a></text:p>
            <text:p text:style-name="s1_center_fi0"><text:a xlink:type="simple" xlink:href="http://ivo.garant.ru/document/redirect/70650730/951110078">32.50.21.112</text:a></text:p>
          </table:table-cell>
        </table:table-row>
        <table:table-row>
          <table:table-cell table:style-name="0">
            <text:p text:style-name="s1_center_fi0"><text:bookmark text:name="anchor2301"/>301.</text:p>
          </table:table-cell>
          <table:table-cell table:style-name="0">
            <text:p text:style-name="s16_fi0">Аппараты рентгеновские прочие, используемые для диагностики, применяемые в медицинских целях</text:p>
          </table:table-cell>
          <table:table-cell table:style-name="0">
            <text:p text:style-name="s1_center_fi0"><text:a xlink:type="simple" xlink:href="http://ivo.garant.ru/document/redirect/70650730/266011119">26.60.11.119</text:a></text:p>
          </table:table-cell>
        </table:table-row>
        <table:table-row>
          <table:table-cell table:style-name="0">
            <text:p text:style-name="s1_center_fi0"><text:bookmark text:name="anchor2302"/>302.</text:p>
          </table:table-cell>
          <table:table-cell table:style-name="0">
            <text:p text:style-name="s16_fi0">Системы однофотонной эмиссионной компьютерной томографии (гамма-камеры), соответствующие кодам 191060, 28053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266011120">26.60.11.120</text:a></text:p>
          </table:table-cell>
        </table:table-row>
        <table:table-row>
          <table:table-cell table:style-name="0">
            <text:p text:style-name="s1_center_fi0"><text:bookmark text:name="anchor2303"/>303.</text:p>
          </table:table-cell>
          <table:table-cell table:style-name="0">
            <text:p text:style-name="s16_fi0">Приборы, аппараты и комплексы гамма-терапевтические контактной лучевой терапии средней и высокой мощности дозы, линейные медицинские ускорители, соответствующие кодам 125970, 142570, 158270, 3104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266011120">26.60.11.120</text:a></text:p>
            <text:p text:style-name="s1_center_fi0"><text:a xlink:type="simple" xlink:href="http://ivo.garant.ru/document/redirect/70650730/266011129">26.60.11.129</text:a></text:p>
            <text:p text:style-name="s1_center_fi0"><text:a xlink:type="simple" xlink:href="http://ivo.garant.ru/document/redirect/70650730/26613190">26.60.13.190</text:a></text:p>
            <text:p text:style-name="s1_center_fi0"><text:a xlink:type="simple" xlink:href="http://ivo.garant.ru/document/redirect/70650730/325050190">32.50.50.190</text:a></text:p>
          </table:table-cell>
        </table:table-row>
        <table:table-row>
          <table:table-cell table:style-name="0">
            <text:p text:style-name="s1_center_fi0"><text:bookmark text:name="anchor2304"/>304.</text:p>
          </table:table-cell>
          <table:table-cell table:style-name="0">
            <text:p text:style-name="s16_fi0">Части и принадлежности аппаратов, основанных на использовании рентгеновского или альфа-, бета- или гамма-излучений, применяемых в медицинских целях, включая хирургию, стоматологию, ветеринарию</text:p>
          </table:table-cell>
          <table:table-cell table:style-name="0">
            <text:p text:style-name="s1_center_fi0"><text:a xlink:type="simple" xlink:href="http://ivo.garant.ru/document/redirect/70650730/266011130">26.60.11.130</text:a></text:p>
          </table:table-cell>
        </table:table-row>
        <table:table-row>
          <table:table-cell table:style-name="0">
            <text:p text:style-name="s1_center_fi0"><text:bookmark text:name="anchor2305"/>305.</text:p>
          </table:table-cell>
          <table:table-cell table:style-name="0">
            <text:p text:style-name="s16_fi0">Электрокардиографы</text:p>
          </table:table-cell>
          <table:table-cell table:style-name="0">
            <text:p text:style-name="s1_center_fi0"><text:a xlink:type="simple" xlink:href="http://ivo.garant.ru/document/redirect/70650730/951110076">26.60.12.111</text:a></text:p>
          </table:table-cell>
        </table:table-row>
        <table:table-row>
          <table:table-cell table:style-name="0">
            <text:p text:style-name="s1_center_fi0"><text:bookmark text:name="anchor2306"/>306.</text:p>
          </table:table-cell>
          <table:table-cell table:style-name="0">
            <text:p text:style-name="s16_fi0">Аппараты электродиагностические прочие</text:p>
          </table:table-cell>
          <table:table-cell table:style-name="0">
            <text:p text:style-name="s1_center_fi0"><text:a xlink:type="simple" xlink:href="http://ivo.garant.ru/document/redirect/70650730/266012119">26.60.12.119</text:a></text:p>
          </table:table-cell>
        </table:table-row>
        <table:table-row>
          <table:table-cell table:style-name="0">
            <text:p text:style-name="s1_center_fi0"><text:bookmark text:name="anchor2307"/>307.</text:p>
          </table:table-cell>
          <table:table-cell table:style-name="0">
            <text:p text:style-name="s16_fi0">Оториноскопы, соответствующие кодам 279450, 17207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2743911">27.40.39.110</text:a></text:p>
            <text:p text:style-name="s1_center_fi0"><text:a xlink:type="simple" xlink:href="http://ivo.garant.ru/document/redirect/70650730/325013120">32.50.13.120</text:a></text:p>
          </table:table-cell>
        </table:table-row>
        <table:table-row>
          <table:table-cell table:style-name="0">
            <text:p text:style-name="s1_center_fi0"><text:bookmark text:name="anchor2308"/>308.</text:p>
          </table:table-cell>
          <table:table-cell table:style-name="0">
            <text:p text:style-name="s16_fi0">Тонометры измерения внутриглазного давления, соответствующие кодам 172450, 17246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13">32.50.13</text:a></text:p>
          </table:table-cell>
        </table:table-row>
        <table:table-row>
          <table:table-cell table:style-name="0">
            <text:p text:style-name="s1_center_fi0"><text:bookmark text:name="anchor2309"/>309.</text:p>
          </table:table-cell>
          <table:table-cell table:style-name="0">
            <text:p text:style-name="s16_fi0">Аппараты для функциональных диагностических исследований или для контроля физиологических параметров, применяемые в медицинских целях, не включенные в другие группировки, соответствующие кодам 145190, 149980, 150000, 150010, 150020, 170280, 218360, 218410, 232490, 249320, 288690, 317710, 345960, 152710, 232490, 260980, 291870, 291820, 291830, 29208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266012120">26.60.12.120</text:a></text:p>
          </table:table-cell>
        </table:table-row>
        <table:table-row>
          <table:table-cell table:style-name="0">
            <text:p text:style-name="s1_center_fi0"><text:bookmark text:name="anchor2310"/>310.</text:p>
          </table:table-cell>
          <table:table-cell table:style-name="0">
            <text:p text:style-name="s16_fi0">Средства измерений массы, силы, энергии, линейных и угловых величин, температуры</text:p>
          </table:table-cell>
          <table:table-cell table:style-name="0">
            <text:p text:style-name="s1_center_fi0"><text:a xlink:type="simple" xlink:href="http://ivo.garant.ru/document/redirect/70650730/266012122">26.60.12.122</text:a></text:p>
          </table:table-cell>
        </table:table-row>
        <table:table-row>
          <table:table-cell table:style-name="0">
            <text:p text:style-name="s1_center_fi0"><text:bookmark text:name="anchor2311"/>311.</text:p>
          </table:table-cell>
          <table:table-cell table:style-name="0">
            <text:p text:style-name="s16_fi0">Приборы для исследования звуковых колебаний в органах человека</text:p>
          </table:table-cell>
          <table:table-cell table:style-name="0">
            <text:p text:style-name="s1_center_fi0"><text:a xlink:type="simple" xlink:href="http://ivo.garant.ru/document/redirect/70650730/2612123">26.60.12.123</text:a></text:p>
          </table:table-cell>
        </table:table-row>
        <table:table-row>
          <table:table-cell table:style-name="0">
            <text:p text:style-name="s1_center_fi0"><text:bookmark text:name="anchor2312"/>312.</text:p>
          </table:table-cell>
          <table:table-cell table:style-name="0">
            <text:p text:style-name="s16_fi0">Приборы и аппараты для функциональной диагностики прочие, применяемые в медицинских целях, не включенные в другие группировки</text:p>
          </table:table-cell>
          <table:table-cell table:style-name="0">
            <text:p text:style-name="s1_center_fi0"><text:a xlink:type="simple" xlink:href="http://ivo.garant.ru/document/redirect/70650730/266012129">26.60.12.129</text:a></text:p>
          </table:table-cell>
        </table:table-row>
        <table:table-row>
          <table:table-cell table:style-name="0">
            <text:p text:style-name="s1_center_fi0"><text:bookmark text:name="anchor2313"/>313.</text:p>
          </table:table-cell>
          <table:table-cell table:style-name="0">
            <text:p text:style-name="s16_fi0">Томографы магнитно-резонансные</text:p>
          </table:table-cell>
          <table:table-cell table:style-name="0">
            <text:p text:style-name="s1_center_fi0"><text:a xlink:type="simple" xlink:href="http://ivo.garant.ru/document/redirect/70650730/26612131">26.60.12.131</text:a></text:p>
          </table:table-cell>
        </table:table-row>
        <table:table-row>
          <table:table-cell table:style-name="0">
            <text:p text:style-name="s1_center_fi0"><text:bookmark text:name="anchor2314"/>314.</text:p>
          </table:table-cell>
          <table:table-cell table:style-name="0">
            <text:p text:style-name="s16_fi0">Аппараты ультразвукового сканирования</text:p>
          </table:table-cell>
          <table:table-cell table:style-name="0">
            <text:p text:style-name="s1_center_fi0"><text:a xlink:type="simple" xlink:href="http://ivo.garant.ru/document/redirect/70650730/26612132">26.60.12.132</text:a></text:p>
          </table:table-cell>
        </table:table-row>
        <table:table-row>
          <table:table-cell table:style-name="0">
            <text:p text:style-name="s1_center_fi0"><text:bookmark text:name="anchor2315"/>315.</text:p>
          </table:table-cell>
          <table:table-cell table:style-name="0">
            <text:p text:style-name="s16_fi0">Облучатели фототерапевтические неонатальные, соответствующие кодам 172870, 204120, 335380, 209840, 335370, 326010, 21234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266013">26.60.13</text:a></text:p>
          </table:table-cell>
        </table:table-row>
        <table:table-row>
          <table:table-cell table:style-name="0">
            <text:p text:style-name="s1_center_fi0"><text:bookmark text:name="anchor2316"/>316.</text:p>
          </table:table-cell>
          <table:table-cell table:style-name="0">
            <text:p text:style-name="s16_fi0">Аппараты микроволновой терапии</text:p>
          </table:table-cell>
          <table:table-cell table:style-name="0">
            <text:p text:style-name="s1_center_fi0"><text:a xlink:type="simple" xlink:href="http://ivo.garant.ru/document/redirect/70650730/266013022">26.60.13.120</text:a></text:p>
          </table:table-cell>
        </table:table-row>
        <table:table-row>
          <table:table-cell table:style-name="0">
            <text:p text:style-name="s1_center_fi0"><text:bookmark text:name="anchor2317"/>317.</text:p>
          </table:table-cell>
          <table:table-cell table:style-name="0">
            <text:p text:style-name="s16_fi0">Литотриптеры, соответствующие кодам 127180, 204130, 216570, 23661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5732">26.60.13.140</text:a></text:p>
          </table:table-cell>
        </table:table-row>
        <table:table-row>
          <table:table-cell table:style-name="0">
            <text:p text:style-name="s1_center_fi0"><text:bookmark text:name="anchor2318"/>318.</text:p>
          </table:table-cell>
          <table:table-cell table:style-name="0">
            <text:p text:style-name="s16_fi0">Аппараты ультразвуковой терапии</text:p>
          </table:table-cell>
          <table:table-cell table:style-name="0">
            <text:p text:style-name="s1_center_fi0"><text:a xlink:type="simple" xlink:href="http://ivo.garant.ru/document/redirect/70650730/5733">26.60.13.150</text:a></text:p>
          </table:table-cell>
        </table:table-row>
        <table:table-row>
          <table:table-cell table:style-name="0">
            <text:p text:style-name="s1_center_fi0"><text:bookmark text:name="anchor2319"/>319.</text:p>
          </table:table-cell>
          <table:table-cell table:style-name="0">
            <text:p text:style-name="s16_fi0">Аппараты светолечения</text:p>
          </table:table-cell>
          <table:table-cell table:style-name="0">
            <text:p text:style-name="s1_center_fi0"><text:a xlink:type="simple" xlink:href="http://ivo.garant.ru/document/redirect/70650730/5735">26.60.13.180</text:a></text:p>
          </table:table-cell>
        </table:table-row>
        <table:table-row>
          <table:table-cell table:style-name="0">
            <text:p text:style-name="s1_center_fi0"><text:bookmark text:name="anchor2320"/>320.</text:p>
          </table:table-cell>
          <table:table-cell table:style-name="0">
            <text:p text:style-name="s16_fi0">Дефибрилляторы; обогреватели детские неонатальные; столы неонатальные с автоматическим поддержанием температуры обогрева новорожденных, соответствующие кодам 119850, 126460, 126470, 126500, 130380, 210150, 233940, 262390, 262430, 262440, 334660, 334670, 33468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26613190">26.60.13.190</text:a></text:p>
            <text:p text:style-name="s1_center_fi0"><text:a xlink:type="simple" xlink:href="http://ivo.garant.ru/document/redirect/70650730/325013190">32.50.13.190</text:a></text:p>
          </table:table-cell>
        </table:table-row>
        <table:table-row>
          <table:table-cell table:style-name="0">
            <text:p text:style-name="s1_center_fi0"><text:bookmark text:name="anchor2321"/>321.</text:p>
          </table:table-cell>
          <table:table-cell table:style-name="0">
            <text:p text:style-name="s16_fi0">Оборудование фотографическое и его части</text:p>
          </table:table-cell>
          <table:table-cell table:style-name="0">
            <text:p text:style-name="s1_center_fi0"><text:a xlink:type="simple" xlink:href="http://ivo.garant.ru/document/redirect/70650730/5741">26.70.1</text:a></text:p>
          </table:table-cell>
        </table:table-row>
        <table:table-row>
          <table:table-cell table:style-name="0">
            <text:p text:style-name="s1_center_fi0"><text:bookmark text:name="anchor2322"/>322.</text:p>
          </table:table-cell>
          <table:table-cell table:style-name="0">
            <text:p text:style-name="s16_fi0">Приборы оптические прочие и их части</text:p>
          </table:table-cell>
          <table:table-cell table:style-name="0">
            <text:p text:style-name="s1_center_fi0"><text:a xlink:type="simple" xlink:href="http://ivo.garant.ru/document/redirect/70650730/26702">26.70.2</text:a></text:p>
          </table:table-cell>
        </table:table-row>
        <table:table-row>
          <table:table-cell table:style-name="0">
            <text:p text:style-name="s1_center_fi0"><text:bookmark text:name="anchor2323"/>323.</text:p>
          </table:table-cell>
          <table:table-cell table:style-name="0">
            <text:p text:style-name="s16_fi0">Носители данных оптические без записи</text:p>
          </table:table-cell>
          <table:table-cell table:style-name="0">
            <text:p text:style-name="s1_center_fi0"><text:a xlink:type="simple" xlink:href="http://ivo.garant.ru/document/redirect/70650730/268012">26.80.12.000</text:a></text:p>
          </table:table-cell>
        </table:table-row>
        <table:table-row>
          <table:table-cell table:style-name="0">
            <text:p text:style-name="s1_center_fi0"><text:bookmark text:name="anchor2324"/>324.</text:p>
          </table:table-cell>
          <table:table-cell table:style-name="0">
            <text:p text:style-name="s16_fi0">Носители данных прочие, включая матрицы и основы для производства дисков</text:p>
          </table:table-cell>
          <table:table-cell table:style-name="0">
            <text:p text:style-name="s1_center_fi0"><text:a xlink:type="simple" xlink:href="http://ivo.garant.ru/document/redirect/77705757/325023000">26.80.13.000</text:a></text:p>
          </table:table-cell>
        </table:table-row>
        <table:table-row>
          <table:table-cell table:style-name="0">
            <text:p text:style-name="s1_center_fi0"><text:bookmark text:name="anchor2325"/>325.</text:p>
          </table:table-cell>
          <table:table-cell table:style-name="0">
            <text:p text:style-name="s16_fi0">Карты магнитные</text:p>
          </table:table-cell>
          <table:table-cell table:style-name="0">
            <text:p text:style-name="s1_center_fi0"><text:a xlink:type="simple" xlink:href="http://ivo.garant.ru/document/redirect/70650730/5774">26.80.14</text:a></text:p>
          </table:table-cell>
        </table:table-row>
        <table:table-row>
          <table:table-cell table:style-name="0">
            <text:p text:style-name="s1_center_fi0"><text:bookmark text:name="anchor2326"/>326.</text:p>
          </table:table-cell>
          <table:table-cell table:style-name="0">
            <text:p text:style-name="s16_fi0">Кабели волоконно-оптические</text:p>
          </table:table-cell>
          <table:table-cell table:style-name="0">
            <text:p text:style-name="s1_center_fi0"><text:a xlink:type="simple" xlink:href="http://ivo.garant.ru/document/redirect/70650730/27311">27.31.1</text:a></text:p>
          </table:table-cell>
        </table:table-row>
        <table:table-row>
          <table:table-cell table:style-name="0">
            <text:p text:style-name="s1_center_fi0"><text:bookmark text:name="anchor2327"/>327.</text:p>
          </table:table-cell>
          <table:table-cell table:style-name="0">
            <text:p text:style-name="s16_fi0">Коммутаторы элементные, командоаппараты, контроллеры, переключатели барабанные, пускатели ручные, выключатели разные (только в отношении контроллеров, микропроцессорных преобразователей величин)</text:p>
          </table:table-cell>
          <table:table-cell table:style-name="0">
            <text:p text:style-name="s1_center_fi0"><text:a xlink:type="simple" xlink:href="http://ivo.garant.ru/document/redirect/70650730/273313161">27.33.13.161</text:a></text:p>
          </table:table-cell>
        </table:table-row>
        <table:table-row>
          <table:table-cell table:style-name="0">
            <text:p text:style-name="s1_center_fi0"><text:bookmark text:name="anchor2328"/>328.</text:p>
          </table:table-cell>
          <table:table-cell table:style-name="0">
            <text:p text:style-name="s16_fi0">Лампы накаливания или газоразрядные лампы; дуговые лампы; светодиодные лампы</text:p>
          </table:table-cell>
          <table:table-cell table:style-name="0">
            <text:p text:style-name="s1_center_fi0"><text:a xlink:type="simple" xlink:href="http://ivo.garant.ru/document/redirect/70650730/27401">27.40.1</text:a></text:p>
          </table:table-cell>
        </table:table-row>
        <table:table-row>
          <table:table-cell table:style-name="0">
            <text:p text:style-name="s1_center_fi0"><text:bookmark text:name="anchor2329"/>329.</text:p>
          </table:table-cell>
          <table:table-cell table:style-name="0">
            <text:p text:style-name="s16_fi0">Светильники электрические настольные, прикроватные или напольные</text:p>
          </table:table-cell>
          <table:table-cell table:style-name="0">
            <text:p text:style-name="s1_center_fi0"><text:a xlink:type="simple" xlink:href="http://ivo.garant.ru/document/redirect/70650730/27422">27.40.22</text:a></text:p>
          </table:table-cell>
        </table:table-row>
        <table:table-row>
          <table:table-cell table:style-name="0">
            <text:p text:style-name="s1_center_fi0"><text:bookmark text:name="anchor2330"/>330.</text:p>
          </table:table-cell>
          <table:table-cell table:style-name="0">
            <text:p text:style-name="s16_fi0">Указатели светящиеся, световые табло и подобные им устройства</text:p>
          </table:table-cell>
          <table:table-cell table:style-name="0">
            <text:p text:style-name="s1_center_fi0"><text:a xlink:type="simple" xlink:href="http://ivo.garant.ru/document/redirect/70650730/27424">27.40.24</text:a></text:p>
          </table:table-cell>
        </table:table-row>
        <table:table-row>
          <table:table-cell table:style-name="0">
            <text:p text:style-name="s1_center_fi0"><text:bookmark text:name="anchor2331"/>331.</text:p>
          </table:table-cell>
          <table:table-cell table:style-name="0">
            <text:p text:style-name="s16_fi0">Люстры и прочие устройства осветительные электрические подвесные, потолочные, встраиваемые и настенные</text:p>
          </table:table-cell>
          <table:table-cell table:style-name="0">
            <text:p text:style-name="s1_center_fi0"><text:a xlink:type="simple" xlink:href="http://ivo.garant.ru/document/redirect/70650730/274025">27.40.25</text:a></text:p>
          </table:table-cell>
        </table:table-row>
        <table:table-row>
          <table:table-cell table:style-name="0">
            <text:p text:style-name="s1_center_fi0"><text:bookmark text:name="anchor2332"/>332.</text:p>
          </table:table-cell>
          <table:table-cell table:style-name="0">
            <text:p text:style-name="s16_fi0">Лампы-вспышки фотографические, фотоосветители типа "кубик" и аналогичные изделия</text:p>
          </table:table-cell>
          <table:table-cell table:style-name="0">
            <text:p text:style-name="s1_center_fi0"><text:a xlink:type="simple" xlink:href="http://ivo.garant.ru/document/redirect/70650730/274031">27.40.31</text:a></text:p>
          </table:table-cell>
        </table:table-row>
        <table:table-row>
          <table:table-cell table:style-name="0">
            <text:p text:style-name="s1_center_fi0"><text:bookmark text:name="anchor2333"/>333.</text:p>
          </table:table-cell>
          <table:table-cell table:style-name="0">
            <text:p text:style-name="s16_fi0">Прожекторы и аналогичные светильники узконаправленного света</text:p>
          </table:table-cell>
          <table:table-cell table:style-name="0">
            <text:p text:style-name="s1_center_fi0"><text:a xlink:type="simple" xlink:href="http://ivo.garant.ru/document/redirect/70650730/27433">27.40.33</text:a></text:p>
          </table:table-cell>
        </table:table-row>
        <table:table-row>
          <table:table-cell table:style-name="0">
            <text:p text:style-name="s1_center_fi0"><text:bookmark text:name="anchor2334"/>334.</text:p>
          </table:table-cell>
          <table:table-cell table:style-name="0">
            <text:p text:style-name="s16_fi0">Светильники медицинские, соответствующие кодам 129360, 18716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27439">27.40.39</text:a></text:p>
            <text:p text:style-name="s1_center_fi0"><text:a xlink:type="simple" xlink:href="http://ivo.garant.ru/document/redirect/70650730/325050190">32.50.50.190</text:a></text:p>
          </table:table-cell>
        </table:table-row>
        <table:table-row>
          <table:table-cell table:style-name="0">
            <text:p text:style-name="s1_center_fi0"><text:bookmark text:name="anchor2335"/>335.</text:p>
          </table:table-cell>
          <table:table-cell table:style-name="0">
            <text:p text:style-name="s16_fi0">Части светильников и осветительных устройств</text:p>
          </table:table-cell>
          <table:table-cell table:style-name="0">
            <text:p text:style-name="s1_center_fi0"><text:a xlink:type="simple" xlink:href="http://ivo.garant.ru/document/redirect/70650730/5871">27.40.42</text:a></text:p>
          </table:table-cell>
        </table:table-row>
        <table:table-row>
          <table:table-cell table:style-name="0">
            <text:p text:style-name="s1_center_fi0"><text:bookmark text:name="anchor2336"/>336.</text:p>
          </table:table-cell>
          <table:table-cell table:style-name="0">
            <text:p text:style-name="s16_fi0">Приборы электромеханические бытовые хозяйственные со встроенным электродвигателем прочие, не включенные в другие группировки</text:p>
          </table:table-cell>
          <table:table-cell table:style-name="0">
            <text:p text:style-name="s1_center_fi0"><text:a xlink:type="simple" xlink:href="http://ivo.garant.ru/document/redirect/70650730/275121119">27.51.21.119</text:a></text:p>
          </table:table-cell>
        </table:table-row>
        <table:table-row>
          <table:table-cell table:style-name="0">
            <text:p text:style-name="s1_center_fi0"><text:bookmark text:name="anchor2337"/>337.</text:p>
          </table:table-cell>
          <table:table-cell table:style-name="0">
            <text:p text:style-name="s16_fi0">Машины и приборы для механизации кухонных работ</text:p>
          </table:table-cell>
          <table:table-cell table:style-name="0">
            <text:p text:style-name="s1_center_fi0"><text:a xlink:type="simple" xlink:href="http://ivo.garant.ru/document/redirect/70650730/275121120">27.51.21.120</text:a></text:p>
          </table:table-cell>
        </table:table-row>
        <table:table-row>
          <table:table-cell table:style-name="0">
            <text:p text:style-name="s1_center_fi0"><text:bookmark text:name="anchor2338"/>338.</text:p>
          </table:table-cell>
          <table:table-cell table:style-name="0">
            <text:p text:style-name="s16_fi0">Утюги электрические</text:p>
          </table:table-cell>
          <table:table-cell table:style-name="0">
            <text:p text:style-name="s1_center_fi0"><text:a xlink:type="simple" xlink:href="http://ivo.garant.ru/document/redirect/70650730/275123130">27.51.23.130</text:a></text:p>
          </table:table-cell>
        </table:table-row>
        <table:table-row>
          <table:table-cell table:style-name="0">
            <text:p text:style-name="s1_center_fi0"><text:bookmark text:name="anchor2339"/>339.</text:p>
          </table:table-cell>
          <table:table-cell table:style-name="0">
            <text:p text:style-name="s16_fi0">Электрочайники</text:p>
          </table:table-cell>
          <table:table-cell table:style-name="0">
            <text:p text:style-name="s1_center_fi0"><text:a xlink:type="simple" xlink:href="http://ivo.garant.ru/document/redirect/70650730/275124110">27.51.24.110</text:a></text:p>
          </table:table-cell>
        </table:table-row>
        <table:table-row>
          <table:table-cell table:style-name="0">
            <text:p text:style-name="s1_center_fi0"><text:bookmark text:name="anchor2340"/>340.</text:p>
          </table:table-cell>
          <table:table-cell table:style-name="0">
            <text:p text:style-name="s16_fi0">Приборы электронагревательные бытовые прочие, не включенные в другие группировки</text:p>
          </table:table-cell>
          <table:table-cell table:style-name="0">
            <text:p text:style-name="s1_center_fi0"><text:a xlink:type="simple" xlink:href="http://ivo.garant.ru/document/redirect/70650730/951110021">27.51.24.190</text:a></text:p>
          </table:table-cell>
        </table:table-row>
        <table:table-row>
          <table:table-cell table:style-name="0">
            <text:p text:style-name="s1_center_fi0"><text:bookmark text:name="anchor2341"/>341.</text:p>
          </table:table-cell>
          <table:table-cell table:style-name="0">
            <text:p text:style-name="s16_fi0">Кипятильники погружные электрические</text:p>
          </table:table-cell>
          <table:table-cell table:style-name="0">
            <text:p text:style-name="s1_center_fi0"><text:a xlink:type="simple" xlink:href="http://ivo.garant.ru/document/redirect/70650730/951110023">27.51.25.120</text:a></text:p>
          </table:table-cell>
        </table:table-row>
        <table:table-row>
          <table:table-cell table:style-name="0">
            <text:p text:style-name="s1_center_fi0"><text:bookmark text:name="anchor2342"/>342.</text:p>
          </table:table-cell>
          <table:table-cell table:style-name="0">
            <text:p text:style-name="s16_fi0">Печи микроволновые</text:p>
          </table:table-cell>
          <table:table-cell table:style-name="0">
            <text:p text:style-name="s1_center_fi0"><text:a xlink:type="simple" xlink:href="http://ivo.garant.ru/document/redirect/70650730/2751270">27.51.27.000</text:a></text:p>
          </table:table-cell>
        </table:table-row>
        <table:table-row>
          <table:table-cell table:style-name="0">
            <text:p text:style-name="s1_center_fi0"><text:bookmark text:name="anchor2343"/>343.</text:p>
          </table:table-cell>
          <table:table-cell table:style-name="0">
            <text:p text:style-name="s16_fi0">Анализаторы частиц</text:p>
          </table:table-cell>
          <table:table-cell table:style-name="0">
            <text:p text:style-name="s1_center_fi0"><text:a xlink:type="simple" xlink:href="http://ivo.garant.ru/document/redirect/70650730/279011171">27.90.11.171</text:a></text:p>
          </table:table-cell>
        </table:table-row>
        <table:table-row>
          <table:table-cell table:style-name="0">
            <text:p text:style-name="s1_center_fi0"><text:bookmark text:name="anchor2344"/>344.</text:p>
          </table:table-cell>
          <table:table-cell table:style-name="0">
            <text:p text:style-name="s16_fi0">Приборы световой и звуковой сигнализации электрические</text:p>
          </table:table-cell>
          <table:table-cell table:style-name="0">
            <text:p text:style-name="s1_center_fi0"><text:a xlink:type="simple" xlink:href="http://ivo.garant.ru/document/redirect/70650730/279020120">27.90.20.120</text:a></text:p>
          </table:table-cell>
        </table:table-row>
        <table:table-row>
          <table:table-cell table:style-name="0">
            <text:p text:style-name="s1_center_fi0"><text:bookmark text:name="anchor2345"/>345.</text:p>
          </table:table-cell>
          <table:table-cell table:style-name="0">
            <text:p text:style-name="s16_fi0">Генераторы сигналов электрические</text:p>
          </table:table-cell>
          <table:table-cell table:style-name="0">
            <text:p text:style-name="s1_center_fi0"><text:a xlink:type="simple" xlink:href="http://ivo.garant.ru/document/redirect/70650730/279040150">27.90.40.150</text:a></text:p>
          </table:table-cell>
        </table:table-row>
        <table:table-row>
          <table:table-cell table:style-name="0">
            <text:p text:style-name="s1_center_fi0"><text:bookmark text:name="anchor2346"/>346.</text:p>
          </table:table-cell>
          <table:table-cell table:style-name="0">
            <text:p text:style-name="s16_fi0">Оборудование электрическое прочее, не включенное в другие группировки</text:p>
          </table:table-cell>
          <table:table-cell table:style-name="0">
            <text:p text:style-name="s1_center_fi0"><text:a xlink:type="simple" xlink:href="http://ivo.garant.ru/document/redirect/70650730/279419">27.90.40.190</text:a></text:p>
          </table:table-cell>
        </table:table-row>
        <table:table-row>
          <table:table-cell table:style-name="0">
            <text:p text:style-name="s1_center_fi0"><text:bookmark text:name="anchor2347"/>347.</text:p>
          </table:table-cell>
          <table:table-cell table:style-name="0">
            <text:p text:style-name="s16_fi0">Устройства электрической сигнализации, электрооборудование для обеспечения безопасности или управления движением на железных дорогах, трамвайных путях, автомобильных дорогах, внутренних водных путях, площадках для парковки, в портовых сооружениях или на аэродромах</text:p>
          </table:table-cell>
          <table:table-cell table:style-name="0">
            <text:p text:style-name="s1_center_fi0"><text:a xlink:type="simple" xlink:href="http://ivo.garant.ru/document/redirect/70650730/279070">27.90.70</text:a></text:p>
          </table:table-cell>
        </table:table-row>
        <table:table-row>
          <table:table-cell table:style-name="0">
            <text:p text:style-name="s1_center_fi0"><text:bookmark text:name="anchor2348"/>348.</text:p>
          </table:table-cell>
          <table:table-cell table:style-name="0">
            <text:p text:style-name="s16_fi0">Машины, содержащие счетные устройства, прочие, не включенные в другие группировки</text:p>
          </table:table-cell>
          <table:table-cell table:style-name="0">
            <text:p text:style-name="s1_center_fi0"><text:a xlink:type="simple" xlink:href="http://ivo.garant.ru/document/redirect/70650730/282313190">28.23.13.190</text:a></text:p>
          </table:table-cell>
        </table:table-row>
        <table:table-row>
          <table:table-cell table:style-name="0">
            <text:p text:style-name="s1_center_fi0"><text:bookmark text:name="anchor2349"/>349.</text:p>
          </table:table-cell>
          <table:table-cell table:style-name="0">
            <text:p text:style-name="s16_fi0">Машины офисные прочие</text:p>
          </table:table-cell>
          <table:table-cell table:style-name="0">
            <text:p text:style-name="s1_center_fi0"><text:a xlink:type="simple" xlink:href="http://ivo.garant.ru/document/redirect/70650730/6147">28.23.23</text:a></text:p>
          </table:table-cell>
        </table:table-row>
        <table:table-row>
          <table:table-cell table:style-name="0">
            <text:p text:style-name="s1_center_fi0"><text:bookmark text:name="anchor2350"/>350.</text:p>
          </table:table-cell>
          <table:table-cell table:style-name="0">
            <text:p text:style-name="s16_fi0">Медицинские морозильники, холодильники комбинированные лабораторные, холодильники фармацевтические, соответствующие кодам 122990, 143910, 145090, 215850, 261620, 32168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282513110">28.25.13.110</text:a> <text:a xlink:type="simple" xlink:href="http://ivo.garant.ru/document/redirect/70650730/252513116">28.25.13.116</text:a> <text:a xlink:type="simple" xlink:href="http://ivo.garant.ru/document/redirect/70650730/325050">32.50.50</text:a></text:p>
          </table:table-cell>
        </table:table-row>
        <table:table-row>
          <table:table-cell table:style-name="0">
            <text:p text:style-name="s1_center_fi0"><text:bookmark text:name="anchor2351"/>351.</text:p>
          </table:table-cell>
          <table:table-cell table:style-name="0">
            <text:p text:style-name="s16_fi0">Оборудование и аппаратура, исключительно или в основном используемые для производства полупроводниковых слитков или пластин, полупроводниковых устройств, электронных интегральных микросхем или плоскопанельных дисплеев</text:p>
          </table:table-cell>
          <table:table-cell table:style-name="0">
            <text:p text:style-name="s1_center_fi0"><text:a xlink:type="simple" xlink:href="http://ivo.garant.ru/document/redirect/70650730/6487">28.99.20</text:a></text:p>
          </table:table-cell>
        </table:table-row>
        <table:table-row>
          <table:table-cell table:style-name="0">
            <text:p text:style-name="s1_center_fi0"><text:bookmark text:name="anchor2352"/>352.</text:p>
          </table:table-cell>
          <table:table-cell table:style-name="0">
            <text:p text:style-name="s16_fi0">Тахографы</text:p>
          </table:table-cell>
          <table:table-cell table:style-name="0">
            <text:p text:style-name="s1_center_fi0"><text:a xlink:type="simple" xlink:href="http://ivo.garant.ru/document/redirect/70650730/6561">29.32.30.163</text:a></text:p>
          </table:table-cell>
        </table:table-row>
        <table:table-row>
          <table:table-cell table:style-name="0">
            <text:p text:style-name="s1_center_fi0"><text:bookmark text:name="anchor2353"/>353.</text:p>
          </table:table-cell>
          <table:table-cell table:style-name="0">
            <text:p text:style-name="s16_fi0">Аппараты электрохирургические, соответствующие кодам 119890, 126550, 127830, 172260, 228980, 228990, 229000, 260140, 260500, 268390, 282800, 2829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2.50.1</text:a></text:p>
            <text:p text:style-name="s1_center_fi0"><text:a xlink:type="simple" xlink:href="http://ivo.garant.ru/document/redirect/70650730/325013190">32.50.13.190</text:a></text:p>
          </table:table-cell>
        </table:table-row>
        <table:table-row>
          <table:table-cell table:style-name="0">
            <text:p text:style-name="s1_center_fi0"><text:bookmark text:name="anchor2354"/>354.</text:p>
          </table:table-cell>
          <table:table-cell table:style-name="0">
            <text:p text:style-name="s16_fi0">Стерилизаторы хирургические или лабораторные</text:p>
          </table:table-cell>
          <table:table-cell table:style-name="0">
            <text:p text:style-name="s1_center_fi0"><text:a xlink:type="simple" xlink:href="http://ivo.garant.ru/document/redirect/70650730/325012">32.50.12</text:a></text:p>
          </table:table-cell>
        </table:table-row>
        <table:table-row>
          <table:table-cell table:style-name="0">
            <text:p text:style-name="s1_center_fi0"><text:bookmark text:name="anchor2355"/>355.</text:p>
          </table:table-cell>
          <table:table-cell table:style-name="0">
            <text:p text:style-name="s16_fi0">Аппараты для ингаляционного наркоза (за исключением аппаратов искусственной вентиляции легких, соответствующих кодам 232870, 23289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21">32.50.21.121</text:a></text:p>
          </table:table-cell>
        </table:table-row>
        <table:table-row>
          <table:table-cell table:style-name="0">
            <text:p text:style-name="s1_center_fi0"><text:bookmark text:name="anchor2356"/>356.</text:p>
          </table:table-cell>
          <table:table-cell table:style-name="0">
            <text:p text:style-name="s16_fi0">Аппараты дыхательные реанимационные (за исключением аппаратов искусственной вентиляции легких, соответствующих кодам 232870, 23289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21122">32.50.21.122</text:a></text:p>
          </table:table-cell>
        </table:table-row>
        <table:table-row>
          <table:table-cell table:style-name="0">
            <text:p text:style-name="s1_center_fi0"><text:bookmark text:name="anchor2357"/>357.</text:p>
          </table:table-cell>
          <table:table-cell table:style-name="0">
            <text:p text:style-name="s16_fi0">Оборудование дыхательное прочее, не включенное в другие группировки</text:p>
          </table:table-cell>
          <table:table-cell table:style-name="0">
            <text:p text:style-name="s1_center_fi0"><text:a xlink:type="simple" xlink:href="http://ivo.garant.ru/document/redirect/70650730/32521129">32.50.21.129</text:a></text:p>
          </table:table-cell>
        </table:table-row>
        <table:table-row>
          <table:table-cell table:style-name="0">
            <text:p text:style-name="s1_center_fi0"><text:bookmark text:name="anchor2358"/>358.</text:p>
          </table:table-cell>
          <table:table-cell table:style-name="0">
            <text:p text:style-name="s16_fi0">Инкубаторы для новорожденных</text:p>
          </table:table-cell>
          <table:table-cell table:style-name="0">
            <text:p text:style-name="s1_center_fi0"><text:a xlink:type="simple" xlink:href="http://ivo.garant.ru/document/redirect/70650730/325021160">32.50.21.160</text:a></text:p>
          </table:table-cell>
        </table:table-row>
        <table:table-row>
          <table:table-cell table:style-name="0">
            <text:p text:style-name="s1_center_fi0"><text:bookmark text:name="anchor2359"/>359.</text:p>
          </table:table-cell>
          <table:table-cell table:style-name="0">
            <text:p text:style-name="s16_fi0">Ванна ультразвуковая для очистки и дезинфекции инструментов, соответствующая коду 1275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50">32.50.50</text:a></text:p>
            <text:p text:style-name="s1_center_fi0"><text:a xlink:type="simple" xlink:href="http://ivo.garant.ru/document/redirect/70650730/325050190">32.50.50.190</text:a></text:p>
          </table:table-cell>
        </table:table-row>
        <table:table-row>
          <table:table-cell table:style-name="0">
            <text:p text:style-name="s1_center_fi0"><text:bookmark text:name="anchor2360"/>360.</text:p>
          </table:table-cell>
          <table:table-cell table:style-name="0">
            <text:p text:style-name="s16_fi0">Облучатели-рециркуляторы воздуха, рециркуляторы бактерицидные, соответствующие кодам 131980, 132020, 132060, 132070, 152690, 152700, 160030, 270540, 292620, 37593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50190">32.50.50.190</text:a></text:p>
          </table:table-cell>
        </table:table-row>
        <table:table-row>
          <table:table-cell table:style-name="0">
            <text:p text:style-name="s1_center_fi0"><text:bookmark text:name="anchor2361"/>361.</text:p>
          </table:table-cell>
          <table:table-cell table:style-name="0">
            <text:p text:style-name="s16_fi0">Консоли подвода медицинских газов и электропитания, соответствующие кодам 259390, 259380, 157680, 3356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9959">32.99.59</text:a></text:p>
          </table:table-cell>
        </table:table-row>
        <table:table-row>
          <table:table-cell table:style-name="0">
            <text:p text:style-name="s1_center_fi0"><text:bookmark text:name="anchor2362"/>362.</text:p>
          </table:table-cell>
          <table:table-cell table:style-name="0">
            <text:p text:style-name="s16_fi0">Изделия санитарно-гигиенические - абсорбирующее белье (подгузники (за исключением размера XS (сверхмалые), пеленки)</text:p>
          </table:table-cell>
          <table:table-cell table:style-name="0">
            <text:p text:style-name="s1_center_fi0"><text:a xlink:type="simple" xlink:href="http://ivo.garant.ru/document/redirect/70650730/1722130">17.22.12.130</text:a></text:p>
            <text:p text:style-name="s1_center_fi0"><text:a xlink:type="simple" xlink:href="http://ivo.garant.ru/document/redirect/70650730/325050149">32.50.50.149</text:a></text:p>
            <text:p text:style-name="s1_center_fi0"><text:a xlink:type="simple" xlink:href="http://ivo.garant.ru/document/redirect/70650730/139510190">13.95.10.190</text:a></text:p>
            <text:p text:style-name="s1_center_fi0"><text:a xlink:type="simple" xlink:href="http://ivo.garant.ru/document/redirect/70650730/325050">32.50.50</text:a></text:p>
          </table:table-cell>
        </table:table-row>
        <table:table-row>
          <table:table-cell table:style-name="0">
            <text:p text:style-name="s1_center_fi0"><text:bookmark text:name="anchor2363"/>363.</text:p>
          </table:table-cell>
          <table:table-cell table:style-name="0">
            <text:p text:style-name="s16_fi0">Микроисточники с йодом-125</text:p>
          </table:table-cell>
          <table:table-cell table:style-name="0">
            <text:p text:style-name="s1_center_fi0"><text:a xlink:type="simple" xlink:href="http://ivo.garant.ru/document/redirect/70650730/266011130">26.60.11.130</text:a></text:p>
          </table:table-cell>
        </table:table-row>
        <table:table-row>
          <table:table-cell table:style-name="0">
            <text:p text:style-name="s1_center_fi0"><text:bookmark text:name="anchor2364"/>364.</text:p>
          </table:table-cell>
          <table:table-cell table:style-name="0">
            <text:p text:style-name="s16_fi0">Медицинские изделия, содержащие антисептические и дезинфицирующие препараты</text:p>
          </table:table-cell>
          <table:table-cell table:style-name="0">
            <text:p text:style-name="s1_center_fi0"><text:a xlink:type="simple" xlink:href="http://ivo.garant.ru/document/redirect/70650730/202014000">20.20.14.000</text:a></text:p>
          </table:table-cell>
        </table:table-row>
        <table:table-row>
          <table:table-cell table:style-name="0">
            <text:p text:style-name="s1_center_fi0"><text:bookmark text:name="anchor2365"/>365.</text:p>
          </table:table-cell>
          <table:table-cell table:style-name="0">
            <text:p text:style-name="s16_fi0">Питательные среды селективные и неселективные</text:p>
          </table:table-cell>
          <table:table-cell table:style-name="0">
            <text:p text:style-name="s1_center_fi0"><text:a xlink:type="simple" xlink:href="http://ivo.garant.ru/document/redirect/70650730/951110068">20.59.52.140</text:a></text:p>
            <text:p text:style-name="s1_center_fi0"><text:a xlink:type="simple" xlink:href="http://ivo.garant.ru/document/redirect/70650730/205952150">20.59.52.150</text:a></text:p>
          </table:table-cell>
        </table:table-row>
        <table:table-row>
          <table:table-cell table:style-name="0">
            <text:p text:style-name="s1_center_fi0"><text:bookmark text:name="anchor2366"/>366.</text:p>
          </table:table-cell>
          <table:table-cell table:style-name="0">
            <text:p text:style-name="s16_fi0">Наборы реагентов для неонатального скрининга в сухих пятнах крови</text:p>
          </table:table-cell>
          <table:table-cell table:style-name="0">
            <text:p text:style-name="s1_center_fi0"><text:a xlink:type="simple" xlink:href="http://ivo.garant.ru/document/redirect/70650730/23110">21.20.23.110</text:a></text:p>
          </table:table-cell>
        </table:table-row>
        <table:table-row>
          <table:table-cell table:style-name="0">
            <text:p text:style-name="s1_center_fi0"><text:bookmark text:name="anchor2367"/>367.</text:p>
          </table:table-cell>
          <table:table-cell table:style-name="0">
            <text:p text:style-name="s16_fi0">Наборы (комплекты) реагентов для гематологических анализаторов</text:p>
          </table:table-cell>
          <table:table-cell table:style-name="0">
            <text:p text:style-name="s1_center_fi0"><text:a xlink:type="simple" xlink:href="http://ivo.garant.ru/document/redirect/70650730/23110">21.20.23.110</text:a></text:p>
          </table:table-cell>
        </table:table-row>
        <table:table-row>
          <table:table-cell table:style-name="0">
            <text:p text:style-name="s1_center_fi0"><text:bookmark text:name="anchor2368"/>368.</text:p>
          </table:table-cell>
          <table:table-cell table:style-name="0">
            <text:p text:style-name="s16_fi0">Наборы биохимических реагентов для определения ферментов</text:p>
          </table:table-cell>
          <table:table-cell table:style-name="0">
            <text:p text:style-name="s1_center_fi0"><text:a xlink:type="simple" xlink:href="http://ivo.garant.ru/document/redirect/70650730/951110069">20.59.52.199</text:a></text:p>
            <text:p text:style-name="s1_center_fi0"><text:a xlink:type="simple" xlink:href="http://ivo.garant.ru/document/redirect/70650730/951110066">21.20.23.111</text:a></text:p>
            <text:p text:style-name="s1_center_fi0"><text:a xlink:type="simple" xlink:href="http://ivo.garant.ru/document/redirect/70650730/23110">21.20.23.110</text:a></text:p>
          </table:table-cell>
        </table:table-row>
        <table:table-row>
          <table:table-cell table:style-name="0">
            <text:p text:style-name="s1_center_fi0"><text:bookmark text:name="anchor2369"/>369.</text:p>
          </table:table-cell>
          <table:table-cell table:style-name="0">
            <text:p text:style-name="s16_fi0">Наборы реагентов для выявления инфекционных агентов методом полимеразной цепной реакции; наборы реагентов для количественного и качественного определения иммуноглобулинов или антигенов инфекционных агентов методом иммуноферментного анализа; наборы реагентов для количественного определения гормонов методом иммуноферментного анализа</text:p>
          </table:table-cell>
          <table:table-cell table:style-name="0">
            <text:p text:style-name="s1_center_fi0"><text:a xlink:type="simple" xlink:href="http://ivo.garant.ru/document/redirect/70650730/951110064">21.10.60.196</text:a></text:p>
            <text:p text:style-name="s1_center_fi0"><text:a xlink:type="simple" xlink:href="http://ivo.garant.ru/document/redirect/70650730/205952195">20.59.52.195</text:a></text:p>
            <text:p text:style-name="s1_center_fi0"><text:a xlink:type="simple" xlink:href="http://ivo.garant.ru/document/redirect/70650730/23110">21.20.23.110</text:a></text:p>
            <text:p text:style-name="s1_center_fi0"><text:a xlink:type="simple" xlink:href="http://ivo.garant.ru/document/redirect/70650730/2121110">21.20.21.110</text:a></text:p>
          </table:table-cell>
        </table:table-row>
        <table:table-row>
          <table:table-cell table:style-name="0">
            <text:p text:style-name="s1_center_fi0"><text:bookmark text:name="anchor2370"/>370.</text:p>
          </table:table-cell>
          <table:table-cell table:style-name="0">
            <text:p text:style-name="s16_fi0">Наборы биохимических реагентов для определения факторов свертывания крови</text:p>
          </table:table-cell>
          <table:table-cell table:style-name="0">
            <text:p text:style-name="s1_center_fi0"><text:a xlink:type="simple" xlink:href="http://ivo.garant.ru/document/redirect/70650730/23110">21.20.23.110</text:a></text:p>
          </table:table-cell>
        </table:table-row>
        <table:table-row>
          <table:table-cell table:style-name="0">
            <text:p text:style-name="s1_center_fi0"><text:bookmark text:name="anchor2371"/>371.</text:p>
          </table:table-cell>
          <table:table-cell table:style-name="0">
            <text:p text:style-name="s16_fi0">Тест-полоски для определения содержания глюкозы в крови, соответствующие коду 24890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23110">21.20.23.110</text:a></text:p>
          </table:table-cell>
        </table:table-row>
        <table:table-row>
          <table:table-cell table:style-name="0">
            <text:p text:style-name="s1_center_fi0"><text:bookmark text:name="anchor2372"/>372.</text:p>
          </table:table-cell>
          <table:table-cell table:style-name="0">
            <text:p text:style-name="s16_fi0">Наборы биохимических реагентов для определения субстратов; наборы реагентов для определения групп крови и резус-фактора; наборы реагентов для фенотипирования крови человека по групповым системам резус, Келл и Кидд</text:p>
          </table:table-cell>
          <table:table-cell table:style-name="0">
            <text:p text:style-name="s1_center_fi0"><text:a xlink:type="simple" xlink:href="http://ivo.garant.ru/document/redirect/70650730/951110066">21.20.23.111</text:a></text:p>
            <text:p text:style-name="s1_center_fi0"><text:a xlink:type="simple" xlink:href="http://ivo.garant.ru/document/redirect/70650730/23110">21.20.23.110</text:a></text:p>
            <text:p text:style-name="s1_center_fi0"><text:a xlink:type="simple" xlink:href="http://ivo.garant.ru/document/redirect/70650730/325013190">32.50.13.190</text:a></text:p>
          </table:table-cell>
        </table:table-row>
        <table:table-row>
          <table:table-cell table:style-name="0">
            <text:p text:style-name="s1_center_fi0"><text:bookmark text:name="anchor2373"/>373.</text:p>
          </table:table-cell>
          <table:table-cell table:style-name="0">
            <text:p text:style-name="s16_fi0">Материалы клейкие перевязочные, в том числе пропитанные или покрытые лекарственными средствами</text:p>
          </table:table-cell>
          <table:table-cell table:style-name="0">
            <text:p text:style-name="s1_center_fi0"><text:a xlink:type="simple" xlink:href="http://ivo.garant.ru/document/redirect/70650730/212024110">21.20.24.110</text:a></text:p>
            <text:p text:style-name="s1_center_fi0"><text:a xlink:type="simple" xlink:href="http://ivo.garant.ru/document/redirect/70650730/212024160">21.20.24.160</text:a></text:p>
          </table:table-cell>
        </table:table-row>
        <table:table-row>
          <table:table-cell table:style-name="0">
            <text:p text:style-name="s1_center_fi0"><text:bookmark text:name="anchor2374"/>374.</text:p>
          </table:table-cell>
          <table:table-cell table:style-name="0">
            <text:p text:style-name="s16_fi0">Бинты стерильные и нестерильные марлевые</text:p>
          </table:table-cell>
          <table:table-cell table:style-name="0">
            <text:p text:style-name="s1_center_fi0"><text:a xlink:type="simple" xlink:href="http://ivo.garant.ru/document/redirect/70650730/2124131">21.20.24.131</text:a></text:p>
            <text:p text:style-name="s1_center_fi0"><text:a xlink:type="simple" xlink:href="http://ivo.garant.ru/document/redirect/70650730/212024130">21.20.24.130</text:a></text:p>
          </table:table-cell>
        </table:table-row>
        <table:table-row>
          <table:table-cell table:style-name="0">
            <text:p text:style-name="s1_center_fi0"><text:bookmark text:name="anchor2375"/>375.</text:p>
          </table:table-cell>
          <table:table-cell table:style-name="0">
            <text:p text:style-name="s16_fi0">Маски марлевые медицинские стерильные и нестерильные; отрезы марлевые медицинские стерильные и нестерильные; пакеты перевязочные медицинские стерильные; тампоны, сетоны, турунды, шарики марлевые стерильные и нестерильные</text:p>
          </table:table-cell>
          <table:table-cell table:style-name="0">
            <text:p text:style-name="s1_center_fi0"><text:a xlink:type="simple" xlink:href="http://ivo.garant.ru/document/redirect/70650730/1344120">13.20.44.120</text:a></text:p>
            <text:p text:style-name="s1_center_fi0"><text:a xlink:type="simple" xlink:href="http://ivo.garant.ru/document/redirect/70650730/2124131">21.20.24.131</text:a></text:p>
            <text:p text:style-name="s1_center_fi0"><text:a xlink:type="simple" xlink:href="http://ivo.garant.ru/document/redirect/70650730/4361">21.20.24.140</text:a></text:p>
            <text:p text:style-name="s1_center_fi0"><text:a xlink:type="simple" xlink:href="http://ivo.garant.ru/document/redirect/70650730/212024150">21.20.24.150</text:a></text:p>
            <text:p text:style-name="s1_center_fi0"><text:a xlink:type="simple" xlink:href="http://ivo.garant.ru/document/redirect/70650730/212024169">21.20.24.169</text:a></text:p>
            <text:p text:style-name="s1_center_fi0"><text:a xlink:type="simple" xlink:href="http://ivo.garant.ru/document/redirect/70650730/325050190">32.50.50.190</text:a></text:p>
          </table:table-cell>
        </table:table-row>
        <table:table-row>
          <table:table-cell table:style-name="0">
            <text:p text:style-name="s1_center_fi0"><text:bookmark text:name="anchor2376"/>376.</text:p>
          </table:table-cell>
          <table:table-cell table:style-name="0">
            <text:p text:style-name="s16_fi0">Повязки и покрытия раневые, пропитанные или покрытые лекарственными средствами; салфетки антисептические спиртовые; салфетки марлевые медицинские стерильные и нестерильные</text:p>
          </table:table-cell>
          <table:table-cell table:style-name="0">
            <text:p text:style-name="s1_center_fi0"><text:a xlink:type="simple" xlink:href="http://ivo.garant.ru/document/redirect/70650730/202014000">20.20.14.000</text:a></text:p>
            <text:p text:style-name="s1_center_fi0"><text:a xlink:type="simple" xlink:href="http://ivo.garant.ru/document/redirect/70650730/212010158">21.20.10.158</text:a></text:p>
            <text:p text:style-name="s1_center_fi0"><text:a xlink:type="simple" xlink:href="http://ivo.garant.ru/document/redirect/70650730/212024110">21.20.24.110</text:a></text:p>
            <text:p text:style-name="s1_center_fi0"><text:a xlink:type="simple" xlink:href="http://ivo.garant.ru/document/redirect/70650730/212024150">21.20.24.150</text:a></text:p>
            <text:p text:style-name="s1_center_fi0"><text:a xlink:type="simple" xlink:href="http://ivo.garant.ru/document/redirect/70650730/212024160">21.20.24.160</text:a></text:p>
            <text:p text:style-name="s1_center_fi0"><text:a xlink:type="simple" xlink:href="http://ivo.garant.ru/document/redirect/70650730/212024170">21.20.24.170</text:a></text:p>
            <text:p text:style-name="s1_center_fi0"><text:a xlink:type="simple" xlink:href="http://ivo.garant.ru/document/redirect/70650730/212024169">21.20.24.169</text:a></text:p>
            <text:p text:style-name="s1_center_fi0"><text:a xlink:type="simple" xlink:href="http://ivo.garant.ru/document/redirect/70650730/325050">32.50.50</text:a></text:p>
          </table:table-cell>
        </table:table-row>
        <table:table-row>
          <table:table-cell table:style-name="0">
            <text:p text:style-name="s1_center_fi0"><text:bookmark text:name="anchor2377"/>377.</text:p>
          </table:table-cell>
          <table:table-cell table:style-name="0">
            <text:p text:style-name="s16_fi0">Матрацы противопролежневые ортопедические с эффектом запоминания формы; матрацы противопролежневые с гелевыми элементами; подушки противопролежневые ортопедические с эффектом запоминания формы</text:p>
          </table:table-cell>
          <table:table-cell table:style-name="0">
            <text:p text:style-name="s1_center_fi0"><text:a xlink:type="simple" xlink:href="http://ivo.garant.ru/document/redirect/70650730/139224141">13.92.24.141</text:a></text:p>
            <text:p text:style-name="s1_center_fi0"><text:a xlink:type="simple" xlink:href="http://ivo.garant.ru/document/redirect/70650730/310312140">31.03.12.140</text:a></text:p>
            <text:p text:style-name="s1_center_fi0"><text:a xlink:type="simple" xlink:href="http://ivo.garant.ru/document/redirect/70650730/325022125">32.50.22.125</text:a></text:p>
            <text:p text:style-name="s1_center_fi0"><text:a xlink:type="simple" xlink:href="http://ivo.garant.ru/document/redirect/70650730/3252129">32.50.22.129</text:a></text:p>
            <text:p text:style-name="s1_center_fi0"><text:a xlink:type="simple" xlink:href="http://ivo.garant.ru/document/redirect/70650730/325050">32.50.50</text:a></text:p>
          </table:table-cell>
        </table:table-row>
        <table:table-row>
          <table:table-cell table:style-name="0">
            <text:p text:style-name="s1_center_fi0"><text:bookmark text:name="anchor2378"/>378.</text:p>
          </table:table-cell>
          <table:table-cell table:style-name="0">
            <text:p text:style-name="s16_fi0">Контейнеры для биопроб полимерные</text:p>
          </table:table-cell>
          <table:table-cell table:style-name="0">
            <text:p text:style-name="s1_center_fi0"><text:a xlink:type="simple" xlink:href="http://ivo.garant.ru/document/redirect/70650730/222214">22.22.14</text:a></text:p>
            <text:p text:style-name="s1_center_fi0"><text:a xlink:type="simple" xlink:href="http://ivo.garant.ru/document/redirect/70650730/222929130">22.29.29.130</text:a></text:p>
            <text:p text:style-name="s1_center_fi0"><text:a xlink:type="simple" xlink:href="http://ivo.garant.ru/document/redirect/70650730/325050190">32.50.50.190</text:a></text:p>
            <text:p text:style-name="s1_center_fi0"><text:a xlink:type="simple" xlink:href="http://ivo.garant.ru/document/redirect/70650730/22221419">22.22.14.190</text:a></text:p>
            <text:p text:style-name="s1_center_fi0"><text:a xlink:type="simple" xlink:href="http://ivo.garant.ru/document/redirect/70650730/325013190">32.50.13.190</text:a></text:p>
            <text:p text:style-name="s1_center_fi0"><text:a xlink:type="simple" xlink:href="http://ivo.garant.ru/document/redirect/70650730/205952150">20.59.52.150</text:a></text:p>
          </table:table-cell>
        </table:table-row>
        <table:table-row>
          <table:table-cell table:style-name="0">
            <text:p text:style-name="s1_center_fi0"><text:bookmark text:name="anchor2379"/>379.</text:p>
          </table:table-cell>
          <table:table-cell table:style-name="0">
            <text:p text:style-name="s16_fi0">Микроскопы медицинские; микроскопы для клинической лабораторной диагностики; микроскопы биологические</text:p>
          </table:table-cell>
          <table:table-cell table:style-name="0">
            <text:p text:style-name="s1_center_fi0"><text:a xlink:type="simple" xlink:href="http://ivo.garant.ru/document/redirect/70650730/266012119">26.60.12.119</text:a></text:p>
            <text:p text:style-name="s1_center_fi0"><text:a xlink:type="simple" xlink:href="http://ivo.garant.ru/document/redirect/70650730/267022150">26.70.22.150</text:a></text:p>
          </table:table-cell>
        </table:table-row>
        <table:table-row>
          <table:table-cell table:style-name="0">
            <text:p text:style-name="s1_center_fi0"><text:bookmark text:name="anchor2380"/>380.</text:p>
          </table:table-cell>
          <table:table-cell table:style-name="0">
            <text:p text:style-name="s16_fi0">Аппараты ультразвуковые хирургические</text:p>
          </table:table-cell>
          <table:table-cell table:style-name="0">
            <text:p text:style-name="s1_center_fi0"><text:a xlink:type="simple" xlink:href="http://ivo.garant.ru/document/redirect/70650730/26612132">26.60.12.132</text:a></text:p>
            <text:p text:style-name="s1_center_fi0"><text:a xlink:type="simple" xlink:href="http://ivo.garant.ru/document/redirect/70650730/26601302">26.60.13.130</text:a></text:p>
            <text:p text:style-name="s1_center_fi0"><text:a xlink:type="simple" xlink:href="http://ivo.garant.ru/document/redirect/70650730/26613190">26.60.13.190</text:a></text:p>
          </table:table-cell>
        </table:table-row>
        <table:table-row>
          <table:table-cell table:style-name="0">
            <text:p text:style-name="s1_center_fi0"><text:bookmark text:name="anchor2381"/>381.</text:p>
          </table:table-cell>
          <table:table-cell table:style-name="0">
            <text:p text:style-name="s16_fi0">Коагуляторы хирургические</text:p>
          </table:table-cell>
          <table:table-cell table:style-name="0">
            <text:p text:style-name="s1_center_fi0"><text:a xlink:type="simple" xlink:href="http://ivo.garant.ru/document/redirect/70650730/26601302">26.60.13.130</text:a></text:p>
          </table:table-cell>
        </table:table-row>
        <table:table-row>
          <table:table-cell table:style-name="0">
            <text:p text:style-name="s1_center_fi0"><text:bookmark text:name="anchor2382"/>382.</text:p>
          </table:table-cell>
          <table:table-cell table:style-name="0">
            <text:p text:style-name="s16_fi0">Аппараты лазерные терапевтические</text:p>
          </table:table-cell>
          <table:table-cell table:style-name="0">
            <text:p text:style-name="s1_center_fi0"><text:a xlink:type="simple" xlink:href="http://ivo.garant.ru/document/redirect/70650730/266013170">26.60.13.170</text:a></text:p>
            <text:p text:style-name="s1_center_fi0"><text:a xlink:type="simple" xlink:href="http://ivo.garant.ru/document/redirect/70650730/26613190">26.60.13.190</text:a></text:p>
          </table:table-cell>
        </table:table-row>
        <table:table-row>
          <table:table-cell table:style-name="0">
            <text:p text:style-name="s1_center_fi0"><text:bookmark text:name="anchor2383"/>383.</text:p>
          </table:table-cell>
          <table:table-cell table:style-name="0">
            <text:p text:style-name="s16_fi0">Слуховые аппараты неимплантируемые</text:p>
          </table:table-cell>
          <table:table-cell table:style-name="0">
            <text:p text:style-name="s1_center_fi0"><text:a xlink:type="simple" xlink:href="http://ivo.garant.ru/document/redirect/70650730/951110081">26.60.14.120</text:a></text:p>
          </table:table-cell>
        </table:table-row>
        <table:table-row>
          <table:table-cell table:style-name="0">
            <text:p text:style-name="s1_center_fi0"><text:bookmark text:name="anchor2384"/>384.</text:p>
          </table:table-cell>
          <table:table-cell table:style-name="0">
            <text:p text:style-name="s16_fi0">Иглы корневые</text:p>
          </table:table-cell>
          <table:table-cell table:style-name="0">
            <text:p text:style-name="s1_center_fi0"><text:a xlink:type="simple" xlink:href="http://ivo.garant.ru/document/redirect/70650730/325013190">32.50.13.190</text:a></text:p>
          </table:table-cell>
        </table:table-row>
        <table:table-row>
          <table:table-cell table:style-name="0">
            <text:p text:style-name="s1_center_fi0"><text:bookmark text:name="anchor2385"/>385.</text:p>
          </table:table-cell>
          <table:table-cell table:style-name="0">
            <text:p text:style-name="s16_fi0">Иглы хирургические; инструменты колющие; шприцы</text:p>
          </table:table-cell>
          <table:table-cell table:style-name="0">
            <text:p text:style-name="s1_center_fi0"><text:a xlink:type="simple" xlink:href="http://ivo.garant.ru/document/redirect/70650730/325013110">32.50.13.110</text:a></text:p>
            <text:p text:style-name="s1_center_fi0"><text:a xlink:type="simple" xlink:href="http://ivo.garant.ru/document/redirect/70650730/212024120">21.20.24.120</text:a></text:p>
            <text:p text:style-name="s1_center_fi0"><text:a xlink:type="simple" xlink:href="http://ivo.garant.ru/document/redirect/70650730/325050190">32.50.50.190</text:a></text:p>
          </table:table-cell>
        </table:table-row>
        <table:table-row>
          <table:table-cell table:style-name="0">
            <text:p text:style-name="s1_center_fi0"><text:bookmark text:name="anchor2386"/>386.</text:p>
          </table:table-cell>
          <table:table-cell table:style-name="0">
            <text:p text:style-name="s16_fi0">Лампы щелевые; микрохирургические инструменты для офтальмологии; набор пробных очковых линз офтальмологический</text:p>
          </table:table-cell>
          <table:table-cell table:style-name="0">
            <text:p text:style-name="s1_center_fi0"><text:a xlink:type="simple" xlink:href="http://ivo.garant.ru/document/redirect/70650730/266012119">26.60.12.119</text:a></text:p>
            <text:p text:style-name="s1_center_fi0"><text:a xlink:type="simple" xlink:href="http://ivo.garant.ru/document/redirect/70650730/325013110">32.50.13.110</text:a></text:p>
            <text:p text:style-name="s1_center_fi0"><text:a xlink:type="simple" xlink:href="http://ivo.garant.ru/document/redirect/70650730/325013120">32.50.13.120</text:a></text:p>
            <text:p text:style-name="s1_center_fi0"><text:a xlink:type="simple" xlink:href="http://ivo.garant.ru/document/redirect/70650730/325013121">32.50.13.121</text:a></text:p>
            <text:p text:style-name="s1_center_fi0"><text:a xlink:type="simple" xlink:href="http://ivo.garant.ru/document/redirect/70650730/325013131">32.50.13.131</text:a></text:p>
            <text:p text:style-name="s1_center_fi0"><text:a xlink:type="simple" xlink:href="http://ivo.garant.ru/document/redirect/70650730/325013190">32.50.13.190</text:a></text:p>
          </table:table-cell>
        </table:table-row>
        <table:table-row>
          <table:table-cell table:style-name="0">
            <text:p text:style-name="s1_center_fi0"><text:bookmark text:name="anchor2387"/>387.</text:p>
          </table:table-cell>
          <table:table-cell table:style-name="0">
            <text:p text:style-name="s16_fi0">Линзы интраокулярные</text:p>
          </table:table-cell>
          <table:table-cell table:style-name="0">
            <text:p text:style-name="s1_center_fi0"><text:a xlink:type="simple" xlink:href="http://ivo.garant.ru/document/redirect/70650730/325013120">32.50.13.120</text:a></text:p>
            <text:p text:style-name="s1_center_fi0"><text:a xlink:type="simple" xlink:href="http://ivo.garant.ru/document/redirect/70650730/325022181">32.50.22.181</text:a></text:p>
          </table:table-cell>
        </table:table-row>
        <table:table-row>
          <table:table-cell table:style-name="0">
            <text:p text:style-name="s1_center_fi0"><text:bookmark text:name="anchor2388"/>388.</text:p>
          </table:table-cell>
          <table:table-cell table:style-name="0">
            <text:p text:style-name="s16_fi0">Боры зубные твердосплавные; головки стоматологические алмазные, в том числе фасонные; емкости для взятия, хранения и транспортировки биологических проб для выполнения клинических лабораторных исследований, а именно пробирки для взятия капиллярной крови, емкости для мочи, кала и мокроты; зеркала гинекологические полимерные по Куско; зонды урогенитальные;</text:p>
            <text:p text:style-name="s16_fi0">иглодержатели микрохирургические; инструменты вспомогательные; инструменты зондирующие, бужирующие; инструменты многоповерхностного воздействия; инструменты оттесняющие; инструменты режущие и ударные с острой (режущей) кромкой; каналонаполнители; микромоторы пневматические для наконечников стоматологических; модули медицинские климатизированные (чистое помещение); наборы гинекологические смотровые одноразовые стерильные; наконечники для микромоторов; наконечники стоматологические турбинные; ножницы микрохирургические; пинцеты микрохирургические; пульпоэкстракторы; фрезы зуботехнические; иглы корневые</text:p>
          </table:table-cell>
          <table:table-cell table:style-name="0">
            <text:p text:style-name="s1_center_fi0"><text:a xlink:type="simple" xlink:href="http://ivo.garant.ru/document/redirect/70650730/222929130">22.29.29.130</text:a></text:p>
            <text:p text:style-name="s1_center_fi0"><text:a xlink:type="simple" xlink:href="http://ivo.garant.ru/document/redirect/70650730/222929190">22.29.29.190</text:a></text:p>
            <text:p text:style-name="s1_center_fi0"><text:a xlink:type="simple" xlink:href="http://ivo.garant.ru/document/redirect/70650730/325011110">32.50.11.110</text:a></text:p>
            <text:p text:style-name="s1_center_fi0"><text:a xlink:type="simple" xlink:href="http://ivo.garant.ru/document/redirect/70650730/325011190">32.50.11.190</text:a></text:p>
            <text:p text:style-name="s1_center_fi0"><text:a xlink:type="simple" xlink:href="http://ivo.garant.ru/document/redirect/70650730/325013110">32.50.13.110</text:a></text:p>
            <text:p text:style-name="s1_center_fi0"><text:a xlink:type="simple" xlink:href="http://ivo.garant.ru/document/redirect/70650730/325013121">32.50.13.121</text:a></text:p>
            <text:p text:style-name="s1_center_fi0"><text:a xlink:type="simple" xlink:href="http://ivo.garant.ru/document/redirect/70650730/325013131">32.50.13.131</text:a></text:p>
            <text:p text:style-name="s1_center_fi0"><text:a xlink:type="simple" xlink:href="http://ivo.garant.ru/document/redirect/70650730/325013132">32.50.13.132</text:a></text:p>
            <text:p text:style-name="s1_center_fi0"><text:a xlink:type="simple" xlink:href="http://ivo.garant.ru/document/redirect/70650730/325013139">32.50.13.139</text:a></text:p>
            <text:p text:style-name="s1_center_fi0"><text:a xlink:type="simple" xlink:href="http://ivo.garant.ru/document/redirect/70650730/325013190">32.50.13.190</text:a></text:p>
            <text:p text:style-name="s1_center_fi0"><text:a xlink:type="simple" xlink:href="http://ivo.garant.ru/document/redirect/70650730/7103">32.50.22.140</text:a></text:p>
            <text:p text:style-name="s1_center_fi0"><text:a xlink:type="simple" xlink:href="http://ivo.garant.ru/document/redirect/70650730/325050110">32.50.50.110</text:a></text:p>
            <text:p text:style-name="s1_center_fi0"><text:a xlink:type="simple" xlink:href="http://ivo.garant.ru/document/redirect/70650730/325050190">32.50.50.190</text:a></text:p>
          </table:table-cell>
        </table:table-row>
        <table:table-row>
          <table:table-cell table:style-name="0">
            <text:p text:style-name="s1_center_fi0"><text:bookmark text:name="anchor2389"/>389.</text:p>
          </table:table-cell>
          <table:table-cell table:style-name="0">
            <text:p text:style-name="s16_fi0">Оборудование терапевтическое (ванны и кабины душевые гидромассажные)</text:p>
          </table:table-cell>
          <table:table-cell table:style-name="0">
            <text:p text:style-name="s1_center_fi0"><text:a xlink:type="simple" xlink:href="http://ivo.garant.ru/document/redirect/70650730/951110078">32.50.21.112</text:a></text:p>
            <text:p text:style-name="s1_center_fi0"><text:a xlink:type="simple" xlink:href="http://ivo.garant.ru/document/redirect/70650730/325021150">32.50.21.150</text:a></text:p>
            <text:p text:style-name="s1_center_fi0"><text:a xlink:type="simple" xlink:href="http://ivo.garant.ru/document/redirect/70650730/325050190">32.50.50.190</text:a></text:p>
          </table:table-cell>
        </table:table-row>
        <table:table-row>
          <table:table-cell table:style-name="0">
            <text:p text:style-name="s1_center_fi0"><text:bookmark text:name="anchor2390"/>390.</text:p>
          </table:table-cell>
          <table:table-cell table:style-name="0">
            <text:p text:style-name="s16_fi0">Эндопротезы суставов конечностей</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22110">32.50.22.110</text:a></text:p>
            <text:p text:style-name="s1_center_fi0"><text:a xlink:type="simple" xlink:href="http://ivo.garant.ru/document/redirect/70650730/32522120">32.50.22.120</text:a></text:p>
            <text:p text:style-name="s1_center_fi0"><text:a xlink:type="simple" xlink:href="http://ivo.garant.ru/document/redirect/70650730/325022190">32.50.22.190</text:a></text:p>
            <text:p text:style-name="s1_center_fi0"><text:a xlink:type="simple" xlink:href="http://ivo.garant.ru/document/redirect/70650730/325050">32.50.50</text:a></text:p>
          </table:table-cell>
        </table:table-row>
        <table:table-row>
          <table:table-cell table:style-name="0">
            <text:p text:style-name="s1_center_fi0"><text:bookmark text:name="anchor2391"/>391.</text:p>
          </table:table-cell>
          <table:table-cell table:style-name="0">
            <text:p text:style-name="s16_fi0">Поручни для ванной и туалета (прямые, угловые, правые, левые)</text:p>
          </table:table-cell>
          <table:table-cell table:style-name="0">
            <text:p text:style-name="s1_center_fi0"><text:a xlink:type="simple" xlink:href="http://ivo.garant.ru/document/redirect/70650730/32522120">32.50.22.120</text:a></text:p>
            <text:p text:style-name="s1_center_fi0"><text:a xlink:type="simple" xlink:href="http://ivo.garant.ru/document/redirect/70650730/325050">32.50.50</text:a></text:p>
          </table:table-cell>
        </table:table-row>
        <table:table-row>
          <table:table-cell table:style-name="0">
            <text:p text:style-name="s1_center_fi0"><text:bookmark text:name="anchor2392"/>392.</text:p>
          </table:table-cell>
          <table:table-cell table:style-name="0">
            <text:p text:style-name="s16_fi0">Аппараты наружной фиксации;</text:p>
            <text:p text:style-name="s16_fi0">имплантаты для остеосинтеза</text:p>
          </table:table-cell>
          <table:table-cell table:style-name="0">
            <text:p text:style-name="s1_center_fi0"><text:a xlink:type="simple" xlink:href="http://ivo.garant.ru/document/redirect/70650730/4266">21.10.60.191</text:a></text:p>
            <text:p text:style-name="s1_center_fi0"><text:a xlink:type="simple" xlink:href="http://ivo.garant.ru/document/redirect/70650730/951110080">32.50.22.127</text:a></text:p>
            <text:p text:style-name="s1_center_fi0"><text:a xlink:type="simple" xlink:href="http://ivo.garant.ru/document/redirect/70650730/325022191">32.50.22.191</text:a></text:p>
            <text:p text:style-name="s1_center_fi0"><text:a xlink:type="simple" xlink:href="http://ivo.garant.ru/document/redirect/70650730/325022199">32.50.22.199</text:a></text:p>
            <text:p text:style-name="s1_center_fi0"><text:a xlink:type="simple" xlink:href="http://ivo.garant.ru/document/redirect/70650730/325050">32.50.50</text:a></text:p>
          </table:table-cell>
        </table:table-row>
        <table:table-row>
          <table:table-cell table:style-name="0">
            <text:p text:style-name="s1_center_fi0"><text:bookmark text:name="anchor2393"/>393.</text:p>
          </table:table-cell>
          <table:table-cell table:style-name="0">
            <text:p text:style-name="s16_fi0">Костыли</text:p>
          </table:table-cell>
          <table:table-cell table:style-name="0">
            <text:p text:style-name="s1_center_fi0"><text:a xlink:type="simple" xlink:href="http://ivo.garant.ru/document/redirect/70650730/3252128">32.50.22.128</text:a></text:p>
            <text:p text:style-name="s1_center_fi0"><text:a xlink:type="simple" xlink:href="http://ivo.garant.ru/document/redirect/70650730/3252129">32.50.22.129</text:a></text:p>
          </table:table-cell>
        </table:table-row>
        <table:table-row>
          <table:table-cell table:style-name="0">
            <text:p text:style-name="s1_center_fi0"><text:bookmark text:name="anchor2394"/>394.</text:p>
          </table:table-cell>
          <table:table-cell table:style-name="0">
            <text:p text:style-name="s16_fi0">Кресла-стулья с санитарным оснащением; опоры (опоры-ходунки шагающие, опоры-ходунки на колесиках); поручни (перила) для самоподнимания угловые, прямые (линейные) и откидные; ходунки на колесах; ходунки шагающие складные, регулируемые по высоте</text:p>
          </table:table-cell>
          <table:table-cell table:style-name="0">
            <text:p text:style-name="s1_center_fi0"><text:a xlink:type="simple" xlink:href="http://ivo.garant.ru/document/redirect/70650730/3252129">32.50.22.129</text:a></text:p>
            <text:p text:style-name="s1_center_fi0"><text:a xlink:type="simple" xlink:href="http://ivo.garant.ru/document/redirect/70650730/325050">32.50.50</text:a></text:p>
          </table:table-cell>
        </table:table-row>
        <table:table-row>
          <table:table-cell table:style-name="0">
            <text:p text:style-name="s1_center_fi0"><text:bookmark text:name="anchor2395"/>395.</text:p>
          </table:table-cell>
          <table:table-cell table:style-name="0">
            <text:p text:style-name="s16_fi0">Обувь ортопедическая детская</text:p>
          </table:table-cell>
          <table:table-cell table:style-name="0">
            <text:p text:style-name="s1_center_fi0"><text:a xlink:type="simple" xlink:href="http://ivo.garant.ru/document/redirect/70650730/325022150">32.50.22.150</text:a></text:p>
          </table:table-cell>
        </table:table-row>
        <table:table-row>
          <table:table-cell table:style-name="0">
            <text:p text:style-name="s1_center_fi0"><text:bookmark text:name="anchor2396"/>396.</text:p>
          </table:table-cell>
          <table:table-cell table:style-name="0">
            <text:p text:style-name="s16_fi0">Экзопротезы грудных (молочных) желез на основе силиконового геля; средство замещения синовиальной жидкости</text:p>
          </table:table-cell>
          <table:table-cell table:style-name="0">
            <text:p text:style-name="s1_center_fi0"><text:a xlink:type="simple" xlink:href="http://ivo.garant.ru/document/redirect/70650730/325022190">32.50.22.190</text:a></text:p>
            <text:p text:style-name="s1_center_fi0"><text:a xlink:type="simple" xlink:href="http://ivo.garant.ru/document/redirect/70650730/3252129">32.50.22.129</text:a></text:p>
            <text:p text:style-name="s1_center_fi0"><text:a xlink:type="simple" xlink:href="http://ivo.garant.ru/document/redirect/70650730/32522121">32.50.22.121</text:a></text:p>
            <text:p text:style-name="s1_center_fi0"><text:a xlink:type="simple" xlink:href="http://ivo.garant.ru/document/redirect/70650730/325050">32.50.50</text:a></text:p>
          </table:table-cell>
        </table:table-row>
        <table:table-row>
          <table:table-cell table:style-name="0">
            <text:p text:style-name="s1_center_fi0"><text:bookmark text:name="anchor2397"/>397.</text:p>
          </table:table-cell>
          <table:table-cell table:style-name="0">
            <text:p text:style-name="s16_fi0">Оболочки косметические к активным протезам верхних конечностей; стопы искусственные пенополиуретановые; чехол для культи нижних конечностей</text:p>
          </table:table-cell>
          <table:table-cell table:style-name="0">
            <text:p text:style-name="s1_center_fi0"><text:a xlink:type="simple" xlink:href="http://ivo.garant.ru/document/redirect/70650730/7106">32.50.23</text:a></text:p>
            <text:p text:style-name="s1_center_fi0"><text:a xlink:type="simple" xlink:href="http://ivo.garant.ru/document/redirect/70650730/14311249">14.31.10.249</text:a></text:p>
            <text:p text:style-name="s1_center_fi0"><text:a xlink:type="simple" xlink:href="http://ivo.garant.ru/document/redirect/70650730/3252129">32.50.22.129</text:a></text:p>
            <text:p text:style-name="s1_center_fi0"><text:a xlink:type="simple" xlink:href="http://ivo.garant.ru/document/redirect/70650730/325023190">32.50.23.190</text:a></text:p>
          </table:table-cell>
        </table:table-row>
        <table:table-row>
          <table:table-cell table:style-name="0">
            <text:p text:style-name="s1_center_fi0"><text:bookmark text:name="anchor2398"/>398.</text:p>
          </table:table-cell>
          <table:table-cell table:style-name="0">
            <text:p text:style-name="s16_fi0">Наконечники полимерные нестерильные</text:p>
            <text:p text:style-name="s16_fi0">(стерильные) одноразовые к дозаторам пипеточным, соответствующие кодам 292810, 35269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50190">32.50.50.190</text:a></text:p>
          </table:table-cell>
        </table:table-row>
        <table:table-row>
          <table:table-cell table:style-name="0">
            <text:p text:style-name="s1_center_fi0"><text:bookmark text:name="anchor2399"/>399.</text:p>
          </table:table-cell>
          <table:table-cell table:style-name="0">
            <text:p text:style-name="s16_fi0">Трости опорные</text:p>
          </table:table-cell>
          <table:table-cell table:style-name="0">
            <text:p text:style-name="s1_center_fi0"><text:a xlink:type="simple" xlink:href="http://ivo.garant.ru/document/redirect/70650730/325050">32.50.50</text:a></text:p>
            <text:p text:style-name="s1_center_fi0"><text:a xlink:type="simple" xlink:href="http://ivo.garant.ru/document/redirect/70650730/3292120">32.99.21.120</text:a></text:p>
          </table:table-cell>
        </table:table-row>
        <table:table-row>
          <table:table-cell table:style-name="0">
            <text:p text:style-name="s1_center_fi0"><text:bookmark text:name="anchor2400"/>400.</text:p>
          </table:table-cell>
          <table:table-cell table:style-name="0">
            <text:p text:style-name="s16_fi0">Устройства для переливания кровезаменителей и инфузионных растворов (ПР), соответствующие кодам 136330, 3759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10">32.50.13.110</text:a></text:p>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90">32.50.50.190</text:a></text:p>
          </table:table-cell>
        </table:table-row>
        <table:table-row>
          <table:table-cell table:style-name="0">
            <text:p text:style-name="s1_center_fi0"><text:bookmark text:name="anchor2401"/>401.</text:p>
          </table:table-cell>
          <table:table-cell table:style-name="0">
            <text:p text:style-name="s16_fi0">Устройства для переливания крови, компонентов крови и кровезаменителей (ПК), соответствующие коду 14557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10">32.50.13.110</text:a></text:p>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90">32.50.50.190</text:a></text:p>
          </table:table-cell>
        </table:table-row>
        <table:table-row>
          <table:table-cell table:style-name="0">
            <text:p text:style-name="s1_center_fi0"><text:bookmark text:name="anchor2402"/>402.</text:p>
          </table:table-cell>
          <table:table-cell table:style-name="0">
            <text:p text:style-name="s16_fi0">Контейнеры для заготовки, хранения и транспортировки донорской крови и ее компонентов без гемоконсервантов, однокамерные (общий объем контейнера - 	<draw:frame draw:style-name="fr1" svg:width="5mm" svg:height="6mm" text:anchor-type="as-char" draw:z-index="1">
		<draw:image xlink:href="Pictures/480512504.png" xlink:type="simple" xlink:show="embed" xlink:actuate="onLoad"/>
	</draw:frame>
 500 мл - 	<draw:frame draw:style-name="fr1" svg:width="5mm" svg:height="6mm" text:anchor-type="as-char" draw:z-index="1">
		<draw:image xlink:href="Pictures/480512505.png" xlink:type="simple" xlink:show="embed" xlink:actuate="onLoad"/>
	</draw:frame>
 1000 мл), соответствующие кодам 145490, 3500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03"/>403.</text:p>
          </table:table-cell>
          <table:table-cell table:style-name="0">
            <text:p text:style-name="s16_fi0">Контейнеры для заготовки, хранения и транспортировки донорской крови и ее компонентов без гемоконсервантов, однокамерные (общий объем контейнера - &lt; 500 мл), соответствующие кодам 145490, 3500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04"/>404.</text:p>
          </table:table-cell>
          <table:table-cell table:style-name="0">
            <text:p text:style-name="s16_fi0">Контейнеры для заготовки, хранения и транспортировки донорской крови и ее компонентов без гемоконсервантов, двухкамерные, соответствующие кодам 145490, 3500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05"/>405.</text:p>
          </table:table-cell>
          <table:table-cell table:style-name="0">
            <text:p text:style-name="s16_fi0">Контейнеры для заготовки, хранения и транспортировки донорской крови и ее компонентов с гемоконсервантом, однокамерные, соответствующие коду 14426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06"/>406.</text:p>
          </table:table-cell>
          <table:table-cell table:style-name="0">
            <text:p text:style-name="s16_fi0">Контейнеры для заготовки, хранения и транспортировки донорской крови и ее компонентов с гемоконсервантом, двухкамерные, соответствующие коду 14427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07"/>407.</text:p>
          </table:table-cell>
          <table:table-cell table:style-name="0">
            <text:p text:style-name="s16_fi0">Контейнеры для заготовки, хранения и транспортировки донорской крови и ее компонентов с гемоконсервантом, трехкамерные, соответствующие коду 1443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08"/>408.</text:p>
          </table:table-cell>
          <table:table-cell table:style-name="0">
            <text:p text:style-name="s16_fi0">Контейнеры для заготовки, хранения и транспортировки донорской крови и ее компонентов с гемоконсервантом, четырехкамерные, соответствующие коду 14430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09"/>409.</text:p>
          </table:table-cell>
          <table:table-cell table:style-name="0">
            <text:p text:style-name="s16_fi0">Контейнеры для заготовки, хранения и транспортировки донорской крови и ее компонентов с гемоконсервантом, с лейкоцитарным фильтром, трехкамерные, соответствующие коду 1443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10"/>410.</text:p>
          </table:table-cell>
          <table:table-cell table:style-name="0">
            <text:p text:style-name="s16_fi0">Контейнеры для заготовки, хранения и транспортировки донорской крови и ее компонентов с гемоконсервантом, с лейкоцитарным фильтром, четырехкамерные, соответствующие коду 14430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11"/>411.</text:p>
          </table:table-cell>
          <table:table-cell table:style-name="0">
            <text:p text:style-name="s16_fi0">Контейнеры для заготовки, хранения и транспортировки донорской крови и ее компонентов с гемоконсервантом и конфигурацией контейнеров "верх/низ" (T&amp;B), трехкамерные, соответствующие коду 1443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12"/>412.</text:p>
          </table:table-cell>
          <table:table-cell table:style-name="0">
            <text:p text:style-name="s16_fi0">Контейнеры для заготовки, хранения и транспортировки донорской крови и ее компонентов с гемоконсервантом и конфигурация контейнеров "верх/низ" (T&amp;B), четырехкамерные, соответствующие коду 14430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13"/>413.</text:p>
          </table:table-cell>
          <table:table-cell table:style-name="0">
            <text:p text:style-name="s16_fi0">Контейнеры для заготовки, хранения и транспортировки донорской крови и ее компонентов, с конфигурацией контейнеров "верх/низ" (T&amp;B), с гемоконсервантом и лейкоцитарным фильтром, трехкамерные, соответствующие коду 144320 вида медицинского изделия в соответствии с номенклатурной классификацией</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14"/>414.</text:p>
          </table:table-cell>
          <table:table-cell table:style-name="0">
            <text:p text:style-name="s16_fi0">Контейнеры для заготовки, хранения и транспортировки донорской крови и ее компонентов, с конфигурацией контейнеров "верх/низ" (T&amp;B), с гемоконсервантом и лейкоцитарным фильтром, четырехкамерные, соответствующие коду 14430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15"/>415.</text:p>
          </table:table-cell>
          <table:table-cell table:style-name="0">
            <text:p text:style-name="s16_fi0">Контейнеры для глубокой заморозки компонентов донорской крови (криоконсервирования), соответствующие кодам 145490, 350020 вида медицинского изделия в соответствии с номенклатурной классификацией</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16"/>416.</text:p>
          </table:table-cell>
          <table:table-cell table:style-name="0">
            <text:p text:style-name="s16_fi0">Контур дыхательный для наркозно-дыхательного аппарата (анестезиологический), соответствующий коду 2758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90">32.50.50.190</text:a></text:p>
            <text:p text:style-name="s1_center_fi0"><text:a xlink:type="simple" xlink:href="http://ivo.garant.ru/document/redirect/70650730/325013150">32.50.13.150</text:a></text:p>
            <text:p text:style-name="s1_center_fi0"><text:a xlink:type="simple" xlink:href="http://ivo.garant.ru/document/redirect/70650730/32502120">32.50.21.120</text:a></text:p>
            <text:p text:style-name="s1_center_fi0"><text:a xlink:type="simple" xlink:href="http://ivo.garant.ru/document/redirect/70650730/3250121">32.50.21.121</text:a></text:p>
            <text:p text:style-name="s1_center_fi0"><text:a xlink:type="simple" xlink:href="http://ivo.garant.ru/document/redirect/70650730/325021122">32.50.21.122</text:a></text:p>
            <text:p text:style-name="s1_center_fi0"><text:a xlink:type="simple" xlink:href="http://ivo.garant.ru/document/redirect/70650730/305021123">32.50.21.123</text:a></text:p>
            <text:p text:style-name="s1_center_fi0"><text:a xlink:type="simple" xlink:href="http://ivo.garant.ru/document/redirect/70650730/32521129">32.50.21.129</text:a></text:p>
          </table:table-cell>
        </table:table-row>
        <table:table-row>
          <table:table-cell table:style-name="0">
            <text:p text:style-name="s1_center_fi0"><text:bookmark text:name="anchor2417"/>417.</text:p>
          </table:table-cell>
          <table:table-cell table:style-name="0">
            <text:p text:style-name="s16_fi0">Контур дыхательный для аппарата искусственной вентиляции легких, соответствующий коду 18561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90">32.50.50.190</text:a></text:p>
            <text:p text:style-name="s1_center_fi0"><text:a xlink:type="simple" xlink:href="http://ivo.garant.ru/document/redirect/70650730/325013150">32.50.13.150</text:a></text:p>
            <text:p text:style-name="s1_center_fi0"><text:a xlink:type="simple" xlink:href="http://ivo.garant.ru/document/redirect/70650730/32502120">32.50.21.120</text:a></text:p>
            <text:p text:style-name="s1_center_fi0"><text:a xlink:type="simple" xlink:href="http://ivo.garant.ru/document/redirect/70650730/3250121">32.50.21.121</text:a></text:p>
            <text:p text:style-name="s1_center_fi0"><text:a xlink:type="simple" xlink:href="http://ivo.garant.ru/document/redirect/70650730/325021122">32.50.21.122</text:a></text:p>
            <text:p text:style-name="s1_center_fi0"><text:a xlink:type="simple" xlink:href="http://ivo.garant.ru/document/redirect/70650730/305021123">32.50.21.123</text:a></text:p>
            <text:p text:style-name="s1_center_fi0"><text:a xlink:type="simple" xlink:href="http://ivo.garant.ru/document/redirect/70650730/32521129">32.50.21.129</text:a></text:p>
          </table:table-cell>
        </table:table-row>
        <table:table-row>
          <table:table-cell table:style-name="0">
            <text:p text:style-name="s1_center_fi0"><text:bookmark text:name="anchor2418"/>418.</text:p>
          </table:table-cell>
          <table:table-cell table:style-name="0">
            <text:p text:style-name="s16_fi0">Фильтр дыхательный (тепловлагообменник/бактериальный фильтр), соответствующий коду 3246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90">32.50.50.190</text:a></text:p>
            <text:p text:style-name="s1_center_fi0"><text:a xlink:type="simple" xlink:href="http://ivo.garant.ru/document/redirect/70650730/325013150">32.50.13.150</text:a></text:p>
            <text:p text:style-name="s1_center_fi0"><text:a xlink:type="simple" xlink:href="http://ivo.garant.ru/document/redirect/70650730/32502120">32.50.21.120</text:a></text:p>
            <text:p text:style-name="s1_center_fi0"><text:a xlink:type="simple" xlink:href="http://ivo.garant.ru/document/redirect/70650730/3250121">32.50.21.121</text:a></text:p>
            <text:p text:style-name="s1_center_fi0"><text:a xlink:type="simple" xlink:href="http://ivo.garant.ru/document/redirect/70650730/325021122">32.50.21.122</text:a></text:p>
            <text:p text:style-name="s1_center_fi0"><text:a xlink:type="simple" xlink:href="http://ivo.garant.ru/document/redirect/70650730/305021123">32.50.21.123</text:a></text:p>
            <text:p text:style-name="s1_center_fi0"><text:a xlink:type="simple" xlink:href="http://ivo.garant.ru/document/redirect/70650730/32521129">32.50.21.129</text:a></text:p>
          </table:table-cell>
        </table:table-row>
        <table:table-row>
          <table:table-cell table:style-name="0">
            <text:p text:style-name="s1_center_fi0"><text:bookmark text:name="anchor2419"/>419.</text:p>
          </table:table-cell>
          <table:table-cell table:style-name="0">
            <text:p text:style-name="s16_fi0">Фильтр дыхательный (бактериальный для медицинских газов), соответствующий коду 3222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90">32.50.50.190</text:a></text:p>
            <text:p text:style-name="s1_center_fi0"><text:a xlink:type="simple" xlink:href="http://ivo.garant.ru/document/redirect/70650730/325013150">32.50.13.150</text:a></text:p>
            <text:p text:style-name="s1_center_fi0"><text:a xlink:type="simple" xlink:href="http://ivo.garant.ru/document/redirect/70650730/32502120">32.50.21.120</text:a></text:p>
            <text:p text:style-name="s1_center_fi0"><text:a xlink:type="simple" xlink:href="http://ivo.garant.ru/document/redirect/70650730/3250121">32.50.21.121</text:a></text:p>
            <text:p text:style-name="s1_center_fi0"><text:a xlink:type="simple" xlink:href="http://ivo.garant.ru/document/redirect/70650730/325021122">32.50.21.122</text:a></text:p>
            <text:p text:style-name="s1_center_fi0"><text:a xlink:type="simple" xlink:href="http://ivo.garant.ru/document/redirect/70650730/305021123">32.50.21.123</text:a></text:p>
            <text:p text:style-name="s1_center_fi0"><text:a xlink:type="simple" xlink:href="http://ivo.garant.ru/document/redirect/70650730/32521129">32.50.21.129</text:a></text:p>
          </table:table-cell>
        </table:table-row>
        <table:table-row>
          <table:table-cell table:style-name="0">
            <text:p text:style-name="s1_center_fi0"><text:bookmark text:name="anchor2420"/>420.</text:p>
          </table:table-cell>
          <table:table-cell table:style-name="0">
            <text:p text:style-name="s16_fi0">Набор расходных материалов для сбора плазмы методом центрифугирования, соответствующий кодам 262850, 26287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21"/>421.</text:p>
          </table:table-cell>
          <table:table-cell table:style-name="0">
            <text:p text:style-name="s16_fi0">Набор однокамерных контейнеров для донорского плазмафереза, соответствующий кодам 262870, 3500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22"/>422.</text:p>
          </table:table-cell>
          <table:table-cell table:style-name="0">
            <text:p text:style-name="s16_fi0">Набор двухкамерных контейнеров для донорского плазмафереза, соответствующий кодам 262870, 3500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23"/>423.</text:p>
          </table:table-cell>
          <table:table-cell table:style-name="0">
            <text:p text:style-name="s16_fi0">Набор трехкамерных контейнеров для донорского плазмафереза, соответствующий кодам 262870, 35002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24"/>424.</text:p>
          </table:table-cell>
          <table:table-cell table:style-name="0">
            <text:p text:style-name="s16_fi0">Комплект магистралей для аппарата донорского плазмафереза, соответствующий коду 26287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25"/>425.</text:p>
          </table:table-cell>
          <table:table-cell table:style-name="0">
            <text:p text:style-name="s16_fi0">Набор расходных материалов для аппарата донорского тромбоцитафереза, соответствующий кодам 262850, 26287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325050190">32.50.50.190</text:a></text:p>
          </table:table-cell>
        </table:table-row>
        <table:table-row>
          <table:table-cell table:style-name="0">
            <text:p text:style-name="s1_center_fi0"><text:bookmark text:name="anchor2426"/>426.</text:p>
          </table:table-cell>
          <table:table-cell table:style-name="0">
            <text:p text:style-name="s16_fi0">Контейнер с антикоагулянтом для донорского плазмафереза или для консервирования компонентов крови, соответствующий кодам 145450, 145500, 2628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2123199">21.20.23.199</text:a></text:p>
            <text:p text:style-name="s1_center_fi0"><text:a xlink:type="simple" xlink:href="http://ivo.garant.ru/document/redirect/70650730/325050190">32.50.50.190</text:a></text:p>
          </table:table-cell>
        </table:table-row>
        <table:table-row>
          <table:table-cell table:style-name="0">
            <text:p text:style-name="s1_center_fi0"><text:bookmark text:name="anchor2427"/>427.</text:p>
          </table:table-cell>
          <table:table-cell table:style-name="0">
            <text:p text:style-name="s16_fi0">Контейнер с антикоагулянтом цитрат натрия 4% для донорского плазмафереза, соответствующий кодам 145450, 145500, 262850 вида медицинского изделия в соответствии с <text:a xlink:type="simple" xlink:href="http://ivo.garant.ru/document/redirect/70199586/1000">номенклатурной классификацией</text:a></text:p>
            <text:p text:style-name="s1"/>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2123199">21.20.23.199</text:a></text:p>
            <text:p text:style-name="s1_center_fi0"><text:a xlink:type="simple" xlink:href="http://ivo.garant.ru/document/redirect/70650730/325050190">32.50.50.190</text:a></text:p>
          </table:table-cell>
        </table:table-row>
        <table:table-row>
          <table:table-cell table:style-name="0">
            <text:p text:style-name="s1_center_fi0"><text:bookmark text:name="anchor2428"/>428.</text:p>
          </table:table-cell>
          <table:table-cell table:style-name="0">
            <text:p text:style-name="s16_fi0">Контейнер с раствором антикоагулянта и (или) консерванта для донорского тромбоцитафереза, соответствующий кодам 145450, 145500, 2628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50">32.50.50</text:a></text:p>
            <text:p text:style-name="s1_center_fi0"><text:a xlink:type="simple" xlink:href="http://ivo.garant.ru/document/redirect/70650730/325050180">32.50.50.180</text:a></text:p>
            <text:p text:style-name="s1_center_fi0"><text:a xlink:type="simple" xlink:href="http://ivo.garant.ru/document/redirect/70650730/2123199">21.20.23.199</text:a></text:p>
            <text:p text:style-name="s1_center_fi0"><text:a xlink:type="simple" xlink:href="http://ivo.garant.ru/document/redirect/70650730/325050190">32.50.50.190</text:a></text:p>
          </table:table-cell>
        </table:table-row>
        <table:table-row>
          <table:table-cell table:style-name="0">
            <text:p text:style-name="s1_center_fi0"><text:bookmark text:name="anchor2429"/>429.</text:p>
          </table:table-cell>
          <table:table-cell table:style-name="0">
            <text:p text:style-name="s16_fi0">Калоприемник однокомпонентный закрытого типа, соответствующий коду 15245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13110">32.50.13.110</text:a></text:p>
            <text:p text:style-name="s1_center_fi0"><text:a xlink:type="simple" xlink:href="http://ivo.garant.ru/document/redirect/70650730/325050141">32.50.50.141</text:a></text:p>
          </table:table-cell>
        </table:table-row>
        <table:table-row>
          <table:table-cell table:style-name="0">
            <text:p text:style-name="s1_center_fi0"><text:bookmark text:name="anchor2430"/>430.</text:p>
          </table:table-cell>
          <table:table-cell table:style-name="0">
            <text:p text:style-name="s16_fi0">Калоприемник однокомпонентный открытого типа, соответствующий коду 15641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13110">32.50.13.110</text:a></text:p>
            <text:p text:style-name="s1_center_fi0"><text:a xlink:type="simple" xlink:href="http://ivo.garant.ru/document/redirect/70650730/325050141">32.50.50.141</text:a></text:p>
          </table:table-cell>
        </table:table-row>
        <table:table-row>
          <table:table-cell table:style-name="0">
            <text:p text:style-name="s1_center_fi0"><text:bookmark text:name="anchor2431"/>431.</text:p>
          </table:table-cell>
          <table:table-cell table:style-name="0">
            <text:p text:style-name="s16_fi0">Мочеприемник однокомпонентный, не носимый, соответствующий кодам 152470, 152480, 15637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13110">32.50.13.110</text:a></text:p>
            <text:p text:style-name="s1_center_fi0"><text:a xlink:type="simple" xlink:href="http://ivo.garant.ru/document/redirect/70650730/325050141">32.50.50.141</text:a></text:p>
          </table:table-cell>
        </table:table-row>
        <table:table-row>
          <table:table-cell table:style-name="0">
            <text:p text:style-name="s1_center_fi0"><text:bookmark text:name="anchor2432"/>432.</text:p>
          </table:table-cell>
          <table:table-cell table:style-name="0">
            <text:p text:style-name="s16_fi0">Мочеприемник однокомпонентный, носимый, соответствующий кодам 152430, 156400, 156390 вида медицинского изделия в соответствии с <text:a xlink:type="simple" xlink:href="http://ivo.garant.ru/document/redirect/70199586/1000">номенклатурной классификацией</text:a></text:p>
          </table:table-cell>
          <table:table-cell table:style-name="0">
            <text:p text:style-name="s1_center_fi0"><text:a xlink:type="simple" xlink:href="http://ivo.garant.ru/document/redirect/70650730/325013190">32.50.13.190</text:a></text:p>
            <text:p text:style-name="s1_center_fi0"><text:a xlink:type="simple" xlink:href="http://ivo.garant.ru/document/redirect/70650730/325013110">32.50.13.110</text:a></text:p>
            <text:p text:style-name="s1_center_fi0"><text:a xlink:type="simple" xlink:href="http://ivo.garant.ru/document/redirect/70650730/325050141">32.50.50.141</text:a></text:p>
          </table:table-cell>
        </table:table-row>
        <table:table-row>
          <table:table-cell table:style-name="0">
            <text:p text:style-name="s1_center_fi0"><text:bookmark text:name="anchor2433"/>433.</text:p>
          </table:table-cell>
          <table:table-cell table:style-name="0">
            <text:p text:style-name="s1_fi0">Препараты лекарственные</text:p>
          </table:table-cell>
          <table:table-cell table:style-name="0">
            <text:p text:style-name="s1_center_fi0"><text:a xlink:type="simple" xlink:href="http://ivo.garant.ru/document/redirect/70650730/21151">21.10.51</text:a></text:p>
            <text:p text:style-name="s1_center_fi0"><text:a xlink:type="simple" xlink:href="http://ivo.garant.ru/document/redirect/70650730/21201">21.20.1</text:a></text:p>
            <text:p text:style-name="s1_center_fi0"><text:a xlink:type="simple" xlink:href="http://ivo.garant.ru/document/redirect/70650730/212021">21.20.21</text:a></text:p>
            <text:p text:style-name="s1_center_fi0"><text:a xlink:type="simple" xlink:href="http://ivo.garant.ru/document/redirect/70650730/212023">21.20.23</text:a></text:p>
          </table:table-cell>
        </table:table-row>
        <table:table-row>
          <table:table-cell table:style-name="0">
            <text:p text:style-name="s1_center_fi0"><text:bookmark text:name="anchor2434"/>434.</text:p>
          </table:table-cell>
          <table:table-cell table:style-name="0">
            <text:p text:style-name="s16_fi0">Огурцы</text:p>
          </table:table-cell>
          <table:table-cell table:style-name="0">
            <text:p text:style-name="s1_center_fi0"><text:a xlink:type="simple" xlink:href="http://ivo.garant.ru/document/redirect/70650730/111332">01.13.32</text:a></text:p>
          </table:table-cell>
        </table:table-row>
        <table:table-row>
          <table:table-cell table:style-name="0">
            <text:p text:style-name="s1_center_fi0"><text:bookmark text:name="anchor2435"/>435.</text:p>
          </table:table-cell>
          <table:table-cell table:style-name="0">
            <text:p text:style-name="s16_fi0">Томаты (помидоры)</text:p>
          </table:table-cell>
          <table:table-cell table:style-name="0">
            <text:p text:style-name="s1_center_fi0"><text:a xlink:type="simple" xlink:href="http://ivo.garant.ru/document/redirect/70650730/111334">01.13.34</text:a></text:p>
          </table:table-cell>
        </table:table-row>
        <table:table-row>
          <table:table-cell table:style-name="0">
            <text:p text:style-name="s1_center_fi0"><text:bookmark text:name="anchor2436"/>436.</text:p>
          </table:table-cell>
          <table:table-cell table:style-name="0">
            <text:p text:style-name="s16_fi0">Продукция из рыбы свежая, охлажденная или мороженая</text:p>
          </table:table-cell>
          <table:table-cell table:style-name="0">
            <text:p text:style-name="s1_center_fi0"><text:a xlink:type="simple" xlink:href="http://ivo.garant.ru/document/redirect/70650730/10201">10.20.1</text:a></text:p>
          </table:table-cell>
        </table:table-row>
        <table:table-row>
          <table:table-cell table:style-name="0">
            <text:p text:style-name="s1_center_fi0"><text:bookmark text:name="anchor2437"/>437.</text:p>
          </table:table-cell>
          <table:table-cell table:style-name="0">
            <text:p text:style-name="s16_fi0">Рыба, приготовленная или консервированная другим способом; икра и заменители икры</text:p>
          </table:table-cell>
          <table:table-cell table:style-name="0">
            <text:p text:style-name="s1_center_fi0"><text:a xlink:type="simple" xlink:href="http://ivo.garant.ru/document/redirect/70650730/10202">10.20.2</text:a></text:p>
          </table:table-cell>
        </table:table-row>
        <table:table-row>
          <table:table-cell table:style-name="0">
            <text:p text:style-name="s1_center_fi0"><text:bookmark text:name="anchor2438"/>438.</text:p>
          </table:table-cell>
          <table:table-cell table:style-name="0">
            <text:p text:style-name="s16_fi0">Ракообразные, моллюски и прочие беспозвоночные водные, мороженые, переработанные или консервированные</text:p>
          </table:table-cell>
          <table:table-cell table:style-name="0">
            <text:p text:style-name="s1_center_fi0"><text:a xlink:type="simple" xlink:href="http://ivo.garant.ru/document/redirect/70650730/10203">10.20.3</text:a></text:p>
          </table:table-cell>
        </table:table-row>
        <table:table-row>
          <table:table-cell table:style-name="0">
            <text:p text:style-name="s1_center_fi0"><text:bookmark text:name="anchor2439"/>439.</text:p>
          </table:table-cell>
          <table:table-cell table:style-name="0">
            <text:p text:style-name="s16_fi0">Соль пищевая выварочная</text:p>
          </table:table-cell>
          <table:table-cell table:style-name="0">
            <text:p text:style-name="s1_center_fi0"><text:a xlink:type="simple" xlink:href="http://ivo.garant.ru/document/redirect/70650730/108430120">10.84.30.120</text:a></text:p>
          </table:table-cell>
        </table:table-row>
        <table:table-row>
          <table:table-cell table:style-name="0">
            <text:p text:style-name="s1_center_fi0"><text:bookmark text:name="anchor2440"/>440.</text:p>
          </table:table-cell>
          <table:table-cell table:style-name="0">
            <text:p text:style-name="s16_fi0">Соль пищевая поваренная йодированная</text:p>
          </table:table-cell>
          <table:table-cell table:style-name="0">
            <text:p text:style-name="s1_center_fi0"><text:a xlink:type="simple" xlink:href="http://ivo.garant.ru/document/redirect/70650730/108430130">10.84.30.130</text:a></text:p>
          </table:table-cell>
        </table:table-row>
        <table:table-row>
          <table:table-cell table:style-name="0">
            <text:p text:style-name="s1_center_fi0"><text:bookmark text:name="anchor2441"/>441.</text:p>
          </table:table-cell>
          <table:table-cell table:style-name="0">
            <text:p text:style-name="s16_fi0">Говядина парная, остывшая или охлажденная</text:p>
          </table:table-cell>
          <table:table-cell table:style-name="0">
            <text:p text:style-name="s1_center_fi0"><text:a xlink:type="simple" xlink:href="http://ivo.garant.ru/document/redirect/70650730/101111110">10.11.11.110</text:a></text:p>
          </table:table-cell>
        </table:table-row>
        <table:table-row>
          <table:table-cell table:style-name="0">
            <text:p text:style-name="s1_center_fi0"><text:bookmark text:name="anchor2442"/>442.</text:p>
          </table:table-cell>
          <table:table-cell table:style-name="0">
            <text:p text:style-name="s16_fi0">Телятина парная, остывшая или охлажденная</text:p>
          </table:table-cell>
          <table:table-cell table:style-name="0">
            <text:p text:style-name="s1_center_fi0"><text:a xlink:type="simple" xlink:href="http://ivo.garant.ru/document/redirect/70650730/101111120">10.11.11.120</text:a></text:p>
          </table:table-cell>
        </table:table-row>
        <table:table-row>
          <table:table-cell table:style-name="0">
            <text:p text:style-name="s1_center_fi0"><text:bookmark text:name="anchor2443"/>443.</text:p>
          </table:table-cell>
          <table:table-cell table:style-name="0">
            <text:p text:style-name="s16_fi0">Свинина парная, остывшая или охлажденная, в том числе для детского питания</text:p>
          </table:table-cell>
          <table:table-cell table:style-name="0">
            <text:p text:style-name="s1_center_fi0"><text:a xlink:type="simple" xlink:href="http://ivo.garant.ru/document/redirect/70650730/10112">10.11.12</text:a></text:p>
          </table:table-cell>
        </table:table-row>
        <table:table-row>
          <table:table-cell table:style-name="0">
            <text:p text:style-name="s1_center_fi0"><text:bookmark text:name="anchor2444"/>444.</text:p>
          </table:table-cell>
          <table:table-cell table:style-name="0">
            <text:p text:style-name="s16_fi0">Субпродукты пищевые крупного рогатого скота парные, остывшие или охлажденные</text:p>
          </table:table-cell>
          <table:table-cell table:style-name="0">
            <text:p text:style-name="s1_center_fi0"><text:a xlink:type="simple" xlink:href="http://ivo.garant.ru/document/redirect/70650730/101120110">10.11.20.110</text:a></text:p>
          </table:table-cell>
        </table:table-row>
        <table:table-row>
          <table:table-cell table:style-name="0">
            <text:p text:style-name="s1_center_fi0"><text:bookmark text:name="anchor2445"/>445.</text:p>
          </table:table-cell>
          <table:table-cell table:style-name="0">
            <text:p text:style-name="s16_fi0">Мясо крупного рогатого скота (говядина и телятина) замороженное, в том числе для детского питания</text:p>
          </table:table-cell>
          <table:table-cell table:style-name="0">
            <text:p text:style-name="s1_center_fi0"><text:a xlink:type="simple" xlink:href="http://ivo.garant.ru/document/redirect/70650730/101131">10.11.31</text:a></text:p>
          </table:table-cell>
        </table:table-row>
        <table:table-row>
          <table:table-cell table:style-name="0">
            <text:p text:style-name="s1_center_fi0"><text:bookmark text:name="anchor2446"/>446.</text:p>
          </table:table-cell>
          <table:table-cell table:style-name="0">
            <text:p text:style-name="s16_fi0">Свинина замороженная, в том числе для детского питания</text:p>
          </table:table-cell>
          <table:table-cell table:style-name="0">
            <text:p text:style-name="s1_center_fi0"><text:a xlink:type="simple" xlink:href="http://ivo.garant.ru/document/redirect/70650730/101132">10.11.32</text:a></text:p>
          </table:table-cell>
        </table:table-row>
        <table:table-row>
          <table:table-cell table:style-name="0">
            <text:p text:style-name="s1_center_fi0"><text:bookmark text:name="anchor2447"/>447.</text:p>
          </table:table-cell>
          <table:table-cell table:style-name="0">
            <text:p text:style-name="s16_fi0">Мясо птицы охлажденное, в том числе для детского питания</text:p>
          </table:table-cell>
          <table:table-cell table:style-name="0">
            <text:p text:style-name="s1_center_fi0"><text:a xlink:type="simple" xlink:href="http://ivo.garant.ru/document/redirect/70650730/10121">10.12.1</text:a></text:p>
          </table:table-cell>
        </table:table-row>
        <table:table-row>
          <table:table-cell table:style-name="0">
            <text:p text:style-name="s1_center_fi0"><text:bookmark text:name="anchor2448"/>448.</text:p>
          </table:table-cell>
          <table:table-cell table:style-name="0">
            <text:p text:style-name="s16_fi0">Субпродукты домашней птицы пищевые замороженные</text:p>
          </table:table-cell>
          <table:table-cell table:style-name="0">
            <text:p text:style-name="s1_center_fi0"><text:a xlink:type="simple" xlink:href="http://ivo.garant.ru/document/redirect/70650730/1240120">10.12.40.120</text:a></text:p>
          </table:table-cell>
        </table:table-row>
        <table:table-row>
          <table:table-cell table:style-name="0">
            <text:p text:style-name="s1_center_fi0"><text:bookmark text:name="anchor2449"/>449.</text:p>
          </table:table-cell>
          <table:table-cell table:style-name="0">
            <text:p text:style-name="s16_fi0">Молоко и сливки сухие, сублимированные</text:p>
          </table:table-cell>
          <table:table-cell table:style-name="0">
            <text:p text:style-name="s1_center_fi0"><text:a xlink:type="simple" xlink:href="http://ivo.garant.ru/document/redirect/70650730/10512">10.51.2</text:a></text:p>
          </table:table-cell>
        </table:table-row>
        <table:table-row>
          <table:table-cell table:style-name="0">
            <text:p text:style-name="s1_center_fi0"><text:bookmark text:name="anchor2450"/>450.</text:p>
          </table:table-cell>
          <table:table-cell table:style-name="0">
            <text:p text:style-name="s16_fi0">Масло сливочное</text:p>
          </table:table-cell>
          <table:table-cell table:style-name="0">
            <text:p text:style-name="s1_center_fi0"><text:a xlink:type="simple" xlink:href="http://ivo.garant.ru/document/redirect/76834021/1030100">10.51.30.100</text:a></text:p>
          </table:table-cell>
        </table:table-row>
        <table:table-row>
          <table:table-cell table:style-name="0">
            <text:p text:style-name="s1_center_fi0"><text:bookmark text:name="anchor2451"/>451.</text:p>
          </table:table-cell>
          <table:table-cell table:style-name="0">
            <text:p text:style-name="s16_fi0">Масло сливочное</text:p>
          </table:table-cell>
          <table:table-cell table:style-name="0">
            <text:p text:style-name="s1_center_fi0"><text:a xlink:type="simple" xlink:href="http://ivo.garant.ru/document/redirect/70650730/105130110">10.51.30.110</text:a></text:p>
          </table:table-cell>
        </table:table-row>
        <table:table-row>
          <table:table-cell table:style-name="0">
            <text:p text:style-name="s1_center_fi0"><text:bookmark text:name="anchor2452"/>452.</text:p>
          </table:table-cell>
          <table:table-cell table:style-name="0">
            <text:p text:style-name="s16_fi0">Пасты масляные</text:p>
          </table:table-cell>
          <table:table-cell table:style-name="0">
            <text:p text:style-name="s1_center_fi0"><text:a xlink:type="simple" xlink:href="http://ivo.garant.ru/document/redirect/76834021/1030200">10.51.30.200</text:a></text:p>
          </table:table-cell>
        </table:table-row>
        <table:table-row>
          <table:table-cell table:style-name="0">
            <text:p text:style-name="s1_center_fi0"><text:bookmark text:name="anchor2453"/>453.</text:p>
          </table:table-cell>
          <table:table-cell table:style-name="0">
            <text:p text:style-name="s16_fi0">Пасты масляные</text:p>
          </table:table-cell>
          <table:table-cell table:style-name="0">
            <text:p text:style-name="s1_center_fi0"><text:a xlink:type="simple" xlink:href="http://ivo.garant.ru/document/redirect/70650730/105130210">10.51.30.210</text:a></text:p>
          </table:table-cell>
        </table:table-row>
        <table:table-row>
          <table:table-cell table:style-name="0">
            <text:p text:style-name="s1_center_fi0"><text:bookmark text:name="anchor2454"/>454.</text:p>
          </table:table-cell>
          <table:table-cell table:style-name="0">
            <text:p text:style-name="s16_fi0">Сыры, продукты сырные и творог</text:p>
          </table:table-cell>
          <table:table-cell table:style-name="0">
            <text:p text:style-name="s1_center_fi0"><text:a xlink:type="simple" xlink:href="http://ivo.garant.ru/document/redirect/70650730/10514">10.51.4</text:a>, за исключением <text:a xlink:type="simple" xlink:href="http://ivo.garant.ru/document/redirect/70650730/105140120">10.51.40.120</text:a></text:p>
          </table:table-cell>
        </table:table-row>
        <table:table-row>
          <table:table-cell table:style-name="0">
            <text:p text:style-name="s1_center_fi0"><text:bookmark text:name="anchor2455"/>455.</text:p>
          </table:table-cell>
          <table:table-cell table:style-name="0">
            <text:p text:style-name="s16_fi0">Молоко и сливки, сгущенные или с добавками сахара или других подслащивающих веществ, не сухие</text:p>
          </table:table-cell>
          <table:table-cell table:style-name="0">
            <text:p text:style-name="s1_center_fi0"><text:a xlink:type="simple" xlink:href="http://ivo.garant.ru/document/redirect/70650730/105151">10.51.51</text:a></text:p>
          </table:table-cell>
        </table:table-row>
        <table:table-row>
          <table:table-cell table:style-name="0">
            <text:p text:style-name="s1_center_fi0"><text:bookmark text:name="anchor2456"/>456.</text:p>
          </table:table-cell>
          <table:table-cell table:style-name="0">
            <text:p text:style-name="s16_fi0">Рис шелушеный</text:p>
          </table:table-cell>
          <table:table-cell table:style-name="0">
            <text:p text:style-name="s1_center_fi0"><text:a xlink:type="simple" xlink:href="http://ivo.garant.ru/document/redirect/70650730/106111000">10.61.11.000</text:a></text:p>
          </table:table-cell>
        </table:table-row>
        <table:table-row>
          <table:table-cell table:style-name="0">
            <text:p text:style-name="s1_center_fi0"><text:bookmark text:name="anchor2457"/>457.</text:p>
          </table:table-cell>
          <table:table-cell table:style-name="0">
            <text:p text:style-name="s16_fi0">Сахар белый свекловичный или тростниковый и химически чистая сахароза в твердом состоянии без вкусоароматических или красящих добавок</text:p>
          </table:table-cell>
          <table:table-cell table:style-name="0">
            <text:p text:style-name="s1_center_fi0"><text:a xlink:type="simple" xlink:href="http://ivo.garant.ru/document/redirect/70650730/108112">10.81.12</text:a></text:p>
          </table:table-cell>
        </table:table-row>
        <table:table-row>
          <table:table-cell table:style-name="0">
            <text:p text:style-name="s1_center_fi0"><text:bookmark text:name="anchor2458"/>458.</text:p>
          </table:table-cell>
          <table:table-cell table:style-name="0">
            <text:p text:style-name="s16_fi0">Сахар рафинированный свекловичный или тростниковый со вкусоароматическими или красящими добавками; кленовый сахар и кленовый сироп</text:p>
          </table:table-cell>
          <table:table-cell table:style-name="0">
            <text:p text:style-name="s1_center_fi0"><text:a xlink:type="simple" xlink:href="http://ivo.garant.ru/document/redirect/70650730/108113">10.81.13</text:a></text:p>
          </table:table-cell>
        </table:table-row>
        <table:table-row>
          <table:table-cell table:style-name="0">
            <text:p text:style-name="s1_center_fi0"><text:bookmark text:name="anchor2459"/>459.</text:p>
          </table:table-cell>
          <table:table-cell table:style-name="0">
            <text:p text:style-name="s16_fi0">Коньяки</text:p>
          </table:table-cell>
          <table:table-cell table:style-name="0">
            <text:p text:style-name="s1_center_fi0"><text:a xlink:type="simple" xlink:href="http://ivo.garant.ru/document/redirect/70650730/110110140">11.01.10.140</text:a></text:p>
          </table:table-cell>
        </table:table-row>
        <table:table-row>
          <table:table-cell table:style-name="0">
            <text:p text:style-name="s1_center_fi0"><text:bookmark text:name="anchor2460"/>460.</text:p>
          </table:table-cell>
          <table:table-cell table:style-name="0">
            <text:p text:style-name="s16_fi0">Бренди</text:p>
          </table:table-cell>
          <table:table-cell table:style-name="0">
            <text:p text:style-name="s1_center_fi0"><text:a xlink:type="simple" xlink:href="http://ivo.garant.ru/document/redirect/70650730/110110160">11.01.10.160</text:a></text:p>
          </table:table-cell>
        </table:table-row>
        <table:table-row>
          <table:table-cell table:style-name="0">
            <text:p text:style-name="s1_center_fi0"><text:bookmark text:name="anchor2461"/>461.</text:p>
          </table:table-cell>
          <table:table-cell table:style-name="0">
            <text:p text:style-name="s16_fi0">Вина игристые</text:p>
          </table:table-cell>
          <table:table-cell table:style-name="0">
            <text:p text:style-name="s1_center_fi0"><text:a xlink:type="simple" xlink:href="http://ivo.garant.ru/document/redirect/70650730/11021111">11.02.11.110</text:a></text:p>
          </table:table-cell>
        </table:table-row>
        <table:table-row>
          <table:table-cell table:style-name="0">
            <text:p text:style-name="s1_center_fi0"><text:bookmark text:name="anchor2462"/>462.</text:p>
          </table:table-cell>
          <table:table-cell table:style-name="0">
            <text:p text:style-name="s16_fi0">Вина</text:p>
          </table:table-cell>
          <table:table-cell table:style-name="0">
            <text:p text:style-name="s1_center_fi0"><text:a xlink:type="simple" xlink:href="http://ivo.garant.ru/document/redirect/70650730/11021211">11.02.12.110</text:a></text:p>
          </table:table-cell>
        </table:table-row>
        <table:table-row>
          <table:table-cell table:style-name="0">
            <text:p text:style-name="s1_center_fi0"><text:bookmark text:name="anchor2463"/>463.</text:p>
          </table:table-cell>
          <table:table-cell table:style-name="0">
            <text:p text:style-name="s16_fi0">Вина ликерные</text:p>
          </table:table-cell>
          <table:table-cell table:style-name="0">
            <text:p text:style-name="s1_center_fi0"><text:a xlink:type="simple" xlink:href="http://ivo.garant.ru/document/redirect/70650730/11021212">11.02.12.120</text:a></text:p>
          </table:table-cell>
        </table:table-row>
        <table:table-row>
          <table:table-cell table:style-name="0">
            <text:p text:style-name="s1_center_fi0"><text:bookmark text:name="anchor2464"/>464.</text:p>
          </table:table-cell>
          <table:table-cell table:style-name="0">
            <text:p text:style-name="s16_fi0">Вина крепленые</text:p>
          </table:table-cell>
          <table:table-cell table:style-name="0">
            <text:p text:style-name="s1_center_fi0"><text:a xlink:type="simple" xlink:href="http://ivo.garant.ru/document/redirect/76834021/15">11.02.12.160</text:a></text:p>
          </table:table-cell>
        </table:table-row>
        <table:table-row>
          <table:table-cell table:style-name="0">
            <text:p text:style-name="s1_center_fi0"><text:bookmark text:name="anchor2465"/>465.</text:p>
          </table:table-cell>
          <table:table-cell table:style-name="0">
            <text:p text:style-name="s16_fi0">Вина фруктовые (плодовые)</text:p>
          </table:table-cell>
          <table:table-cell table:style-name="0">
            <text:p text:style-name="s1_center_fi0"><text:a xlink:type="simple" xlink:href="http://ivo.garant.ru/document/redirect/70650730/113111">11.03.10.110</text:a></text:p>
          </table:table-cell>
        </table:table-row>
      </table:table>
      <text:p text:style-name="s1"/>
      <text:p text:style-name="s22header">Информация об изменениях:</text:p>
      <text:p text:style-name="s22"><text:bookmark text:name="anchor3000"/>Приложение 3 изменено с 1 января 2027 г. - <text:a xlink:type="simple" xlink:href="http://ivo.garant.ru/document/redirect/414186645/1002">Постановление</text:a> Правительства России от 4 мая 2026 г. № 513</text:p>
      <text:p text:style-name="s22"><text:a xlink:type="simple" xlink:href="http://ivo.garant.ru/document/redirect/483425820/3000">См. будущую редакцию</text:a></text:p>
      <text:p text:style-name="s22">Приложение 3 изменено с 16 марта 2026 г. - <text:a xlink:type="simple" xlink:href="http://ivo.garant.ru/document/redirect/413632116/1003">Постановление</text:a> Правительства России от 11 февраля 2026 г. № 119</text:p>
      <text:p text:style-name="s22"><text:a xlink:type="simple" xlink:href="http://ivo.garant.ru/document/redirect/483425373/3000">См. предыдущую редакцию</text:a></text:p>
      <text:p text:style-name="s1_right_fi698"><text:span text:style-name="s10">ПРИЛОЖЕНИЕ N 3
к <text:a xlink:type="simple" xlink:href="#anchor0">постановлению</text:a> Правительства
Российской Федерации
от 23 декабря 2024 г. N 1875</text:span></text:p>
      <text:p text:style-name="s1"/>
      <text:h text:outline-level="1" text:style-name="s3">Минимальная обязательная доля
закупок товаров российского происхождения при осуществлении закупок в соответствии с Федеральным законом "О закупках товаров, работ, услуг отдельными видами юридических лиц"</text:h>
      <text:p text:style-name="s52header">С изменениями и дополнениями от:</text:p>
      <text:p text:style-name="s52">10 июня, 29 августа 2025 г., 11 февраля 2026 г.</text:p>
      <text:p text:style-name="s1"/>
      <table:table table:name="9972" table:style-name="9972">
        <table:table-column table:style-name="887"/>
        <table:table-column table:style-name="4217"/>
        <table:table-column table:style-name="2866"/>
        <table:table-column table:style-name="2002"/>
        <table:table-row>
          <table:table-cell table:style-name="13" table:number-columns-spanned="2">
            <table:covered-table-cell/>
            <text:p text:style-name="s1_center_fi0"><text:bookmark text:name="anchor30100"/>Наименование товара</text:p>
          </table:table-cell>
          <table:table-cell table:style-name="13">
            <text:p text:style-name="s1_center_fi0">Код товара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cell table:style-name="9">
            <text:p text:style-name="s1_center_fi0">Размер минимальной обязательной доли закупок товаров российского происхождения,</text:p>
            <text:p text:style-name="s1_center_fi0">процентов</text:p>
          </table:table-cell>
        </table:table-row>
        <table:table-row>
          <table:table-cell table:style-name="0">
            <text:p text:style-name="s1_center_fi0"><text:bookmark text:name="anchor3001"/>1.</text:p>
          </table:table-cell>
          <table:table-cell table:style-name="0">
            <text:p text:style-name="s16_fi0">Щебень</text:p>
          </table:table-cell>
          <table:table-cell table:style-name="0">
            <text:p text:style-name="s1_center_fi0"><text:a xlink:type="simple" xlink:href="http://ivo.garant.ru/document/redirect/70650730/81212140">08.12.12.140</text:a></text:p>
          </table:table-cell>
          <table:table-cell table:style-name="0">
            <text:p text:style-name="s1_center_fi0">80</text:p>
          </table:table-cell>
        </table:table-row>
        <table:table-row>
          <table:table-cell table:style-name="0">
            <text:p text:style-name="s1_center_fi0"><text:bookmark text:name="anchor3002"/>2.</text:p>
          </table:table-cell>
          <table:table-cell table:style-name="0">
            <text:p text:style-name="s16_fi0">Марля медицинская</text:p>
          </table:table-cell>
          <table:table-cell table:style-name="0">
            <text:p text:style-name="s1_center_fi0"><text:a xlink:type="simple" xlink:href="http://ivo.garant.ru/document/redirect/70650730/1344120">13.20.44.120</text:a></text:p>
          </table:table-cell>
          <table:table-cell table:style-name="0">
            <text:p text:style-name="s1_center_fi0">90</text:p>
          </table:table-cell>
        </table:table-row>
        <table:table-row>
          <table:table-cell table:style-name="0">
            <text:p text:style-name="s1_center_fi0"><text:bookmark text:name="anchor3003"/>3.</text:p>
          </table:table-cell>
          <table:table-cell table:style-name="0">
            <text:p text:style-name="s16_fi0">Ткани из стекловолокна (включая узкие ткани)</text:p>
          </table:table-cell>
          <table:table-cell table:style-name="0">
            <text:p text:style-name="s1_center_fi0"><text:a xlink:type="simple" xlink:href="http://ivo.garant.ru/document/redirect/70650730/132046">13.20.46</text:a></text:p>
          </table:table-cell>
          <table:table-cell table:style-name="0">
            <text:p text:style-name="s1_center_fi0">90</text:p>
          </table:table-cell>
        </table:table-row>
        <table:table-row>
          <table:table-cell table:style-name="0">
            <text:p text:style-name="s1_center_fi0"><text:bookmark text:name="anchor3004"/>4.</text:p>
          </table:table-cell>
          <table:table-cell table:style-name="0">
            <text:p text:style-name="s16_fi0">Канаты, веревки, шпагат и сети, кроме отходов</text:p>
          </table:table-cell>
          <table:table-cell table:style-name="0">
            <text:p text:style-name="s1_center_fi0"><text:a xlink:type="simple" xlink:href="http://ivo.garant.ru/document/redirect/70650730/13941">13.94.1</text:a></text:p>
          </table:table-cell>
          <table:table-cell table:style-name="0">
            <text:p text:style-name="s1_center_fi0">90</text:p>
          </table:table-cell>
        </table:table-row>
        <table:table-row>
          <table:table-cell table:style-name="0">
            <text:p text:style-name="s1_center_fi0"><text:bookmark text:name="anchor3005"/>5.</text:p>
          </table:table-cell>
          <table:table-cell table:style-name="0">
            <text:p text:style-name="s16_fi0">Материалы нетканые из текстильных волокон</text:p>
          </table:table-cell>
          <table:table-cell table:style-name="0">
            <text:p text:style-name="s1_center_fi0"><text:a xlink:type="simple" xlink:href="http://ivo.garant.ru/document/redirect/70650730/139510111">13.95.10.111</text:a></text:p>
          </table:table-cell>
          <table:table-cell table:style-name="0">
            <text:p text:style-name="s1_center_fi0">90</text:p>
          </table:table-cell>
        </table:table-row>
        <table:table-row>
          <table:table-cell table:style-name="0">
            <text:p text:style-name="s1_center_fi0"><text:bookmark text:name="anchor3006"/>6.</text:p>
          </table:table-cell>
          <table:table-cell table:style-name="0">
            <text:p text:style-name="s16_fi0">Материалы нетканые из химических нитей</text:p>
          </table:table-cell>
          <table:table-cell table:style-name="0">
            <text:p text:style-name="s1_center_fi0"><text:a xlink:type="simple" xlink:href="http://ivo.garant.ru/document/redirect/70650730/951110039">13.95.10.112</text:a></text:p>
          </table:table-cell>
          <table:table-cell table:style-name="0">
            <text:p text:style-name="s1_center_fi0">90</text:p>
          </table:table-cell>
        </table:table-row>
        <table:table-row>
          <table:table-cell table:style-name="0">
            <text:p text:style-name="s1_center_fi0"><text:bookmark text:name="anchor3007"/>7.</text:p>
          </table:table-cell>
          <table:table-cell table:style-name="0">
            <text:p text:style-name="s16_fi0">Ткани узкие; ткани узкие с основой без утка с клеевым соединением (клеящие ленты); материалы для отделки и аналогичные изделия, за исключением товара, предусмотренного <text:a xlink:type="simple" xlink:href="#anchor3008">позицией 8</text:a> настоящего приложения</text:p>
          </table:table-cell>
          <table:table-cell table:style-name="0">
            <text:p text:style-name="s1_center_fi0"><text:a xlink:type="simple" xlink:href="http://ivo.garant.ru/document/redirect/70650730/2274">13.96.17</text:a></text:p>
          </table:table-cell>
          <table:table-cell table:style-name="0">
            <text:p text:style-name="s1_center_fi0">90</text:p>
          </table:table-cell>
        </table:table-row>
        <table:table-row>
          <table:table-cell table:style-name="0">
            <text:p text:style-name="s1_center_fi0"><text:bookmark text:name="anchor3008"/>8.</text:p>
          </table:table-cell>
          <table:table-cell table:style-name="0">
            <text:p text:style-name="s16_fi0">Тесьма плетеная и шнуры</text:p>
          </table:table-cell>
          <table:table-cell table:style-name="0">
            <text:p text:style-name="s1_center_fi0"><text:a xlink:type="simple" xlink:href="http://ivo.garant.ru/document/redirect/70650730/139617131">13.96.17.131</text:a></text:p>
          </table:table-cell>
          <table:table-cell table:style-name="0">
            <text:p text:style-name="s1_center_fi0">90</text:p>
          </table:table-cell>
        </table:table-row>
        <table:table-row>
          <table:table-cell table:style-name="0">
            <text:p text:style-name="s1_center_fi0"><text:bookmark text:name="anchor3009"/>9.</text:p>
          </table:table-cell>
          <table:table-cell table:style-name="0">
            <text:p text:style-name="s16_fi0">Одежда из текстильных материалов с пропиткой или покрытием</text:p>
          </table:table-cell>
          <table:table-cell table:style-name="0">
            <text:p text:style-name="s1_center_fi0"><text:a xlink:type="simple" xlink:href="http://ivo.garant.ru/document/redirect/70650730/141932130">14.19.32.130</text:a></text:p>
          </table:table-cell>
          <table:table-cell table:style-name="0">
            <text:p text:style-name="s1_center_fi0">90</text:p>
          </table:table-cell>
        </table:table-row>
        <table:table-row>
          <table:table-cell table:style-name="0">
            <text:p text:style-name="s1_center_fi0"><text:bookmark text:name="anchor3010"/>10.</text:p>
          </table:table-cell>
          <table:table-cell table:style-name="0">
            <text:p text:style-name="s16_fi0">Кожа дубленая и выделанная; меха выделанные и окрашенные</text:p>
          </table:table-cell>
          <table:table-cell table:style-name="0">
            <text:p text:style-name="s1_center_fi0"><text:a xlink:type="simple" xlink:href="http://ivo.garant.ru/document/redirect/70650730/1511">15.11</text:a></text:p>
          </table:table-cell>
          <table:table-cell table:style-name="0">
            <text:p text:style-name="s1_center_fi0">90</text:p>
          </table:table-cell>
        </table:table-row>
        <table:table-row>
          <table:table-cell table:style-name="0">
            <text:p text:style-name="s1_center_fi0"><text:bookmark text:name="anchor3011"/>11.</text:p>
          </table:table-cell>
          <table:table-cell table:style-name="0">
            <text:p text:style-name="s16_fi0">Обувь водонепроницаемая на подошве и с верхом из резины или пластмассы, кроме обуви с защитным металлическим подноском</text:p>
          </table:table-cell>
          <table:table-cell table:style-name="0">
            <text:p text:style-name="s1_center_fi0"><text:a xlink:type="simple" xlink:href="http://ivo.garant.ru/document/redirect/70650730/152011">15.20.11</text:a></text:p>
          </table:table-cell>
          <table:table-cell table:style-name="0">
            <text:p text:style-name="s1_center_fi0">90</text:p>
          </table:table-cell>
        </table:table-row>
        <table:table-row>
          <table:table-cell table:style-name="0">
            <text:p text:style-name="s1_center_fi0"><text:bookmark text:name="anchor3012"/>12.</text:p>
          </table:table-cell>
          <table:table-cell table:style-name="0">
            <text:p text:style-name="s16_fi0">Обувь с верхом из кожи, кроме спортивной обуви, обуви с защитным металлическим подноском и различной специальной обуви</text:p>
          </table:table-cell>
          <table:table-cell table:style-name="0">
            <text:p text:style-name="s1_center_fi0"><text:a xlink:type="simple" xlink:href="http://ivo.garant.ru/document/redirect/70650730/152013">15.20.13</text:a></text:p>
          </table:table-cell>
          <table:table-cell table:style-name="0">
            <text:p text:style-name="s1_center_fi0">90</text:p>
          </table:table-cell>
        </table:table-row>
        <table:table-row>
          <table:table-cell table:style-name="0">
            <text:p text:style-name="s1_center_fi0"><text:bookmark text:name="anchor3013"/>13.</text:p>
          </table:table-cell>
          <table:table-cell table:style-name="0">
            <text:p text:style-name="s16_fi0">Бумага и картон</text:p>
          </table:table-cell>
          <table:table-cell table:style-name="0">
            <text:p text:style-name="s1_center_fi0"><text:a xlink:type="simple" xlink:href="http://ivo.garant.ru/document/redirect/70650730/1712">17.12</text:a></text:p>
          </table:table-cell>
          <table:table-cell table:style-name="0">
            <text:p text:style-name="s1_center_fi0">90</text:p>
          </table:table-cell>
        </table:table-row>
        <table:table-row>
          <table:table-cell table:style-name="0">
            <text:p text:style-name="s1_center_fi0"><text:bookmark text:name="anchor3014"/>14.</text:p>
          </table:table-cell>
          <table:table-cell table:style-name="0">
            <text:p text:style-name="s16_fi0">Фотопластинки и фотопленки светочувствительные, неэкспонированные</text:p>
          </table:table-cell>
          <table:table-cell table:style-name="0">
            <text:p text:style-name="s1_center_fi0"><text:a xlink:type="simple" xlink:href="http://ivo.garant.ru/document/redirect/70650730/205911110">20.59.11.110</text:a></text:p>
          </table:table-cell>
          <table:table-cell table:style-name="0">
            <text:p text:style-name="s1_center_fi0">80</text:p>
          </table:table-cell>
        </table:table-row>
        <table:table-row>
          <table:table-cell table:style-name="0">
            <text:p text:style-name="s1_center_fi0"><text:bookmark text:name="anchor3015"/>15.</text:p>
          </table:table-cell>
          <table:table-cell table:style-name="0">
            <text:p text:style-name="s16_fi0">Катализаторы, не включенные в другие группировки</text:p>
          </table:table-cell>
          <table:table-cell table:style-name="0">
            <text:p text:style-name="s1_center_fi0"><text:a xlink:type="simple" xlink:href="http://ivo.garant.ru/document/redirect/70650730/2059150">20.59.56.150</text:a></text:p>
          </table:table-cell>
          <table:table-cell table:style-name="0">
            <text:p text:style-name="s1_center_fi0">50</text:p>
          </table:table-cell>
        </table:table-row>
        <table:table-row>
          <table:table-cell table:style-name="0">
            <text:p text:style-name="s1_center_fi0"><text:bookmark text:name="anchor3016"/>16.</text:p>
          </table:table-cell>
          <table:table-cell table:style-name="0">
            <text:p text:style-name="s16_fi0">Перчатки хирургические резиновые</text:p>
          </table:table-cell>
          <table:table-cell table:style-name="0">
            <text:p text:style-name="s1_center_fi0"><text:a xlink:type="simple" xlink:href="http://ivo.garant.ru/document/redirect/70650730/221960111">22.19.60.111</text:a></text:p>
          </table:table-cell>
          <table:table-cell table:style-name="0">
            <text:p text:style-name="s1_center_fi0">20</text:p>
          </table:table-cell>
        </table:table-row>
        <table:table-row>
          <table:table-cell table:style-name="0">
            <text:p text:style-name="s1_center_fi0"><text:bookmark text:name="anchor3017"/>17.</text:p>
          </table:table-cell>
          <table:table-cell table:style-name="0">
            <text:p text:style-name="s16_fi0">Перчатки резиновые технические</text:p>
          </table:table-cell>
          <table:table-cell table:style-name="0">
            <text:p text:style-name="s1_center_fi0"><text:a xlink:type="simple" xlink:href="http://ivo.garant.ru/document/redirect/70650730/4407">22.19.60.112</text:a></text:p>
          </table:table-cell>
          <table:table-cell table:style-name="0">
            <text:p text:style-name="s1_center_fi0">20</text:p>
          </table:table-cell>
        </table:table-row>
        <table:table-row>
          <table:table-cell table:style-name="0">
            <text:p text:style-name="s1_center_fi0"><text:bookmark text:name="anchor3018"/>18.</text:p>
          </table:table-cell>
          <table:table-cell table:style-name="0">
            <text:p text:style-name="s16_fi0">Перчатки хирургические из каучукового латекса стерильные одноразовые</text:p>
          </table:table-cell>
          <table:table-cell table:style-name="0">
            <text:p text:style-name="s1_center_fi0"><text:a xlink:type="simple" xlink:href="http://ivo.garant.ru/document/redirect/70650730/221960113">22.19.60.113</text:a></text:p>
          </table:table-cell>
          <table:table-cell table:style-name="0">
            <text:p text:style-name="s1_center_fi0">20</text:p>
          </table:table-cell>
        </table:table-row>
        <table:table-row>
          <table:table-cell table:style-name="0">
            <text:p text:style-name="s1_center_fi0"><text:bookmark text:name="anchor3019"/>19.</text:p>
          </table:table-cell>
          <table:table-cell table:style-name="0">
            <text:p text:style-name="s16_fi0">Перчатки резиновые прочие</text:p>
          </table:table-cell>
          <table:table-cell table:style-name="0">
            <text:p text:style-name="s1_center_fi0"><text:a xlink:type="simple" xlink:href="http://ivo.garant.ru/document/redirect/70650730/4409">22.19.60.119</text:a></text:p>
          </table:table-cell>
          <table:table-cell table:style-name="0">
            <text:p text:style-name="s1_center_fi0">20</text:p>
          </table:table-cell>
        </table:table-row>
        <table:table-row>
          <table:table-cell table:style-name="0">
            <text:p text:style-name="s1_center_fi0"><text:bookmark text:name="anchor3020"/>20.</text:p>
          </table:table-cell>
          <table:table-cell table:style-name="0">
            <text:p text:style-name="s16_fi0">Жернова, точильные камни, шлифовальные круги и аналогичные изделия без каркаса, для обработки камней, и их части, из природного камня, агломерированных природных или искусственных абразивов или керамики</text:p>
          </table:table-cell>
          <table:table-cell table:style-name="0">
            <text:p text:style-name="s1_center_fi0"><text:a xlink:type="simple" xlink:href="http://ivo.garant.ru/document/redirect/70650730/239111">23.91.11</text:a></text:p>
          </table:table-cell>
          <table:table-cell table:style-name="0">
            <text:p text:style-name="s1_center_fi0">80</text:p>
          </table:table-cell>
        </table:table-row>
        <table:table-row>
          <table:table-cell table:style-name="0">
            <text:p text:style-name="s1_center_fi0"><text:bookmark text:name="anchor30201"/>20<text:span text:style-name="upper"><text:span> 1</text:span></text:span>.</text:p>
          </table:table-cell>
          <table:table-cell table:style-name="0">
            <text:p text:style-name="s16_fi0">Башня (опора) из черных металлов, предназначенная для ветроэнергетических установок</text:p>
          </table:table-cell>
          <table:table-cell table:style-name="0">
            <text:p text:style-name="s1_center_fi0">из <text:a xlink:type="simple" xlink:href="http://ivo.garant.ru/document/redirect/70650730/25112311">25.11.23.110</text:a></text:p>
          </table:table-cell>
          <table:table-cell table:style-name="0">
            <text:p text:style-name="s1_center_fi0">95</text:p>
          </table:table-cell>
        </table:table-row>
        <table:table-row>
          <table:table-cell table:style-name="0">
            <text:p text:style-name="s1_center_fi0"><text:bookmark text:name="anchor3021"/>21.</text:p>
          </table:table-cell>
          <table:table-cell table:style-name="0">
            <text:p text:style-name="s16_fi0">Котлы водогрейные центрального отопления для производства горячей воды или пара низкого давления</text:p>
          </table:table-cell>
          <table:table-cell table:style-name="0">
            <text:p text:style-name="s1_center_fi0"><text:a xlink:type="simple" xlink:href="http://ivo.garant.ru/document/redirect/70650730/252112">25.21.12</text:a></text:p>
          </table:table-cell>
          <table:table-cell table:style-name="0">
            <text:p text:style-name="s1_center_fi0">80</text:p>
          </table:table-cell>
        </table:table-row>
        <table:table-row>
          <table:table-cell table:style-name="0">
            <text:p text:style-name="s1_center_fi0"><text:bookmark text:name="anchor3022"/>22.</text:p>
          </table:table-cell>
          <table:table-cell table:style-name="0">
            <text:p text:style-name="s16_fi0">Резервуары, цистерны, баки и аналогичные емкости (кроме емкостей для сжатых или сжиженных газов) из чугуна, стали или алюминия, вместимостью более 300 л, без механического или теплотехнического оборудования</text:p>
          </table:table-cell>
          <table:table-cell table:style-name="0">
            <text:p text:style-name="s1_center_fi0"><text:a xlink:type="simple" xlink:href="http://ivo.garant.ru/document/redirect/70650730/25291">25.29.11</text:a></text:p>
          </table:table-cell>
          <table:table-cell table:style-name="0">
            <text:p text:style-name="s1_center_fi0">90</text:p>
          </table:table-cell>
        </table:table-row>
        <table:table-row>
          <table:table-cell table:style-name="0">
            <text:p text:style-name="s1_center_fi0"><text:bookmark text:name="anchor3023"/>23.</text:p>
          </table:table-cell>
          <table:table-cell table:style-name="0">
            <text:p text:style-name="s16_fi0">Емкости металлические для сжатых или сжиженных газов</text:p>
          </table:table-cell>
          <table:table-cell table:style-name="0">
            <text:p text:style-name="s1_center_fi0"><text:a xlink:type="simple" xlink:href="http://ivo.garant.ru/document/redirect/70650730/252912">25.29.12</text:a></text:p>
          </table:table-cell>
          <table:table-cell table:style-name="0">
            <text:p text:style-name="s1_center_fi0">90</text:p>
          </table:table-cell>
        </table:table-row>
        <table:table-row>
          <table:table-cell table:style-name="0">
            <text:p text:style-name="s1_center_fi0"><text:bookmark text:name="anchor3024"/>24.</text:p>
          </table:table-cell>
          <table:table-cell table:style-name="0">
            <text:p text:style-name="s16_fi0">Оружие спортивное огнестрельное с нарезным стволом</text:p>
          </table:table-cell>
          <table:table-cell table:style-name="0">
            <text:p text:style-name="s1_center_fi0"><text:a xlink:type="simple" xlink:href="http://ivo.garant.ru/document/redirect/70650730/2541241">25.40.12.410</text:a></text:p>
          </table:table-cell>
          <table:table-cell table:style-name="0">
            <text:p text:style-name="s1_center_fi0">90</text:p>
          </table:table-cell>
        </table:table-row>
        <table:table-row>
          <table:table-cell table:style-name="0">
            <text:p text:style-name="s1_center_fi0"><text:bookmark text:name="anchor3025"/>25.</text:p>
          </table:table-cell>
          <table:table-cell table:style-name="0">
            <text:p text:style-name="s16_fi0">Патроны и боеприпасы прочие и их детали</text:p>
          </table:table-cell>
          <table:table-cell table:style-name="0">
            <text:p text:style-name="s1_center_fi0"><text:a xlink:type="simple" xlink:href="http://ivo.garant.ru/document/redirect/70650730/2541319">25.40.13.190</text:a></text:p>
          </table:table-cell>
          <table:table-cell table:style-name="0">
            <text:p text:style-name="s1_center_fi0">90</text:p>
          </table:table-cell>
        </table:table-row>
        <table:table-row>
          <table:table-cell table:style-name="0">
            <text:p text:style-name="s1_center_fi0"><text:bookmark text:name="anchor3026"/>26.</text:p>
          </table:table-cell>
          <table:table-cell table:style-name="0">
            <text:p text:style-name="s16_fi0">Инструмент ручной прочий</text:p>
          </table:table-cell>
          <table:table-cell table:style-name="0">
            <text:p text:style-name="s1_center_fi0"><text:a xlink:type="simple" xlink:href="http://ivo.garant.ru/document/redirect/70650730/73330">25.73.30</text:a></text:p>
          </table:table-cell>
          <table:table-cell table:style-name="0">
            <text:p text:style-name="s1_center_fi0">70</text:p>
          </table:table-cell>
        </table:table-row>
        <table:table-row>
          <table:table-cell table:style-name="0">
            <text:p text:style-name="s1_center_fi0"><text:bookmark text:name="anchor3027"/>27.</text:p>
          </table:table-cell>
          <table:table-cell table:style-name="0">
            <text:p text:style-name="s16_fi0">Инструменты рабочие сменные для станков или для ручного инструмента (с механическим приводом или без него)</text:p>
          </table:table-cell>
          <table:table-cell table:style-name="0">
            <text:p text:style-name="s1_center_fi0"><text:a xlink:type="simple" xlink:href="http://ivo.garant.ru/document/redirect/70650730/257340">25.73.40</text:a></text:p>
          </table:table-cell>
          <table:table-cell table:style-name="0">
            <text:p text:style-name="s1_center_fi0">70</text:p>
          </table:table-cell>
        </table:table-row>
        <table:table-row>
          <table:table-cell table:style-name="0">
            <text:p text:style-name="s1_center_fi0"><text:bookmark text:name="anchor3028"/>28.</text:p>
          </table:table-cell>
          <table:table-cell table:style-name="0">
            <text:p text:style-name="s16_fi0">Инструмент прочий</text:p>
          </table:table-cell>
          <table:table-cell table:style-name="0">
            <text:p text:style-name="s1_center_fi0"><text:a xlink:type="simple" xlink:href="http://ivo.garant.ru/document/redirect/70650730/257360">25.73.60</text:a></text:p>
          </table:table-cell>
          <table:table-cell table:style-name="0">
            <text:p text:style-name="s1_center_fi0">70</text:p>
          </table:table-cell>
        </table:table-row>
        <table:table-row>
          <table:table-cell table:style-name="0">
            <text:p text:style-name="s1_center_fi0"><text:bookmark text:name="anchor3029"/>29.</text:p>
          </table:table-cell>
          <table:table-cell table:style-name="0">
            <text:p text:style-name="s16_fi0">Винты гребные судовые, колеса гребные</text:p>
          </table:table-cell>
          <table:table-cell table:style-name="0">
            <text:p text:style-name="s1_center_fi0"><text:a xlink:type="simple" xlink:href="http://ivo.garant.ru/document/redirect/70650730/992600">25.99.26.000</text:a></text:p>
          </table:table-cell>
          <table:table-cell table:style-name="0">
            <text:p text:style-name="s1_center_fi0">90</text:p>
          </table:table-cell>
        </table:table-row>
        <table:table-row>
          <table:table-cell table:style-name="0">
            <text:p text:style-name="s1_center_fi0"><text:bookmark text:name="anchor3030"/>30.</text:p>
          </table:table-cell>
          <table:table-cell table:style-name="0">
            <text:p text:style-name="s16_fi0">Компоненты электронные, за исключением товаров, предусмотренных <text:a xlink:type="simple" xlink:href="#anchor3031">позициями 31 - 34</text:a> настоящего приложения</text:p>
          </table:table-cell>
          <table:table-cell table:style-name="0">
            <text:p text:style-name="s1_center_fi0"><text:a xlink:type="simple" xlink:href="http://ivo.garant.ru/document/redirect/70650730/2611">26.11</text:a></text:p>
          </table:table-cell>
          <table:table-cell table:style-name="0">
            <text:p text:style-name="s1_center_fi0">90</text:p>
          </table:table-cell>
        </table:table-row>
        <table:table-row>
          <table:table-cell table:style-name="0">
            <text:p text:style-name="s1_center_fi0"><text:bookmark text:name="anchor3031"/>31.</text:p>
          </table:table-cell>
          <table:table-cell table:style-name="0">
            <text:p text:style-name="s16_fi0">Приборы полупроводниковые и их части</text:p>
          </table:table-cell>
          <table:table-cell table:style-name="0">
            <text:p text:style-name="s1_center_fi0"><text:a xlink:type="simple" xlink:href="http://ivo.garant.ru/document/redirect/70650730/261122100">26.11.22.100</text:a></text:p>
          </table:table-cell>
          <table:table-cell table:style-name="0">
            <text:p text:style-name="s1_center_fi0">90</text:p>
          </table:table-cell>
        </table:table-row>
        <table:table-row>
          <table:table-cell table:style-name="0">
            <text:p text:style-name="s1_center_fi0"><text:bookmark text:name="anchor3032"/>32.</text:p>
          </table:table-cell>
          <table:table-cell table:style-name="0">
            <text:p text:style-name="s16_fi0">Элементы фотогальванические</text:p>
          </table:table-cell>
          <table:table-cell table:style-name="0">
            <text:p text:style-name="s1_center_fi0"><text:a xlink:type="simple" xlink:href="http://ivo.garant.ru/document/redirect/70650730/261122120">26.11.22.120</text:a></text:p>
          </table:table-cell>
          <table:table-cell table:style-name="0">
            <text:p text:style-name="s1_center_fi0">60</text:p>
          </table:table-cell>
        </table:table-row>
        <table:table-row>
          <table:table-cell table:style-name="0">
            <text:p text:style-name="s1_center_fi0"><text:bookmark text:name="anchor3033"/>33.</text:p>
          </table:table-cell>
          <table:table-cell table:style-name="0">
            <text:p text:style-name="s16_fi0">Светодиоды, светодиодные модули и их части</text:p>
          </table:table-cell>
          <table:table-cell table:style-name="0">
            <text:p text:style-name="s1_center_fi0"><text:a xlink:type="simple" xlink:href="http://ivo.garant.ru/document/redirect/70650730/261122200">26.11.22.200</text:a></text:p>
          </table:table-cell>
          <table:table-cell table:style-name="0">
            <text:p text:style-name="s1_center_fi0">90</text:p>
          </table:table-cell>
        </table:table-row>
        <table:table-row>
          <table:table-cell table:style-name="0">
            <text:p text:style-name="s1_center_fi0"><text:bookmark text:name="anchor3034"/>34.</text:p>
          </table:table-cell>
          <table:table-cell table:style-name="0">
            <text:p text:style-name="s16_fi0">Схемы интегральные электронные</text:p>
          </table:table-cell>
          <table:table-cell table:style-name="0">
            <text:p text:style-name="s1_center_fi0"><text:a xlink:type="simple" xlink:href="http://ivo.garant.ru/document/redirect/70650730/2601130">26.11.30</text:a></text:p>
          </table:table-cell>
          <table:table-cell table:style-name="0">
            <text:p text:style-name="s1_center_fi0">90</text:p>
          </table:table-cell>
        </table:table-row>
        <table:table-row>
          <table:table-cell table:style-name="0">
            <text:p text:style-name="s1_center_fi0"><text:bookmark text:name="anchor3035"/>35.</text:p>
          </table:table-cell>
          <table:table-cell table:style-name="0">
            <text:p text:style-name="s16_fi0">Платы печатные смонтированные, за исключением плат звуковых, видеоплат, сетевых и аналогичных плат для машин автоматической обработки информации, относящихся к коду <text:a xlink:type="simple" xlink:href="http://ivo.garant.ru/document/redirect/70650730/5501">26.12.20</text:a> по Общероссийскому классификатору продукции по видам экономической деятельности ОК 034-2014 (КПЕС 2008)</text:p>
          </table:table-cell>
          <table:table-cell table:style-name="0">
            <text:p text:style-name="s1_center_fi0"><text:a xlink:type="simple" xlink:href="http://ivo.garant.ru/document/redirect/70650730/2612">26.12</text:a></text:p>
          </table:table-cell>
          <table:table-cell table:style-name="0">
            <text:p text:style-name="s1_center_fi0">90</text:p>
          </table:table-cell>
        </table:table-row>
        <table:table-row>
          <table:table-cell table:style-name="0">
            <text:p text:style-name="s1_center_fi0"><text:bookmark text:name="anchor3036"/>36.</text:p>
          </table:table-cell>
          <table:table-cell table:style-name="0">
            <text:p text:style-name="s16_fi0">Платы звуковые, видеоплаты, сетевые и аналогичные платы для машин автоматической обработки информации</text:p>
          </table:table-cell>
          <table:table-cell table:style-name="0">
            <text:p text:style-name="s1_center_fi0"><text:a xlink:type="simple" xlink:href="http://ivo.garant.ru/document/redirect/70650730/5501">26.12.20</text:a></text:p>
          </table:table-cell>
          <table:table-cell table:style-name="0">
            <text:p text:style-name="s1_center_fi0">15</text:p>
          </table:table-cell>
        </table:table-row>
        <table:table-row>
          <table:table-cell table:style-name="0">
            <text:p text:style-name="s1_center_fi0"><text:bookmark text:name="anchor3037"/>37.</text:p>
          </table:table-cell>
          <table:table-cell table:style-name="0">
            <text:p text:style-name="s16_fi0">Компьютеры портативные массой не более 10 кг, такие как ноутбуки, планшетные компьютеры, карманные компьютеры, в том числе совмещающие функции мобильного телефонного аппарата, электронные записные книжки и аналогичная компьютерная техника</text:p>
          </table:table-cell>
          <table:table-cell table:style-name="0">
            <text:p text:style-name="s1_center_fi0"><text:a xlink:type="simple" xlink:href="http://ivo.garant.ru/document/redirect/70650730/262011">26.20.11</text:a></text:p>
          </table:table-cell>
          <table:table-cell table:style-name="0">
            <text:p text:style-name="s1_center_fi0">80</text:p>
          </table:table-cell>
        </table:table-row>
        <table:table-row>
          <table:table-cell table:style-name="0">
            <text:p text:style-name="s1_center_fi0"><text:bookmark text:name="anchor3038"/>38.</text:p>
          </table:table-cell>
          <table:table-cell table:style-name="0">
            <text:p text:style-name="s16_fi0">Терминалы кассовые, подключаемые к компьютеру или сети передачи данных</text:p>
          </table:table-cell>
          <table:table-cell table:style-name="0">
            <text:p text:style-name="s1_center_fi0"><text:a xlink:type="simple" xlink:href="http://ivo.garant.ru/document/redirect/70650730/262012110">26.20.12.110</text:a></text:p>
          </table:table-cell>
          <table:table-cell table:style-name="0">
            <text:p text:style-name="s1_center_fi0">50</text:p>
          </table:table-cell>
        </table:table-row>
        <table:table-row>
          <table:table-cell table:style-name="0">
            <text:p text:style-name="s1_center_fi0"><text:bookmark text:name="anchor3039"/>39.</text:p>
          </table:table-cell>
          <table:table-cell table:style-name="0">
            <text:p text:style-name="s16_fi0">Банкоматы и аналогичное оборудование, подключаемое к компьютеру или сети передачи данных</text:p>
          </table:table-cell>
          <table:table-cell table:style-name="0">
            <text:p text:style-name="s1_center_fi0"><text:a xlink:type="simple" xlink:href="http://ivo.garant.ru/document/redirect/70650730/262012120">26.20.12.120</text:a></text:p>
          </table:table-cell>
          <table:table-cell table:style-name="0">
            <text:p text:style-name="s1_center_fi0">50</text:p>
          </table:table-cell>
        </table:table-row>
        <table:table-row>
          <table:table-cell table:style-name="0">
            <text:p text:style-name="s1_center_fi0"><text:bookmark text:name="anchor3040"/>40.</text:p>
          </table:table-cell>
          <table:table-cell table:style-name="0">
            <text:p text:style-name="s16_fi0">Машины вычислительные электронные цифровые, содержащие в одном корпусе центральный процессор и устройство ввода и вывода, объединенные или нет для автоматической обработки данных</text:p>
          </table:table-cell>
          <table:table-cell table:style-name="0">
            <text:p text:style-name="s1_center_fi0"><text:a xlink:type="simple" xlink:href="http://ivo.garant.ru/document/redirect/70650730/262013">26.20.13</text:a></text:p>
          </table:table-cell>
          <table:table-cell table:style-name="0">
            <text:p text:style-name="s1_center_fi0">70</text:p>
          </table:table-cell>
        </table:table-row>
        <table:table-row>
          <table:table-cell table:style-name="0">
            <text:p text:style-name="s1_center_fi0"><text:bookmark text:name="anchor3041"/>41.</text:p>
          </table:table-cell>
          <table:table-cell table:style-name="0">
            <text:p text:style-name="s16_fi0">Машины вычислительные электронные цифровые, поставляемые в виде систем для автоматической обработки данных</text:p>
          </table:table-cell>
          <table:table-cell table:style-name="0">
            <text:p text:style-name="s1_center_fi0"><text:a xlink:type="simple" xlink:href="http://ivo.garant.ru/document/redirect/70650730/262014">26.20.14</text:a></text:p>
          </table:table-cell>
          <table:table-cell table:style-name="0">
            <text:p text:style-name="s1_center_fi0">70</text:p>
          </table:table-cell>
        </table:table-row>
        <table:table-row>
          <table:table-cell table:style-name="0">
            <text:p text:style-name="s1_center_fi0"><text:bookmark text:name="anchor3042"/>42.</text:p>
          </table:table-cell>
          <table:table-cell table:style-name="0">
            <text:p text:style-name="s16_fi0">Машины вычислительные электронные цифровые прочие, содержащие или не содержащие в одном корпусе одно или два из следующих устройств для автоматической обработки данных: запоминающие устройства, устройства ввода, устройства вывода</text:p>
          </table:table-cell>
          <table:table-cell table:style-name="0">
            <text:p text:style-name="s1_center_fi0"><text:a xlink:type="simple" xlink:href="http://ivo.garant.ru/document/redirect/70650730/262015">26.20.15</text:a></text:p>
          </table:table-cell>
          <table:table-cell table:style-name="0">
            <text:p text:style-name="s1_center_fi0">70</text:p>
          </table:table-cell>
        </table:table-row>
        <table:table-row>
          <table:table-cell table:style-name="0">
            <text:p text:style-name="s1_center_fi0"><text:bookmark text:name="anchor3043"/>43.</text:p>
          </table:table-cell>
          <table:table-cell table:style-name="0">
            <text:p text:style-name="s16_fi0">Устройства ввода или вывода, содержащие или не содержащие в одном корпусе запоминающие устройства</text:p>
          </table:table-cell>
          <table:table-cell table:style-name="0">
            <text:p text:style-name="s1_center_fi0"><text:a xlink:type="simple" xlink:href="http://ivo.garant.ru/document/redirect/70650730/262016">26.20.16</text:a></text:p>
          </table:table-cell>
          <table:table-cell table:style-name="0">
            <text:p text:style-name="s1_center_fi0">30</text:p>
          </table:table-cell>
        </table:table-row>
        <table:table-row>
          <table:table-cell table:style-name="0">
            <text:p text:style-name="s1_center_fi0"><text:bookmark text:name="anchor3044"/>44.</text:p>
          </table:table-cell>
          <table:table-cell table:style-name="0">
            <text:p text:style-name="s16_fi0">Мониторы и проекторы, преимущественно используемые в системах автоматической обработки данных</text:p>
          </table:table-cell>
          <table:table-cell table:style-name="0">
            <text:p text:style-name="s1_center_fi0"><text:a xlink:type="simple" xlink:href="http://ivo.garant.ru/document/redirect/70650730/262017">26.20.17</text:a></text:p>
          </table:table-cell>
          <table:table-cell table:style-name="0">
            <text:p text:style-name="s1_center_fi0">50</text:p>
          </table:table-cell>
        </table:table-row>
        <table:table-row>
          <table:table-cell table:style-name="0">
            <text:p text:style-name="s1_center_fi0"><text:bookmark text:name="anchor3045"/>45.</text:p>
          </table:table-cell>
          <table:table-cell table:style-name="0">
            <text:p text:style-name="s16_fi0">Устройства запоминающие и прочие устройства хранения данных</text:p>
          </table:table-cell>
          <table:table-cell table:style-name="0">
            <text:p text:style-name="s1_center_fi0"><text:a xlink:type="simple" xlink:href="http://ivo.garant.ru/document/redirect/70650730/26202">26.20.2</text:a></text:p>
          </table:table-cell>
          <table:table-cell table:style-name="0">
            <text:p text:style-name="s1_center_fi0">50</text:p>
          </table:table-cell>
        </table:table-row>
        <table:table-row>
          <table:table-cell table:style-name="0">
            <text:p text:style-name="s1_center_fi0"><text:bookmark text:name="anchor3046"/>46.</text:p>
          </table:table-cell>
          <table:table-cell table:style-name="0">
            <text:p text:style-name="s16_fi0">Устройства автоматической обработки данных прочие</text:p>
          </table:table-cell>
          <table:table-cell table:style-name="0">
            <text:p text:style-name="s1_center_fi0"><text:a xlink:type="simple" xlink:href="http://ivo.garant.ru/document/redirect/70650730/26203">26.20.3</text:a></text:p>
          </table:table-cell>
          <table:table-cell table:style-name="0">
            <text:p text:style-name="s1_center_fi0">70</text:p>
          </table:table-cell>
        </table:table-row>
        <table:table-row>
          <table:table-cell table:style-name="0">
            <text:p text:style-name="s1_center_fi0"><text:bookmark text:name="anchor3047"/>47.</text:p>
          </table:table-cell>
          <table:table-cell table:style-name="0">
            <text:p text:style-name="s16_fi0">Блоки, части и принадлежности вычислительных машин</text:p>
          </table:table-cell>
          <table:table-cell table:style-name="0">
            <text:p text:style-name="s1_center_fi0"><text:a xlink:type="simple" xlink:href="http://ivo.garant.ru/document/redirect/70650730/262940">26.20.40</text:a></text:p>
          </table:table-cell>
          <table:table-cell table:style-name="0">
            <text:p text:style-name="s1_center_fi0">55</text:p>
          </table:table-cell>
        </table:table-row>
        <table:table-row>
          <table:table-cell table:style-name="0">
            <text:p text:style-name="s1_center_fi0"><text:bookmark text:name="anchor3048"/>48.</text:p>
          </table:table-cell>
          <table:table-cell table:style-name="0">
            <text:p text:style-name="s16_fi0">Аппаратура коммуникационная передающая с приемными устройствами, за исключением товаров, предусмотренных <text:a xlink:type="simple" xlink:href="#anchor3049">позициями 49 - 54</text:a> настоящего приложения</text:p>
          </table:table-cell>
          <table:table-cell table:style-name="0">
            <text:p text:style-name="s1_center_fi0"><text:a xlink:type="simple" xlink:href="http://ivo.garant.ru/document/redirect/70650730/2630011">26.30.11</text:a></text:p>
          </table:table-cell>
          <table:table-cell table:style-name="0">
            <text:p text:style-name="s1_center_fi0">70</text:p>
          </table:table-cell>
        </table:table-row>
        <table:table-row>
          <table:table-cell table:style-name="0">
            <text:p text:style-name="s1_center_fi0"><text:bookmark text:name="anchor3049"/>49.</text:p>
          </table:table-cell>
          <table:table-cell table:style-name="0">
            <text:p text:style-name="s16_fi0">Средства связи, выполняющие функцию систем коммутации</text:p>
          </table:table-cell>
          <table:table-cell table:style-name="0">
            <text:p text:style-name="s1_center_fi0"><text:a xlink:type="simple" xlink:href="http://ivo.garant.ru/document/redirect/70650730/263011110">26.30.11.110</text:a></text:p>
          </table:table-cell>
          <table:table-cell table:style-name="0">
            <text:p text:style-name="s1_center_fi0">49</text:p>
          </table:table-cell>
        </table:table-row>
        <table:table-row>
          <table:table-cell table:style-name="0">
            <text:p text:style-name="s1_center_fi0"><text:bookmark text:name="anchor3050"/>50.</text:p>
          </table:table-cell>
          <table:table-cell table:style-name="0">
            <text:p text:style-name="s16_fi0">Средства связи, выполняющие функцию цифровых транспортных систем</text:p>
          </table:table-cell>
          <table:table-cell table:style-name="0">
            <text:p text:style-name="s1_center_fi0"><text:a xlink:type="simple" xlink:href="http://ivo.garant.ru/document/redirect/70650730/263011120">26.30.11.120</text:a></text:p>
          </table:table-cell>
          <table:table-cell table:style-name="0">
            <text:p text:style-name="s1_center_fi0">49</text:p>
          </table:table-cell>
        </table:table-row>
        <table:table-row>
          <table:table-cell table:style-name="0">
            <text:p text:style-name="s1_center_fi0"><text:bookmark text:name="anchor3051"/>51.</text:p>
          </table:table-cell>
          <table:table-cell table:style-name="0">
            <text:p text:style-name="s16_fi0">Средства связи, выполняющие функцию систем управления и мониторинга</text:p>
          </table:table-cell>
          <table:table-cell table:style-name="0">
            <text:p text:style-name="s1_center_fi0"><text:a xlink:type="simple" xlink:href="http://ivo.garant.ru/document/redirect/70650730/263011">26.30.11.130</text:a></text:p>
          </table:table-cell>
          <table:table-cell table:style-name="0">
            <text:p text:style-name="s1_center_fi0">49</text:p>
          </table:table-cell>
        </table:table-row>
        <table:table-row>
          <table:table-cell table:style-name="0">
            <text:p text:style-name="s1_center_fi0"><text:bookmark text:name="anchor3052"/>52.</text:p>
          </table:table-cell>
          <table:table-cell table:style-name="0">
            <text:p text:style-name="s16_fi0">Средства связи радиоэлектронные</text:p>
          </table:table-cell>
          <table:table-cell table:style-name="0">
            <text:p text:style-name="s1_center_fi0"><text:a xlink:type="simple" xlink:href="http://ivo.garant.ru/document/redirect/70650730/263011150">26.30.11.150</text:a></text:p>
          </table:table-cell>
          <table:table-cell table:style-name="0">
            <text:p text:style-name="s1_center_fi0">90</text:p>
          </table:table-cell>
        </table:table-row>
        <table:table-row>
          <table:table-cell table:style-name="0">
            <text:p text:style-name="s1_center_fi0"><text:bookmark text:name="anchor3053"/>53.</text:p>
          </table:table-cell>
          <table:table-cell table:style-name="0">
            <text:p text:style-name="s16_fi0">Средства связи, в том числе программное обеспечение, обеспечивающее выполнение установленных действий при проведении оперативно-розыскных мероприятий</text:p>
          </table:table-cell>
          <table:table-cell table:style-name="0">
            <text:p text:style-name="s1_center_fi0"><text:a xlink:type="simple" xlink:href="http://ivo.garant.ru/document/redirect/70650730/263011160">26.30.11.160</text:a></text:p>
          </table:table-cell>
          <table:table-cell table:style-name="0">
            <text:p text:style-name="s1_center_fi0">62</text:p>
          </table:table-cell>
        </table:table-row>
        <table:table-row>
          <table:table-cell table:style-name="0">
            <text:p text:style-name="s1_center_fi0"><text:bookmark text:name="anchor3054"/>54.</text:p>
          </table:table-cell>
          <table:table-cell table:style-name="0">
            <text:p text:style-name="s16_fi0">Аппаратура коммуникационная передающая с приемными устройствами прочая, не включенная в другие группировки</text:p>
          </table:table-cell>
          <table:table-cell table:style-name="0">
            <text:p text:style-name="s1_center_fi0"><text:a xlink:type="simple" xlink:href="http://ivo.garant.ru/document/redirect/70650730/263011190">26.30.11.190</text:a></text:p>
          </table:table-cell>
          <table:table-cell table:style-name="0">
            <text:p text:style-name="s1_center_fi0">73</text:p>
          </table:table-cell>
        </table:table-row>
        <table:table-row>
          <table:table-cell table:style-name="0">
            <text:p text:style-name="s1_center_fi0"><text:bookmark text:name="anchor3055"/>55.</text:p>
          </table:table-cell>
          <table:table-cell table:style-name="0">
            <text:p text:style-name="s16_fi0">Аппаратура коммуникационная передающая без приемных устройств</text:p>
          </table:table-cell>
          <table:table-cell table:style-name="0">
            <text:p text:style-name="s1_center_fi0"><text:a xlink:type="simple" xlink:href="http://ivo.garant.ru/document/redirect/70650730/2630120">26.30.12</text:a></text:p>
          </table:table-cell>
          <table:table-cell table:style-name="0">
            <text:p text:style-name="s1_center_fi0">90</text:p>
          </table:table-cell>
        </table:table-row>
        <table:table-row>
          <table:table-cell table:style-name="0">
            <text:p text:style-name="s1_center_fi0"><text:bookmark text:name="anchor3056"/>56.</text:p>
          </table:table-cell>
          <table:table-cell table:style-name="0">
            <text:p text:style-name="s16_fi0">Камеры телевизионные</text:p>
          </table:table-cell>
          <table:table-cell table:style-name="0">
            <text:p text:style-name="s1_center_fi0"><text:a xlink:type="simple" xlink:href="http://ivo.garant.ru/document/redirect/70650730/2630130">26.30.13</text:a></text:p>
          </table:table-cell>
          <table:table-cell table:style-name="0">
            <text:p text:style-name="s1_center_fi0">18</text:p>
          </table:table-cell>
        </table:table-row>
        <table:table-row>
          <table:table-cell table:style-name="0">
            <text:p text:style-name="s1_center_fi0"><text:bookmark text:name="anchor3057"/>57.</text:p>
          </table:table-cell>
          <table:table-cell table:style-name="0">
            <text:p text:style-name="s16_fi0">Аппараты телефонные для сотовых сетей связи или для прочих беспроводных сетей</text:p>
          </table:table-cell>
          <table:table-cell table:style-name="0">
            <text:p text:style-name="s1_center_fi0"><text:a xlink:type="simple" xlink:href="http://ivo.garant.ru/document/redirect/70650730/263022">26.30.22</text:a></text:p>
          </table:table-cell>
          <table:table-cell table:style-name="0">
            <text:p text:style-name="s1_center_fi0">5</text:p>
          </table:table-cell>
        </table:table-row>
        <table:table-row>
          <table:table-cell table:style-name="0">
            <text:p text:style-name="s1_center_fi0"><text:bookmark text:name="anchor3058"/>58.</text:p>
          </table:table-cell>
          <table:table-cell table:style-name="0">
            <text:p text:style-name="s16_fi0">Аппараты телефонные прочие, устройства и аппаратура для передачи и приема речи, изображений или других данных, включая оборудование коммуникационное для работы в проводных или беспроводных сетях связи (например, локальных и глобальных сетях)</text:p>
          </table:table-cell>
          <table:table-cell table:style-name="0">
            <text:p text:style-name="s1_center_fi0"><text:a xlink:type="simple" xlink:href="http://ivo.garant.ru/document/redirect/70650730/263023">26.30.23</text:a></text:p>
          </table:table-cell>
          <table:table-cell table:style-name="0">
            <text:p text:style-name="s1_center_fi0">60</text:p>
          </table:table-cell>
        </table:table-row>
        <table:table-row>
          <table:table-cell table:style-name="0">
            <text:p text:style-name="s1_center_fi0"><text:bookmark text:name="anchor3059"/>59.</text:p>
          </table:table-cell>
          <table:table-cell table:style-name="0">
            <text:p text:style-name="s16_fi0">Части и комплектующие коммуникационного оборудования</text:p>
          </table:table-cell>
          <table:table-cell table:style-name="0">
            <text:p text:style-name="s1_center_fi0"><text:a xlink:type="simple" xlink:href="http://ivo.garant.ru/document/redirect/70650730/26303">26.30.3</text:a></text:p>
          </table:table-cell>
          <table:table-cell table:style-name="0">
            <text:p text:style-name="s1_center_fi0">40</text:p>
          </table:table-cell>
        </table:table-row>
        <table:table-row>
          <table:table-cell table:style-name="0">
            <text:p text:style-name="s1_center_fi0"><text:bookmark text:name="anchor3060"/>60.</text:p>
          </table:table-cell>
          <table:table-cell table:style-name="0">
            <text:p text:style-name="s16_fi0">Антенны и антенные отражатели всех видов и их части; части передающей радио- и телевизионной аппаратуры и телевизионных камер</text:p>
          </table:table-cell>
          <table:table-cell table:style-name="0">
            <text:p text:style-name="s1_center_fi0"><text:a xlink:type="simple" xlink:href="http://ivo.garant.ru/document/redirect/70650730/26304">26.30.4</text:a></text:p>
          </table:table-cell>
          <table:table-cell table:style-name="0">
            <text:p text:style-name="s1_center_fi0">21</text:p>
          </table:table-cell>
        </table:table-row>
        <table:table-row>
          <table:table-cell table:style-name="0">
            <text:p text:style-name="s1_center_fi0"><text:bookmark text:name="anchor3061"/>61.</text:p>
          </table:table-cell>
          <table:table-cell table:style-name="0">
            <text:p text:style-name="s16_fi0">Устройства охранной или пожарной сигнализации и аналогичная аппаратура</text:p>
          </table:table-cell>
          <table:table-cell table:style-name="0">
            <text:p text:style-name="s1_center_fi0"><text:a xlink:type="simple" xlink:href="http://ivo.garant.ru/document/redirect/70650730/26305">26.30.5</text:a></text:p>
          </table:table-cell>
          <table:table-cell table:style-name="0">
            <text:p text:style-name="s1_center_fi0">95</text:p>
          </table:table-cell>
        </table:table-row>
        <table:table-row>
          <table:table-cell table:style-name="0">
            <text:p text:style-name="s1_center_fi0"><text:bookmark text:name="anchor3062"/>62.</text:p>
          </table:table-cell>
          <table:table-cell table:style-name="0">
            <text:p text:style-name="s16_fi0">Части устройств охранной или пожарной сигнализации и аналогичной аппаратуры</text:p>
          </table:table-cell>
          <table:table-cell table:style-name="0">
            <text:p text:style-name="s1_center_fi0"><text:a xlink:type="simple" xlink:href="http://ivo.garant.ru/document/redirect/70650730/26306">26.30.6</text:a></text:p>
          </table:table-cell>
          <table:table-cell table:style-name="0">
            <text:p text:style-name="s1_center_fi0">8</text:p>
          </table:table-cell>
        </table:table-row>
        <table:table-row>
          <table:table-cell table:style-name="0">
            <text:p text:style-name="s1_center_fi0"><text:bookmark text:name="anchor3063"/>63.</text:p>
          </table:table-cell>
          <table:table-cell table:style-name="0">
            <text:p text:style-name="s16_fi0">Техника бытовая электронная, за исключением товаров, предусмотренных <text:a xlink:type="simple" xlink:href="#anchor3064">позициями 64 - 71</text:a> настоящего приложения</text:p>
          </table:table-cell>
          <table:table-cell table:style-name="0">
            <text:p text:style-name="s1_center_fi0"><text:a xlink:type="simple" xlink:href="http://ivo.garant.ru/document/redirect/70650730/2640">26.40</text:a></text:p>
          </table:table-cell>
          <table:table-cell table:style-name="0">
            <text:p text:style-name="s1_center_fi0">90</text:p>
          </table:table-cell>
        </table:table-row>
        <table:table-row>
          <table:table-cell table:style-name="0">
            <text:p text:style-name="s1_center_fi0"><text:bookmark text:name="anchor3064"/>64.</text:p>
          </table:table-cell>
          <table:table-cell table:style-name="0">
            <text:p text:style-name="s16_fi0">Приемники телевизионные (телевизоры) цветного изображения с жидкокристаллическим экраном, плазменной панелью</text:p>
          </table:table-cell>
          <table:table-cell table:style-name="0">
            <text:p text:style-name="s1_center_fi0"><text:a xlink:type="simple" xlink:href="http://ivo.garant.ru/document/redirect/70650730/20122">26.40.20.122</text:a></text:p>
          </table:table-cell>
          <table:table-cell table:style-name="0">
            <text:p text:style-name="s1_center_fi0">80</text:p>
          </table:table-cell>
        </table:table-row>
        <table:table-row>
          <table:table-cell table:style-name="0">
            <text:p text:style-name="s1_center_fi0"><text:bookmark text:name="anchor3065"/>65.</text:p>
          </table:table-cell>
          <table:table-cell table:style-name="0">
            <text:p text:style-name="s16_fi0">Аппаратура для воспроизведения звука прочая</text:p>
          </table:table-cell>
          <table:table-cell table:style-name="0">
            <text:p text:style-name="s1_center_fi0"><text:a xlink:type="simple" xlink:href="http://ivo.garant.ru/document/redirect/70650730/264031190">26.40.31.190</text:a></text:p>
          </table:table-cell>
          <table:table-cell table:style-name="0">
            <text:p text:style-name="s1_center_fi0">70</text:p>
          </table:table-cell>
        </table:table-row>
        <table:table-row>
          <table:table-cell table:style-name="0">
            <text:p text:style-name="s1_center_fi0"><text:bookmark text:name="anchor3066"/>66.</text:p>
          </table:table-cell>
          <table:table-cell table:style-name="0">
            <text:p text:style-name="s16_fi0">Видеокамеры</text:p>
          </table:table-cell>
          <table:table-cell table:style-name="0">
            <text:p text:style-name="s1_center_fi0"><text:a xlink:type="simple" xlink:href="http://ivo.garant.ru/document/redirect/70650730/264033110">26.40.33.110</text:a></text:p>
          </table:table-cell>
          <table:table-cell table:style-name="0">
            <text:p text:style-name="s1_center_fi0">70</text:p>
          </table:table-cell>
        </table:table-row>
        <table:table-row>
          <table:table-cell table:style-name="0">
            <text:p text:style-name="s1_center_fi0"><text:bookmark text:name="anchor3067"/>67.</text:p>
          </table:table-cell>
          <table:table-cell table:style-name="0">
            <text:p text:style-name="s16_fi0">Аппаратура записи и воспроизведения изображения прочая</text:p>
          </table:table-cell>
          <table:table-cell table:style-name="0">
            <text:p text:style-name="s1_center_fi0"><text:a xlink:type="simple" xlink:href="http://ivo.garant.ru/document/redirect/70650730/264033190">26.40.33.190</text:a></text:p>
          </table:table-cell>
          <table:table-cell table:style-name="0">
            <text:p text:style-name="s1_center_fi0">70</text:p>
          </table:table-cell>
        </table:table-row>
        <table:table-row>
          <table:table-cell table:style-name="0">
            <text:p text:style-name="s1_center_fi0"><text:bookmark text:name="anchor3068"/>68.</text:p>
          </table:table-cell>
          <table:table-cell table:style-name="0">
            <text:p text:style-name="s16_fi0">Микрофоны и подставки для них</text:p>
          </table:table-cell>
          <table:table-cell table:style-name="0">
            <text:p text:style-name="s1_center_fi0"><text:a xlink:type="simple" xlink:href="http://ivo.garant.ru/document/redirect/70650730/2640410">26.40.41.000</text:a></text:p>
          </table:table-cell>
          <table:table-cell table:style-name="0">
            <text:p text:style-name="s1_center_fi0">70</text:p>
          </table:table-cell>
        </table:table-row>
        <table:table-row>
          <table:table-cell table:style-name="0">
            <text:p text:style-name="s1_center_fi0"><text:bookmark text:name="anchor3069"/>69.</text:p>
          </table:table-cell>
          <table:table-cell table:style-name="0">
            <text:p text:style-name="s16_fi0">Громкоговорители</text:p>
          </table:table-cell>
          <table:table-cell table:style-name="0">
            <text:p text:style-name="s1_center_fi0"><text:a xlink:type="simple" xlink:href="http://ivo.garant.ru/document/redirect/70650730/264042110">26.40.42.110</text:a></text:p>
          </table:table-cell>
          <table:table-cell table:style-name="0">
            <text:p text:style-name="s1_center_fi0">70</text:p>
          </table:table-cell>
        </table:table-row>
        <table:table-row>
          <table:table-cell table:style-name="0">
            <text:p text:style-name="s1_center_fi0"><text:bookmark text:name="anchor3070"/>70.</text:p>
          </table:table-cell>
          <table:table-cell table:style-name="0">
            <text:p text:style-name="s16_fi0">Усилители электрические звуковых частот; установки электрических усилителей звука</text:p>
          </table:table-cell>
          <table:table-cell table:style-name="0">
            <text:p text:style-name="s1_center_fi0"><text:a xlink:type="simple" xlink:href="http://ivo.garant.ru/document/redirect/70650730/264043">26.40.43</text:a></text:p>
          </table:table-cell>
          <table:table-cell table:style-name="0">
            <text:p text:style-name="s1_center_fi0">70</text:p>
          </table:table-cell>
        </table:table-row>
        <table:table-row>
          <table:table-cell table:style-name="0">
            <text:p text:style-name="s1_center_fi0"><text:bookmark text:name="anchor3071"/>71.</text:p>
          </table:table-cell>
          <table:table-cell table:style-name="0">
            <text:p text:style-name="s16_fi0">Части и принадлежности звукового и видеооборудования</text:p>
          </table:table-cell>
          <table:table-cell table:style-name="0">
            <text:p text:style-name="s1_center_fi0"><text:a xlink:type="simple" xlink:href="http://ivo.garant.ru/document/redirect/70650730/2640510">26.40.51.000</text:a></text:p>
          </table:table-cell>
          <table:table-cell table:style-name="0">
            <text:p text:style-name="s1_center_fi0">70</text:p>
          </table:table-cell>
        </table:table-row>
        <table:table-row>
          <table:table-cell table:style-name="0">
            <text:p text:style-name="s1_center_fi0"><text:bookmark text:name="anchor3072"/>72.</text:p>
          </table:table-cell>
          <table:table-cell table:style-name="0">
            <text:p text:style-name="s16_fi0">Аппаратура радиолокационная, радионавигационная и радиоаппаратура дистанционного управления</text:p>
          </table:table-cell>
          <table:table-cell table:style-name="0">
            <text:p text:style-name="s1_center_fi0"><text:a xlink:type="simple" xlink:href="http://ivo.garant.ru/document/redirect/70650730/26512">26.51.2</text:a></text:p>
          </table:table-cell>
          <table:table-cell table:style-name="0">
            <text:p text:style-name="s1_center_fi0">90</text:p>
          </table:table-cell>
        </table:table-row>
        <table:table-row>
          <table:table-cell table:style-name="0">
            <text:p text:style-name="s1_center_fi0"><text:bookmark text:name="anchor3073"/>73.</text:p>
          </table:table-cell>
          <table:table-cell table:style-name="0">
            <text:p text:style-name="s16_fi0">Приборы для измерения электрических величин или ионизирующих излучений</text:p>
          </table:table-cell>
          <table:table-cell table:style-name="0">
            <text:p text:style-name="s1_center_fi0"><text:a xlink:type="simple" xlink:href="http://ivo.garant.ru/document/redirect/70650730/26514">26.51.4</text:a></text:p>
          </table:table-cell>
          <table:table-cell table:style-name="0">
            <text:p text:style-name="s1_center_fi0">90</text:p>
          </table:table-cell>
        </table:table-row>
        <table:table-row>
          <table:table-cell table:style-name="0">
            <text:p text:style-name="s1_center_fi0"><text:bookmark text:name="anchor3074"/>74.</text:p>
          </table:table-cell>
          <table:table-cell table:style-name="0">
            <text:p text:style-name="s16_fi0">Приборы для контроля прочих физических величин</text:p>
          </table:table-cell>
          <table:table-cell table:style-name="0">
            <text:p text:style-name="s1_center_fi0"><text:a xlink:type="simple" xlink:href="http://ivo.garant.ru/document/redirect/70650730/26515">26.51.5</text:a></text:p>
          </table:table-cell>
          <table:table-cell table:style-name="0">
            <text:p text:style-name="s1_center_fi0">90</text:p>
          </table:table-cell>
        </table:table-row>
        <table:table-row>
          <table:table-cell table:style-name="0">
            <text:p text:style-name="s1_center_fi0"><text:bookmark text:name="anchor3075"/>75.</text:p>
          </table:table-cell>
          <table:table-cell table:style-name="0">
            <text:p text:style-name="s16_fi0">Инструменты и приборы прочие для измерения, контроля и испытаний, за исключением товаров, предусмотренных <text:a xlink:type="simple" xlink:href="#anchor3076">позицией 76</text:a> настоящего приложения</text:p>
          </table:table-cell>
          <table:table-cell table:style-name="0">
            <text:p text:style-name="s1_center_fi0"><text:a xlink:type="simple" xlink:href="http://ivo.garant.ru/document/redirect/70650730/26516">26.51.6</text:a></text:p>
          </table:table-cell>
          <table:table-cell table:style-name="0">
            <text:p text:style-name="s1_center_fi0">90</text:p>
          </table:table-cell>
        </table:table-row>
        <table:table-row>
          <table:table-cell table:style-name="0">
            <text:p text:style-name="s1_center_fi0"><text:bookmark text:name="anchor3076"/>76.</text:p>
          </table:table-cell>
          <table:table-cell table:style-name="0">
            <text:p text:style-name="s16_fi0">Счетчики производства или потребления электроэнергии</text:p>
          </table:table-cell>
          <table:table-cell table:style-name="0">
            <text:p text:style-name="s1_center_fi0"><text:a xlink:type="simple" xlink:href="http://ivo.garant.ru/document/redirect/70650730/26516313">26.51.63.130</text:a></text:p>
          </table:table-cell>
          <table:table-cell table:style-name="0">
            <text:p text:style-name="s1_center_fi0">95</text:p>
          </table:table-cell>
        </table:table-row>
        <table:table-row>
          <table:table-cell table:style-name="0">
            <text:p text:style-name="s1_center_fi0"><text:bookmark text:name="anchor3077"/>77.</text:p>
          </table:table-cell>
          <table:table-cell table:style-name="0">
            <text:p text:style-name="s16_fi0">Приборы автоматические регулирующие и контрольно-измерительные прочие</text:p>
          </table:table-cell>
          <table:table-cell table:style-name="0">
            <text:p text:style-name="s1_center_fi0"><text:a xlink:type="simple" xlink:href="http://ivo.garant.ru/document/redirect/70650730/70190">26.51.70.190</text:a></text:p>
          </table:table-cell>
          <table:table-cell table:style-name="0">
            <text:p text:style-name="s1_center_fi0">70</text:p>
          </table:table-cell>
        </table:table-row>
        <table:table-row>
          <table:table-cell table:style-name="0">
            <text:p text:style-name="s1_center_fi0"><text:bookmark text:name="anchor3078"/>78.</text:p>
          </table:table-cell>
          <table:table-cell table:style-name="0">
            <text:p text:style-name="s16_fi0">Оборудование для облучения, электрическое диагностическое и терапевтическое, применяемые в медицинских целях, за исключением товаров, предусмотренных <text:a xlink:type="simple" xlink:href="#anchor3079">позициями 79 - 87</text:a> настоящего приложения</text:p>
          </table:table-cell>
          <table:table-cell table:style-name="0">
            <text:p text:style-name="s1_center_fi0"><text:a xlink:type="simple" xlink:href="http://ivo.garant.ru/document/redirect/70650730/2660">26.60</text:a></text:p>
          </table:table-cell>
          <table:table-cell table:style-name="0">
            <text:p text:style-name="s1_center_fi0">10</text:p>
          </table:table-cell>
        </table:table-row>
        <table:table-row>
          <table:table-cell table:style-name="0">
            <text:p text:style-name="s1_center_fi0"><text:bookmark text:name="anchor3079"/>79.</text:p>
          </table:table-cell>
          <table:table-cell table:style-name="0">
            <text:p text:style-name="s16_fi0">Томографы компьютерные</text:p>
          </table:table-cell>
          <table:table-cell table:style-name="0">
            <text:p text:style-name="s1_center_fi0"><text:a xlink:type="simple" xlink:href="http://ivo.garant.ru/document/redirect/70650730/951110073">26.60.11.111</text:a></text:p>
          </table:table-cell>
          <table:table-cell table:style-name="0">
            <text:p text:style-name="s1_center_fi0">30</text:p>
          </table:table-cell>
        </table:table-row>
        <table:table-row>
          <table:table-cell table:style-name="0">
            <text:p text:style-name="s1_center_fi0"><text:bookmark text:name="anchor3080"/>80.</text:p>
          </table:table-cell>
          <table:table-cell table:style-name="0">
            <text:p text:style-name="s16_fi0">Аппараты рентгеноскопические (флуороскопические)</text:p>
          </table:table-cell>
          <table:table-cell table:style-name="0">
            <text:p text:style-name="s1_center_fi0"><text:a xlink:type="simple" xlink:href="http://ivo.garant.ru/document/redirect/70650730/951110074">26.60.11.112</text:a></text:p>
          </table:table-cell>
          <table:table-cell table:style-name="0">
            <text:p text:style-name="s1_center_fi0">75</text:p>
          </table:table-cell>
        </table:table-row>
        <table:table-row>
          <table:table-cell table:style-name="0">
            <text:p text:style-name="s1_center_fi0"><text:bookmark text:name="anchor3081"/>81.</text:p>
          </table:table-cell>
          <table:table-cell table:style-name="0">
            <text:p text:style-name="s16_fi0">Аппараты рентгенографические</text:p>
          </table:table-cell>
          <table:table-cell table:style-name="0">
            <text:p text:style-name="s1_center_fi0"><text:a xlink:type="simple" xlink:href="http://ivo.garant.ru/document/redirect/70650730/951110075">26.60.11.113</text:a></text:p>
          </table:table-cell>
          <table:table-cell table:style-name="0">
            <text:p text:style-name="s1_center_fi0">75</text:p>
          </table:table-cell>
        </table:table-row>
        <table:table-row>
          <table:table-cell table:style-name="0">
            <text:p text:style-name="s1_center_fi0"><text:bookmark text:name="anchor3082"/>82.</text:p>
          </table:table-cell>
          <table:table-cell table:style-name="0">
            <text:p text:style-name="s16_fi0">Аппараты, основанные на использовании альфа-, бета- или гамма-излучений, применяемые в медицинских целях, включая хирургию, стоматологию, ветеринарию, прочие</text:p>
          </table:table-cell>
          <table:table-cell table:style-name="0">
            <text:p text:style-name="s1_center_fi0"><text:a xlink:type="simple" xlink:href="http://ivo.garant.ru/document/redirect/70650730/266011129">26.60.11.129</text:a></text:p>
          </table:table-cell>
          <table:table-cell table:style-name="0">
            <text:p text:style-name="s1_center_fi0">45</text:p>
          </table:table-cell>
        </table:table-row>
        <table:table-row>
          <table:table-cell table:style-name="0">
            <text:p text:style-name="s1_center_fi0"><text:bookmark text:name="anchor3083"/>83.</text:p>
          </table:table-cell>
          <table:table-cell table:style-name="0">
            <text:p text:style-name="s16_fi0">Электрокардиографы</text:p>
          </table:table-cell>
          <table:table-cell table:style-name="0">
            <text:p text:style-name="s1_center_fi0"><text:a xlink:type="simple" xlink:href="http://ivo.garant.ru/document/redirect/70650730/951110076">26.60.12.111</text:a></text:p>
          </table:table-cell>
          <table:table-cell table:style-name="0">
            <text:p text:style-name="s1_center_fi0">60</text:p>
          </table:table-cell>
        </table:table-row>
        <table:table-row>
          <table:table-cell table:style-name="0">
            <text:p text:style-name="s1_center_fi0"><text:bookmark text:name="anchor3084"/>84.</text:p>
          </table:table-cell>
          <table:table-cell table:style-name="0">
            <text:p text:style-name="s16_fi0">Аппараты электродиагностические прочие</text:p>
          </table:table-cell>
          <table:table-cell table:style-name="0">
            <text:p text:style-name="s1_center_fi0"><text:a xlink:type="simple" xlink:href="http://ivo.garant.ru/document/redirect/70650730/266012119">26.60.12.119</text:a></text:p>
          </table:table-cell>
          <table:table-cell table:style-name="0">
            <text:p text:style-name="s1_center_fi0">50</text:p>
          </table:table-cell>
        </table:table-row>
        <table:table-row>
          <table:table-cell table:style-name="0">
            <text:p text:style-name="s1_center_fi0"><text:bookmark text:name="anchor3085"/>85.</text:p>
          </table:table-cell>
          <table:table-cell table:style-name="0">
            <text:p text:style-name="s16_fi0">Приборы и аппараты для функциональной диагностики прочие, применяемые в медицинских целях, не включенные в другие группировки</text:p>
          </table:table-cell>
          <table:table-cell table:style-name="0">
            <text:p text:style-name="s1_center_fi0"><text:a xlink:type="simple" xlink:href="http://ivo.garant.ru/document/redirect/70650730/266012129">26.60.12.129</text:a></text:p>
          </table:table-cell>
          <table:table-cell table:style-name="0">
            <text:p text:style-name="s1_center_fi0">50</text:p>
          </table:table-cell>
        </table:table-row>
        <table:table-row>
          <table:table-cell table:style-name="0">
            <text:p text:style-name="s1_center_fi0"><text:bookmark text:name="anchor3086"/>86.</text:p>
          </table:table-cell>
          <table:table-cell table:style-name="0">
            <text:p text:style-name="s16_fi0">Аппараты ультразвукового сканирования</text:p>
          </table:table-cell>
          <table:table-cell table:style-name="0">
            <text:p text:style-name="s1_center_fi0"><text:a xlink:type="simple" xlink:href="http://ivo.garant.ru/document/redirect/70650730/26612132">26.60.12.132</text:a></text:p>
          </table:table-cell>
          <table:table-cell table:style-name="0">
            <text:p text:style-name="s1_center_fi0">80</text:p>
          </table:table-cell>
        </table:table-row>
        <table:table-row>
          <table:table-cell table:style-name="0">
            <text:p text:style-name="s1_center_fi0"><text:bookmark text:name="anchor3087"/>87.</text:p>
          </table:table-cell>
          <table:table-cell table:style-name="0">
            <text:p text:style-name="s16_fi0">Оборудование для электротерапии прочее, не включенное в другие группировки</text:p>
          </table:table-cell>
          <table:table-cell table:style-name="0">
            <text:p text:style-name="s1_center_fi0"><text:a xlink:type="simple" xlink:href="http://ivo.garant.ru/document/redirect/70650730/26613190">26.60.13.190</text:a></text:p>
          </table:table-cell>
          <table:table-cell table:style-name="0">
            <text:p text:style-name="s1_center_fi0">70</text:p>
          </table:table-cell>
        </table:table-row>
        <table:table-row>
          <table:table-cell table:style-name="0">
            <text:p text:style-name="s1_center_fi0"><text:bookmark text:name="anchor3088"/>88.</text:p>
          </table:table-cell>
          <table:table-cell table:style-name="0">
            <text:p text:style-name="s16_fi0">Приборы оптические и фотографическое оборудование</text:p>
          </table:table-cell>
          <table:table-cell table:style-name="0">
            <text:p text:style-name="s1_center_fi0"><text:a xlink:type="simple" xlink:href="http://ivo.garant.ru/document/redirect/70650730/2670">26.70</text:a></text:p>
          </table:table-cell>
          <table:table-cell table:style-name="0">
            <text:p text:style-name="s1_center_fi0">70</text:p>
          </table:table-cell>
        </table:table-row>
        <table:table-row>
          <table:table-cell table:style-name="0">
            <text:p text:style-name="s1_center_fi0"><text:bookmark text:name="anchor3089"/>89.</text:p>
          </table:table-cell>
          <table:table-cell table:style-name="0">
            <text:p text:style-name="s16_fi0">Носители данных магнитные и оптические</text:p>
          </table:table-cell>
          <table:table-cell table:style-name="0">
            <text:p text:style-name="s1_center_fi0"><text:a xlink:type="simple" xlink:href="http://ivo.garant.ru/document/redirect/70650730/2680">26.80</text:a></text:p>
          </table:table-cell>
          <table:table-cell table:style-name="0">
            <text:p text:style-name="s1_center_fi0">45</text:p>
          </table:table-cell>
        </table:table-row>
        <table:table-row>
          <table:table-cell table:style-name="0">
            <text:p text:style-name="s1_center_fi0"><text:bookmark text:name="anchor3090"/>90.</text:p>
          </table:table-cell>
          <table:table-cell table:style-name="0">
            <text:p text:style-name="s16_fi0">Трансформаторы электрические</text:p>
          </table:table-cell>
          <table:table-cell table:style-name="0">
            <text:p text:style-name="s1_center_fi0"><text:a xlink:type="simple" xlink:href="http://ivo.garant.ru/document/redirect/70650730/27114">27.11.4</text:a></text:p>
          </table:table-cell>
          <table:table-cell table:style-name="0">
            <text:p text:style-name="s1_center_fi0">80</text:p>
          </table:table-cell>
        </table:table-row>
        <table:table-row>
          <table:table-cell table:style-name="0">
            <text:p text:style-name="s1_center_fi0"><text:bookmark text:name="anchor3091"/>91.</text:p>
          </table:table-cell>
          <table:table-cell table:style-name="0">
            <text:p text:style-name="s16_fi0">Электродвигатели мощностью не более 37,5 Вт; электродвигатели постоянного тока прочие; генераторы постоянного тока</text:p>
          </table:table-cell>
          <table:table-cell table:style-name="0">
            <text:p text:style-name="s1_center_fi0"><text:a xlink:type="simple" xlink:href="http://ivo.garant.ru/document/redirect/70650730/27111">27.11.1</text:a></text:p>
          </table:table-cell>
          <table:table-cell table:style-name="0">
            <text:p text:style-name="s1_center_fi0">70</text:p>
          </table:table-cell>
        </table:table-row>
        <table:table-row>
          <table:table-cell table:style-name="0">
            <text:p text:style-name="s1_center_fi0"><text:bookmark text:name="anchor3092"/>92.</text:p>
          </table:table-cell>
          <table:table-cell table:style-name="0">
            <text:p text:style-name="s16_fi0">Электродвигатели переменного и постоянного тока универсальные мощностью более 37,5 Вт; электродвигатели переменного тока прочие; генераторы (синхронные генераторы) переменного тока</text:p>
          </table:table-cell>
          <table:table-cell table:style-name="0">
            <text:p text:style-name="s1_center_fi0"><text:a xlink:type="simple" xlink:href="http://ivo.garant.ru/document/redirect/70650730/27112">27.11.2</text:a></text:p>
          </table:table-cell>
          <table:table-cell table:style-name="0">
            <text:p text:style-name="s1_center_fi0">70</text:p>
          </table:table-cell>
        </table:table-row>
        <table:table-row>
          <table:table-cell table:style-name="0">
            <text:p text:style-name="s1_center_fi0"><text:bookmark text:name="anchor3093"/>93.</text:p>
          </table:table-cell>
          <table:table-cell table:style-name="0">
            <text:p text:style-name="s16_fi0">Установки генераторные электрические и вращающиеся преобразователи</text:p>
          </table:table-cell>
          <table:table-cell table:style-name="0">
            <text:p text:style-name="s1_center_fi0"><text:a xlink:type="simple" xlink:href="http://ivo.garant.ru/document/redirect/70650730/27113">27.11.3</text:a></text:p>
          </table:table-cell>
          <table:table-cell table:style-name="0">
            <text:p text:style-name="s1_center_fi0">70</text:p>
          </table:table-cell>
        </table:table-row>
        <table:table-row>
          <table:table-cell table:style-name="0">
            <text:p text:style-name="s1_center_fi0"><text:bookmark text:name="anchor3094"/>94.</text:p>
          </table:table-cell>
          <table:table-cell table:style-name="0">
            <text:p text:style-name="s16_fi0">Устройства для коммутации или защиты электрических цепей на напряжение более 1 кВ</text:p>
          </table:table-cell>
          <table:table-cell table:style-name="0">
            <text:p text:style-name="s1_center_fi0"><text:a xlink:type="simple" xlink:href="http://ivo.garant.ru/document/redirect/70650730/27121">27.12.1</text:a></text:p>
          </table:table-cell>
          <table:table-cell table:style-name="0">
            <text:p text:style-name="s1_center_fi0">70</text:p>
          </table:table-cell>
        </table:table-row>
        <table:table-row>
          <table:table-cell table:style-name="0">
            <text:p text:style-name="s1_center_fi0"><text:bookmark text:name="anchor3095"/>95.</text:p>
          </table:table-cell>
          <table:table-cell table:style-name="0">
            <text:p text:style-name="s16_fi0">Устройства коммутации или защиты электрических цепей на напряжение не более 1 кВ</text:p>
          </table:table-cell>
          <table:table-cell table:style-name="0">
            <text:p text:style-name="s1_center_fi0"><text:a xlink:type="simple" xlink:href="http://ivo.garant.ru/document/redirect/70650730/951110052">27.12.2</text:a></text:p>
          </table:table-cell>
          <table:table-cell table:style-name="0">
            <text:p text:style-name="s1_center_fi0">80</text:p>
          </table:table-cell>
        </table:table-row>
        <table:table-row>
          <table:table-cell table:style-name="0">
            <text:p text:style-name="s1_center_fi0"><text:bookmark text:name="anchor3096"/>96.</text:p>
          </table:table-cell>
          <table:table-cell table:style-name="0">
            <text:p text:style-name="s16_fi0">Панели и прочие комплекты электрической аппаратуры коммутации или защиты на напряжение не более 1 кВ</text:p>
          </table:table-cell>
          <table:table-cell table:style-name="0">
            <text:p text:style-name="s1_center_fi0"><text:a xlink:type="simple" xlink:href="http://ivo.garant.ru/document/redirect/70650730/271231">27.12.31</text:a></text:p>
          </table:table-cell>
          <table:table-cell table:style-name="0">
            <text:p text:style-name="s1_center_fi0">80</text:p>
          </table:table-cell>
        </table:table-row>
        <table:table-row>
          <table:table-cell table:style-name="0">
            <text:p text:style-name="s1_center_fi0"><text:bookmark text:name="anchor3097"/>97.</text:p>
          </table:table-cell>
          <table:table-cell table:style-name="0">
            <text:p text:style-name="s16_fi0">Панели и прочие комплекты электрической аппаратуры коммутации или защиты на напряжение более 1 кВ</text:p>
          </table:table-cell>
          <table:table-cell table:style-name="0">
            <text:p text:style-name="s1_center_fi0"><text:a xlink:type="simple" xlink:href="http://ivo.garant.ru/document/redirect/70650730/271232">27.12.32</text:a></text:p>
          </table:table-cell>
          <table:table-cell table:style-name="0">
            <text:p text:style-name="s1_center_fi0">80</text:p>
          </table:table-cell>
        </table:table-row>
        <table:table-row>
          <table:table-cell table:style-name="0">
            <text:p text:style-name="s1_center_fi0"><text:bookmark text:name="anchor3098"/>98.</text:p>
          </table:table-cell>
          <table:table-cell table:style-name="0">
            <text:p text:style-name="s16_fi0">Аккумуляторы свинцовые для запуска поршневых двигателей</text:p>
          </table:table-cell>
          <table:table-cell table:style-name="0">
            <text:p text:style-name="s1_center_fi0"><text:a xlink:type="simple" xlink:href="http://ivo.garant.ru/document/redirect/70650730/272021000">27.20.21.000</text:a></text:p>
          </table:table-cell>
          <table:table-cell table:style-name="0">
            <text:p text:style-name="s1_center_fi0">90</text:p>
          </table:table-cell>
        </table:table-row>
        <table:table-row>
          <table:table-cell table:style-name="0">
            <text:p text:style-name="s1_center_fi0"><text:bookmark text:name="anchor3099"/>99.</text:p>
          </table:table-cell>
          <table:table-cell table:style-name="0">
            <text:p text:style-name="s16_fi0">Аккумуляторы свинцовые, кроме используемых для запуска поршневых двигателей</text:p>
          </table:table-cell>
          <table:table-cell table:style-name="0">
            <text:p text:style-name="s1_center_fi0"><text:a xlink:type="simple" xlink:href="http://ivo.garant.ru/document/redirect/70650730/27202200">27.20.22.000</text:a></text:p>
          </table:table-cell>
          <table:table-cell table:style-name="0">
            <text:p text:style-name="s1_center_fi0">60</text:p>
          </table:table-cell>
        </table:table-row>
        <table:table-row>
          <table:table-cell table:style-name="0">
            <text:p text:style-name="s1_center_fi0"><text:bookmark text:name="anchor3100"/>100.</text:p>
          </table:table-cell>
          <table:table-cell table:style-name="0">
            <text:p text:style-name="s16_fi0">Батареи аккумуляторные литий-ионные</text:p>
          </table:table-cell>
          <table:table-cell table:style-name="0">
            <text:p text:style-name="s1_center_fi0"><text:a xlink:type="simple" xlink:href="http://ivo.garant.ru/document/redirect/70650730/272023130">27.20.23.130</text:a></text:p>
          </table:table-cell>
          <table:table-cell table:style-name="0">
            <text:p text:style-name="s1_center_fi0">60</text:p>
          </table:table-cell>
        </table:table-row>
        <table:table-row>
          <table:table-cell table:style-name="0">
            <text:p text:style-name="s1_center_fi0"><text:bookmark text:name="anchor3101"/>101.</text:p>
          </table:table-cell>
          <table:table-cell table:style-name="0">
            <text:p text:style-name="s16_fi0">Кабели волоконно-оптические, состоящие из волокон с индивидуальными оболочками</text:p>
          </table:table-cell>
          <table:table-cell table:style-name="0">
            <text:p text:style-name="s1_center_fi0"><text:a xlink:type="simple" xlink:href="http://ivo.garant.ru/document/redirect/70650730/273111">27.31.11</text:a></text:p>
          </table:table-cell>
          <table:table-cell table:style-name="0">
            <text:p text:style-name="s1_center_fi0">90</text:p>
          </table:table-cell>
        </table:table-row>
        <table:table-row>
          <table:table-cell table:style-name="0">
            <text:p text:style-name="s1_center_fi0"><text:bookmark text:name="anchor3102"/>102.</text:p>
          </table:table-cell>
          <table:table-cell table:style-name="0">
            <text:p text:style-name="s16_fi0">Кабели волоконно-оптические, кроме составленных из волокон с индивидуальными оболочками</text:p>
          </table:table-cell>
          <table:table-cell table:style-name="0">
            <text:p text:style-name="s1_center_fi0"><text:a xlink:type="simple" xlink:href="http://ivo.garant.ru/document/redirect/70650730/273112120">27.31.12.120</text:a></text:p>
          </table:table-cell>
          <table:table-cell table:style-name="0">
            <text:p text:style-name="s1_center_fi0">90</text:p>
          </table:table-cell>
        </table:table-row>
        <table:table-row>
          <table:table-cell table:style-name="0">
            <text:p text:style-name="s1_center_fi0"><text:bookmark text:name="anchor3103"/>103.</text:p>
          </table:table-cell>
          <table:table-cell table:style-name="0">
            <text:p text:style-name="s16_fi0">Провода и кабели электронные и электрические прочие</text:p>
          </table:table-cell>
          <table:table-cell table:style-name="0">
            <text:p text:style-name="s1_center_fi0"><text:a xlink:type="simple" xlink:href="http://ivo.garant.ru/document/redirect/70650730/27320">27.32</text:a></text:p>
          </table:table-cell>
          <table:table-cell table:style-name="0">
            <text:p text:style-name="s1_center_fi0">80</text:p>
          </table:table-cell>
        </table:table-row>
        <table:table-row>
          <table:table-cell table:style-name="0">
            <text:p text:style-name="s1_center_fi0"><text:bookmark text:name="anchor3104"/>104.</text:p>
          </table:table-cell>
          <table:table-cell table:style-name="0">
            <text:p text:style-name="s16_fi0">Оборудование электрическое осветительное, за исключением товаров, предусмотренных <text:a xlink:type="simple" xlink:href="#anchor3105">позицией 105</text:a> настоящего приложения</text:p>
          </table:table-cell>
          <table:table-cell table:style-name="0">
            <text:p text:style-name="s1_center_fi0"><text:a xlink:type="simple" xlink:href="http://ivo.garant.ru/document/redirect/70650730/2740">27.40</text:a></text:p>
          </table:table-cell>
          <table:table-cell table:style-name="0">
            <text:p text:style-name="s1_center_fi0">90</text:p>
          </table:table-cell>
        </table:table-row>
        <table:table-row>
          <table:table-cell table:style-name="0">
            <text:p text:style-name="s1_center_fi0"><text:bookmark text:name="anchor3105"/>105.</text:p>
          </table:table-cell>
          <table:table-cell table:style-name="0">
            <text:p text:style-name="s16_fi0">Светильники и устройства осветительные прочие, не включенные в другие группировки</text:p>
          </table:table-cell>
          <table:table-cell table:style-name="0">
            <text:p text:style-name="s1_center_fi0"><text:a xlink:type="simple" xlink:href="http://ivo.garant.ru/document/redirect/70650730/27439">27.40.39</text:a></text:p>
          </table:table-cell>
          <table:table-cell table:style-name="0">
            <text:p text:style-name="s1_center_fi0">90</text:p>
          </table:table-cell>
        </table:table-row>
        <table:table-row>
          <table:table-cell table:style-name="0">
            <text:p text:style-name="s1_center_fi0"><text:bookmark text:name="anchor3106"/>106.</text:p>
          </table:table-cell>
          <table:table-cell table:style-name="0">
            <text:p text:style-name="s16_fi0">Машины стиральные бытовые и машины для сушки одежды</text:p>
          </table:table-cell>
          <table:table-cell table:style-name="0">
            <text:p text:style-name="s1_center_fi0"><text:a xlink:type="simple" xlink:href="http://ivo.garant.ru/document/redirect/70650730/275113">27.51.13</text:a></text:p>
          </table:table-cell>
          <table:table-cell table:style-name="0">
            <text:p text:style-name="s1_center_fi0">90</text:p>
          </table:table-cell>
        </table:table-row>
        <table:table-row>
          <table:table-cell table:style-name="0">
            <text:p text:style-name="s1_center_fi0"><text:bookmark text:name="anchor3107"/>107.</text:p>
          </table:table-cell>
          <table:table-cell table:style-name="0">
            <text:p text:style-name="s16_fi0">Печи прочие; варочные котлы, кухонные плиты, варочные панели; грили, жаровни</text:p>
          </table:table-cell>
          <table:table-cell table:style-name="0">
            <text:p text:style-name="s1_center_fi0"><text:a xlink:type="simple" xlink:href="http://ivo.garant.ru/document/redirect/70650730/275128">27.51.28</text:a></text:p>
          </table:table-cell>
          <table:table-cell table:style-name="0">
            <text:p text:style-name="s1_center_fi0">90</text:p>
          </table:table-cell>
        </table:table-row>
        <table:table-row>
          <table:table-cell table:style-name="0">
            <text:p text:style-name="s1_center_fi0"><text:bookmark text:name="anchor3108"/>108.</text:p>
          </table:table-cell>
          <table:table-cell table:style-name="0">
            <text:p text:style-name="s16_fi0">Оборудование электрическое прочее, за исключением товаров, предусмотренных <text:a xlink:type="simple" xlink:href="#anchor3109">позициями 109</text:a> и <text:a xlink:type="simple" xlink:href="#anchor3110">110</text:a> настоящего приложения</text:p>
          </table:table-cell>
          <table:table-cell table:style-name="0">
            <text:p text:style-name="s1_center_fi0"><text:a xlink:type="simple" xlink:href="http://ivo.garant.ru/document/redirect/70650730/2790">27.90</text:a></text:p>
          </table:table-cell>
          <table:table-cell table:style-name="0">
            <text:p text:style-name="s1_center_fi0">87</text:p>
          </table:table-cell>
        </table:table-row>
        <table:table-row>
          <table:table-cell table:style-name="0">
            <text:p text:style-name="s1_center_fi0"><text:bookmark text:name="anchor3109"/>109.</text:p>
          </table:table-cell>
          <table:table-cell table:style-name="0">
            <text:p text:style-name="s16_fi0">Машины и оборудование электрические для пайки мягким и твердым припоем и сварки</text:p>
          </table:table-cell>
          <table:table-cell table:style-name="0">
            <text:p text:style-name="s1_center_fi0"><text:a xlink:type="simple" xlink:href="http://ivo.garant.ru/document/redirect/70650730/279031110">27.90.31.110</text:a></text:p>
          </table:table-cell>
          <table:table-cell table:style-name="0">
            <text:p text:style-name="s1_center_fi0">70</text:p>
          </table:table-cell>
        </table:table-row>
        <table:table-row>
          <table:table-cell table:style-name="0">
            <text:p text:style-name="s1_center_fi0"><text:bookmark text:name="anchor3110"/>110.</text:p>
          </table:table-cell>
          <table:table-cell table:style-name="0">
            <text:p text:style-name="s16_fi0">Комплектующие (запасные части) электрических машин и оборудования для пайки мягким и твердым припоем и сварки, не имеющие самостоятельных группировок</text:p>
          </table:table-cell>
          <table:table-cell table:style-name="0">
            <text:p text:style-name="s1_center_fi0"><text:a xlink:type="simple" xlink:href="http://ivo.garant.ru/document/redirect/70650730/279032110">27.90.32.110</text:a></text:p>
          </table:table-cell>
          <table:table-cell table:style-name="0">
            <text:p text:style-name="s1_center_fi0">70</text:p>
          </table:table-cell>
        </table:table-row>
        <table:table-row>
          <table:table-cell table:style-name="0">
            <text:p text:style-name="s1_center_fi0"><text:bookmark text:name="anchor3111"/>111.</text:p>
          </table:table-cell>
          <table:table-cell table:style-name="0">
            <text:p text:style-name="s16_fi0">Дизели судовые</text:p>
          </table:table-cell>
          <table:table-cell table:style-name="0">
            <text:p text:style-name="s1_center_fi0"><text:a xlink:type="simple" xlink:href="http://ivo.garant.ru/document/redirect/70650730/5929">28.11.13.120</text:a></text:p>
          </table:table-cell>
          <table:table-cell table:style-name="0">
            <text:p text:style-name="s1_center_fi0">65</text:p>
          </table:table-cell>
        </table:table-row>
        <table:table-row>
          <table:table-cell table:style-name="0">
            <text:p text:style-name="s1_center_fi0"><text:bookmark text:name="anchor3112"/>112.</text:p>
          </table:table-cell>
          <table:table-cell table:style-name="0">
            <text:p text:style-name="s16_fi0">Насосы возвратно-поступательные объемного действия прочие для перекачки жидкостей</text:p>
          </table:table-cell>
          <table:table-cell table:style-name="0">
            <text:p text:style-name="s1_center_fi0"><text:a xlink:type="simple" xlink:href="http://ivo.garant.ru/document/redirect/70650730/281312">28.13.12</text:a></text:p>
          </table:table-cell>
          <table:table-cell table:style-name="0">
            <text:p text:style-name="s1_center_fi0">80</text:p>
          </table:table-cell>
        </table:table-row>
        <table:table-row>
          <table:table-cell table:style-name="0">
            <text:p text:style-name="s1_center_fi0"><text:bookmark text:name="anchor3113"/>113.</text:p>
          </table:table-cell>
          <table:table-cell table:style-name="0">
            <text:p text:style-name="s16_fi0">Насосы роторные объемные прочие для перекачки жидкостей</text:p>
          </table:table-cell>
          <table:table-cell table:style-name="0">
            <text:p text:style-name="s1_center_fi0"><text:a xlink:type="simple" xlink:href="http://ivo.garant.ru/document/redirect/70650730/281313">28.13.13</text:a></text:p>
          </table:table-cell>
          <table:table-cell table:style-name="0">
            <text:p text:style-name="s1_center_fi0">80</text:p>
          </table:table-cell>
        </table:table-row>
        <table:table-row>
          <table:table-cell table:style-name="0">
            <text:p text:style-name="s1_center_fi0"><text:bookmark text:name="anchor3114"/>114.</text:p>
          </table:table-cell>
          <table:table-cell table:style-name="0">
            <text:p text:style-name="s16_fi0">Насосы центробежные подачи жидкостей прочие; насосы прочие</text:p>
          </table:table-cell>
          <table:table-cell table:style-name="0">
            <text:p text:style-name="s1_center_fi0"><text:a xlink:type="simple" xlink:href="http://ivo.garant.ru/document/redirect/70650730/281314">28.13.14</text:a></text:p>
          </table:table-cell>
          <table:table-cell table:style-name="0">
            <text:p text:style-name="s1_center_fi0">80</text:p>
          </table:table-cell>
        </table:table-row>
        <table:table-row>
          <table:table-cell table:style-name="0">
            <text:p text:style-name="s1_center_fi0"><text:bookmark text:name="anchor3115"/>115.</text:p>
          </table:table-cell>
          <table:table-cell table:style-name="0">
            <text:p text:style-name="s16_fi0">Компрессоры воздушные передвижные на колесных шасси</text:p>
          </table:table-cell>
          <table:table-cell table:style-name="0">
            <text:p text:style-name="s1_center_fi0"><text:a xlink:type="simple" xlink:href="http://ivo.garant.ru/document/redirect/70650730/281324">28.13.24</text:a></text:p>
          </table:table-cell>
          <table:table-cell table:style-name="0">
            <text:p text:style-name="s1_center_fi0">90</text:p>
          </table:table-cell>
        </table:table-row>
        <table:table-row>
          <table:table-cell table:style-name="0">
            <text:p text:style-name="s1_center_fi0"><text:bookmark text:name="anchor3116"/>116.</text:p>
          </table:table-cell>
          <table:table-cell table:style-name="0">
            <text:p text:style-name="s16_fi0">Турбокомпрессоры</text:p>
          </table:table-cell>
          <table:table-cell table:style-name="0">
            <text:p text:style-name="s1_center_fi0"><text:a xlink:type="simple" xlink:href="http://ivo.garant.ru/document/redirect/70650730/281325">28.13.25</text:a></text:p>
          </table:table-cell>
          <table:table-cell table:style-name="0">
            <text:p text:style-name="s1_center_fi0">80</text:p>
          </table:table-cell>
        </table:table-row>
        <table:table-row>
          <table:table-cell table:style-name="0">
            <text:p text:style-name="s1_center_fi0"><text:bookmark text:name="anchor3117"/>117.</text:p>
          </table:table-cell>
          <table:table-cell table:style-name="0">
            <text:p text:style-name="s16_fi0">Компрессоры поршневые объемные</text:p>
          </table:table-cell>
          <table:table-cell table:style-name="0">
            <text:p text:style-name="s1_center_fi0"><text:a xlink:type="simple" xlink:href="http://ivo.garant.ru/document/redirect/70650730/281326">28.13.26</text:a></text:p>
          </table:table-cell>
          <table:table-cell table:style-name="0">
            <text:p text:style-name="s1_center_fi0">60</text:p>
          </table:table-cell>
        </table:table-row>
        <table:table-row>
          <table:table-cell table:style-name="0">
            <text:p text:style-name="s1_center_fi0"><text:bookmark text:name="anchor3118"/>118.</text:p>
          </table:table-cell>
          <table:table-cell table:style-name="0">
            <text:p text:style-name="s16_fi0">Компрессоры прочие</text:p>
          </table:table-cell>
          <table:table-cell table:style-name="0">
            <text:p text:style-name="s1_center_fi0"><text:a xlink:type="simple" xlink:href="http://ivo.garant.ru/document/redirect/70650730/281328">28.13.28</text:a></text:p>
          </table:table-cell>
          <table:table-cell table:style-name="0">
            <text:p text:style-name="s1_center_fi0">80</text:p>
          </table:table-cell>
        </table:table-row>
        <table:table-row>
          <table:table-cell table:style-name="0">
            <text:p text:style-name="s1_center_fi0"><text:bookmark text:name="anchor3119"/>119.</text:p>
          </table:table-cell>
          <table:table-cell table:style-name="0">
            <text:p text:style-name="s16_fi0">Комплектующие (запасные части) насосов, не имеющие самостоятельных группировок</text:p>
          </table:table-cell>
          <table:table-cell table:style-name="0">
            <text:p text:style-name="s1_center_fi0"><text:a xlink:type="simple" xlink:href="http://ivo.garant.ru/document/redirect/70650730/281331110">28.13.31.110</text:a></text:p>
          </table:table-cell>
          <table:table-cell table:style-name="0">
            <text:p text:style-name="s1_center_fi0">70</text:p>
          </table:table-cell>
        </table:table-row>
        <table:table-row>
          <table:table-cell table:style-name="0">
            <text:p text:style-name="s1_center_fi0"><text:bookmark text:name="anchor3120"/>120.</text:p>
          </table:table-cell>
          <table:table-cell table:style-name="0">
            <text:p text:style-name="s16_fi0">Клапаны редукционные</text:p>
          </table:table-cell>
          <table:table-cell table:style-name="0">
            <text:p text:style-name="s1_center_fi0"><text:a xlink:type="simple" xlink:href="http://ivo.garant.ru/document/redirect/70650730/28141111">28.14.11.110</text:a></text:p>
          </table:table-cell>
          <table:table-cell table:style-name="0">
            <text:p text:style-name="s1_center_fi0">70</text:p>
          </table:table-cell>
        </table:table-row>
        <table:table-row>
          <table:table-cell table:style-name="0">
            <text:p text:style-name="s1_center_fi0"><text:bookmark text:name="anchor3121"/>121.</text:p>
          </table:table-cell>
          <table:table-cell table:style-name="0">
            <text:p text:style-name="s16_fi0">Арматура регулирующая</text:p>
          </table:table-cell>
          <table:table-cell table:style-name="0">
            <text:p text:style-name="s1_center_fi0"><text:a xlink:type="simple" xlink:href="http://ivo.garant.ru/document/redirect/70650730/28141112">28.14.11.120</text:a></text:p>
          </table:table-cell>
          <table:table-cell table:style-name="0">
            <text:p text:style-name="s1_center_fi0">70</text:p>
          </table:table-cell>
        </table:table-row>
        <table:table-row>
          <table:table-cell table:style-name="0">
            <text:p text:style-name="s1_center_fi0"><text:bookmark text:name="anchor3122"/>122.</text:p>
          </table:table-cell>
          <table:table-cell table:style-name="0">
            <text:p text:style-name="s16_fi0">Арматура обратная</text:p>
          </table:table-cell>
          <table:table-cell table:style-name="0">
            <text:p text:style-name="s1_center_fi0"><text:a xlink:type="simple" xlink:href="http://ivo.garant.ru/document/redirect/70650730/28141113">28.14.11.130</text:a></text:p>
          </table:table-cell>
          <table:table-cell table:style-name="0">
            <text:p text:style-name="s1_center_fi0">95</text:p>
          </table:table-cell>
        </table:table-row>
        <table:table-row>
          <table:table-cell table:style-name="0">
            <text:p text:style-name="s1_center_fi0"><text:bookmark text:name="anchor3123"/>123.</text:p>
          </table:table-cell>
          <table:table-cell table:style-name="0">
            <text:p text:style-name="s16_fi0">Арматура предохранительная</text:p>
          </table:table-cell>
          <table:table-cell table:style-name="0">
            <text:p text:style-name="s1_center_fi0"><text:a xlink:type="simple" xlink:href="http://ivo.garant.ru/document/redirect/70650730/281411140">28.14.11.140</text:a></text:p>
          </table:table-cell>
          <table:table-cell table:style-name="0">
            <text:p text:style-name="s1_center_fi0">90</text:p>
          </table:table-cell>
        </table:table-row>
        <table:table-row>
          <table:table-cell table:style-name="0">
            <text:p text:style-name="s1_center_fi0"><text:bookmark text:name="anchor3124"/>124.</text:p>
          </table:table-cell>
          <table:table-cell table:style-name="0">
            <text:p text:style-name="s16_fi0">Арматура распределительно-смесительная</text:p>
          </table:table-cell>
          <table:table-cell table:style-name="0">
            <text:p text:style-name="s1_center_fi0"><text:a xlink:type="simple" xlink:href="http://ivo.garant.ru/document/redirect/70650730/281411160">28.14.11.160</text:a></text:p>
          </table:table-cell>
          <table:table-cell table:style-name="0">
            <text:p text:style-name="s1_center_fi0">95</text:p>
          </table:table-cell>
        </table:table-row>
        <table:table-row>
          <table:table-cell table:style-name="0">
            <text:p text:style-name="s1_center_fi0"><text:bookmark text:name="anchor3125"/>125.</text:p>
          </table:table-cell>
          <table:table-cell table:style-name="0">
            <text:p text:style-name="s16_fi0">Арматура отключающая</text:p>
          </table:table-cell>
          <table:table-cell table:style-name="0">
            <text:p text:style-name="s1_center_fi0"><text:a xlink:type="simple" xlink:href="http://ivo.garant.ru/document/redirect/70650730/281411170">28.14.11.170</text:a></text:p>
          </table:table-cell>
          <table:table-cell table:style-name="0">
            <text:p text:style-name="s1_center_fi0">85</text:p>
          </table:table-cell>
        </table:table-row>
        <table:table-row>
          <table:table-cell table:style-name="0">
            <text:p text:style-name="s1_center_fi0"><text:bookmark text:name="anchor3126"/>126.</text:p>
          </table:table-cell>
          <table:table-cell table:style-name="0">
            <text:p text:style-name="s16_fi0">Клапаны запорные</text:p>
          </table:table-cell>
          <table:table-cell table:style-name="0">
            <text:p text:style-name="s1_center_fi0"><text:a xlink:type="simple" xlink:href="http://ivo.garant.ru/document/redirect/70650730/281413110">28.14.13.110</text:a></text:p>
          </table:table-cell>
          <table:table-cell table:style-name="0">
            <text:p text:style-name="s1_center_fi0">90</text:p>
          </table:table-cell>
        </table:table-row>
        <table:table-row>
          <table:table-cell table:style-name="0">
            <text:p text:style-name="s1_center_fi0"><text:bookmark text:name="anchor3127"/>127.</text:p>
          </table:table-cell>
          <table:table-cell table:style-name="0">
            <text:p text:style-name="s16_fi0">Задвижки</text:p>
          </table:table-cell>
          <table:table-cell table:style-name="0">
            <text:p text:style-name="s1_center_fi0"><text:a xlink:type="simple" xlink:href="http://ivo.garant.ru/document/redirect/70650730/28141312">28.14.13.120</text:a></text:p>
          </table:table-cell>
          <table:table-cell table:style-name="0">
            <text:p text:style-name="s1_center_fi0">95</text:p>
          </table:table-cell>
        </table:table-row>
        <table:table-row>
          <table:table-cell table:style-name="0">
            <text:p text:style-name="s1_center_fi0"><text:bookmark text:name="anchor3128"/>128.</text:p>
          </table:table-cell>
          <table:table-cell table:style-name="0">
            <text:p text:style-name="s16_fi0">Краны (шаровые, конусные и цилиндрические)</text:p>
          </table:table-cell>
          <table:table-cell table:style-name="0">
            <text:p text:style-name="s1_center_fi0"><text:a xlink:type="simple" xlink:href="http://ivo.garant.ru/document/redirect/70650730/281413131">28.14.13.131</text:a></text:p>
          </table:table-cell>
          <table:table-cell table:style-name="0">
            <text:p text:style-name="s1_center_fi0">90</text:p>
          </table:table-cell>
        </table:table-row>
        <table:table-row>
          <table:table-cell table:style-name="0">
            <text:p text:style-name="s1_center_fi0"><text:bookmark text:name="anchor3129"/>129.</text:p>
          </table:table-cell>
          <table:table-cell table:style-name="0">
            <text:p text:style-name="s16_fi0">Затворы дисковые</text:p>
          </table:table-cell>
          <table:table-cell table:style-name="0">
            <text:p text:style-name="s1_center_fi0"><text:a xlink:type="simple" xlink:href="http://ivo.garant.ru/document/redirect/70650730/281413132">28.14.13.132</text:a></text:p>
          </table:table-cell>
          <table:table-cell table:style-name="0">
            <text:p text:style-name="s1_center_fi0">90</text:p>
          </table:table-cell>
        </table:table-row>
        <table:table-row>
          <table:table-cell table:style-name="0">
            <text:p text:style-name="s1_center_fi0"><text:bookmark text:name="anchor3130"/>130.</text:p>
          </table:table-cell>
          <table:table-cell table:style-name="0">
            <text:p text:style-name="s16_fi0">Арматура специальная для области использования атомной энергии</text:p>
          </table:table-cell>
          <table:table-cell table:style-name="0">
            <text:p text:style-name="s1_center_fi0"><text:a xlink:type="simple" xlink:href="http://ivo.garant.ru/document/redirect/70650730/281413170">28.14.13.170</text:a></text:p>
          </table:table-cell>
          <table:table-cell table:style-name="0">
            <text:p text:style-name="s1_center_fi0">95</text:p>
          </table:table-cell>
        </table:table-row>
        <table:table-row>
          <table:table-cell table:style-name="0">
            <text:p text:style-name="s1_center_fi0"><text:bookmark text:name="anchor3131"/>131.</text:p>
          </table:table-cell>
          <table:table-cell table:style-name="0">
            <text:p text:style-name="s16_fi0">Электропечи сопротивления</text:p>
          </table:table-cell>
          <table:table-cell table:style-name="0">
            <text:p text:style-name="s1_center_fi0"><text:a xlink:type="simple" xlink:href="http://ivo.garant.ru/document/redirect/70650730/282113111">28.21.13.111</text:a></text:p>
          </table:table-cell>
          <table:table-cell table:style-name="0">
            <text:p text:style-name="s1_center_fi0">90</text:p>
          </table:table-cell>
        </table:table-row>
        <table:table-row>
          <table:table-cell table:style-name="0">
            <text:p text:style-name="s1_center_fi0"><text:bookmark text:name="anchor3132"/>132.</text:p>
          </table:table-cell>
          <table:table-cell table:style-name="0">
            <text:p text:style-name="s16_fi0">Электропечи и камеры промышленные или лабораторные прочие, не включенные в другие группировки</text:p>
          </table:table-cell>
          <table:table-cell table:style-name="0">
            <text:p text:style-name="s1_center_fi0"><text:a xlink:type="simple" xlink:href="http://ivo.garant.ru/document/redirect/70650730/282113119">28.21.13.119</text:a></text:p>
          </table:table-cell>
          <table:table-cell table:style-name="0">
            <text:p text:style-name="s1_center_fi0">90</text:p>
          </table:table-cell>
        </table:table-row>
        <table:table-row>
          <table:table-cell table:style-name="0">
            <text:p text:style-name="s1_center_fi0"><text:bookmark text:name="anchor3133"/>133.</text:p>
          </table:table-cell>
          <table:table-cell table:style-name="0">
            <text:p text:style-name="s16_fi0">Тали электрические канатные</text:p>
          </table:table-cell>
          <table:table-cell table:style-name="0">
            <text:p text:style-name="s1_center_fi0"><text:a xlink:type="simple" xlink:href="http://ivo.garant.ru/document/redirect/70650730/6095">28.22.11.112</text:a></text:p>
          </table:table-cell>
          <table:table-cell table:style-name="0">
            <text:p text:style-name="s1_center_fi0">90</text:p>
          </table:table-cell>
        </table:table-row>
        <table:table-row>
          <table:table-cell table:style-name="0">
            <text:p text:style-name="s1_center_fi0"><text:bookmark text:name="anchor3134"/>134.</text:p>
          </table:table-cell>
          <table:table-cell table:style-name="0">
            <text:p text:style-name="s16_fi0">Краны мостовые электрические</text:p>
          </table:table-cell>
          <table:table-cell table:style-name="0">
            <text:p text:style-name="s1_center_fi0"><text:a xlink:type="simple" xlink:href="http://ivo.garant.ru/document/redirect/70650730/282214121">28.22.14.121</text:a></text:p>
          </table:table-cell>
          <table:table-cell table:style-name="0">
            <text:p text:style-name="s1_center_fi0">90</text:p>
          </table:table-cell>
        </table:table-row>
        <table:table-row>
          <table:table-cell table:style-name="0">
            <text:p text:style-name="s1_center_fi0"><text:bookmark text:name="anchor3135"/>135.</text:p>
          </table:table-cell>
          <table:table-cell table:style-name="0">
            <text:p text:style-name="s16_fi0">Краны козловые и полукозловые электрические</text:p>
          </table:table-cell>
          <table:table-cell table:style-name="0">
            <text:p text:style-name="s1_center_fi0"><text:a xlink:type="simple" xlink:href="http://ivo.garant.ru/document/redirect/70650730/28214122">28.22.14.122</text:a></text:p>
          </table:table-cell>
          <table:table-cell table:style-name="0">
            <text:p text:style-name="s1_center_fi0">90</text:p>
          </table:table-cell>
        </table:table-row>
        <table:table-row>
          <table:table-cell table:style-name="0">
            <text:p text:style-name="s1_center_fi0"><text:bookmark text:name="anchor3136"/>136.</text:p>
          </table:table-cell>
          <table:table-cell table:style-name="0">
            <text:p text:style-name="s16_fi0">Краны портальные</text:p>
          </table:table-cell>
          <table:table-cell table:style-name="0">
            <text:p text:style-name="s1_center_fi0"><text:a xlink:type="simple" xlink:href="http://ivo.garant.ru/document/redirect/70650730/282214140">28.22.14.140</text:a></text:p>
          </table:table-cell>
          <table:table-cell table:style-name="0">
            <text:p text:style-name="s1_center_fi0">90</text:p>
          </table:table-cell>
        </table:table-row>
        <table:table-row>
          <table:table-cell table:style-name="0">
            <text:p text:style-name="s1_center_fi0"><text:bookmark text:name="anchor3137"/>137.</text:p>
          </table:table-cell>
          <table:table-cell table:style-name="0">
            <text:p text:style-name="s16_fi0">Краны грузоподъемные стрелкового типа</text:p>
          </table:table-cell>
          <table:table-cell table:style-name="0">
            <text:p text:style-name="s1_center_fi0"><text:a xlink:type="simple" xlink:href="http://ivo.garant.ru/document/redirect/70650730/282214125">28.22.14.125</text:a></text:p>
          </table:table-cell>
          <table:table-cell table:style-name="0">
            <text:p text:style-name="s1_center_fi0">90</text:p>
          </table:table-cell>
        </table:table-row>
        <table:table-row>
          <table:table-cell table:style-name="0">
            <text:p text:style-name="s1_center_fi0"><text:bookmark text:name="anchor3138"/>138.</text:p>
          </table:table-cell>
          <table:table-cell table:style-name="0">
            <text:p text:style-name="s16_fi0">Краны башенные строительные</text:p>
          </table:table-cell>
          <table:table-cell table:style-name="0">
            <text:p text:style-name="s1_center_fi0"><text:a xlink:type="simple" xlink:href="http://ivo.garant.ru/document/redirect/70650730/2821426">28.22.14.126</text:a></text:p>
          </table:table-cell>
          <table:table-cell table:style-name="0">
            <text:p text:style-name="s1_center_fi0">90</text:p>
          </table:table-cell>
        </table:table-row>
        <table:table-row>
          <table:table-cell table:style-name="0">
            <text:p text:style-name="s1_center_fi0"><text:bookmark text:name="anchor3139"/>139.</text:p>
          </table:table-cell>
          <table:table-cell table:style-name="0">
            <text:p text:style-name="s16_fi0">Краны на гусеничном ходу</text:p>
          </table:table-cell>
          <table:table-cell table:style-name="0">
            <text:p text:style-name="s1_center_fi0"><text:a xlink:type="simple" xlink:href="http://ivo.garant.ru/document/redirect/70650730/282214151">28.22.14.151</text:a></text:p>
          </table:table-cell>
          <table:table-cell table:style-name="0">
            <text:p text:style-name="s1_center_fi0">90</text:p>
          </table:table-cell>
        </table:table-row>
        <table:table-row>
          <table:table-cell table:style-name="0">
            <text:p text:style-name="s1_center_fi0"><text:bookmark text:name="anchor3140"/>140.</text:p>
          </table:table-cell>
          <table:table-cell table:style-name="0">
            <text:p text:style-name="s16_fi0">Машины самоходные и тележки, оснащенные подъемным краном, прочие, не включенные в другие группировки</text:p>
          </table:table-cell>
          <table:table-cell table:style-name="0">
            <text:p text:style-name="s1_center_fi0"><text:a xlink:type="simple" xlink:href="http://ivo.garant.ru/document/redirect/70650730/28214159">28.22.14.159</text:a></text:p>
          </table:table-cell>
          <table:table-cell table:style-name="0">
            <text:p text:style-name="s1_center_fi0">90</text:p>
          </table:table-cell>
        </table:table-row>
        <table:table-row>
          <table:table-cell table:style-name="0">
            <text:p text:style-name="s1_center_fi0"><text:bookmark text:name="anchor3141"/>141.</text:p>
          </table:table-cell>
          <table:table-cell table:style-name="0">
            <text:p text:style-name="s16_fi0">Автопогрузчики с вилочным захватом</text:p>
          </table:table-cell>
          <table:table-cell table:style-name="0">
            <text:p text:style-name="s1_center_fi0"><text:a xlink:type="simple" xlink:href="http://ivo.garant.ru/document/redirect/70650730/282215110">28.22.15.110</text:a></text:p>
          </table:table-cell>
          <table:table-cell table:style-name="0">
            <text:p text:style-name="s1_center_fi0">87</text:p>
          </table:table-cell>
        </table:table-row>
        <table:table-row>
          <table:table-cell table:style-name="0">
            <text:p text:style-name="s1_center_fi0"><text:bookmark text:name="anchor3142"/>142.</text:p>
          </table:table-cell>
          <table:table-cell table:style-name="0">
            <text:p text:style-name="s16_fi0">Погрузчики прочие</text:p>
          </table:table-cell>
          <table:table-cell table:style-name="0">
            <text:p text:style-name="s1_center_fi0"><text:a xlink:type="simple" xlink:href="http://ivo.garant.ru/document/redirect/70650730/282215120">28.22.15.120</text:a></text:p>
          </table:table-cell>
          <table:table-cell table:style-name="0">
            <text:p text:style-name="s1_center_fi0">87</text:p>
          </table:table-cell>
        </table:table-row>
        <table:table-row>
          <table:table-cell table:style-name="0">
            <text:p text:style-name="s1_center_fi0"><text:bookmark text:name="anchor3143"/>143.</text:p>
          </table:table-cell>
          <table:table-cell table:style-name="0">
            <text:p text:style-name="s16_fi0">Лифты</text:p>
          </table:table-cell>
          <table:table-cell table:style-name="0">
            <text:p text:style-name="s1_center_fi0"><text:a xlink:type="simple" xlink:href="http://ivo.garant.ru/document/redirect/70650730/28221611">28.22.16.110</text:a></text:p>
          </table:table-cell>
          <table:table-cell table:style-name="0">
            <text:p text:style-name="s1_center_fi0">90</text:p>
          </table:table-cell>
        </table:table-row>
        <table:table-row>
          <table:table-cell table:style-name="0">
            <text:p text:style-name="s1_center_fi0"><text:bookmark text:name="anchor31431"/>143<text:span text:style-name="upper"><text:span> 1</text:span></text:span>.</text:p>
          </table:table-cell>
          <table:table-cell table:style-name="0">
            <text:p text:style-name="s16_fi0">Дороги канатные пассажирские и грузовые</text:p>
          </table:table-cell>
          <table:table-cell table:style-name="0">
            <text:p text:style-name="s1_center_fi0"><text:a xlink:type="simple" xlink:href="http://ivo.garant.ru/document/redirect/70650730/282218150">28.22.18.150</text:a></text:p>
          </table:table-cell>
          <table:table-cell table:style-name="0">
            <text:p text:style-name="s1_center_fi0">90</text:p>
          </table:table-cell>
        </table:table-row>
        <table:table-row>
          <table:table-cell table:style-name="0">
            <text:p text:style-name="s1_center_fi0"><text:bookmark text:name="anchor3144"/>144.</text:p>
          </table:table-cell>
          <table:table-cell table:style-name="0">
            <text:p text:style-name="s16_fi0">Склады - накопители механизированные</text:p>
          </table:table-cell>
          <table:table-cell table:style-name="0">
            <text:p text:style-name="s1_center_fi0"><text:a xlink:type="simple" xlink:href="http://ivo.garant.ru/document/redirect/70650730/282218261">28.22.18.261</text:a></text:p>
          </table:table-cell>
          <table:table-cell table:style-name="0">
            <text:p text:style-name="s1_center_fi0">90</text:p>
          </table:table-cell>
        </table:table-row>
        <table:table-row>
          <table:table-cell table:style-name="0">
            <text:p text:style-name="s1_center_fi0"><text:bookmark text:name="anchor3145"/>145.</text:p>
          </table:table-cell>
          <table:table-cell table:style-name="0">
            <text:p text:style-name="s16_fi0">Машины подъемные для механизации складов прочие, не включенные в другие группировки</text:p>
          </table:table-cell>
          <table:table-cell table:style-name="0">
            <text:p text:style-name="s1_center_fi0"><text:a xlink:type="simple" xlink:href="http://ivo.garant.ru/document/redirect/70650730/282218269">28.22.18.269</text:a></text:p>
          </table:table-cell>
          <table:table-cell table:style-name="0">
            <text:p text:style-name="s1_center_fi0">60</text:p>
          </table:table-cell>
        </table:table-row>
        <table:table-row>
          <table:table-cell table:style-name="0">
            <text:p text:style-name="s1_center_fi0"><text:bookmark text:name="anchor3146"/>146.</text:p>
          </table:table-cell>
          <table:table-cell table:style-name="0">
            <text:p text:style-name="s16_fi0">Оборудование подъемно-транспортное и погрузочно-разгрузочное прочее, не включенное в другие группировки</text:p>
          </table:table-cell>
          <table:table-cell table:style-name="0">
            <text:p text:style-name="s1_center_fi0"><text:a xlink:type="simple" xlink:href="http://ivo.garant.ru/document/redirect/70650730/282218390">28.22.18.390</text:a></text:p>
          </table:table-cell>
          <table:table-cell table:style-name="0">
            <text:p text:style-name="s1_center_fi0">60</text:p>
          </table:table-cell>
        </table:table-row>
        <table:table-row>
          <table:table-cell table:style-name="0">
            <text:p text:style-name="s1_center_fi0"><text:bookmark text:name="anchor3147"/>147.</text:p>
          </table:table-cell>
          <table:table-cell table:style-name="0">
            <text:p text:style-name="s16_fi0">Машины офисные и оборудование, кроме компьютеров и периферийного оборудования</text:p>
          </table:table-cell>
          <table:table-cell table:style-name="0">
            <text:p text:style-name="s1_center_fi0"><text:a xlink:type="simple" xlink:href="http://ivo.garant.ru/document/redirect/70650730/2823">28.23</text:a></text:p>
          </table:table-cell>
          <table:table-cell table:style-name="0">
            <text:p text:style-name="s1_center_fi0">37</text:p>
          </table:table-cell>
        </table:table-row>
        <table:table-row>
          <table:table-cell table:style-name="0">
            <text:p text:style-name="s1_center_fi0"><text:bookmark text:name="anchor3148"/>148.</text:p>
          </table:table-cell>
          <table:table-cell table:style-name="0">
            <text:p text:style-name="s16_fi0">Инструменты ручные электрические; инструменты ручные прочие с механизированным приводом</text:p>
          </table:table-cell>
          <table:table-cell table:style-name="0">
            <text:p text:style-name="s1_center_fi0"><text:a xlink:type="simple" xlink:href="http://ivo.garant.ru/document/redirect/70650730/28241">28.24.1</text:a></text:p>
          </table:table-cell>
          <table:table-cell table:style-name="0">
            <text:p text:style-name="s1_center_fi0">80</text:p>
          </table:table-cell>
        </table:table-row>
        <table:table-row>
          <table:table-cell table:style-name="0">
            <text:p text:style-name="s1_center_fi0"><text:bookmark text:name="anchor3149"/>149.</text:p>
          </table:table-cell>
          <table:table-cell table:style-name="0">
            <text:p text:style-name="s16_fi0">Теплообменники и машины для сжижения воздуха или прочих газов</text:p>
          </table:table-cell>
          <table:table-cell table:style-name="0">
            <text:p text:style-name="s1_center_fi0"><text:a xlink:type="simple" xlink:href="http://ivo.garant.ru/document/redirect/70650730/282511">28.25.11</text:a></text:p>
          </table:table-cell>
          <table:table-cell table:style-name="0">
            <text:p text:style-name="s1_center_fi0">90</text:p>
          </table:table-cell>
        </table:table-row>
        <table:table-row>
          <table:table-cell table:style-name="0">
            <text:p text:style-name="s1_center_fi0"><text:bookmark text:name="anchor3150"/>150.</text:p>
          </table:table-cell>
          <table:table-cell table:style-name="0">
            <text:p text:style-name="s16_fi0">Шкафы холодильные</text:p>
          </table:table-cell>
          <table:table-cell table:style-name="0">
            <text:p text:style-name="s1_center_fi0"><text:a xlink:type="simple" xlink:href="http://ivo.garant.ru/document/redirect/70650730/951110071">28.25.13.111</text:a></text:p>
          </table:table-cell>
          <table:table-cell table:style-name="0">
            <text:p text:style-name="s1_center_fi0">80</text:p>
          </table:table-cell>
        </table:table-row>
        <table:table-row>
          <table:table-cell table:style-name="0">
            <text:p text:style-name="s1_center_fi0"><text:bookmark text:name="anchor3151"/>151.</text:p>
          </table:table-cell>
          <table:table-cell table:style-name="0">
            <text:p text:style-name="s16_fi0">Холодильные, морозильные камеры медицинские</text:p>
          </table:table-cell>
          <table:table-cell table:style-name="0">
            <text:p text:style-name="s1_center_fi0"><text:a xlink:type="simple" xlink:href="http://ivo.garant.ru/document/redirect/70650730/252513116">28.25.13.116</text:a></text:p>
          </table:table-cell>
          <table:table-cell table:style-name="0">
            <text:p text:style-name="s1_center_fi0">95</text:p>
          </table:table-cell>
        </table:table-row>
        <table:table-row>
          <table:table-cell table:style-name="0">
            <text:p text:style-name="s1_center_fi0"><text:bookmark text:name="anchor3152"/>152.</text:p>
          </table:table-cell>
          <table:table-cell table:style-name="0">
            <text:p text:style-name="s16_fi0">Камеры холодильные сборные</text:p>
          </table:table-cell>
          <table:table-cell table:style-name="0">
            <text:p text:style-name="s1_center_fi0"><text:a xlink:type="simple" xlink:href="http://ivo.garant.ru/document/redirect/70650730/282513112">28.25.13.112</text:a></text:p>
          </table:table-cell>
          <table:table-cell table:style-name="0">
            <text:p text:style-name="s1_center_fi0">75</text:p>
          </table:table-cell>
        </table:table-row>
        <table:table-row>
          <table:table-cell table:style-name="0">
            <text:p text:style-name="s1_center_fi0"><text:bookmark text:name="anchor3153"/>153.</text:p>
          </table:table-cell>
          <table:table-cell table:style-name="0">
            <text:p text:style-name="s16_fi0">Оборудование и установки для фильтрования или очистки газов, не включенные в другие группировки. Эта группировка не включает машины и аппараты для разделения жидких и газовых неоднородных систем в радиохимическом производстве и изготовлении тепловыделяющих элементов, за исключением товаров, предусмотренных <text:a xlink:type="simple" xlink:href="#anchor3154">позициями 154</text:a> и <text:a xlink:type="simple" xlink:href="#anchor3155">155</text:a> настоящего приложения</text:p>
          </table:table-cell>
          <table:table-cell table:style-name="0">
            <text:p text:style-name="s1_center_fi0"><text:a xlink:type="simple" xlink:href="http://ivo.garant.ru/document/redirect/70650730/282514">28.25.14</text:a></text:p>
          </table:table-cell>
          <table:table-cell table:style-name="0">
            <text:p text:style-name="s1_center_fi0">60</text:p>
          </table:table-cell>
        </table:table-row>
        <table:table-row>
          <table:table-cell table:style-name="0">
            <text:p text:style-name="s1_center_fi0"><text:bookmark text:name="anchor3154"/>154.</text:p>
          </table:table-cell>
          <table:table-cell table:style-name="0">
            <text:p text:style-name="s16_fi0">Оборудование и установки для фильтрования или очистки воздуха</text:p>
          </table:table-cell>
          <table:table-cell table:style-name="0">
            <text:p text:style-name="s1_center_fi0"><text:a xlink:type="simple" xlink:href="http://ivo.garant.ru/document/redirect/70650730/2814110">28.25.14.110</text:a></text:p>
          </table:table-cell>
          <table:table-cell table:style-name="0">
            <text:p text:style-name="s1_center_fi0">95</text:p>
          </table:table-cell>
        </table:table-row>
        <table:table-row>
          <table:table-cell table:style-name="0">
            <text:p text:style-name="s1_center_fi0"><text:bookmark text:name="anchor3155"/>155.</text:p>
          </table:table-cell>
          <table:table-cell table:style-name="0">
            <text:p text:style-name="s16_fi0">Оборудование газоочистное и пылеулавливающее</text:p>
          </table:table-cell>
          <table:table-cell table:style-name="0">
            <text:p text:style-name="s1_center_fi0"><text:a xlink:type="simple" xlink:href="http://ivo.garant.ru/document/redirect/70650730/28251412">28.25.14.120</text:a></text:p>
          </table:table-cell>
          <table:table-cell table:style-name="0">
            <text:p text:style-name="s1_center_fi0">65</text:p>
          </table:table-cell>
        </table:table-row>
        <table:table-row>
          <table:table-cell table:style-name="0">
            <text:p text:style-name="s1_center_fi0"><text:bookmark text:name="anchor3156"/>156.</text:p>
          </table:table-cell>
          <table:table-cell table:style-name="0">
            <text:p text:style-name="s16_fi0">Оборудование и установки для фильтрования или очистки жидкостей</text:p>
          </table:table-cell>
          <table:table-cell table:style-name="0">
            <text:p text:style-name="s1_center_fi0"><text:a xlink:type="simple" xlink:href="http://ivo.garant.ru/document/redirect/70650730/282912">28.29.12</text:a></text:p>
          </table:table-cell>
          <table:table-cell table:style-name="0">
            <text:p text:style-name="s1_center_fi0">60</text:p>
          </table:table-cell>
        </table:table-row>
        <table:table-row>
          <table:table-cell table:style-name="0">
            <text:p text:style-name="s1_center_fi0"><text:bookmark text:name="anchor3157"/>157.</text:p>
          </table:table-cell>
          <table:table-cell table:style-name="0">
            <text:p text:style-name="s16_fi0">Машины посудомоечные промышленного типа</text:p>
          </table:table-cell>
          <table:table-cell table:style-name="0">
            <text:p text:style-name="s1_center_fi0"><text:a xlink:type="simple" xlink:href="http://ivo.garant.ru/document/redirect/70650730/282950000">28.29.50.000</text:a></text:p>
          </table:table-cell>
          <table:table-cell table:style-name="0">
            <text:p text:style-name="s1_center_fi0">90</text:p>
          </table:table-cell>
        </table:table-row>
        <table:table-row>
          <table:table-cell table:style-name="0">
            <text:p text:style-name="s1_center_fi0"><text:bookmark text:name="anchor3158"/>158.</text:p>
          </table:table-cell>
          <table:table-cell table:style-name="0">
            <text:p text:style-name="s16_fi0">Установки для обработки материалов с использованием процессов, включающих изменение температуры, не включенные в другие группировки</text:p>
          </table:table-cell>
          <table:table-cell table:style-name="0">
            <text:p text:style-name="s1_center_fi0"><text:a xlink:type="simple" xlink:href="http://ivo.garant.ru/document/redirect/70650730/282960">28.29.60</text:a></text:p>
          </table:table-cell>
          <table:table-cell table:style-name="0">
            <text:p text:style-name="s1_center_fi0">70</text:p>
          </table:table-cell>
        </table:table-row>
        <table:table-row>
          <table:table-cell table:style-name="0">
            <text:p text:style-name="s1_center_fi0"><text:bookmark text:name="anchor3159"/>159.</text:p>
          </table:table-cell>
          <table:table-cell table:style-name="0">
            <text:p text:style-name="s16_fi0">Машины и оборудование для сельского и лесного хозяйства</text:p>
          </table:table-cell>
          <table:table-cell table:style-name="0">
            <text:p text:style-name="s1_center_fi0"><text:a xlink:type="simple" xlink:href="http://ivo.garant.ru/document/redirect/70650730/283">28.3</text:a></text:p>
          </table:table-cell>
          <table:table-cell table:style-name="0">
            <text:p text:style-name="s1_center_fi0">50</text:p>
          </table:table-cell>
        </table:table-row>
        <table:table-row>
          <table:table-cell table:style-name="0">
            <text:p text:style-name="s1_center_fi0"><text:bookmark text:name="anchor3160"/>160.</text:p>
          </table:table-cell>
          <table:table-cell table:style-name="0">
            <text:p text:style-name="s16_fi0">Станки для обработки металлов лазером и станки аналогичного типа; обрабатывающие центры и станки аналогичного типа</text:p>
          </table:table-cell>
          <table:table-cell table:style-name="0">
            <text:p text:style-name="s1_center_fi0"><text:a xlink:type="simple" xlink:href="http://ivo.garant.ru/document/redirect/70650730/28411">28.41.1</text:a></text:p>
          </table:table-cell>
          <table:table-cell table:style-name="0">
            <text:p text:style-name="s1_center_fi0">80</text:p>
          </table:table-cell>
        </table:table-row>
        <table:table-row>
          <table:table-cell table:style-name="0">
            <text:p text:style-name="s1_center_fi0"><text:bookmark text:name="anchor3161"/>161.</text:p>
          </table:table-cell>
          <table:table-cell table:style-name="0">
            <text:p text:style-name="s16_fi0">Станки токарные, расточные и фрезерные металлорежущие</text:p>
          </table:table-cell>
          <table:table-cell table:style-name="0">
            <text:p text:style-name="s1_center_fi0"><text:a xlink:type="simple" xlink:href="http://ivo.garant.ru/document/redirect/70650730/28412">28.41.2</text:a></text:p>
          </table:table-cell>
          <table:table-cell table:style-name="0">
            <text:p text:style-name="s1_center_fi0">80</text:p>
          </table:table-cell>
        </table:table-row>
        <table:table-row>
          <table:table-cell table:style-name="0">
            <text:p text:style-name="s1_center_fi0"><text:bookmark text:name="anchor3162"/>162.</text:p>
          </table:table-cell>
          <table:table-cell table:style-name="0">
            <text:p text:style-name="s16_fi0">Станки металлообрабатывающие прочие</text:p>
          </table:table-cell>
          <table:table-cell table:style-name="0">
            <text:p text:style-name="s1_center_fi0"><text:a xlink:type="simple" xlink:href="http://ivo.garant.ru/document/redirect/70650730/28413">28.41.3</text:a></text:p>
          </table:table-cell>
          <table:table-cell table:style-name="0">
            <text:p text:style-name="s1_center_fi0">80</text:p>
          </table:table-cell>
        </table:table-row>
        <table:table-row>
          <table:table-cell table:style-name="0">
            <text:p text:style-name="s1_center_fi0"><text:bookmark text:name="anchor3163"/>163.</text:p>
          </table:table-cell>
          <table:table-cell table:style-name="0">
            <text:p text:style-name="s16_fi0">Части и принадлежности станков для обработки металлов</text:p>
          </table:table-cell>
          <table:table-cell table:style-name="0">
            <text:p text:style-name="s1_center_fi0"><text:a xlink:type="simple" xlink:href="http://ivo.garant.ru/document/redirect/70650730/28414">28.41.4</text:a></text:p>
          </table:table-cell>
          <table:table-cell table:style-name="0">
            <text:p text:style-name="s1_center_fi0">80</text:p>
          </table:table-cell>
        </table:table-row>
        <table:table-row>
          <table:table-cell table:style-name="0">
            <text:p text:style-name="s1_center_fi0"><text:bookmark text:name="anchor3164"/>164.</text:p>
          </table:table-cell>
          <table:table-cell table:style-name="0">
            <text:p text:style-name="s16_fi0">Станки для обработки камня, дерева и аналогичных твердых материалов</text:p>
          </table:table-cell>
          <table:table-cell table:style-name="0">
            <text:p text:style-name="s1_center_fi0"><text:a xlink:type="simple" xlink:href="http://ivo.garant.ru/document/redirect/70650730/28491">28.49.1</text:a></text:p>
          </table:table-cell>
          <table:table-cell table:style-name="0">
            <text:p text:style-name="s1_center_fi0">70</text:p>
          </table:table-cell>
        </table:table-row>
        <table:table-row>
          <table:table-cell table:style-name="0">
            <text:p text:style-name="s1_center_fi0"><text:bookmark text:name="anchor3165"/>165.</text:p>
          </table:table-cell>
          <table:table-cell table:style-name="0">
            <text:p text:style-name="s16_fi0">Оправки для крепления инструмента</text:p>
          </table:table-cell>
          <table:table-cell table:style-name="0">
            <text:p text:style-name="s1_center_fi0"><text:a xlink:type="simple" xlink:href="http://ivo.garant.ru/document/redirect/70650730/28492">28.49.2</text:a></text:p>
          </table:table-cell>
          <table:table-cell table:style-name="0">
            <text:p text:style-name="s1_center_fi0">75</text:p>
          </table:table-cell>
        </table:table-row>
        <table:table-row>
          <table:table-cell table:style-name="0">
            <text:p text:style-name="s1_center_fi0"><text:bookmark text:name="anchor3166"/>166.</text:p>
          </table:table-cell>
          <table:table-cell table:style-name="0">
            <text:p text:style-name="s16_fi0">Машины бурильные</text:p>
          </table:table-cell>
          <table:table-cell table:style-name="0">
            <text:p text:style-name="s1_center_fi0"><text:a xlink:type="simple" xlink:href="http://ivo.garant.ru/document/redirect/70650730/2892113">28.92.12.130</text:a></text:p>
          </table:table-cell>
          <table:table-cell table:style-name="0">
            <text:p text:style-name="s1_center_fi0">88</text:p>
          </table:table-cell>
        </table:table-row>
        <table:table-row>
          <table:table-cell table:style-name="0">
            <text:p text:style-name="s1_center_fi0"><text:bookmark text:name="anchor3167"/>167.</text:p>
          </table:table-cell>
          <table:table-cell table:style-name="0">
            <text:p text:style-name="s16_fi0">Бульдозеры и бульдозеры с поворотным отвалом</text:p>
          </table:table-cell>
          <table:table-cell table:style-name="0">
            <text:p text:style-name="s1_center_fi0"><text:a xlink:type="simple" xlink:href="http://ivo.garant.ru/document/redirect/70650730/289221">28.92.21</text:a></text:p>
          </table:table-cell>
          <table:table-cell table:style-name="0">
            <text:p text:style-name="s1_center_fi0">90</text:p>
          </table:table-cell>
        </table:table-row>
        <table:table-row>
          <table:table-cell table:style-name="0">
            <text:p text:style-name="s1_center_fi0"><text:bookmark text:name="anchor3168"/>168.</text:p>
          </table:table-cell>
          <table:table-cell table:style-name="0">
            <text:p text:style-name="s16_fi0">Грейдеры и планировщики самоходные</text:p>
          </table:table-cell>
          <table:table-cell table:style-name="0">
            <text:p text:style-name="s1_center_fi0"><text:a xlink:type="simple" xlink:href="http://ivo.garant.ru/document/redirect/70650730/289222">28.92.22</text:a></text:p>
          </table:table-cell>
          <table:table-cell table:style-name="0">
            <text:p text:style-name="s1_center_fi0">90</text:p>
          </table:table-cell>
        </table:table-row>
        <table:table-row>
          <table:table-cell table:style-name="0">
            <text:p text:style-name="s1_center_fi0"><text:bookmark text:name="anchor3169"/>169.</text:p>
          </table:table-cell>
          <table:table-cell table:style-name="0">
            <text:p text:style-name="s16_fi0">Машины трамбовочные самоходные</text:p>
          </table:table-cell>
          <table:table-cell table:style-name="0">
            <text:p text:style-name="s1_center_fi0"><text:a xlink:type="simple" xlink:href="http://ivo.garant.ru/document/redirect/70650730/289224110">28.92.24.110</text:a></text:p>
          </table:table-cell>
          <table:table-cell table:style-name="0">
            <text:p text:style-name="s1_center_fi0">90</text:p>
          </table:table-cell>
        </table:table-row>
        <table:table-row>
          <table:table-cell table:style-name="0">
            <text:p text:style-name="s1_center_fi0"><text:bookmark text:name="anchor3170"/>170.</text:p>
          </table:table-cell>
          <table:table-cell table:style-name="0">
            <text:p text:style-name="s16_fi0">Катки дорожные самоходные</text:p>
          </table:table-cell>
          <table:table-cell table:style-name="0">
            <text:p text:style-name="s1_center_fi0"><text:a xlink:type="simple" xlink:href="http://ivo.garant.ru/document/redirect/70650730/28922412">28.92.24.120</text:a></text:p>
          </table:table-cell>
          <table:table-cell table:style-name="0">
            <text:p text:style-name="s1_center_fi0">90</text:p>
          </table:table-cell>
        </table:table-row>
        <table:table-row>
          <table:table-cell table:style-name="0">
            <text:p text:style-name="s1_center_fi0"><text:bookmark text:name="anchor3171"/>171.</text:p>
          </table:table-cell>
          <table:table-cell table:style-name="0">
            <text:p text:style-name="s16_fi0">Погрузчики фронтальные одноковшовые самоходные</text:p>
          </table:table-cell>
          <table:table-cell table:style-name="0">
            <text:p text:style-name="s1_center_fi0"><text:a xlink:type="simple" xlink:href="http://ivo.garant.ru/document/redirect/70650730/2892250">28.92.25.000</text:a></text:p>
          </table:table-cell>
          <table:table-cell table:style-name="0">
            <text:p text:style-name="s1_center_fi0">50</text:p>
          </table:table-cell>
        </table:table-row>
        <table:table-row>
          <table:table-cell table:style-name="0">
            <text:p text:style-name="s1_center_fi0"><text:bookmark text:name="anchor3172"/>172.</text:p>
          </table:table-cell>
          <table:table-cell table:style-name="0">
            <text:p text:style-name="s16_fi0">Экскаваторы самоходные одноковшовые</text:p>
          </table:table-cell>
          <table:table-cell table:style-name="0">
            <text:p text:style-name="s1_center_fi0"><text:a xlink:type="simple" xlink:href="http://ivo.garant.ru/document/redirect/70650730/289261">28.92.26.110</text:a></text:p>
          </table:table-cell>
          <table:table-cell table:style-name="0">
            <text:p text:style-name="s1_center_fi0">80</text:p>
          </table:table-cell>
        </table:table-row>
        <table:table-row>
          <table:table-cell table:style-name="0">
            <text:p text:style-name="s1_center_fi0"><text:bookmark text:name="anchor3173"/>173.</text:p>
          </table:table-cell>
          <table:table-cell table:style-name="0">
            <text:p text:style-name="s16_fi0">Погрузчики одноковшовые самоходные прочие</text:p>
          </table:table-cell>
          <table:table-cell table:style-name="0">
            <text:p text:style-name="s1_center_fi0"><text:a xlink:type="simple" xlink:href="http://ivo.garant.ru/document/redirect/70650730/289227120">28.92.27.120</text:a></text:p>
          </table:table-cell>
          <table:table-cell table:style-name="0">
            <text:p text:style-name="s1_center_fi0">90</text:p>
          </table:table-cell>
        </table:table-row>
        <table:table-row>
          <table:table-cell table:style-name="0">
            <text:p text:style-name="s1_center_fi0"><text:bookmark text:name="anchor3174"/>174.</text:p>
          </table:table-cell>
          <table:table-cell table:style-name="0">
            <text:p text:style-name="s16_fi0">Машины самоходные для добычи полезных ископаемых прочие</text:p>
          </table:table-cell>
          <table:table-cell table:style-name="0">
            <text:p text:style-name="s1_center_fi0"><text:a xlink:type="simple" xlink:href="http://ivo.garant.ru/document/redirect/70650730/2892719">28.92.27.190</text:a></text:p>
          </table:table-cell>
          <table:table-cell table:style-name="0">
            <text:p text:style-name="s1_center_fi0">90</text:p>
          </table:table-cell>
        </table:table-row>
        <table:table-row>
          <table:table-cell table:style-name="0">
            <text:p text:style-name="s1_center_fi0"><text:bookmark text:name="anchor3175"/>175.</text:p>
          </table:table-cell>
          <table:table-cell table:style-name="0">
            <text:p text:style-name="s16_fi0">Автомобили-самосвалы, предназначенные для использования в условиях бездорожья</text:p>
          </table:table-cell>
          <table:table-cell table:style-name="0">
            <text:p text:style-name="s1_center_fi0"><text:a xlink:type="simple" xlink:href="http://ivo.garant.ru/document/redirect/70650730/289229000">28.92.29.000</text:a></text:p>
          </table:table-cell>
          <table:table-cell table:style-name="0">
            <text:p text:style-name="s1_center_fi0">90</text:p>
          </table:table-cell>
        </table:table-row>
        <table:table-row>
          <table:table-cell table:style-name="0">
            <text:p text:style-name="s1_center_fi0"><text:bookmark text:name="anchor3176"/>176.</text:p>
          </table:table-cell>
          <table:table-cell table:style-name="0">
            <text:p text:style-name="s16_fi0">Машины для укладки гравия на дороге или аналогичных поверхностях, для поливки и пропитки поверхностей дорог битумными материалами</text:p>
          </table:table-cell>
          <table:table-cell table:style-name="0">
            <text:p text:style-name="s1_center_fi0"><text:a xlink:type="simple" xlink:href="http://ivo.garant.ru/document/redirect/70650730/289230160">28.92.30.160</text:a></text:p>
          </table:table-cell>
          <table:table-cell table:style-name="0">
            <text:p text:style-name="s1_center_fi0">37</text:p>
          </table:table-cell>
        </table:table-row>
        <table:table-row>
          <table:table-cell table:style-name="0">
            <text:p text:style-name="s1_center_fi0"><text:bookmark text:name="anchor3177"/>177.</text:p>
          </table:table-cell>
          <table:table-cell table:style-name="0">
            <text:p text:style-name="s16_fi0">Машины для выемки грунта и строительства прочие, не включенные в другие группировки</text:p>
          </table:table-cell>
          <table:table-cell table:style-name="0">
            <text:p text:style-name="s1_center_fi0"><text:a xlink:type="simple" xlink:href="http://ivo.garant.ru/document/redirect/70650730/289030190">28.92.30.190</text:a></text:p>
          </table:table-cell>
          <table:table-cell table:style-name="0">
            <text:p text:style-name="s1_center_fi0">90</text:p>
          </table:table-cell>
        </table:table-row>
        <table:table-row>
          <table:table-cell table:style-name="0">
            <text:p text:style-name="s1_center_fi0"><text:bookmark text:name="anchor3178"/>178.</text:p>
          </table:table-cell>
          <table:table-cell table:style-name="0">
            <text:p text:style-name="s16_fi0">Машины для дробления грунта, камня, руды и прочих минеральных веществ</text:p>
          </table:table-cell>
          <table:table-cell table:style-name="0">
            <text:p text:style-name="s1_center_fi0"><text:a xlink:type="simple" xlink:href="http://ivo.garant.ru/document/redirect/70650730/289240120">28.92.40.120</text:a></text:p>
          </table:table-cell>
          <table:table-cell table:style-name="0">
            <text:p text:style-name="s1_center_fi0">90</text:p>
          </table:table-cell>
        </table:table-row>
        <table:table-row>
          <table:table-cell table:style-name="0">
            <text:p text:style-name="s1_center_fi0"><text:bookmark text:name="anchor3179"/>179.</text:p>
          </table:table-cell>
          <table:table-cell table:style-name="0">
            <text:p text:style-name="s16_fi0">Комплектующие (запасные части) бурильных и проходческих машин, не имеющие самостоятельных группировок</text:p>
          </table:table-cell>
          <table:table-cell table:style-name="0">
            <text:p text:style-name="s1_center_fi0"><text:a xlink:type="simple" xlink:href="http://ivo.garant.ru/document/redirect/70650730/2896111">28.92.61.110</text:a></text:p>
          </table:table-cell>
          <table:table-cell table:style-name="0">
            <text:p text:style-name="s1_center_fi0">80</text:p>
          </table:table-cell>
        </table:table-row>
        <table:table-row>
          <table:table-cell table:style-name="0">
            <text:p text:style-name="s1_center_fi0"><text:bookmark text:name="anchor3180"/>180.</text:p>
          </table:table-cell>
          <table:table-cell table:style-name="0">
            <text:p text:style-name="s16_fi0">Части машин для сортировки, дробления или прочих способов обработки грунта, камня и аналогичных материалов</text:p>
          </table:table-cell>
          <table:table-cell table:style-name="0">
            <text:p text:style-name="s1_center_fi0"><text:a xlink:type="simple" xlink:href="http://ivo.garant.ru/document/redirect/70650730/2892620">28.92.62.000</text:a></text:p>
          </table:table-cell>
          <table:table-cell table:style-name="0">
            <text:p text:style-name="s1_center_fi0">70</text:p>
          </table:table-cell>
        </table:table-row>
        <table:table-row>
          <table:table-cell table:style-name="0">
            <text:p text:style-name="s1_center_fi0"><text:bookmark text:name="anchor3181"/>181.</text:p>
          </table:table-cell>
          <table:table-cell table:style-name="0">
            <text:p text:style-name="s16_fi0">Печи хлебопекарные неэлектрические</text:p>
          </table:table-cell>
          <table:table-cell table:style-name="0">
            <text:p text:style-name="s1_center_fi0"><text:a xlink:type="simple" xlink:href="http://ivo.garant.ru/document/redirect/70650730/289315110">28.93.15.110</text:a></text:p>
          </table:table-cell>
          <table:table-cell table:style-name="0">
            <text:p text:style-name="s1_center_fi0">90</text:p>
          </table:table-cell>
        </table:table-row>
        <table:table-row>
          <table:table-cell table:style-name="0">
            <text:p text:style-name="s1_center_fi0"><text:bookmark text:name="anchor3182"/>182.</text:p>
          </table:table-cell>
          <table:table-cell table:style-name="0">
            <text:p text:style-name="s16_fi0">Оборудование для промышленного приготовления или подогрева пищи</text:p>
          </table:table-cell>
          <table:table-cell table:style-name="0">
            <text:p text:style-name="s1_center_fi0"><text:a xlink:type="simple" xlink:href="http://ivo.garant.ru/document/redirect/70650730/289315120">28.93.15.120</text:a></text:p>
          </table:table-cell>
          <table:table-cell table:style-name="0">
            <text:p text:style-name="s1_center_fi0">90</text:p>
          </table:table-cell>
        </table:table-row>
        <table:table-row>
          <table:table-cell table:style-name="0">
            <text:p text:style-name="s1_center_fi0"><text:bookmark text:name="anchor3183"/>183.</text:p>
          </table:table-cell>
          <table:table-cell table:style-name="0">
            <text:p text:style-name="s16_fi0">Машины для переработки мяса, овощей и теста (оборудование для механической обработки продуктов на предприятиях общественного питания)</text:p>
          </table:table-cell>
          <table:table-cell table:style-name="0">
            <text:p text:style-name="s1_center_fi0"><text:a xlink:type="simple" xlink:href="http://ivo.garant.ru/document/redirect/70650730/289317110">28.93.17.110</text:a></text:p>
          </table:table-cell>
          <table:table-cell table:style-name="0">
            <text:p text:style-name="s1_center_fi0">90</text:p>
          </table:table-cell>
        </table:table-row>
        <table:table-row>
          <table:table-cell table:style-name="0">
            <text:p text:style-name="s1_center_fi0"><text:bookmark text:name="anchor3184"/>184.</text:p>
          </table:table-cell>
          <table:table-cell table:style-name="0">
            <text:p text:style-name="s16_fi0">Оборудование для производства хлебобулочных изделий</text:p>
          </table:table-cell>
          <table:table-cell table:style-name="0">
            <text:p text:style-name="s1_center_fi0"><text:a xlink:type="simple" xlink:href="http://ivo.garant.ru/document/redirect/70650730/289317120">28.93.17.120</text:a></text:p>
          </table:table-cell>
          <table:table-cell table:style-name="0">
            <text:p text:style-name="s1_center_fi0">90</text:p>
          </table:table-cell>
        </table:table-row>
        <table:table-row>
          <table:table-cell table:style-name="0">
            <text:p text:style-name="s1_center_fi0"><text:bookmark text:name="anchor3185"/>185.</text:p>
          </table:table-cell>
          <table:table-cell table:style-name="0">
            <text:p text:style-name="s16_fi0">Машины для очистки, сортировки или калибровки семян, зерна или сухих бобовых культур</text:p>
          </table:table-cell>
          <table:table-cell table:style-name="0">
            <text:p text:style-name="s1_center_fi0"><text:a xlink:type="simple" xlink:href="http://ivo.garant.ru/document/redirect/70650730/28932">28.93.2</text:a></text:p>
          </table:table-cell>
          <table:table-cell table:style-name="0">
            <text:p text:style-name="s1_center_fi0">90</text:p>
          </table:table-cell>
        </table:table-row>
        <table:table-row>
          <table:table-cell table:style-name="0">
            <text:p text:style-name="s1_center_fi0"><text:bookmark text:name="anchor3186"/>186.</text:p>
          </table:table-cell>
          <table:table-cell table:style-name="0">
            <text:p text:style-name="s16_fi0">Оборудование для текстильного, швейного и кожевенного производства</text:p>
          </table:table-cell>
          <table:table-cell table:style-name="0">
            <text:p text:style-name="s1_center_fi0"><text:a xlink:type="simple" xlink:href="http://ivo.garant.ru/document/redirect/70650730/28094">28.94</text:a></text:p>
          </table:table-cell>
          <table:table-cell table:style-name="0">
            <text:p text:style-name="s1_center_fi0">40</text:p>
          </table:table-cell>
        </table:table-row>
        <table:table-row>
          <table:table-cell table:style-name="0">
            <text:p text:style-name="s1_center_fi0"><text:bookmark text:name="anchor3187"/>187.</text:p>
          </table:table-cell>
          <table:table-cell table:style-name="0">
            <text:p text:style-name="s16_fi0">Аддитивные установки экструзии материала</text:p>
          </table:table-cell>
          <table:table-cell table:style-name="0">
            <text:p text:style-name="s1_center_fi0"><text:a xlink:type="simple" xlink:href="http://ivo.garant.ru/document/redirect/70650730/289610122">28.96.10.122</text:a></text:p>
          </table:table-cell>
          <table:table-cell table:style-name="0">
            <text:p text:style-name="s1_center_fi0">70</text:p>
          </table:table-cell>
        </table:table-row>
        <table:table-row>
          <table:table-cell table:style-name="0">
            <text:p text:style-name="s1_center_fi0"><text:bookmark text:name="anchor3188"/>188.</text:p>
          </table:table-cell>
          <table:table-cell table:style-name="0">
            <text:p text:style-name="s16_fi0">Аддитивные установки струйного нанесения связующего</text:p>
          </table:table-cell>
          <table:table-cell table:style-name="0">
            <text:p text:style-name="s1_center_fi0"><text:a xlink:type="simple" xlink:href="http://ivo.garant.ru/document/redirect/70650730/289610123">28.96.10.123</text:a></text:p>
          </table:table-cell>
          <table:table-cell table:style-name="0">
            <text:p text:style-name="s1_center_fi0">70</text:p>
          </table:table-cell>
        </table:table-row>
        <table:table-row>
          <table:table-cell table:style-name="0">
            <text:p text:style-name="s1_center_fi0"><text:bookmark text:name="anchor3189"/>189.</text:p>
          </table:table-cell>
          <table:table-cell table:style-name="0">
            <text:p text:style-name="s16_fi0">Машины сушильные промышленные, не включенные в другие группировки</text:p>
          </table:table-cell>
          <table:table-cell table:style-name="0">
            <text:p text:style-name="s1_center_fi0"><text:a xlink:type="simple" xlink:href="http://ivo.garant.ru/document/redirect/70650730/28993112">28.99.31.120</text:a></text:p>
          </table:table-cell>
          <table:table-cell table:style-name="0">
            <text:p text:style-name="s1_center_fi0">70</text:p>
          </table:table-cell>
        </table:table-row>
        <table:table-row>
          <table:table-cell table:style-name="0">
            <text:p text:style-name="s1_center_fi0"><text:bookmark text:name="anchor3190"/>190.</text:p>
          </table:table-cell>
          <table:table-cell table:style-name="0">
            <text:p text:style-name="s16_fi0">Автомобили легковые</text:p>
          </table:table-cell>
          <table:table-cell table:style-name="0">
            <text:p text:style-name="s1_center_fi0"><text:a xlink:type="simple" xlink:href="http://ivo.garant.ru/document/redirect/70650730/29102">29.10.2</text:a></text:p>
          </table:table-cell>
          <table:table-cell table:style-name="0">
            <text:p text:style-name="s1_center_fi0">60</text:p>
          </table:table-cell>
        </table:table-row>
        <table:table-row>
          <table:table-cell table:style-name="0">
            <text:p text:style-name="s1_center_fi0"><text:bookmark text:name="anchor3191"/>191.</text:p>
          </table:table-cell>
          <table:table-cell table:style-name="0">
            <text:p text:style-name="s16_fi0">Средства автотранспортные для перевозки 10 или более человек</text:p>
          </table:table-cell>
          <table:table-cell table:style-name="0">
            <text:p text:style-name="s1_center_fi0"><text:a xlink:type="simple" xlink:href="http://ivo.garant.ru/document/redirect/70650730/29103">29.10.3</text:a></text:p>
          </table:table-cell>
          <table:table-cell table:style-name="0">
            <text:p text:style-name="s1_center_fi0">80</text:p>
          </table:table-cell>
        </table:table-row>
        <table:table-row>
          <table:table-cell table:style-name="0">
            <text:p text:style-name="s1_center_fi0"><text:bookmark text:name="anchor3192"/>192.</text:p>
          </table:table-cell>
          <table:table-cell table:style-name="0">
            <text:p text:style-name="s16_fi0">Средства автотранспортные грузовые</text:p>
          </table:table-cell>
          <table:table-cell table:style-name="0">
            <text:p text:style-name="s1_center_fi0"><text:a xlink:type="simple" xlink:href="http://ivo.garant.ru/document/redirect/70650730/29104">29.10.4</text:a></text:p>
          </table:table-cell>
          <table:table-cell table:style-name="0">
            <text:p text:style-name="s1_center_fi0">70</text:p>
          </table:table-cell>
        </table:table-row>
        <table:table-row>
          <table:table-cell table:style-name="0">
            <text:p text:style-name="s1_center_fi0"><text:bookmark text:name="anchor3193"/>193.</text:p>
          </table:table-cell>
          <table:table-cell table:style-name="0">
            <text:p text:style-name="s16_fi0">Автокраны</text:p>
          </table:table-cell>
          <table:table-cell table:style-name="0">
            <text:p text:style-name="s1_center_fi0"><text:a xlink:type="simple" xlink:href="http://ivo.garant.ru/document/redirect/70650730/2910510">29.10.51.000</text:a></text:p>
          </table:table-cell>
          <table:table-cell table:style-name="0">
            <text:p text:style-name="s1_center_fi0">90</text:p>
          </table:table-cell>
        </table:table-row>
        <table:table-row>
          <table:table-cell table:style-name="0">
            <text:p text:style-name="s1_center_fi0"><text:bookmark text:name="anchor3194"/>194.</text:p>
          </table:table-cell>
          <table:table-cell table:style-name="0">
            <text:p text:style-name="s16_fi0">Средства транспортные снегоходные</text:p>
          </table:table-cell>
          <table:table-cell table:style-name="0">
            <text:p text:style-name="s1_center_fi0"><text:a xlink:type="simple" xlink:href="http://ivo.garant.ru/document/redirect/70650730/291052110">29.10.52.110</text:a></text:p>
          </table:table-cell>
          <table:table-cell table:style-name="0">
            <text:p text:style-name="s1_center_fi0">90</text:p>
          </table:table-cell>
        </table:table-row>
        <table:table-row>
          <table:table-cell table:style-name="0">
            <text:p text:style-name="s1_center_fi0"><text:bookmark text:name="anchor3195"/>195.</text:p>
          </table:table-cell>
          <table:table-cell table:style-name="0">
            <text:p text:style-name="s16_fi0">Квадроциклы</text:p>
          </table:table-cell>
          <table:table-cell table:style-name="0">
            <text:p text:style-name="s1_center_fi0"><text:a xlink:type="simple" xlink:href="http://ivo.garant.ru/document/redirect/70650730/291052130">29.10.52.130</text:a></text:p>
          </table:table-cell>
          <table:table-cell table:style-name="0">
            <text:p text:style-name="s1_center_fi0">90</text:p>
          </table:table-cell>
        </table:table-row>
        <table:table-row>
          <table:table-cell table:style-name="0">
            <text:p text:style-name="s1_center_fi0"><text:bookmark text:name="anchor3196"/>196.</text:p>
          </table:table-cell>
          <table:table-cell table:style-name="0">
            <text:p text:style-name="s16_fi0">Средства автотранспортные для транспортирования строительных материалов</text:p>
          </table:table-cell>
          <table:table-cell table:style-name="0">
            <text:p text:style-name="s1_center_fi0"><text:a xlink:type="simple" xlink:href="http://ivo.garant.ru/document/redirect/70650730/2915911">29.10.59.110</text:a></text:p>
          </table:table-cell>
          <table:table-cell table:style-name="0">
            <text:p text:style-name="s1_center_fi0">90</text:p>
          </table:table-cell>
        </table:table-row>
        <table:table-row>
          <table:table-cell table:style-name="0">
            <text:p text:style-name="s1_center_fi0"><text:bookmark text:name="anchor3197"/>197.</text:p>
          </table:table-cell>
          <table:table-cell table:style-name="0">
            <text:p text:style-name="s16_fi0">Средства транспортные для коммунального хозяйства и содержания дорог</text:p>
          </table:table-cell>
          <table:table-cell table:style-name="0">
            <text:p text:style-name="s1_center_fi0"><text:a xlink:type="simple" xlink:href="http://ivo.garant.ru/document/redirect/70650730/291059130">29.10.59.130</text:a></text:p>
          </table:table-cell>
          <table:table-cell table:style-name="0">
            <text:p text:style-name="s1_center_fi0">90</text:p>
          </table:table-cell>
        </table:table-row>
        <table:table-row>
          <table:table-cell table:style-name="0">
            <text:p text:style-name="s1_center_fi0"><text:bookmark text:name="anchor3198"/>198.</text:p>
          </table:table-cell>
          <table:table-cell table:style-name="0">
            <text:p text:style-name="s16_fi0">Автомобили пожарные</text:p>
          </table:table-cell>
          <table:table-cell table:style-name="0">
            <text:p text:style-name="s1_center_fi0"><text:a xlink:type="simple" xlink:href="http://ivo.garant.ru/document/redirect/70650730/291059140">29.10.59.140</text:a></text:p>
          </table:table-cell>
          <table:table-cell table:style-name="0">
            <text:p text:style-name="s1_center_fi0">90</text:p>
          </table:table-cell>
        </table:table-row>
        <table:table-row>
          <table:table-cell table:style-name="0">
            <text:p text:style-name="s1_center_fi0"><text:bookmark text:name="anchor3199"/>199.</text:p>
          </table:table-cell>
          <table:table-cell table:style-name="0">
            <text:p text:style-name="s16_fi0">Средства транспортные для обслуживания нефтяных и газовых скважин</text:p>
          </table:table-cell>
          <table:table-cell table:style-name="0">
            <text:p text:style-name="s1_center_fi0"><text:a xlink:type="simple" xlink:href="http://ivo.garant.ru/document/redirect/70650730/2915918">29.10.59.180</text:a></text:p>
          </table:table-cell>
          <table:table-cell table:style-name="0">
            <text:p text:style-name="s1_center_fi0">90</text:p>
          </table:table-cell>
        </table:table-row>
        <table:table-row>
          <table:table-cell table:style-name="0">
            <text:p text:style-name="s1_center_fi0"><text:bookmark text:name="anchor3200"/>200.</text:p>
          </table:table-cell>
          <table:table-cell table:style-name="0">
            <text:p text:style-name="s16_fi0">Средства транспортные для перевозки нефтепродуктов</text:p>
          </table:table-cell>
          <table:table-cell table:style-name="0">
            <text:p text:style-name="s1_center_fi0"><text:a xlink:type="simple" xlink:href="http://ivo.garant.ru/document/redirect/70650730/291059230">29.10.59.230</text:a></text:p>
          </table:table-cell>
          <table:table-cell table:style-name="0">
            <text:p text:style-name="s1_center_fi0">90</text:p>
          </table:table-cell>
        </table:table-row>
        <table:table-row>
          <table:table-cell table:style-name="0">
            <text:p text:style-name="s1_center_fi0"><text:bookmark text:name="anchor3201"/>201.</text:p>
          </table:table-cell>
          <table:table-cell table:style-name="0">
            <text:p text:style-name="s16_fi0">Средства транспортные для перевозки пищевых жидкостей</text:p>
          </table:table-cell>
          <table:table-cell table:style-name="0">
            <text:p text:style-name="s1_center_fi0"><text:a xlink:type="simple" xlink:href="http://ivo.garant.ru/document/redirect/70650730/2915924">29.10.59.240</text:a></text:p>
          </table:table-cell>
          <table:table-cell table:style-name="0">
            <text:p text:style-name="s1_center_fi0">90</text:p>
          </table:table-cell>
        </table:table-row>
        <table:table-row>
          <table:table-cell table:style-name="0">
            <text:p text:style-name="s1_center_fi0"><text:bookmark text:name="anchor3202"/>202.</text:p>
          </table:table-cell>
          <table:table-cell table:style-name="0">
            <text:p text:style-name="s16_fi0">Средства транспортные для перевозки сжиженных углеводородных газов на давление до 1,8 МПа</text:p>
          </table:table-cell>
          <table:table-cell table:style-name="0">
            <text:p text:style-name="s1_center_fi0"><text:a xlink:type="simple" xlink:href="http://ivo.garant.ru/document/redirect/70650730/2915925">29.10.59.250</text:a></text:p>
          </table:table-cell>
          <table:table-cell table:style-name="0">
            <text:p text:style-name="s1_center_fi0">90</text:p>
          </table:table-cell>
        </table:table-row>
        <table:table-row>
          <table:table-cell table:style-name="0">
            <text:p text:style-name="s1_center_fi0"><text:bookmark text:name="anchor3203"/>203.</text:p>
          </table:table-cell>
          <table:table-cell table:style-name="0">
            <text:p text:style-name="s16_fi0">Средства транспортные, оснащенные подъемниками с рабочими платформами</text:p>
          </table:table-cell>
          <table:table-cell table:style-name="0">
            <text:p text:style-name="s1_center_fi0"><text:a xlink:type="simple" xlink:href="http://ivo.garant.ru/document/redirect/70650730/2915927">29.10.59.270</text:a></text:p>
          </table:table-cell>
          <table:table-cell table:style-name="0">
            <text:p text:style-name="s1_center_fi0">90</text:p>
          </table:table-cell>
        </table:table-row>
        <table:table-row>
          <table:table-cell table:style-name="0">
            <text:p text:style-name="s1_center_fi0"><text:bookmark text:name="anchor3204"/>204.</text:p>
          </table:table-cell>
          <table:table-cell table:style-name="0">
            <text:p text:style-name="s16_fi0">Средства транспортные, оснащенные кранами-манипуляторами</text:p>
          </table:table-cell>
          <table:table-cell table:style-name="0">
            <text:p text:style-name="s1_center_fi0"><text:a xlink:type="simple" xlink:href="http://ivo.garant.ru/document/redirect/70650730/2915931">29.10.59.310</text:a></text:p>
          </table:table-cell>
          <table:table-cell table:style-name="0">
            <text:p text:style-name="s1_center_fi0">90</text:p>
          </table:table-cell>
        </table:table-row>
        <table:table-row>
          <table:table-cell table:style-name="0">
            <text:p text:style-name="s1_center_fi0"><text:bookmark text:name="anchor3205"/>205.</text:p>
          </table:table-cell>
          <table:table-cell table:style-name="0">
            <text:p text:style-name="s16_fi0">Средства транспортные - фургоны для перевозки пищевых продуктов</text:p>
          </table:table-cell>
          <table:table-cell table:style-name="0">
            <text:p text:style-name="s1_center_fi0"><text:a xlink:type="simple" xlink:href="http://ivo.garant.ru/document/redirect/70650730/2915928">29.10.59.280</text:a></text:p>
          </table:table-cell>
          <table:table-cell table:style-name="0">
            <text:p text:style-name="s1_center_fi0">90</text:p>
          </table:table-cell>
        </table:table-row>
        <table:table-row>
          <table:table-cell table:style-name="0">
            <text:p text:style-name="s1_center_fi0"><text:bookmark text:name="anchor3206"/>206.</text:p>
          </table:table-cell>
          <table:table-cell table:style-name="0">
            <text:p text:style-name="s16_fi0">Снегоочистители</text:p>
          </table:table-cell>
          <table:table-cell table:style-name="0">
            <text:p text:style-name="s1_center_fi0"><text:a xlink:type="simple" xlink:href="http://ivo.garant.ru/document/redirect/70650730/2915932">29.10.59.320</text:a></text:p>
          </table:table-cell>
          <table:table-cell table:style-name="0">
            <text:p text:style-name="s1_center_fi0">85</text:p>
          </table:table-cell>
        </table:table-row>
        <table:table-row>
          <table:table-cell table:style-name="0">
            <text:p text:style-name="s1_center_fi0"><text:bookmark text:name="anchor3207"/>207.</text:p>
          </table:table-cell>
          <table:table-cell table:style-name="0">
            <text:p text:style-name="s16_fi0">Средства автотранспортные специального назначения прочие, не включенные в другие группировки</text:p>
          </table:table-cell>
          <table:table-cell table:style-name="0">
            <text:p text:style-name="s1_center_fi0"><text:a xlink:type="simple" xlink:href="http://ivo.garant.ru/document/redirect/70650730/291059390">29.10.59.390</text:a></text:p>
          </table:table-cell>
          <table:table-cell table:style-name="0">
            <text:p text:style-name="s1_center_fi0">90</text:p>
          </table:table-cell>
        </table:table-row>
        <table:table-row>
          <table:table-cell table:style-name="0">
            <text:p text:style-name="s1_center_fi0"><text:bookmark text:name="anchor3208"/>208.</text:p>
          </table:table-cell>
          <table:table-cell table:style-name="0">
            <text:p text:style-name="s16_fi0">Прицепы (полуприцепы) к легковым и грузовым автомобилям, мотоциклам, мотороллерам и квадрициклам</text:p>
          </table:table-cell>
          <table:table-cell table:style-name="0">
            <text:p text:style-name="s1_center_fi0"><text:a xlink:type="simple" xlink:href="http://ivo.garant.ru/document/redirect/70650730/292023110">29.20.23.110</text:a></text:p>
          </table:table-cell>
          <table:table-cell table:style-name="0">
            <text:p text:style-name="s1_center_fi0">90</text:p>
          </table:table-cell>
        </table:table-row>
        <table:table-row>
          <table:table-cell table:style-name="0">
            <text:p text:style-name="s1_center_fi0"><text:bookmark text:name="anchor3209"/>209.</text:p>
          </table:table-cell>
          <table:table-cell table:style-name="0">
            <text:p text:style-name="s16_fi0">Прицепы-цистерны и полуприцепы-цистерны для перевозки нефтепродуктов, воды и прочих жидкостей</text:p>
          </table:table-cell>
          <table:table-cell table:style-name="0">
            <text:p text:style-name="s1_center_fi0"><text:a xlink:type="simple" xlink:href="http://ivo.garant.ru/document/redirect/70650730/292023120">29.20.23.120</text:a></text:p>
          </table:table-cell>
          <table:table-cell table:style-name="0">
            <text:p text:style-name="s1_center_fi0">90</text:p>
          </table:table-cell>
        </table:table-row>
        <table:table-row>
          <table:table-cell table:style-name="0">
            <text:p text:style-name="s1_center_fi0"><text:bookmark text:name="anchor3210"/>210.</text:p>
          </table:table-cell>
          <table:table-cell table:style-name="0">
            <text:p text:style-name="s16_fi0">Прицепы и полуприцепы тракторные</text:p>
          </table:table-cell>
          <table:table-cell table:style-name="0">
            <text:p text:style-name="s1_center_fi0"><text:a xlink:type="simple" xlink:href="http://ivo.garant.ru/document/redirect/70650730/292023130">29.20.23.130</text:a></text:p>
          </table:table-cell>
          <table:table-cell table:style-name="0">
            <text:p text:style-name="s1_center_fi0">90</text:p>
          </table:table-cell>
        </table:table-row>
        <table:table-row>
          <table:table-cell table:style-name="0">
            <text:p text:style-name="s1_center_fi0"><text:bookmark text:name="anchor3211"/>211.</text:p>
          </table:table-cell>
          <table:table-cell table:style-name="0">
            <text:p text:style-name="s16_fi0">Прицепы и полуприцепы прочие, не включенные в другие группировки</text:p>
          </table:table-cell>
          <table:table-cell table:style-name="0">
            <text:p text:style-name="s1_center_fi0"><text:a xlink:type="simple" xlink:href="http://ivo.garant.ru/document/redirect/70650730/292023190">29.20.23.190</text:a></text:p>
          </table:table-cell>
          <table:table-cell table:style-name="0">
            <text:p text:style-name="s1_center_fi0">90</text:p>
          </table:table-cell>
        </table:table-row>
        <table:table-row>
          <table:table-cell table:style-name="0">
            <text:p text:style-name="s1_center_fi0"><text:bookmark text:name="anchor3212"/>212.</text:p>
          </table:table-cell>
          <table:table-cell table:style-name="0">
            <text:p text:style-name="s16_fi0">Суда круизные, суда экскурсионные и аналогичные плавучие средства для перевозки пассажиров;</text:p>
            <text:p text:style-name="s16_fi0">паромы всех типов</text:p>
          </table:table-cell>
          <table:table-cell table:style-name="0">
            <text:p text:style-name="s1_center_fi0"><text:a xlink:type="simple" xlink:href="http://ivo.garant.ru/document/redirect/70650730/301121">30.11.21</text:a></text:p>
          </table:table-cell>
          <table:table-cell table:style-name="0">
            <text:p text:style-name="s1_center_fi0">90</text:p>
          </table:table-cell>
        </table:table-row>
        <table:table-row>
          <table:table-cell table:style-name="0">
            <text:p text:style-name="s1_center_fi0"><text:bookmark text:name="anchor3213"/>213.</text:p>
          </table:table-cell>
          <table:table-cell table:style-name="0">
            <text:p text:style-name="s16_fi0">Танкеры для перевозки нефти, нефтепродуктов, химических продуктов, сжиженного газа</text:p>
          </table:table-cell>
          <table:table-cell table:style-name="0">
            <text:p text:style-name="s1_center_fi0"><text:a xlink:type="simple" xlink:href="http://ivo.garant.ru/document/redirect/70650730/301122">30.11.22</text:a></text:p>
          </table:table-cell>
          <table:table-cell table:style-name="0">
            <text:p text:style-name="s1_center_fi0">90</text:p>
          </table:table-cell>
        </table:table-row>
        <table:table-row>
          <table:table-cell table:style-name="0">
            <text:p text:style-name="s1_center_fi0"><text:bookmark text:name="anchor3214"/>214.</text:p>
          </table:table-cell>
          <table:table-cell table:style-name="0">
            <text:p text:style-name="s16_fi0">Суда рефрижераторные, кроме танкеров</text:p>
          </table:table-cell>
          <table:table-cell table:style-name="0">
            <text:p text:style-name="s1_center_fi0"><text:a xlink:type="simple" xlink:href="http://ivo.garant.ru/document/redirect/70650730/301123">30.11.23</text:a></text:p>
          </table:table-cell>
          <table:table-cell table:style-name="0">
            <text:p text:style-name="s1_center_fi0">90</text:p>
          </table:table-cell>
        </table:table-row>
        <table:table-row>
          <table:table-cell table:style-name="0">
            <text:p text:style-name="s1_center_fi0"><text:bookmark text:name="anchor3215"/>215.</text:p>
          </table:table-cell>
          <table:table-cell table:style-name="0">
            <text:p text:style-name="s16_fi0">Суда сухогрузные</text:p>
          </table:table-cell>
          <table:table-cell table:style-name="0">
            <text:p text:style-name="s1_center_fi0"><text:a xlink:type="simple" xlink:href="http://ivo.garant.ru/document/redirect/70650730/301124">30.11.24</text:a></text:p>
          </table:table-cell>
          <table:table-cell table:style-name="0">
            <text:p text:style-name="s1_center_fi0">90</text:p>
          </table:table-cell>
        </table:table-row>
        <table:table-row>
          <table:table-cell table:style-name="0">
            <text:p text:style-name="s1_center_fi0"><text:bookmark text:name="anchor3216"/>216.</text:p>
          </table:table-cell>
          <table:table-cell table:style-name="0">
            <text:p text:style-name="s16_fi0">Суда рыболовные; суда-рыбозаводы и прочие суда для переработки или консервирования рыбных продуктов</text:p>
          </table:table-cell>
          <table:table-cell table:style-name="0">
            <text:p text:style-name="s1_center_fi0"><text:a xlink:type="simple" xlink:href="http://ivo.garant.ru/document/redirect/70650730/301131">30.11.31</text:a></text:p>
          </table:table-cell>
          <table:table-cell table:style-name="0">
            <text:p text:style-name="s1_center_fi0">90</text:p>
          </table:table-cell>
        </table:table-row>
        <table:table-row>
          <table:table-cell table:style-name="0">
            <text:p text:style-name="s1_center_fi0"><text:bookmark text:name="anchor3217"/>217.</text:p>
          </table:table-cell>
          <table:table-cell table:style-name="0">
            <text:p text:style-name="s16_fi0">Буксиры и суда-толкачи</text:p>
          </table:table-cell>
          <table:table-cell table:style-name="0">
            <text:p text:style-name="s1_center_fi0"><text:a xlink:type="simple" xlink:href="http://ivo.garant.ru/document/redirect/70650730/301132">30.11.32</text:a></text:p>
          </table:table-cell>
          <table:table-cell table:style-name="0">
            <text:p text:style-name="s1_center_fi0">90</text:p>
          </table:table-cell>
        </table:table-row>
        <table:table-row>
          <table:table-cell table:style-name="0">
            <text:p text:style-name="s1_center_fi0"><text:bookmark text:name="anchor3218"/>218.</text:p>
          </table:table-cell>
          <table:table-cell table:style-name="0">
            <text:p text:style-name="s16_fi0">Земснаряды, плавучие маяки, плавучие краны, прочие суда</text:p>
          </table:table-cell>
          <table:table-cell table:style-name="0">
            <text:p text:style-name="s1_center_fi0"><text:a xlink:type="simple" xlink:href="http://ivo.garant.ru/document/redirect/70650730/301133">30.11.33</text:a></text:p>
          </table:table-cell>
          <table:table-cell table:style-name="0">
            <text:p text:style-name="s1_center_fi0">90</text:p>
          </table:table-cell>
        </table:table-row>
        <table:table-row>
          <table:table-cell table:style-name="0">
            <text:p text:style-name="s1_center_fi0"><text:bookmark text:name="anchor3219"/>219.</text:p>
          </table:table-cell>
          <table:table-cell table:style-name="0">
            <text:p text:style-name="s16_fi0">Платформы плавучие или погружные и инфраструктура</text:p>
          </table:table-cell>
          <table:table-cell table:style-name="0">
            <text:p text:style-name="s1_center_fi0"><text:a xlink:type="simple" xlink:href="http://ivo.garant.ru/document/redirect/70650730/301140">30.11.40</text:a></text:p>
          </table:table-cell>
          <table:table-cell table:style-name="0">
            <text:p text:style-name="s1_center_fi0">90</text:p>
          </table:table-cell>
        </table:table-row>
        <table:table-row>
          <table:table-cell table:style-name="0">
            <text:p text:style-name="s1_center_fi0"><text:bookmark text:name="anchor3220"/>220.</text:p>
          </table:table-cell>
          <table:table-cell table:style-name="0">
            <text:p text:style-name="s16_fi0">Конструкции плавучие прочие (включая плоты, понтоны, кессоны, дебаркадеры, буи и бакены)</text:p>
          </table:table-cell>
          <table:table-cell table:style-name="0">
            <text:p text:style-name="s1_center_fi0"><text:a xlink:type="simple" xlink:href="http://ivo.garant.ru/document/redirect/70650730/301150">30.11.50</text:a></text:p>
          </table:table-cell>
          <table:table-cell table:style-name="0">
            <text:p text:style-name="s1_center_fi0">90</text:p>
          </table:table-cell>
        </table:table-row>
        <table:table-row>
          <table:table-cell table:style-name="0">
            <text:p text:style-name="s1_center_fi0"><text:bookmark text:name="anchor3221"/>221.</text:p>
          </table:table-cell>
          <table:table-cell table:style-name="0">
            <text:p text:style-name="s16_fi0">Суда прогулочные</text:p>
          </table:table-cell>
          <table:table-cell table:style-name="0">
            <text:p text:style-name="s1_center_fi0"><text:a xlink:type="simple" xlink:href="http://ivo.garant.ru/document/redirect/70650730/3012">30.12</text:a></text:p>
          </table:table-cell>
          <table:table-cell table:style-name="0">
            <text:p text:style-name="s1_center_fi0">90</text:p>
          </table:table-cell>
        </table:table-row>
        <table:table-row>
          <table:table-cell table:style-name="0">
            <text:p text:style-name="s1_center_fi0"><text:bookmark text:name="anchor3222"/>222.</text:p>
          </table:table-cell>
          <table:table-cell table:style-name="0">
            <text:p text:style-name="s16_fi0">Локомотивы железнодорожные и тендеры локомотивов</text:p>
          </table:table-cell>
          <table:table-cell table:style-name="0">
            <text:p text:style-name="s1_center_fi0"><text:a xlink:type="simple" xlink:href="http://ivo.garant.ru/document/redirect/70650730/30201">30.20.1</text:a></text:p>
          </table:table-cell>
          <table:table-cell table:style-name="0">
            <text:p text:style-name="s1_center_fi0">90</text:p>
          </table:table-cell>
        </table:table-row>
        <table:table-row>
          <table:table-cell table:style-name="0">
            <text:p text:style-name="s1_center_fi0"><text:bookmark text:name="anchor3223"/>223.</text:p>
          </table:table-cell>
          <table:table-cell table:style-name="0">
            <text:p text:style-name="s16_fi0">Вагоны железнодорожные или трамвайные пассажирские самоходные (моторные), вагоны товарные (багажные) и платформы открытые, кроме транспортных средств, предназначенных для технического обслуживания или ремонта</text:p>
          </table:table-cell>
          <table:table-cell table:style-name="0">
            <text:p text:style-name="s1_center_fi0"><text:a xlink:type="simple" xlink:href="http://ivo.garant.ru/document/redirect/70650730/30202">30.20.2</text:a></text:p>
          </table:table-cell>
          <table:table-cell table:style-name="0">
            <text:p text:style-name="s1_center_fi0">90</text:p>
          </table:table-cell>
        </table:table-row>
        <table:table-row>
          <table:table-cell table:style-name="0">
            <text:p text:style-name="s1_center_fi0"><text:bookmark text:name="anchor3224"/>224.</text:p>
          </table:table-cell>
          <table:table-cell table:style-name="0">
            <text:p text:style-name="s16_fi0">Средства транспортные, предназначенные для технического обслуживания или ремонта железнодорожных или трамвайных путей</text:p>
          </table:table-cell>
          <table:table-cell table:style-name="0">
            <text:p text:style-name="s1_center_fi0"><text:a xlink:type="simple" xlink:href="http://ivo.garant.ru/document/redirect/70650730/302031">30.20.31</text:a></text:p>
          </table:table-cell>
          <table:table-cell table:style-name="0">
            <text:p text:style-name="s1_center_fi0">90</text:p>
          </table:table-cell>
        </table:table-row>
        <table:table-row>
          <table:table-cell table:style-name="0">
            <text:p text:style-name="s1_center_fi0"><text:bookmark text:name="anchor3225"/>225.</text:p>
          </table:table-cell>
          <table:table-cell table:style-name="0">
            <text:p text:style-name="s16_fi0">Вагоны железнодорожные или трамвайные пассажирские немоторные; вагоны багажные и прочие вагоны специального назначения</text:p>
          </table:table-cell>
          <table:table-cell table:style-name="0">
            <text:p text:style-name="s1_center_fi0"><text:a xlink:type="simple" xlink:href="http://ivo.garant.ru/document/redirect/70650730/302032">30.20.32</text:a></text:p>
          </table:table-cell>
          <table:table-cell table:style-name="0">
            <text:p text:style-name="s1_center_fi0">90</text:p>
          </table:table-cell>
        </table:table-row>
        <table:table-row>
          <table:table-cell table:style-name="0">
            <text:p text:style-name="s1_center_fi0"><text:bookmark text:name="anchor3226"/>226.</text:p>
          </table:table-cell>
          <table:table-cell table:style-name="0">
            <text:p text:style-name="s16_fi0">Вагоны железнодорожные или трамвайные грузовые и вагоны-платформы, несамоходные</text:p>
          </table:table-cell>
          <table:table-cell table:style-name="0">
            <text:p text:style-name="s1_center_fi0"><text:a xlink:type="simple" xlink:href="http://ivo.garant.ru/document/redirect/70650730/302033">30.20.33</text:a></text:p>
          </table:table-cell>
          <table:table-cell table:style-name="0">
            <text:p text:style-name="s1_center_fi0">90</text:p>
          </table:table-cell>
        </table:table-row>
        <table:table-row>
          <table:table-cell table:style-name="0">
            <text:p text:style-name="s1_center_fi0"><text:bookmark text:name="anchor3227"/>227.</text:p>
          </table:table-cell>
          <table:table-cell table:style-name="0">
            <text:p text:style-name="s16_fi0">Комплектующие (запасные части) железнодорожных локомотивов, не имеющие самостоятельных группировок</text:p>
          </table:table-cell>
          <table:table-cell table:style-name="0">
            <text:p text:style-name="s1_center_fi0"><text:a xlink:type="simple" xlink:href="http://ivo.garant.ru/document/redirect/70650730/302040110">30.20.40.110</text:a></text:p>
          </table:table-cell>
          <table:table-cell table:style-name="0">
            <text:p text:style-name="s1_center_fi0">80</text:p>
          </table:table-cell>
        </table:table-row>
        <table:table-row>
          <table:table-cell table:style-name="0">
            <text:p text:style-name="s1_center_fi0"><text:bookmark text:name="anchor3228"/>228.</text:p>
          </table:table-cell>
          <table:table-cell table:style-name="0">
            <text:p text:style-name="s16_fi0">Комплектующие (запасные части) моторных трамвайных вагонов, не имеющие самостоятельных группировок</text:p>
          </table:table-cell>
          <table:table-cell table:style-name="0">
            <text:p text:style-name="s1_center_fi0"><text:a xlink:type="simple" xlink:href="http://ivo.garant.ru/document/redirect/70650730/302040120">30.20.40.120</text:a></text:p>
          </table:table-cell>
          <table:table-cell table:style-name="0">
            <text:p text:style-name="s1_center_fi0">80</text:p>
          </table:table-cell>
        </table:table-row>
        <table:table-row>
          <table:table-cell table:style-name="0">
            <text:p text:style-name="s1_center_fi0"><text:bookmark text:name="anchor3229"/>229.</text:p>
          </table:table-cell>
          <table:table-cell table:style-name="0">
            <text:p text:style-name="s16_fi0">Комплектующие (запасные части) вагонов метрополитена, не имеющие самостоятельных группировок</text:p>
          </table:table-cell>
          <table:table-cell table:style-name="0">
            <text:p text:style-name="s1_center_fi0"><text:a xlink:type="simple" xlink:href="http://ivo.garant.ru/document/redirect/70650730/32413">30.20.40.130</text:a></text:p>
          </table:table-cell>
          <table:table-cell table:style-name="0">
            <text:p text:style-name="s1_center_fi0">80</text:p>
          </table:table-cell>
        </table:table-row>
        <table:table-row>
          <table:table-cell table:style-name="0">
            <text:p text:style-name="s1_center_fi0"><text:bookmark text:name="anchor3230"/>230.</text:p>
          </table:table-cell>
          <table:table-cell table:style-name="0">
            <text:p text:style-name="s16_fi0">Комплектующие (запасные части) прочего подвижного состава, не имеющие самостоятельных группировок</text:p>
          </table:table-cell>
          <table:table-cell table:style-name="0">
            <text:p text:style-name="s1_center_fi0"><text:a xlink:type="simple" xlink:href="http://ivo.garant.ru/document/redirect/70650730/302040140">30.20.40.140</text:a></text:p>
          </table:table-cell>
          <table:table-cell table:style-name="0">
            <text:p text:style-name="s1_center_fi0">80</text:p>
          </table:table-cell>
        </table:table-row>
        <table:table-row>
          <table:table-cell table:style-name="0">
            <text:p text:style-name="s1_center_fi0"><text:bookmark text:name="anchor3231"/>231.</text:p>
          </table:table-cell>
          <table:table-cell table:style-name="0">
            <text:p text:style-name="s16_fi0">Мебель металлическая для офисов</text:p>
          </table:table-cell>
          <table:table-cell table:style-name="0">
            <text:p text:style-name="s1_center_fi0"><text:a xlink:type="simple" xlink:href="http://ivo.garant.ru/document/redirect/70650730/310111">31.01.11</text:a></text:p>
          </table:table-cell>
          <table:table-cell table:style-name="0">
            <text:p text:style-name="s1_center_fi0">75</text:p>
          </table:table-cell>
        </table:table-row>
        <table:table-row>
          <table:table-cell table:style-name="0">
            <text:p text:style-name="s1_center_fi0"><text:bookmark text:name="anchor3232"/>232.</text:p>
          </table:table-cell>
          <table:table-cell table:style-name="0">
            <text:p text:style-name="s16_fi0">Мебель деревянная для офисов</text:p>
          </table:table-cell>
          <table:table-cell table:style-name="0">
            <text:p text:style-name="s1_center_fi0"><text:a xlink:type="simple" xlink:href="http://ivo.garant.ru/document/redirect/70650730/310112">31.01.12</text:a></text:p>
          </table:table-cell>
          <table:table-cell table:style-name="0">
            <text:p text:style-name="s1_center_fi0">75</text:p>
          </table:table-cell>
        </table:table-row>
        <table:table-row>
          <table:table-cell table:style-name="0">
            <text:p text:style-name="s1_center_fi0"><text:bookmark text:name="anchor3233"/>233.</text:p>
          </table:table-cell>
          <table:table-cell table:style-name="0">
            <text:p text:style-name="s16_fi0">Мебель кухонная</text:p>
          </table:table-cell>
          <table:table-cell table:style-name="0">
            <text:p text:style-name="s1_center_fi0"><text:a xlink:type="simple" xlink:href="http://ivo.garant.ru/document/redirect/70650730/310210">31.02.10</text:a></text:p>
          </table:table-cell>
          <table:table-cell table:style-name="0">
            <text:p text:style-name="s1_center_fi0">75</text:p>
          </table:table-cell>
        </table:table-row>
        <table:table-row>
          <table:table-cell table:style-name="0">
            <text:p text:style-name="s1_center_fi0"><text:bookmark text:name="anchor3234"/>234.</text:p>
          </table:table-cell>
          <table:table-cell table:style-name="0">
            <text:p text:style-name="s16_fi0">Матрасы</text:p>
          </table:table-cell>
          <table:table-cell table:style-name="0">
            <text:p text:style-name="s1_center_fi0"><text:a xlink:type="simple" xlink:href="http://ivo.garant.ru/document/redirect/70650730/31031">31.03.1</text:a></text:p>
          </table:table-cell>
          <table:table-cell table:style-name="0">
            <text:p text:style-name="s1_center_fi0">75</text:p>
          </table:table-cell>
        </table:table-row>
        <table:table-row>
          <table:table-cell table:style-name="0">
            <text:p text:style-name="s1_center_fi0"><text:bookmark text:name="anchor3235"/>235.</text:p>
          </table:table-cell>
          <table:table-cell table:style-name="0">
            <text:p text:style-name="s16_fi0">Мебель металлическая, не включенная в другие группировки</text:p>
          </table:table-cell>
          <table:table-cell table:style-name="0">
            <text:p text:style-name="s1_center_fi0"><text:a xlink:type="simple" xlink:href="http://ivo.garant.ru/document/redirect/70650730/310911">31.09.11</text:a></text:p>
          </table:table-cell>
          <table:table-cell table:style-name="0">
            <text:p text:style-name="s1_center_fi0">75</text:p>
          </table:table-cell>
        </table:table-row>
        <table:table-row>
          <table:table-cell table:style-name="0">
            <text:p text:style-name="s1_center_fi0"><text:bookmark text:name="anchor3236"/>236.</text:p>
          </table:table-cell>
          <table:table-cell table:style-name="0">
            <text:p text:style-name="s16_fi0">Мебель деревянная для спальни, столовой и гостиной</text:p>
          </table:table-cell>
          <table:table-cell table:style-name="0">
            <text:p text:style-name="s1_center_fi0"><text:a xlink:type="simple" xlink:href="http://ivo.garant.ru/document/redirect/70650730/310912">31.09.12</text:a></text:p>
          </table:table-cell>
          <table:table-cell table:style-name="0">
            <text:p text:style-name="s1_center_fi0">75</text:p>
          </table:table-cell>
        </table:table-row>
        <table:table-row>
          <table:table-cell table:style-name="0">
            <text:p text:style-name="s1_center_fi0"><text:bookmark text:name="anchor3237"/>237.</text:p>
          </table:table-cell>
          <table:table-cell table:style-name="0">
            <text:p text:style-name="s16_fi0">Мебель деревянная, не включенная в другие группировки</text:p>
          </table:table-cell>
          <table:table-cell table:style-name="0">
            <text:p text:style-name="s1_center_fi0"><text:a xlink:type="simple" xlink:href="http://ivo.garant.ru/document/redirect/70650730/310913">31.09.13</text:a></text:p>
          </table:table-cell>
          <table:table-cell table:style-name="0">
            <text:p text:style-name="s1_center_fi0">75</text:p>
          </table:table-cell>
        </table:table-row>
        <table:table-row>
          <table:table-cell table:style-name="0">
            <text:p text:style-name="s1_center_fi0"><text:bookmark text:name="anchor3238"/>238.</text:p>
          </table:table-cell>
          <table:table-cell table:style-name="0">
            <text:p text:style-name="s16_fi0">Мебель из пластмассовых материалов</text:p>
          </table:table-cell>
          <table:table-cell table:style-name="0">
            <text:p text:style-name="s1_center_fi0"><text:a xlink:type="simple" xlink:href="http://ivo.garant.ru/document/redirect/70650730/310914110">31.09.14.110</text:a></text:p>
          </table:table-cell>
          <table:table-cell table:style-name="0">
            <text:p text:style-name="s1_center_fi0">75</text:p>
          </table:table-cell>
        </table:table-row>
        <table:table-row>
          <table:table-cell table:style-name="0">
            <text:p text:style-name="s1_center_fi0"><text:bookmark text:name="anchor3239"/>239.</text:p>
          </table:table-cell>
          <table:table-cell table:style-name="0">
            <text:p text:style-name="s16_fi0">Пианино</text:p>
          </table:table-cell>
          <table:table-cell table:style-name="0">
            <text:p text:style-name="s1_center_fi0"><text:a xlink:type="simple" xlink:href="http://ivo.garant.ru/document/redirect/70650730/322011120">32.20.11.120</text:a></text:p>
          </table:table-cell>
          <table:table-cell table:style-name="0">
            <text:p text:style-name="s1_center_fi0">70</text:p>
          </table:table-cell>
        </table:table-row>
        <table:table-row>
          <table:table-cell table:style-name="0">
            <text:p text:style-name="s1_center_fi0"><text:bookmark text:name="anchor3240"/>240.</text:p>
          </table:table-cell>
          <table:table-cell table:style-name="0">
            <text:p text:style-name="s16_fi0">Рояли</text:p>
          </table:table-cell>
          <table:table-cell table:style-name="0">
            <text:p text:style-name="s1_center_fi0"><text:a xlink:type="simple" xlink:href="http://ivo.garant.ru/document/redirect/70650730/322011130">32.20.11.130</text:a></text:p>
          </table:table-cell>
          <table:table-cell table:style-name="0">
            <text:p text:style-name="s1_center_fi0">30</text:p>
          </table:table-cell>
        </table:table-row>
        <table:table-row>
          <table:table-cell table:style-name="0">
            <text:p text:style-name="s1_center_fi0"><text:bookmark text:name="anchor3241"/>241.</text:p>
          </table:table-cell>
          <table:table-cell table:style-name="0">
            <text:p text:style-name="s16_fi0">Скрипки</text:p>
          </table:table-cell>
          <table:table-cell table:style-name="0">
            <text:p text:style-name="s1_center_fi0"><text:a xlink:type="simple" xlink:href="http://ivo.garant.ru/document/redirect/70650730/322012111">32.20.12.111</text:a></text:p>
          </table:table-cell>
          <table:table-cell table:style-name="0">
            <text:p text:style-name="s1_center_fi0">40</text:p>
          </table:table-cell>
        </table:table-row>
        <table:table-row>
          <table:table-cell table:style-name="0">
            <text:p text:style-name="s1_center_fi0"><text:bookmark text:name="anchor3242"/>242.</text:p>
          </table:table-cell>
          <table:table-cell table:style-name="0">
            <text:p text:style-name="s16_fi0">Альты</text:p>
          </table:table-cell>
          <table:table-cell table:style-name="0">
            <text:p text:style-name="s1_center_fi0"><text:a xlink:type="simple" xlink:href="http://ivo.garant.ru/document/redirect/70650730/322012112">32.20.12.112</text:a></text:p>
          </table:table-cell>
          <table:table-cell table:style-name="0">
            <text:p text:style-name="s1_center_fi0">40</text:p>
          </table:table-cell>
        </table:table-row>
        <table:table-row>
          <table:table-cell table:style-name="0">
            <text:p text:style-name="s1_center_fi0"><text:bookmark text:name="anchor3243"/>243.</text:p>
          </table:table-cell>
          <table:table-cell table:style-name="0">
            <text:p text:style-name="s16_fi0">Виолончели</text:p>
          </table:table-cell>
          <table:table-cell table:style-name="0">
            <text:p text:style-name="s1_center_fi0"><text:a xlink:type="simple" xlink:href="http://ivo.garant.ru/document/redirect/70650730/322012113">32.20.12.113</text:a></text:p>
          </table:table-cell>
          <table:table-cell table:style-name="0">
            <text:p text:style-name="s1_center_fi0">40</text:p>
          </table:table-cell>
        </table:table-row>
        <table:table-row>
          <table:table-cell table:style-name="0">
            <text:p text:style-name="s1_center_fi0"><text:bookmark text:name="anchor3244"/>244.</text:p>
          </table:table-cell>
          <table:table-cell table:style-name="0">
            <text:p text:style-name="s16_fi0">Контрабасы</text:p>
          </table:table-cell>
          <table:table-cell table:style-name="0">
            <text:p text:style-name="s1_center_fi0"><text:a xlink:type="simple" xlink:href="http://ivo.garant.ru/document/redirect/70650730/322012114">32.20.12.114</text:a></text:p>
          </table:table-cell>
          <table:table-cell table:style-name="0">
            <text:p text:style-name="s1_center_fi0">30</text:p>
          </table:table-cell>
        </table:table-row>
        <table:table-row>
          <table:table-cell table:style-name="0">
            <text:p text:style-name="s1_center_fi0"><text:bookmark text:name="anchor3245"/>245.</text:p>
          </table:table-cell>
          <table:table-cell table:style-name="0">
            <text:p text:style-name="s16_fi0">Балалайки</text:p>
          </table:table-cell>
          <table:table-cell table:style-name="0">
            <text:p text:style-name="s1_center_fi0"><text:a xlink:type="simple" xlink:href="http://ivo.garant.ru/document/redirect/70650730/322012121">32.20.12.121</text:a></text:p>
          </table:table-cell>
          <table:table-cell table:style-name="0">
            <text:p text:style-name="s1_center_fi0">90</text:p>
          </table:table-cell>
        </table:table-row>
        <table:table-row>
          <table:table-cell table:style-name="0">
            <text:p text:style-name="s1_center_fi0"><text:bookmark text:name="anchor3246"/>246.</text:p>
          </table:table-cell>
          <table:table-cell table:style-name="0">
            <text:p text:style-name="s16_fi0">Гитары</text:p>
          </table:table-cell>
          <table:table-cell table:style-name="0">
            <text:p text:style-name="s1_center_fi0"><text:a xlink:type="simple" xlink:href="http://ivo.garant.ru/document/redirect/70650730/322012122">32.20.12.122</text:a></text:p>
          </table:table-cell>
          <table:table-cell table:style-name="0">
            <text:p text:style-name="s1_center_fi0">50</text:p>
          </table:table-cell>
        </table:table-row>
        <table:table-row>
          <table:table-cell table:style-name="0">
            <text:p text:style-name="s1_center_fi0"><text:bookmark text:name="anchor3247"/>247.</text:p>
          </table:table-cell>
          <table:table-cell table:style-name="0">
            <text:p text:style-name="s16_fi0">Домры</text:p>
          </table:table-cell>
          <table:table-cell table:style-name="0">
            <text:p text:style-name="s1_center_fi0"><text:a xlink:type="simple" xlink:href="http://ivo.garant.ru/document/redirect/70650730/302012124">32.20.12.124</text:a></text:p>
          </table:table-cell>
          <table:table-cell table:style-name="0">
            <text:p text:style-name="s1_center_fi0">50</text:p>
          </table:table-cell>
        </table:table-row>
        <table:table-row>
          <table:table-cell table:style-name="0">
            <text:p text:style-name="s1_center_fi0"><text:bookmark text:name="anchor3248"/>248.</text:p>
          </table:table-cell>
          <table:table-cell table:style-name="0">
            <text:p text:style-name="s16_fi0">Инструменты струнные щипковые национальные</text:p>
          </table:table-cell>
          <table:table-cell table:style-name="0">
            <text:p text:style-name="s1_center_fi0"><text:a xlink:type="simple" xlink:href="http://ivo.garant.ru/document/redirect/70650730/322012126">32.20.12.126</text:a></text:p>
          </table:table-cell>
          <table:table-cell table:style-name="0">
            <text:p text:style-name="s1_center_fi0">90</text:p>
          </table:table-cell>
        </table:table-row>
        <table:table-row>
          <table:table-cell table:style-name="0">
            <text:p text:style-name="s1_center_fi0"><text:bookmark text:name="anchor3249"/>249.</text:p>
          </table:table-cell>
          <table:table-cell table:style-name="0">
            <text:p text:style-name="s16_fi0">Аккордеоны</text:p>
          </table:table-cell>
          <table:table-cell table:style-name="0">
            <text:p text:style-name="s1_center_fi0"><text:a xlink:type="simple" xlink:href="http://ivo.garant.ru/document/redirect/70650730/322013131">32.20.13.131</text:a></text:p>
          </table:table-cell>
          <table:table-cell table:style-name="0">
            <text:p text:style-name="s1_center_fi0">40</text:p>
          </table:table-cell>
        </table:table-row>
        <table:table-row>
          <table:table-cell table:style-name="0">
            <text:p text:style-name="s1_center_fi0"><text:bookmark text:name="anchor3250"/>250.</text:p>
          </table:table-cell>
          <table:table-cell table:style-name="0">
            <text:p text:style-name="s16_fi0">Баяны</text:p>
          </table:table-cell>
          <table:table-cell table:style-name="0">
            <text:p text:style-name="s1_center_fi0"><text:a xlink:type="simple" xlink:href="http://ivo.garant.ru/document/redirect/70650730/322013132">32.20.13.132</text:a></text:p>
          </table:table-cell>
          <table:table-cell table:style-name="0">
            <text:p text:style-name="s1_center_fi0">60</text:p>
          </table:table-cell>
        </table:table-row>
        <table:table-row>
          <table:table-cell table:style-name="0">
            <text:p text:style-name="s1_center_fi0"><text:bookmark text:name="anchor3251"/>251.</text:p>
          </table:table-cell>
          <table:table-cell table:style-name="0">
            <text:p text:style-name="s16_fi0">Гармони</text:p>
          </table:table-cell>
          <table:table-cell table:style-name="0">
            <text:p text:style-name="s1_center_fi0"><text:a xlink:type="simple" xlink:href="http://ivo.garant.ru/document/redirect/70650730/322013133">32.20.13.133</text:a></text:p>
          </table:table-cell>
          <table:table-cell table:style-name="0">
            <text:p text:style-name="s1_center_fi0">90</text:p>
          </table:table-cell>
        </table:table-row>
        <table:table-row>
          <table:table-cell table:style-name="0">
            <text:p text:style-name="s1_center_fi0"><text:bookmark text:name="anchor3252"/>252.</text:p>
          </table:table-cell>
          <table:table-cell table:style-name="0">
            <text:p text:style-name="s16_fi0">Трубы</text:p>
          </table:table-cell>
          <table:table-cell table:style-name="0">
            <text:p text:style-name="s1_center_fi0"><text:a xlink:type="simple" xlink:href="http://ivo.garant.ru/document/redirect/70650730/322013161">32.20.13.161</text:a></text:p>
          </table:table-cell>
          <table:table-cell table:style-name="0">
            <text:p text:style-name="s1_center_fi0">40</text:p>
          </table:table-cell>
        </table:table-row>
        <table:table-row>
          <table:table-cell table:style-name="0">
            <text:p text:style-name="s1_center_fi0"><text:bookmark text:name="anchor3253"/>253.</text:p>
          </table:table-cell>
          <table:table-cell table:style-name="0">
            <text:p text:style-name="s16_fi0">Альты</text:p>
          </table:table-cell>
          <table:table-cell table:style-name="0">
            <text:p text:style-name="s1_center_fi0"><text:a xlink:type="simple" xlink:href="http://ivo.garant.ru/document/redirect/70650730/322013163">32.20.13.163</text:a></text:p>
          </table:table-cell>
          <table:table-cell table:style-name="0">
            <text:p text:style-name="s1_center_fi0">40</text:p>
          </table:table-cell>
        </table:table-row>
        <table:table-row>
          <table:table-cell table:style-name="0">
            <text:p text:style-name="s1_center_fi0"><text:bookmark text:name="anchor3254"/>254.</text:p>
          </table:table-cell>
          <table:table-cell table:style-name="0">
            <text:p text:style-name="s16_fi0">Теноры</text:p>
          </table:table-cell>
          <table:table-cell table:style-name="0">
            <text:p text:style-name="s1_center_fi0"><text:a xlink:type="simple" xlink:href="http://ivo.garant.ru/document/redirect/70650730/322013164">32.20.13.164</text:a></text:p>
          </table:table-cell>
          <table:table-cell table:style-name="0">
            <text:p text:style-name="s1_center_fi0">40</text:p>
          </table:table-cell>
        </table:table-row>
        <table:table-row>
          <table:table-cell table:style-name="0">
            <text:p text:style-name="s1_center_fi0"><text:bookmark text:name="anchor3255"/>255.</text:p>
          </table:table-cell>
          <table:table-cell table:style-name="0">
            <text:p text:style-name="s16_fi0">Баритоны</text:p>
          </table:table-cell>
          <table:table-cell table:style-name="0">
            <text:p text:style-name="s1_center_fi0"><text:a xlink:type="simple" xlink:href="http://ivo.garant.ru/document/redirect/70650730/322013165">32.20.13.165</text:a></text:p>
          </table:table-cell>
          <table:table-cell table:style-name="0">
            <text:p text:style-name="s1_center_fi0">50</text:p>
          </table:table-cell>
        </table:table-row>
        <table:table-row>
          <table:table-cell table:style-name="0">
            <text:p text:style-name="s1_center_fi0"><text:bookmark text:name="anchor3256"/>256.</text:p>
          </table:table-cell>
          <table:table-cell table:style-name="0">
            <text:p text:style-name="s16_fi0">Басы (включая тубы, геликоны, сузофоны)</text:p>
          </table:table-cell>
          <table:table-cell table:style-name="0">
            <text:p text:style-name="s1_center_fi0"><text:a xlink:type="simple" xlink:href="http://ivo.garant.ru/document/redirect/70650730/322013166">32.20.13.166</text:a></text:p>
          </table:table-cell>
          <table:table-cell table:style-name="0">
            <text:p text:style-name="s1_center_fi0">50</text:p>
          </table:table-cell>
        </table:table-row>
        <table:table-row>
          <table:table-cell table:style-name="0">
            <text:p text:style-name="s1_center_fi0"><text:bookmark text:name="anchor3257"/>257.</text:p>
          </table:table-cell>
          <table:table-cell table:style-name="0">
            <text:p text:style-name="s16_fi0">Валторны</text:p>
          </table:table-cell>
          <table:table-cell table:style-name="0">
            <text:p text:style-name="s1_center_fi0"><text:a xlink:type="simple" xlink:href="http://ivo.garant.ru/document/redirect/70650730/322013167">32.20.13.167</text:a></text:p>
          </table:table-cell>
          <table:table-cell table:style-name="0">
            <text:p text:style-name="s1_center_fi0">50</text:p>
          </table:table-cell>
        </table:table-row>
        <table:table-row>
          <table:table-cell table:style-name="0">
            <text:p text:style-name="s1_center_fi0"><text:bookmark text:name="anchor3258"/>258.</text:p>
          </table:table-cell>
          <table:table-cell table:style-name="0">
            <text:p text:style-name="s16_fi0">Тромбоны</text:p>
          </table:table-cell>
          <table:table-cell table:style-name="0">
            <text:p text:style-name="s1_center_fi0"><text:a xlink:type="simple" xlink:href="http://ivo.garant.ru/document/redirect/70650730/322013168">32.20.13.168</text:a></text:p>
          </table:table-cell>
          <table:table-cell table:style-name="0">
            <text:p text:style-name="s1_center_fi0">70</text:p>
          </table:table-cell>
        </table:table-row>
        <table:table-row>
          <table:table-cell table:style-name="0">
            <text:p text:style-name="s1_center_fi0"><text:bookmark text:name="anchor3259"/>259.</text:p>
          </table:table-cell>
          <table:table-cell table:style-name="0">
            <text:p text:style-name="s16_fi0">Флейты</text:p>
          </table:table-cell>
          <table:table-cell table:style-name="0">
            <text:p text:style-name="s1_center_fi0"><text:a xlink:type="simple" xlink:href="http://ivo.garant.ru/document/redirect/70650730/322013173">32.20.13.173</text:a></text:p>
          </table:table-cell>
          <table:table-cell table:style-name="0">
            <text:p text:style-name="s1_center_fi0">50</text:p>
          </table:table-cell>
        </table:table-row>
        <table:table-row>
          <table:table-cell table:style-name="0">
            <text:p text:style-name="s1_center_fi0"><text:bookmark text:name="anchor3260"/>260.</text:p>
          </table:table-cell>
          <table:table-cell table:style-name="0">
            <text:p text:style-name="s16_fi0">Кларнеты</text:p>
          </table:table-cell>
          <table:table-cell table:style-name="0">
            <text:p text:style-name="s1_center_fi0"><text:a xlink:type="simple" xlink:href="http://ivo.garant.ru/document/redirect/70650730/322013174">32.20.13.174</text:a></text:p>
          </table:table-cell>
          <table:table-cell table:style-name="0">
            <text:p text:style-name="s1_center_fi0">50</text:p>
          </table:table-cell>
        </table:table-row>
        <table:table-row>
          <table:table-cell table:style-name="0">
            <text:p text:style-name="s1_center_fi0"><text:bookmark text:name="anchor3261"/>261.</text:p>
          </table:table-cell>
          <table:table-cell table:style-name="0">
            <text:p text:style-name="s16_fi0">Саксофоны</text:p>
          </table:table-cell>
          <table:table-cell table:style-name="0">
            <text:p text:style-name="s1_center_fi0"><text:a xlink:type="simple" xlink:href="http://ivo.garant.ru/document/redirect/70650730/322013175">32.20.13.175</text:a></text:p>
          </table:table-cell>
          <table:table-cell table:style-name="0">
            <text:p text:style-name="s1_center_fi0">60</text:p>
          </table:table-cell>
        </table:table-row>
        <table:table-row>
          <table:table-cell table:style-name="0">
            <text:p text:style-name="s1_center_fi0"><text:bookmark text:name="anchor3262"/>262.</text:p>
          </table:table-cell>
          <table:table-cell table:style-name="0">
            <text:p text:style-name="s16_fi0">Гобои</text:p>
          </table:table-cell>
          <table:table-cell table:style-name="0">
            <text:p text:style-name="s1_center_fi0"><text:a xlink:type="simple" xlink:href="http://ivo.garant.ru/document/redirect/70650730/322013176">32.20.13.176</text:a></text:p>
          </table:table-cell>
          <table:table-cell table:style-name="0">
            <text:p text:style-name="s1_center_fi0">60</text:p>
          </table:table-cell>
        </table:table-row>
        <table:table-row>
          <table:table-cell table:style-name="0">
            <text:p text:style-name="s1_center_fi0"><text:bookmark text:name="anchor3263"/>263.</text:p>
          </table:table-cell>
          <table:table-cell table:style-name="0">
            <text:p text:style-name="s16_fi0">Фаготы</text:p>
          </table:table-cell>
          <table:table-cell table:style-name="0">
            <text:p text:style-name="s1_center_fi0"><text:a xlink:type="simple" xlink:href="http://ivo.garant.ru/document/redirect/70650730/322013177">32.20.13.177</text:a></text:p>
          </table:table-cell>
          <table:table-cell table:style-name="0">
            <text:p text:style-name="s1_center_fi0">40</text:p>
          </table:table-cell>
        </table:table-row>
        <table:table-row>
          <table:table-cell table:style-name="0">
            <text:p text:style-name="s1_center_fi0"><text:bookmark text:name="anchor3264"/>264.</text:p>
          </table:table-cell>
          <table:table-cell table:style-name="0">
            <text:p text:style-name="s16_fi0">Инструменты музыкальные ударные</text:p>
          </table:table-cell>
          <table:table-cell table:style-name="0">
            <text:p text:style-name="s1_center_fi0"><text:a xlink:type="simple" xlink:href="http://ivo.garant.ru/document/redirect/70650730/322015110">32.20.15.110</text:a></text:p>
          </table:table-cell>
          <table:table-cell table:style-name="0">
            <text:p text:style-name="s1_center_fi0">40</text:p>
          </table:table-cell>
        </table:table-row>
        <table:table-row>
          <table:table-cell table:style-name="0">
            <text:p text:style-name="s1_center_fi0"><text:bookmark text:name="anchor3265"/>265.</text:p>
          </table:table-cell>
          <table:table-cell table:style-name="0">
            <text:p text:style-name="s16_fi0">Лыжи</text:p>
          </table:table-cell>
          <table:table-cell table:style-name="0">
            <text:p text:style-name="s1_center_fi0"><text:a xlink:type="simple" xlink:href="http://ivo.garant.ru/document/redirect/70650730/32301111">32.30.11.110</text:a></text:p>
          </table:table-cell>
          <table:table-cell table:style-name="0">
            <text:p text:style-name="s1_center_fi0">65</text:p>
          </table:table-cell>
        </table:table-row>
        <table:table-row>
          <table:table-cell table:style-name="0">
            <text:p text:style-name="s1_center_fi0"><text:bookmark text:name="anchor3266"/>266.</text:p>
          </table:table-cell>
          <table:table-cell table:style-name="0">
            <text:p text:style-name="s16_fi0">Снаряжение лыжное, кроме обуви</text:p>
          </table:table-cell>
          <table:table-cell table:style-name="0">
            <text:p text:style-name="s1_center_fi0"><text:a xlink:type="simple" xlink:href="http://ivo.garant.ru/document/redirect/70650730/323011120">32.30.11.120</text:a></text:p>
          </table:table-cell>
          <table:table-cell table:style-name="0">
            <text:p text:style-name="s1_center_fi0">55</text:p>
          </table:table-cell>
        </table:table-row>
        <table:table-row>
          <table:table-cell table:style-name="0">
            <text:p text:style-name="s1_center_fi0"><text:bookmark text:name="anchor3267"/>267.</text:p>
          </table:table-cell>
          <table:table-cell table:style-name="0">
            <text:p text:style-name="s16_fi0">Коньки ледовые, включая коньки с ботинками</text:p>
          </table:table-cell>
          <table:table-cell table:style-name="0">
            <text:p text:style-name="s1_center_fi0"><text:a xlink:type="simple" xlink:href="http://ivo.garant.ru/document/redirect/70650730/323011131">32.30.11.131</text:a></text:p>
          </table:table-cell>
          <table:table-cell table:style-name="0">
            <text:p text:style-name="s1_center_fi0">65</text:p>
          </table:table-cell>
        </table:table-row>
        <table:table-row>
          <table:table-cell table:style-name="0">
            <text:p text:style-name="s1_center_fi0"><text:bookmark text:name="anchor3268"/>268.</text:p>
          </table:table-cell>
          <table:table-cell table:style-name="0">
            <text:p text:style-name="s16_fi0">Ботинки лыжные</text:p>
          </table:table-cell>
          <table:table-cell table:style-name="0">
            <text:p text:style-name="s1_center_fi0"><text:a xlink:type="simple" xlink:href="http://ivo.garant.ru/document/redirect/70650730/32301211">32.30.12.110</text:a></text:p>
          </table:table-cell>
          <table:table-cell table:style-name="0">
            <text:p text:style-name="s1_center_fi0">65</text:p>
          </table:table-cell>
        </table:table-row>
        <table:table-row>
          <table:table-cell table:style-name="0">
            <text:p text:style-name="s1_center_fi0"><text:bookmark text:name="anchor3269"/>269.</text:p>
          </table:table-cell>
          <table:table-cell table:style-name="0">
            <text:p text:style-name="s16_fi0">Инвентарь и оборудование для занятий физкультурой, гимнастикой и атлетикой</text:p>
          </table:table-cell>
          <table:table-cell table:style-name="0">
            <text:p text:style-name="s1_center_fi0"><text:a xlink:type="simple" xlink:href="http://ivo.garant.ru/document/redirect/70650730/323014110">32.30.14.110</text:a></text:p>
          </table:table-cell>
          <table:table-cell table:style-name="0">
            <text:p text:style-name="s1_center_fi0">28</text:p>
          </table:table-cell>
        </table:table-row>
        <table:table-row>
          <table:table-cell table:style-name="0">
            <text:p text:style-name="s1_center_fi0"><text:bookmark text:name="anchor3270"/>270.</text:p>
          </table:table-cell>
          <table:table-cell table:style-name="0">
            <text:p text:style-name="s16_fi0">Инвентарь для игры в хоккей с шайбой и мячом</text:p>
          </table:table-cell>
          <table:table-cell table:style-name="0">
            <text:p text:style-name="s1_center_fi0"><text:a xlink:type="simple" xlink:href="http://ivo.garant.ru/document/redirect/70650730/323015117">32.30.15.117</text:a></text:p>
          </table:table-cell>
          <table:table-cell table:style-name="0">
            <text:p text:style-name="s1_center_fi0">65</text:p>
          </table:table-cell>
        </table:table-row>
        <table:table-row>
          <table:table-cell table:style-name="0">
            <text:p text:style-name="s1_center_fi0"><text:bookmark text:name="anchor3271"/>271.</text:p>
          </table:table-cell>
          <table:table-cell table:style-name="0">
            <text:p text:style-name="s16_fi0">Инструменты и приспособления, применяемые в медицинских целях, прочие, не включенные в другие группировки</text:p>
          </table:table-cell>
          <table:table-cell table:style-name="0">
            <text:p text:style-name="s1_center_fi0"><text:a xlink:type="simple" xlink:href="http://ivo.garant.ru/document/redirect/70650730/325013190">32.50.13.190</text:a></text:p>
          </table:table-cell>
          <table:table-cell table:style-name="0">
            <text:p text:style-name="s1_center_fi0">40</text:p>
          </table:table-cell>
        </table:table-row>
        <table:table-row>
          <table:table-cell table:style-name="0">
            <text:p text:style-name="s1_center_fi0"><text:bookmark text:name="anchor3272"/>272.</text:p>
          </table:table-cell>
          <table:table-cell table:style-name="0">
            <text:p text:style-name="s16_fi0">Стерилизаторы воздушные; стерилизаторы паровые</text:p>
          </table:table-cell>
          <table:table-cell table:style-name="0">
            <text:p text:style-name="s1_fi0"><text:a xlink:type="simple" xlink:href="http://ivo.garant.ru/document/redirect/70650730/325012">32.50.12</text:a></text:p>
          </table:table-cell>
          <table:table-cell table:style-name="0">
            <text:p text:style-name="s1_center_fi0">95</text:p>
          </table:table-cell>
        </table:table-row>
        <table:table-row>
          <table:table-cell table:style-name="0">
            <text:p text:style-name="s1_center_fi0"><text:bookmark text:name="anchor3273"/>273.</text:p>
          </table:table-cell>
          <table:table-cell table:style-name="0">
            <text:p text:style-name="s16_fi0">Инкубаторы для новорожденных</text:p>
          </table:table-cell>
          <table:table-cell table:style-name="0">
            <text:p text:style-name="s1_center_fi0"><text:a xlink:type="simple" xlink:href="http://ivo.garant.ru/document/redirect/70650730/325021160">32.50.21.160</text:a></text:p>
          </table:table-cell>
          <table:table-cell table:style-name="0">
            <text:p text:style-name="s1_center_fi0">30</text:p>
          </table:table-cell>
        </table:table-row>
        <table:table-row>
          <table:table-cell table:style-name="0">
            <text:p text:style-name="s1_center_fi0"><text:bookmark text:name="anchor3274"/>274.</text:p>
          </table:table-cell>
          <table:table-cell table:style-name="0">
            <text:p text:style-name="s16_fi0">Аппараты для ингаляционного наркоза</text:p>
          </table:table-cell>
          <table:table-cell table:style-name="0">
            <text:p text:style-name="s1_center_fi0"><text:a xlink:type="simple" xlink:href="http://ivo.garant.ru/document/redirect/70650730/3250121">32.50.21.121</text:a></text:p>
          </table:table-cell>
          <table:table-cell table:style-name="0">
            <text:p text:style-name="s1_center_fi0">70</text:p>
          </table:table-cell>
        </table:table-row>
        <table:table-row>
          <table:table-cell table:style-name="0">
            <text:p text:style-name="s1_center_fi0"><text:bookmark text:name="anchor3275"/>275.</text:p>
          </table:table-cell>
          <table:table-cell table:style-name="0">
            <text:p text:style-name="s16_fi0">Аппараты искусственной вентиляции легких</text:p>
          </table:table-cell>
          <table:table-cell table:style-name="0">
            <text:p text:style-name="s1_center_fi0"><text:a xlink:type="simple" xlink:href="http://ivo.garant.ru/document/redirect/70650730/3250121">32.50.21.121</text:a></text:p>
            <text:p text:style-name="s1_center_fi0"><text:a xlink:type="simple" xlink:href="http://ivo.garant.ru/document/redirect/70650730/325021122">32.50.21.122</text:a></text:p>
          </table:table-cell>
          <table:table-cell table:style-name="0">
            <text:p text:style-name="s1_center_fi0">70</text:p>
          </table:table-cell>
        </table:table-row>
        <table:table-row>
          <table:table-cell table:style-name="0">
            <text:p text:style-name="s1_center_fi0"><text:bookmark text:name="anchor3276"/>276.</text:p>
          </table:table-cell>
          <table:table-cell table:style-name="0">
            <text:p text:style-name="s16_fi0">Одежда защитная огнестойкая</text:p>
          </table:table-cell>
          <table:table-cell table:style-name="0">
            <text:p text:style-name="s1_center_fi0"><text:a xlink:type="simple" xlink:href="http://ivo.garant.ru/document/redirect/70650730/329911140">32.99.11.140</text:a></text:p>
          </table:table-cell>
          <table:table-cell table:style-name="0">
            <text:p text:style-name="s1_center_fi0">90</text:p>
          </table:table-cell>
        </table:table-row>
        <table:table-row>
          <table:table-cell table:style-name="0">
            <text:p text:style-name="s1_center_fi0"><text:bookmark text:name="anchor3277"/>277.</text:p>
          </table:table-cell>
          <table:table-cell table:style-name="0">
            <text:p text:style-name="s16_fi0">Площадки спортивные для спортивных игр на открытом воздухе</text:p>
          </table:table-cell>
          <table:table-cell table:style-name="0">
            <text:p text:style-name="s1_center_fi0"><text:a xlink:type="simple" xlink:href="http://ivo.garant.ru/document/redirect/70650730/429912110">42.99.12.110</text:a></text:p>
          </table:table-cell>
          <table:table-cell table:style-name="0">
            <text:p text:style-name="s1_center_fi0">55</text:p>
          </table:table-cell>
        </table:table-row>
      </table:table>
      <text:p text:style-name="s1"/>
      <text:p text:style-name="s1_right_fi698"><text:bookmark text:name="anchor4000"/><text:span text:style-name="s10">ПРИЛОЖЕНИЕ N 4
к <text:a xlink:type="simple" xlink:href="#anchor0">постановлению</text:a> Правительства
Российской Федерации
от 23 декабря 2024 г. N 1875</text:span></text:p>
      <text:p text:style-name="s1"/>
      <text:h text:outline-level="1" text:style-name="s3">Предельные значения
доли стоимости используемых для производства одной единицы отдельных медицинских изделий иностранных материалов (сырья) в цене конечной продукции</text:h>
      <text:p text:style-name="s1"/>
      <table:table table:name="9887" table:style-name="9887">
        <table:table-column table:style-name="546"/>
        <table:table-column table:style-name="2719"/>
        <table:table-column table:style-name="2747"/>
        <table:table-column table:style-name="3875"/>
        <table:table-row>
          <table:table-cell table:style-name="13" table:number-columns-spanned="2">
            <table:covered-table-cell/>
            <text:p text:style-name="s1_center_fi0">Наименование медицинского изделия</text:p>
          </table:table-cell>
          <table:table-cell table:style-name="13">
            <text:p text:style-name="s1_center_fi0">Предельное значение доли стоимости используемых для производства одной единицы отдельных медицинских изделий иностранных материалов (сырья) в цене конечной продукции, процентов</text:p>
          </table:table-cell>
          <table:table-cell table:style-name="9">
            <text:p text:style-name="s1_center_fi0">Подтверждающий документ</text:p>
          </table:table-cell>
        </table:table-row>
        <table:table-row>
          <table:table-cell table:style-name="0">
            <text:p text:style-name="s1_center_fi0"><text:bookmark text:name="anchor4001"/>1.</text:p>
          </table:table-cell>
          <table:table-cell table:style-name="0">
            <text:p text:style-name="s16_fi0">Устройства для переливания крови, кровезаменителей и инфузионных растворов</text:p>
          </table:table-cell>
          <table:table-cell table:style-name="0">
            <text:p text:style-name="s1_center_fi0">не более 20</text:p>
          </table:table-cell>
          <table:table-cell table:style-name="0">
            <text:p text:style-name="s16_fi0">сертификат по <text:a xlink:type="simple" xlink:href="http://ivo.garant.ru/document/redirect/2568717/1200">форме СТ-1</text:a> и документ, подтверждающий, что доля стоимости использованных материалов (сырья) иностранного происхождения в цене конечной продукции составляет не более 20% для каждого наименования медицинского изделия</text:p>
          </table:table-cell>
        </table:table-row>
        <table:table-row>
          <table:table-cell table:style-name="0">
            <text:p text:style-name="s1_center_fi0"><text:bookmark text:name="anchor4002"/>2.</text:p>
          </table:table-cell>
          <table:table-cell table:style-name="0">
            <text:p text:style-name="s16_fi0">Контейнеры для заготовки, хранения и транспортирования донорской крови и ее компонентов</text:p>
          </table:table-cell>
          <table:table-cell table:style-name="0">
            <text:p text:style-name="s1_center_fi0">не более 10</text:p>
          </table:table-cell>
          <table:table-cell table:style-name="0">
            <text:p text:style-name="s16_fi0">сертификат по <text:a xlink:type="simple" xlink:href="http://ivo.garant.ru/document/redirect/2568717/1200">форме СТ-1</text:a> и документ, подтверждающий, что доля стоимости использованных материалов (сырья) иностранного происхождения в цене конечной продукции составляет не более 10% для каждого наименования медицинского изделия</text:p>
          </table:table-cell>
        </table:table-row>
        <table:table-row>
          <table:table-cell table:style-name="0">
            <text:p text:style-name="s1_center_fi0"><text:bookmark text:name="anchor4003"/>3.</text:p>
          </table:table-cell>
          <table:table-cell table:style-name="0">
            <text:p text:style-name="s16_fi0">Расходные материалы для аппаратов искусственной вентиляции легких</text:p>
          </table:table-cell>
          <table:table-cell table:style-name="0">
            <text:p text:style-name="s1_center_fi0">не более 10</text:p>
          </table:table-cell>
          <table:table-cell table:style-name="0">
            <text:p text:style-name="s16_fi0">сертификат по <text:a xlink:type="simple" xlink:href="http://ivo.garant.ru/document/redirect/2568717/1200">форме СТ-1</text:a> и документ, подтверждающий, что доля стоимости использованных материалов (сырья) иностранного происхождения в цене конечной продукции составляет не более 10% для каждого наименования медицинского изделия</text:p>
          </table:table-cell>
        </table:table-row>
        <table:table-row>
          <table:table-cell table:style-name="0">
            <text:p text:style-name="s1_center_fi0"><text:bookmark text:name="anchor4004"/>4.</text:p>
          </table:table-cell>
          <table:table-cell table:style-name="0">
            <text:p text:style-name="s16_fi0">Расходные материалы для аппаратов донорского плазмафереза/ тромбоцитафереза</text:p>
          </table:table-cell>
          <table:table-cell table:style-name="0">
            <text:p text:style-name="s1_center_fi0">не более 40</text:p>
          </table:table-cell>
          <table:table-cell table:style-name="0">
            <text:p text:style-name="s16_fi0">сертификат по <text:a xlink:type="simple" xlink:href="http://ivo.garant.ru/document/redirect/2568717/1200">форме СТ-1</text:a> и документ, подтверждающий, что доля стоимости использованных материалов (сырья) иностранного происхождения в цене конечной продукции составляет не более 40% для каждого наименования медицинского изделия</text:p>
          </table:table-cell>
        </table:table-row>
        <table:table-row>
          <table:table-cell table:style-name="0">
            <text:p text:style-name="s1_center_fi0"><text:bookmark text:name="anchor4005"/>5.</text:p>
          </table:table-cell>
          <table:table-cell table:style-name="0">
            <text:p text:style-name="s16_fi0">Расходные материалы для аппаратов искусственного (экстракорпорального) кровообращения</text:p>
          </table:table-cell>
          <table:table-cell table:style-name="0">
            <text:p text:style-name="s1_center_fi0">не более 40</text:p>
          </table:table-cell>
          <table:table-cell table:style-name="0">
            <text:p text:style-name="s16_fi0">сертификат по <text:a xlink:type="simple" xlink:href="http://ivo.garant.ru/document/redirect/2568717/1200">форме СТ-1</text:a> и документ, подтверждающий, что доля стоимости использованных материалов (сырья) иностранного происхождения в цене конечной продукции составляет не более 40% для каждого наименования медицинского изделия</text:p>
          </table:table-cell>
        </table:table-row>
        <table:table-row>
          <table:table-cell table:style-name="0">
            <text:p text:style-name="s1_center_fi0"><text:bookmark text:name="anchor4006"/>6.</text:p>
          </table:table-cell>
          <table:table-cell table:style-name="0">
            <text:p text:style-name="s16_fi0">Мочеприемники и калоприемники</text:p>
          </table:table-cell>
          <table:table-cell table:style-name="0">
            <text:p text:style-name="s1_center_fi0">не более 20</text:p>
          </table:table-cell>
          <table:table-cell table:style-name="0">
            <text:p text:style-name="s16_fi0">сертификат по <text:a xlink:type="simple" xlink:href="http://ivo.garant.ru/document/redirect/2568717/1200">форме СТ-1</text:a> и документ, подтверждающий, что доля стоимости использованных материалов (сырья) иностранного происхождения в цене конечной продукции составляет не более 20% для каждого наименования медицинского изделия</text:p>
          </table:table-cell>
        </table:table-row>
      </table:table>
      <text:p text:style-name="s1"/>
      <text:p text:style-name="s1_right_fi698"><text:bookmark text:name="anchor5000"/><text:span text:style-name="s10">УТВЕРЖДЕНО
<text:a xlink:type="simple" xlink:href="#anchor0">постановлением</text:a> Правительства
Российской Федерации
от 23 декабря 2024 г. N 1875</text:span></text:p>
      <text:p text:style-name="s1"/>
      <text:h text:outline-level="1" text:style-name="s3">Положение
о требованиях к форме и содержанию отчета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о порядке формирования и размещения такого отчета в единой информационной системе в сфере закупок товаров, работ, услуг для обеспечения государственных и муниципальных нужд, на официальном сайте единой информационной системы в сфере закупок товаров, работ, услуг для обеспечения государственных и муниципальных нужд в информационно-телекоммуникационной сети "Интернет", о порядке предоставления федеральному органу исполнительной власти, указанному в части 7 статьи 14 Федерального закона "О контрактной системе в сфере закупок товаров, работ, услуг для обеспечения государственных и муниципальных нужд" и части 7 статьи 3<text:span text:style-name="upper"><text:span> 1-4</text:span></text:span> Федерального закона "О закупках товаров, работ, услуг отдельными видами юридических лиц", доступа к информации, содержащейся в таких отчетах, размещенных в единой информационной системе в сфере закупок товаров, работ, услуг для обеспечения государственных и муниципальных нужд, о порядке рассмотрения таких отчетов и оценки результатов осуществления в отчетном году указанных закупок этим федеральным органом исполнительной власти</text:h>
      <text:p text:style-name="s52header">С изменениями и дополнениями от:</text:p>
      <text:p text:style-name="s52">10 июня 2025 г., 30 декабря 2025 г.</text:p>
      <text:p text:style-name="s1"/>
      <text:h text:outline-level="1" text:style-name="s3"><text:bookmark text:name="anchor5100"/>I. Общие положения</text:h>
      <text:p text:style-name="s1"/>
      <text:p text:style-name="s1"><text:bookmark text:name="anchor5001"/>1. Настоящее Положение устанавливает требования к <text:a xlink:type="simple" xlink:href="#anchor51000">форме</text:a> и содержанию отчета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далее соответственно - отчет, российские лица), порядок формирования и размещения отчета в единой информационной системе в сфере закупок товаров, работ, услуг для обеспечения государственных и муниципальных нужд (далее - единая информационная система), на <text:a xlink:type="simple" xlink:href="https://zakupki.gov.ru">официальном сайте</text:a> единой информационной системы в информационно-телекоммуникационной сети "Интернет" (далее - официальный сайт), порядок предоставления федеральному органу исполнительной власти, указанному в <text:a xlink:type="simple" xlink:href="http://ivo.garant.ru/document/redirect/70353464/147">части 7 статьи 14</text:a> Федерального закона "О контрактной системе в сфере закупок товаров, работ, услуг для обеспечения государственных и муниципальных нужд" и <text:a xlink:type="simple" xlink:href="http://ivo.garant.ru/document/redirect/12188083/31407">части 7 статьи 3<text:span text:style-name="upper"><text:span> 1-4</text:span></text:span></text:a> Федерального закона "О закупках товаров, работ, услуг отдельными видами юридических лиц" (далее - уполномоченный орган), доступа к информации, содержащейся в отчетах, размещенных в единой информационной системе, порядок рассмотрения отчетов и оценки результатов осуществления в отчетном году таких закупок уполномоченным органом.</text:p>
      <text:p text:style-name="s1"><text:bookmark text:name="anchor5002"/>2. Отчетным периодом при формировании в соответствии с настоящим Положением отчета является календарный год - с 1 января по 31 декабря включительно (далее - отчетный год).</text:p>
      <text:p text:style-name="s1"/>
      <text:h text:outline-level="1" text:style-name="s3"><text:bookmark text:name="anchor5200"/>II. Требования к форме и содержанию отчета</text:h>
      <text:p text:style-name="s1"/>
      <text:p text:style-name="s1"><text:bookmark text:name="anchor5003"/>3. Отчет формируется в соответствии с настоящим Положением по форме согласно <text:a xlink:type="simple" xlink:href="#anchor51000">приложению N 1</text:a>.</text:p>
      <text:p text:style-name="s1"><text:bookmark text:name="anchor5004"/>4. В <text:a xlink:type="simple" xlink:href="#anchor51100">разделе 1</text:a> приложения N 1 к настоящему Положению указывается следующая информация о заказчике:</text:p>
      <text:p text:style-name="s1"><text:bookmark text:name="anchor5041"/>а) полное наименование;</text:p>
      <text:p text:style-name="s1"><text:bookmark text:name="anchor5042"/>б) идентификационный номер налогоплательщика;</text:p>
      <text:p text:style-name="s1"><text:bookmark text:name="anchor5043"/>в) код причины постановки на учет в налоговом органе;</text:p>
      <text:p text:style-name="s1"><text:bookmark text:name="anchor5044"/>г) организационно-правовая форма с указанием кода организационно-правовой формы в соответствии с <text:a xlink:type="simple" xlink:href="http://ivo.garant.ru/document/redirect/70284934/0">Общероссийским классификатором</text:a> организационно-правовых форм;</text:p>
      <text:p text:style-name="s1"><text:bookmark text:name="anchor5045"/>д) форма собственности с указанием кода формы собственности в соответствии с <text:a xlink:type="simple" xlink:href="http://ivo.garant.ru/document/redirect/12117985/0">Общероссийским классификатором</text:a> форм собственности;</text:p>
      <text:p text:style-name="s1"><text:bookmark text:name="anchor5046"/>е) место нахождения с указанием кода территории населенного пункта в соответствии с <text:a xlink:type="simple" xlink:href="http://ivo.garant.ru/document/redirect/70465940/0">Общероссийским классификатором</text:a> территорий муниципальных образований, телефон и адрес электронной почты;</text:p>
      <text:p text:style-name="s1"><text:bookmark text:name="anchor5047"/>ж) полное наименование, идентификационный номер налогоплательщика, код причины постановки на учет в налоговом органе, место нахождения с указанием кода территории населенного пункта в соответствии с <text:a xlink:type="simple" xlink:href="http://ivo.garant.ru/document/redirect/70465940/0">Общероссийским классификатором</text:a> территорий муниципальных образований, телефон и адрес электронной почты бюджетного, автономного учреждения, государственного, муниципального унитарного предприятия, иного юридического лица, которому переданы полномочия государственного, муниципального заказчика (указываются в отчете, содержащем информацию о закупках, осуществляемых в рамках указанных полномочий);</text:p>
      <text:p text:style-name="s1"><text:bookmark text:name="anchor5048"/>з) код вида формируемого документа, принимающий значения "01 - основной документ" или "02 - изменения к документу".</text:p>
      <text:p text:style-name="s1"><text:bookmark text:name="anchor5005"/>5. В <text:a xlink:type="simple" xlink:href="#anchor51200">разделе 2</text:a> приложения N 1 к настоящему Положению:</text:p>
      <text:p text:style-name="s1"><text:bookmark text:name="anchor5051"/>а) в <text:a xlink:type="simple" xlink:href="#anchor51210">графах 2</text:a> и 3 с учетом <text:a xlink:type="simple" xlink:href="#anchor5071">подпунктов "а"</text:a> и <text:a xlink:type="simple" xlink:href="#anchor5072">"б" пункта 7</text:a> настоящего Положения указываются наименование товара и его код по Общероссийскому классификатору продукции по видам экономической деятельности <text:a xlink:type="simple" xlink:href="http://ivo.garant.ru/document/redirect/70650730/0">ОК 034-2014 (КПЕС 2008)</text:a> в отношении товаров, приемка которых осуществлена, в том числе при выполнении закупаемых работ, оказании закупаемых услуг, в отчетном году;</text:p>
      <text:p text:style-name="s1"><text:bookmark text:name="anchor5052"/>б) в <text:a xlink:type="simple" xlink:href="#anchor51210">графе 4</text:a> указывается стоимостной объем поставленного товара, указываемого в графе 2 и в отношении которого в отчетном году в реестр контрактов, заключенных заказчиками, или реестр договоров, заключенных заказчиками, включена информация о его приемке (в том числе поставляемого при выполнении закупаемых работ, оказании закупаемых услуг);</text:p>
      <text:p text:style-name="s1"><text:bookmark text:name="anchor5053"/>в) в <text:a xlink:type="simple" xlink:href="#anchor51210">графе 5</text:a> указывается стоимостной объем поставленного товара российского происхождения, в отношении которого в отчетном году в реестр контрактов, заключенных заказчиками, или реестр договоров, заключенных заказчиками, включена информация о его приемке (в том числе товаров, поставляемых при выполнении закупаемых работ, оказании закупаемых услуг);</text:p>
      <text:p text:style-name="s1"><text:bookmark text:name="anchor5054"/>г) в <text:a xlink:type="simple" xlink:href="#anchor51210">графе 6</text:a> указывается (указываются) номер (номера) реестровой записи (реестровых записей) из реестра контрактов, заключенных заказчиками, или реестра договоров, заключенных заказчиками, в отношении контракта (контрактов) или договора (договоров), при исполнении которого (которых) в отчетном году в такие реестры включена информация о приемке товара, указанного в графе 2;</text:p>
      <text:p text:style-name="s1"><text:bookmark text:name="anchor5055"/>д) в <text:a xlink:type="simple" xlink:href="#anchor51210">графе 7</text:a> в отношении товара, указанного в графе 3, указывается размер установленной минимальной обязательной доли закупок товаров российского происхождения в соответствии с <text:a xlink:type="simple" xlink:href="#anchor3000">приложением N 3</text:a> к постановлению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 (далее - постановление Правительства Российской Федерации от 23 декабря 2024 г. N 1875);</text:p>
      <text:p text:style-name="s1"><text:bookmark text:name="anchor5056"/>е) в <text:a xlink:type="simple" xlink:href="#anchor51210">графе 8</text:a> указывается размер достигнутой доли закупок товаров российского происхождения, который рассчитывается путем деления стоимостного объема поставленного товара, указанного в графе 5, на стоимостной объем поставленного товара, указанный в графе 4, и последующего умножения на 100. Если в графе 6 указано несколько номеров реестровых записей из реестра договоров, заключенных заказчиками, осуществляется деление суммы стоимостных объемов поставленного товара, указанных в графе 5 по всем договорам, уникальные реестровые номера которых указаны в графе 6, на сумму стоимостных объемов поставленного товара, указанных в графе 4 по всем таким договорам.</text:p>
      <text:p text:style-name="s1"><text:bookmark text:name="anchor5006"/>6. В <text:a xlink:type="simple" xlink:href="#anchor51300">разделе 3</text:a> приложения N 1 к настоящему Положению:</text:p>
      <text:p text:style-name="s1"><text:bookmark text:name="anchor5061"/>а) в <text:a xlink:type="simple" xlink:href="#anchor51310">графе 1</text:a> указывается номер по порядку;</text:p>
      <text:p text:style-name="s1"><text:bookmark text:name="anchor5062"/>б) в <text:a xlink:type="simple" xlink:href="#anchor51310">графах 2</text:a> и 3 с учетом <text:a xlink:type="simple" xlink:href="#anchor5071">подпунктов "а"</text:a> и <text:a xlink:type="simple" xlink:href="#anchor5072">"б" пункта 7</text:a> настоящего Положения указываются наименование работы, услуги и их код по Общероссийскому классификатору продукции по видам экономической деятельности <text:a xlink:type="simple" xlink:href="http://ivo.garant.ru/document/redirect/70650730/0">ОК 034-2014 (КПЕС 2008)</text:a> в отношении работ, услуг, приемка которых осуществлена в отчетном году;</text:p>
      <text:p text:style-name="s1"><text:bookmark text:name="anchor5063"/>в) в <text:a xlink:type="simple" xlink:href="#anchor51310">графе 4</text:a> указывается стоимостной объем выполненных работ, оказанных услуг, указываемых в графе 2 и в отношении которых в отчетном году в реестр контрактов, заключенных заказчиками, или реестр договоров, заключенных заказчиками, включена информация о приемке, за исключением стоимостного объема товаров, поставленных при выполнении таких работ, оказании таких услуг;</text:p>
      <text:p text:style-name="s1"><text:bookmark text:name="anchor5064"/>г) в <text:a xlink:type="simple" xlink:href="#anchor51310">графе 5</text:a> указывается стоимостной объем работ, услуг, выполненных, оказанных соответственно российскими лицами, в отношении которых в отчетном году в реестр контрактов, заключенных заказчиками, или реестр договоров, заключенных заказчиками, включена информация о приемке, за исключением стоимостного объема товаров, поставленных при выполнении таких работ, оказании таких услуг;</text:p>
      <text:p text:style-name="s1"><text:bookmark text:name="anchor5065"/>д) в <text:a xlink:type="simple" xlink:href="#anchor51310">графе 6</text:a> указывается (указываются) номер (номера) реестровой записи (реестровых записей) из реестра контрактов, заключенных заказчиками, или реестра договоров, заключенных заказчиками, в отношении контракта (контрактов) или договора (договоров), при исполнении которого (которых) в отчетном году в такие реестры включена информация о приемке работ, услуг, указанных в графе 2.</text:p>
      <text:p text:style-name="s1"><text:bookmark text:name="anchor5007"/>7. Информация, предусмотренная <text:a xlink:type="simple" xlink:href="#anchor5004">пунктами 4 - 6</text:a> настоящего Положения, формируется в соответствии со следующими требованиями:</text:p>
      <text:p text:style-name="s1"><text:bookmark text:name="anchor5071"/>а) при формировании отчета товары, происходящие из государств - членов Евразийского экономического союза, учитываются в составе товаров российского происхождения;</text:p>
      <text:p text:style-name="s1"><text:bookmark text:name="anchor5072"/>б) при формировании отчета заказчика, осуществлявшего в отчетном году закупк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информация, предусмотренная <text:a xlink:type="simple" xlink:href="#anchor5004">пунктом 4</text:a> настоящего Положения, формируется автоматически в соответствии со сведениями, включенными в реестр участников бюджетного процесса, а также юридических лиц, не являющихся участниками бюджетного процесса;</text:p>
      <text:p text:style-name="s1"><text:bookmark text:name="anchor5073"/>в) при формировании отчета заказчика, осуществлявшего в отчетном году закупки в соответствии с <text:a xlink:type="simple" xlink:href="http://ivo.garant.ru/document/redirect/12188083/0">Федеральным законом</text:a> "О закупках товаров, работ, услуг отдельными видами юридических лиц", информация, предусмотренная <text:a xlink:type="simple" xlink:href="#anchor5004">пунктом 4</text:a> настоящего Положения, формируется автоматически в соответствии со сведениями, включенными в реестр заказчиков, зарегистрированных в единой информационной системе;</text:p>
      <text:p text:style-name="s1"><text:bookmark text:name="anchor5074"/>г) в случае возложения в соответствии со <text:a xlink:type="simple" xlink:href="http://ivo.garant.ru/document/redirect/70353464/26">статьей 26</text:a> Федерального закона "О контрактной системе в сфере закупок товаров, работ, услуг для обеспечения государственных и муниципальных нужд" полномочий по исполнению контрактов, в том числе по приемке поставленных товаров, выполненных работ (их результатов), оказанных услуг, на государственный орган, муниципальный орган, казенное учреждение формирование отчета осуществляется государственным органом, муниципальным органом, казенным учреждением соответственно. В этом случае к таким органам, учреждению применяются положения настоящего Положения, касающиеся заказчика;</text:p>
      <text:p text:style-name="s1"><text:bookmark text:name="anchor5075"/>д) в случае передачи в соответствии с <text:a xlink:type="simple" xlink:href="http://ivo.garant.ru/document/redirect/12112604/0">Бюджетным кодексом</text:a> Российской Федерации полномочий государственного, муниципального заказчика бюджетному, автономному учреждению, государственному, муниципальному унитарному предприятию или иному юридическому лицу формирование отчета осуществляется бюджетным, автономным учреждением, государственным, муниципальным унитарным предприятием или иным юридическим лицом соответственно от лица соответствующего органа или организации, являющихся государственными, муниципальными заказчиками и передавших им указанные полномочия;</text:p>
      <text:p text:style-name="s1"><text:bookmark text:name="anchor5076"/>е) если заказчиком в отчетном году осуществлялись закупки как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так и в соответствии с <text:a xlink:type="simple" xlink:href="http://ivo.garant.ru/document/redirect/12188083/0">Федеральным законом</text:a> "О закупках товаров, работ, услуг отдельными видами юридических лиц", такой заказчик формирует в соответствии с настоящим Положением отдельный отчет в отношении закупок в соответствии с Федеральным законом "О контрактной системе в сфере закупок товаров, работ, услуг для обеспечения государственных и муниципальных нужд" и отдельный отчет в отношении закупок в соответствии с Федеральным законом "О закупках товаров, работ, услуг отдельными видами юридических лиц";</text:p>
      <text:p text:style-name="s1"><text:bookmark text:name="anchor5077"/>ж) предусмотренные <text:a xlink:type="simple" xlink:href="#anchor5051">подпунктом "а" пункта 5</text:a>, <text:a xlink:type="simple" xlink:href="#anchor5062">подпунктом "б" пункта 6</text:a> настоящего Положения наименование и код указываются в соответствии с наименованием товара, работы, услуги и их кодом по Общероссийскому классификатору продукции по видам экономической деятельности <text:a xlink:type="simple" xlink:href="http://ivo.garant.ru/document/redirect/70650730/0">ОК 034-2014 (КПЕС 2008)</text:a>, содержащимися в <text:a xlink:type="simple" xlink:href="#anchor1000">приложениях N 1</text:a> и <text:a xlink:type="simple" xlink:href="#anchor2000">2</text:a> к постановлению Правительства Российской Федерации от 23 декабря 2024 г. N 1875, за исключением случаев, предусмотренных <text:a xlink:type="simple" xlink:href="#anchor5075">подпунктами "д"</text:a> и <text:a xlink:type="simple" xlink:href="#anchor5076">"е"</text:a> настоящего пункта;</text:p>
      <text:p text:style-name="s22header">Информация об изменениях:</text:p>
      <text:p text:style-name="s22"><text:bookmark text:name="anchor5078"/>Подпункт "з" изменен с 1 января 2026 г. - <text:a xlink:type="simple" xlink:href="http://ivo.garant.ru/document/redirect/413396332/1161">Постановление</text:a> Правительства России от 30 декабря 2025 г. № 2225</text:p>
      <text:p text:style-name="s22"><text:a xlink:type="simple" xlink:href="http://ivo.garant.ru/document/redirect/76849700/5078">См. предыдущую редакцию</text:a></text:p>
      <text:p text:style-name="s1">з) предусмотренные <text:a xlink:type="simple" xlink:href="#anchor5051">подпунктом "а" пункта 5</text:a> настоящего Положения наименование и код товара указываются отдельными заказчиками, указанными в <text:a xlink:type="simple" xlink:href="#anchor4112">абзаце втором подпункта "л" пункта 4</text:a> постановления Правительства Российской Федерации от 23 декабря 2024 г. № 1875, в соответствии с наименованием товара и его кодом, содержащимися в <text:a xlink:type="simple" xlink:href="#anchor3000">приложении N 3</text:a> к постановлению Правительства Российской Федерации от 23 декабря 2024 г. N 1875;</text:p>
      <text:p text:style-name="s1"><text:bookmark text:name="anchor5079"/>и) если информация и документы о контракте или договоре не подлежат включению в реестр контрактов, заключенных заказчиками, или реестр договоров, заключенных заказчиками, в <text:a xlink:type="simple" xlink:href="#anchor51210">графе 6 раздела 2</text:a>, <text:a xlink:type="simple" xlink:href="#anchor51310">графе 6 раздела 3</text:a> приложения N 1 к настоящему Положению указываются номер контракта или договора и дата его заключения;</text:p>
      <text:p text:style-name="s1"><text:bookmark text:name="anchor5710"/>к) если в <text:a xlink:type="simple" xlink:href="#anchor51210">графе 6 раздела 2</text:a>, <text:a xlink:type="simple" xlink:href="#anchor51310">графе 6 раздела 3</text:a> приложения N 1 к настоящему Положению указано несколько уникальных номеров реестровых записей из реестра контрактов, заключенных заказчиками, или реестра договоров, заключенных заказчиками, в графах 4 и 5 раздела 2 и в графах 4 и 5 раздела 3 приложения N 1 к настоящему Положению указывается общий объем по таким контрактам или договорам;</text:p>
      <text:p text:style-name="s1"><text:bookmark text:name="anchor5711"/>л) <text:a xlink:type="simple" xlink:href="#anchor51210">графы 7</text:a> и 8 раздела 2 приложения N 1 к настоящему Положению не включаются в отчет заказчика, не относящегося к числу отдельных заказчиков, указанных в <text:a xlink:type="simple" xlink:href="#anchor5078">подпункте "з"</text:a> настоящего пункта;</text:p>
      <text:p text:style-name="s1"><text:bookmark text:name="anchor5712"/>м) <text:a xlink:type="simple" xlink:href="#anchor51300">раздел 3</text:a> приложения N 1 в отчет заказчика из числа отдельных заказчиков, указанных в <text:a xlink:type="simple" xlink:href="#anchor5078">подпункте "з"</text:a> настоящего пункта, не включается;</text:p>
      <text:p text:style-name="s22header">Информация об изменениях:</text:p>
      <text:p text:style-name="s22"><text:bookmark text:name="anchor5713"/>Пункт 7 дополнен подпунктом "н" с 19 июня 2025 г. - <text:a xlink:type="simple" xlink:href="http://ivo.garant.ru/document/redirect/412162530/1510">Постановление</text:a> Правительства России от 10 июня 2025 г. № 879</text:p>
      <text:p text:style-name="s1">н) в <text:a xlink:type="simple" xlink:href="#anchor51210">графах 4 - 6 раздела 2</text:a> приложения № 1 к настоящему Положению не учитываются в отчете заказчика из числа отдельных заказчиков, указанных в <text:a xlink:type="simple" xlink:href="#anchor5078">подпункте "з"</text:a> настоящего пункта, указанные в <text:a xlink:type="simple" xlink:href="#anchor5052">подпунктах "б" - "г" пункта 5</text:a> настоящего Положения стоимостные объемы и номер (номера) реестровой записи (реестровых записей) в отношении:</text:p>
      <text:p text:style-name="s1">закупки товара (в том числе поставляемого при выполнении закупаемых работ, оказании закупаемых услуг) в целях исполнения контракта (договора), содержащего условие о поставке или использовании такого товара и заключенного с лицом, которое не является заказчиком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и <text:a xlink:type="simple" xlink:href="http://ivo.garant.ru/document/redirect/12188083/0">Федеральным законом</text:a> "О закупках товаров, работ, услуг отдельными видами юридических лиц", либо заключенного с лицом, которое относится к числу таких заказчиков и при осуществлении закупки которым не применены в случаях, предусмотренных указанными федеральными законами, <text:a xlink:type="simple" xlink:href="#anchor0">постановлением</text:a> Правительства Российской Федерации от 23 декабря 2024 г. № 1875, запрет, ограничение или преимущество, либо заключенного до 1 января 2025 г. с лицом, которое относится к числу таких заказчиков;</text:p>
      <text:p text:style-name="s1">закупки товара (в том числе поставляемого при выполнении закупаемых работ, оказании закупаемых услуг) в целях изготовления, ремонта, модернизации, технического и сервисного обслуживания вооружения, военной и специальной техники (их составных частей), изготавливаемых по нормативно-технической документации (или указанных в такой документации), утвержденной (согласованной) в установленном порядке (государственным заказчиком государственного оборонного заказа либо военным представительством Министерства обороны Российской Федерации или иного государственного заказчика, уполномоченным осуществлять деятельность в организации, осуществляющей закупку такого товара) и (или) передаваемой заказчику, осуществляющему закупку такого товара, государственным заказчиком государственного оборонного заказа, головным исполнителем поставок продукции по государственному оборонному заказу, исполнителем, участвующим в поставках продукции по государственному оборонному заказу (в том числе для целей выполнения закупаемых работ, оказания закупаемых услуг);</text:p>
      <text:p text:style-name="s1"><text:bookmark text:name="anchor57134"/>для служебного пользования;</text:p>
      <text:p text:style-name="s1"><text:bookmark text:name="anchor57135"/>для служебного пользования;</text:p>
      <text:p text:style-name="s1">закупки товара (в том числе поставляемого при выполнении закупаемых работ, оказании закупаемых услуг), не относящегося к товарам, указанным в <text:a xlink:type="simple" xlink:href="#anchor3002">позициях 2</text:a>, <text:a xlink:type="simple" xlink:href="#anchor3005">5</text:a>, <text:a xlink:type="simple" xlink:href="#anchor3006">6</text:a>, <text:a xlink:type="simple" xlink:href="#anchor3013">13</text:a>, <text:a xlink:type="simple" xlink:href="#anchor3014">14</text:a>, <text:a xlink:type="simple" xlink:href="#anchor3016">16</text:a>, <text:a xlink:type="simple" xlink:href="#anchor3018">18</text:a>, <text:a xlink:type="simple" xlink:href="#anchor3019">19</text:a>, <text:a xlink:type="simple" xlink:href="#anchor3234">234</text:a> и <text:a xlink:type="simple" xlink:href="#anchor3271">271</text:a> приложения № 3 к <text:a xlink:type="simple" xlink:href="#anchor0">постановлению</text:a> Правительства Российской Федерации от 23 декабря 2024 г. № 1875, в целях исполнения таким отдельным заказчиком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и <text:a xlink:type="simple" xlink:href="http://ivo.garant.ru/document/redirect/12188083/0">Федеральным законом</text:a> "О закупках товаров, работ, услуг отдельными видами юридических лиц" обязательств, предусмотренных специальным инвестиционным контрактом, стороной которого является такой отдельный заказчик;</text:p>
      <text:p text:style-name="s1">закупки товара, поставляемого при выполнении закупаемых работ, оказании закупаемых услуг по изготовлению такого товара по индивидуальному заказу такого отдельного заказчика, осуществляющего закупку;</text:p>
      <text:p text:style-name="s1">закупки, при которой заключается контракт (договор) со встречными инвестиционными обязательствами, предусматривающий поставку товара, произведенного исключительно на создаваемом, модернизируемом, осваиваемом в соответствии с таким контрактом (договором) производстве.</text:p>
      <text:p text:style-name="s1"/>
      <text:h text:outline-level="1" text:style-name="s3"><text:bookmark text:name="anchor5300"/>III. Формирование и размещение отчета в единой информационной системе, на официальном сайте</text:h>
      <text:p text:style-name="s1"/>
      <text:p text:style-name="s1"><text:bookmark text:name="anchor5008"/>8. Отчет формируется в единой информационной системе не позднее 15 января года, следующего за отчетным, путем обработки содержащейся в единой информационной системе информации, включенной в реестр контрактов, заключенных заказчиками, в том числе в части содержащейся в указанном реестре информации, не подлежащей размещению на <text:a xlink:type="simple" xlink:href="https://zakupki.gov.ru">официальном сайте</text:a>.</text:p>
      <text:p text:style-name="s1"><text:bookmark text:name="anchor5009"/>9. Заказчик не позднее 31 января года, следующего за отчетным:</text:p>
      <text:p text:style-name="s1"><text:bookmark text:name="anchor5091"/>а) включает в отчет информацию в отношении осуществленных заказчиком в отчетном году закупок, информация о которых не подлежит размещению в единой информационной системе (при наличии таких закупок);</text:p>
      <text:p text:style-name="s1"><text:bookmark text:name="anchor5092"/>б) подписывает отчет усиленной квалифицированной <text:a xlink:type="simple" xlink:href="http://ivo.garant.ru/document/redirect/12184522/21">электронной подписью</text:a> лица, имеющего право действовать от имени заказчика.</text:p>
      <text:p text:style-name="s1"><text:bookmark text:name="anchor5010"/>10. Размещение отчета в единой информационной системе осуществляется автоматически не позднее одного часа с момента его подписания.</text:p>
      <text:p text:style-name="s1"><text:bookmark text:name="anchor5011"/>11. На <text:a xlink:type="simple" xlink:href="https://zakupki.gov.ru">официальном сайте</text:a> не размещаются:</text:p>
      <text:p text:style-name="s1"><text:bookmark text:name="anchor5111"/>а) отчеты заказчиков, предусмотренных в <text:a xlink:type="simple" xlink:href="http://ivo.garant.ru/document/redirect/70353464/2401151">подпунктах "а"</text:a> и <text:a xlink:type="simple" xlink:href="http://ivo.garant.ru/document/redirect/70353464/2401152">"б" пункта 5 части 11 статьи 24</text:a> Федерального закона "О контрактной системе в сфере закупок товаров, работ, услуг для обеспечения государственных и муниципальных нужд";</text:p>
      <text:p text:style-name="s1"><text:bookmark text:name="anchor5112"/>б) отчеты заказчиков из числа юридических лиц, указанных в <text:a xlink:type="simple" xlink:href="http://ivo.garant.ru/document/redirect/12188083/12">части 2 статьи 1</text:a> Федерального закона "О закупках товаров, работ, услуг отдельными видами юридических лиц", осуществлявших в отчетном году хотя бы одну закупку, информация о которой не подлежит размещению в единой информационной системе в соответствии с <text:a xlink:type="simple" xlink:href="http://ivo.garant.ru/document/redirect/12188083/415">частью 15 статьи 4</text:a> Федерального закона "О закупках товаров, работ, услуг отдельными видами юридических лиц" или на <text:a xlink:type="simple" xlink:href="https://zakupki.gov.ru">официальном сайте</text:a> в соответствии с <text:a xlink:type="simple" xlink:href="http://ivo.garant.ru/document/redirect/12188083/416">частью 16 статьи 4</text:a> указанного Федерального закона.</text:p>
      <text:p text:style-name="s1"/>
      <text:h text:outline-level="1" text:style-name="s3"><text:bookmark text:name="anchor5400"/>IV. Рассмотрение отчетов и оценка результатов осуществления в отчетном году закупок товаров российского происхождения, работ, услуг, соответственно выполняемых, оказываемых российскими лицами, уполномоченным органом</text:h>
      <text:p text:style-name="s1"/>
      <text:p text:style-name="s1"><text:bookmark text:name="anchor5012"/>12. Уполномоченному органу в единой информационной системе предоставляется доступ к информации о совокупном объеме закупок товаров российского происхождения, работ, услуг, соответственно выполняемых, оказываемых российскими лицами, формируемой в единой информационной системе автоматически по форме согласно <text:a xlink:type="simple" xlink:href="#anchor52000">приложению N 2</text:a> путем обработки размещенных в соответствии с настоящим Положением в единой информационной системе отчетов заказчиков.</text:p>
      <text:p text:style-name="s1"><text:bookmark text:name="anchor5013"/>13. В <text:a xlink:type="simple" xlink:href="#anchor52000">приложении N 2</text:a> к настоящему Положению:</text:p>
      <text:p text:style-name="s1"><text:bookmark text:name="anchor5131"/>а) в <text:a xlink:type="simple" xlink:href="#anchor521110">графах 2</text:a> и 3 подраздела 1, <text:a xlink:type="simple" xlink:href="#anchor521210">графах 2</text:a> и 3 подраздела 2 раздела I, <text:a xlink:type="simple" xlink:href="#anchor522110">графах 2</text:a> и 3 подраздела 1, <text:a xlink:type="simple" xlink:href="#anchor522310">графах 2</text:a> и 3 подраздела 3 раздела II наименование и код формируются в соответствии с наименованием товара, работы, услуги и их кодом по Общероссийскому классификатору продукции по видам экономической деятельности <text:a xlink:type="simple" xlink:href="http://ivo.garant.ru/document/redirect/70650730/0">ОК 034-2014 (КПЕС 2008)</text:a>, содержащимися в <text:a xlink:type="simple" xlink:href="#anchor1000">приложениях N 1</text:a> и <text:a xlink:type="simple" xlink:href="#anchor2000">2</text:a> к постановлению Правительства Российской Федерации от 23 декабря 2024 г. N 1875;</text:p>
      <text:p text:style-name="s1"><text:bookmark text:name="anchor5132"/>б) в <text:a xlink:type="simple" xlink:href="#anchor522210">графах 2</text:a> и 3 подраздела 2 раздела II наименование и код формируются в соответствии с наименованием товара, работы, услуги и их кодом по Общероссийскому классификатору продукции по видам экономической деятельности <text:a xlink:type="simple" xlink:href="http://ivo.garant.ru/document/redirect/70650730/0">ОК 034-2014 (КПЕС 2008)</text:a>, содержащимися в <text:a xlink:type="simple" xlink:href="#anchor3000">приложении N 3</text:a> к постановлению Правительства Российской Федерации от 23 декабря 2024 г. N 1875;</text:p>
      <text:p text:style-name="s1"><text:bookmark text:name="anchor5133"/>в) совокупные стоимостные объемы в <text:a xlink:type="simple" xlink:href="#anchor521110">графах 4</text:a> и 5 подраздела 1, <text:a xlink:type="simple" xlink:href="#anchor521210">графах 4</text:a> и 5 подраздела 2 раздела I формируются путем суммирования соответствующих стоимостных объемов, содержащихся в отчетах заказчиков, осуществлявших в отчетном году закупки в соответствии с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text:p>
      <text:p text:style-name="s1"><text:bookmark text:name="anchor5134"/>г) совокупные стоимостные объемы в <text:a xlink:type="simple" xlink:href="#anchor522110">графах 4</text:a> и 5 подраздела 1 раздела II формируются путем суммирования соответствующих стоимостных объемов, содержащихся в отчетах заказчиков, осуществлявших в отчетном году закупки в соответствии с <text:a xlink:type="simple" xlink:href="http://ivo.garant.ru/document/redirect/12188083/0">Федеральным законом</text:a> "О закупках товаров, работ, услуг отдельными видами юридических лиц", за исключением отчетов отдельных заказчиков, указанных в <text:a xlink:type="simple" xlink:href="#anchor5078">подпункте "з" пункта 7</text:a> настоящего Положения;</text:p>
      <text:p text:style-name="s1"><text:bookmark text:name="anchor5135"/>д) совокупные стоимостные объемы в <text:a xlink:type="simple" xlink:href="#anchor522210">графах 4</text:a> и 5 подраздела 2 раздела II формируются путем суммирования соответствующих стоимостных объемов, содержащихся в отчетах отдельных заказчиков, указанных в <text:a xlink:type="simple" xlink:href="#anchor5078">подпункте "з" пункта 7</text:a> настоящего Положения;</text:p>
      <text:p text:style-name="s1"><text:bookmark text:name="anchor5136"/>е) совокупные стоимостные объемы в <text:a xlink:type="simple" xlink:href="#anchor522310">графах 4</text:a> и 5 подраздела 3 раздела II формируются путем суммирования соответствующих стоимостных объемов, содержащихся в отчетах заказчиков, осуществлявших в отчетном году закупки в соответствии с <text:a xlink:type="simple" xlink:href="http://ivo.garant.ru/document/redirect/12188083/0">Федеральным законом</text:a> "О закупках товаров, работ, услуг отдельными видами юридических лиц".</text:p>
      <text:p text:style-name="s1"><text:bookmark text:name="anchor5014"/>14. Уполномоченный орган до 1 марта года, следующего за отчетным, осуществляет рассмотрение информации, содержащейся в отчетах заказчиков, путем рассмотрения информации, сформированной в соответствии с <text:a xlink:type="simple" xlink:href="#anchor5012">пунктом 12</text:a> настоящего Положения, а также осуществляет оценку результатов осуществления в отчетном году закупок товаров российского происхождения, работ, услуг, соответственно выполняемых, оказываемых российскими лицами.</text:p>
      <text:p text:style-name="s1"><text:bookmark text:name="anchor5015"/>15. Результаты оценки, предусмотренной <text:a xlink:type="simple" xlink:href="#anchor5014">пунктом 14</text:a> настоящего Положения, включаются в сводный аналитический отчет, формируемый в соответствии с <text:a xlink:type="simple" xlink:href="http://ivo.garant.ru/document/redirect/400860204/1000">Положением</text:a> о порядке обеспечения мониторинга закупок товаров, работ, услуг для обеспечения государственных и муниципальных нужд, о требованиях к содержанию и порядку подготовки сводного аналитического отчета по результатам такого мониторинга, а также сроки подготовки указанного отчета, о порядке оценки эффективности деятельности органов контроля, указанных в части 1 статьи 99 Федерального закона "О контрактной системе в сфере закупок товаров, работ, услуг для обеспечения государственных и муниципальных нужд", а также о порядке и сроке осуществления мониторинга закупок товаров, работ, услуг отдельными видами юридических лиц и о требованиях к его содержанию, утвержденным <text:a xlink:type="simple" xlink:href="http://ivo.garant.ru/document/redirect/400860204/0">постановлением</text:a> Правительства Российской Федерации от 27 мая 2021 г. N 814 "О мониторинге закупок товаров, работ, услуг для обеспечения государственных и муниципальных нужд и закупок товаров, работ, услуг отдельными видами юридических лиц, а также об оценке эффективности деятельности органов контроля, осуществляющих контроль за соблюдением законодательства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о внесении изменений в некоторые акты Правительства Российской Федерации и признании утратившими силу некоторых актов Правительства Российской Федерации и отдельных положений некоторых актов Правительства Российской Федерации".</text:p>
      <text:p text:style-name="s1"/>
      <text:p text:style-name="SB0"/>
      <text:p text:style-name="s1_right_fi698"><text:bookmark text:name="anchor51000"/><text:span text:style-name="s10">Приложение N 1
к <text:a xlink:type="simple" xlink:href="#anchor5000">Положению</text:a> о требованиях к форме и содержанию отчета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о порядке формирования и размещения такого
отчета в единой информационной системе в сфере закупок
товаров, работ, услуг для обеспечения государственных
и муниципальных нужд, на официальном сайте единой
информационной системы в сфере закупок товаров, работ,
услуг для обеспечения государственных и муниципальных
нужд в информационно-телекоммуникационной сети
"Интернет", о порядке предоставления федеральному
органу исполнительной власти, указанному в части 7
статьи 14 Федерального закона "О контрактной системе
в сфере закупок товаров, работ, услуг для обеспечения
государственных и муниципальных нужд" и части 7
статьи 3</text:span><text:span text:style-name="upper"><text:span text:style-name="s10"> 1-4 </text:span></text:span><text:span text:style-name="s10">Федерального закона "О закупках товаров,
работ, услуг отдельными видами юридических лиц",
доступа к информации, содержащейся в таких отчетах,
размещенных в единой информационной системе в сфере
закупок товаров, работ, услуг для обеспечения
государственных и муниципальных нужд, о порядке
рассмотрения таких отчетов и оценки результатов
осуществления в отчетном году указанных закупок этим
федеральным органом исполнительной власти</text:span></text:p>
      <text:p text:style-name="s1"/>
      <text:p text:style-name="s1_right_fi698"><text:span text:style-name="s10">(форма)</text:span></text:p>
      <text:p text:style-name="s1"/>
      <text:h text:outline-level="1" text:style-name="s3">ОТЧЕТ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text:h>
      <text:p text:style-name="s1"/>
      <text:h text:outline-level="1" text:style-name="s3"><text:bookmark text:name="anchor51100"/>1. Информация о заказчике</text:h>
      <text:p text:style-name="s1"/>
      <table:table table:name="15204" table:style-name="15204">
        <table:table-column table:style-name="7849"/>
        <table:table-column table:style-name="3777"/>
        <table:table-column table:style-name="1711"/>
        <table:table-column table:style-name="1867"/>
        <table:table-row>
          <table:table-cell table:style-name="0">
            <text:p text:style-name="s1"/>
          </table:table-cell>
          <table:table-cell table:style-name="0">
            <text:p text:style-name="s1"/>
          </table:table-cell>
          <table:table-cell table:style-name="4">
            <text:p text:style-name="s1"/>
          </table:table-cell>
          <table:table-cell table:style-name="13">
            <text:p text:style-name="s1_center_fi0">Коды</text:p>
          </table:table-cell>
        </table:table-row>
        <table:table-row>
          <table:table-cell table:style-name="64" table:number-rows-spanned="2">
            <text:p text:style-name="s16_fi0">Полное наименование</text:p>
          </table:table-cell>
          <table:table-cell table:style-name="0">
            <text:p text:style-name="s1"/>
          </table:table-cell>
          <table:table-cell table:style-name="4">
            <text:p text:style-name="s1_right_fi0">ИНН</text:p>
          </table:table-cell>
          <table:table-cell table:style-name="5">
            <text:p text:style-name="s1"/>
          </table:table-cell>
        </table:table-row>
        <table:table-row>
          <table:table-cell table:style-name="1">
            <text:p text:style-name="s1"/>
          </table:table-cell>
          <table:table-cell table:style-name="4">
            <text:p text:style-name="s1_right_fi0">КПП</text:p>
          </table:table-cell>
          <table:table-cell table:style-name="5">
            <text:p text:style-name="s1"/>
          </table:table-cell>
        </table:table-row>
        <table:table-row>
          <table:table-cell table:style-name="0">
            <text:p text:style-name="s16_fi0">Организационно-правовая форма</text:p>
          </table:table-cell>
          <table:table-cell table:style-name="1">
            <text:p text:style-name="s1"/>
          </table:table-cell>
          <table:table-cell table:style-name="4">
            <text:p text:style-name="s1_right_fi0">по <text:a xlink:type="simple" xlink:href="http://ivo.garant.ru/document/redirect/70284934/0">ОКОПФ</text:a></text:p>
          </table:table-cell>
          <table:table-cell table:style-name="5">
            <text:p text:style-name="s1"/>
          </table:table-cell>
        </table:table-row>
        <table:table-row>
          <table:table-cell table:style-name="0">
            <text:p text:style-name="s16_fi0">Форма собственности</text:p>
          </table:table-cell>
          <table:table-cell table:style-name="1">
            <text:p text:style-name="s1"/>
          </table:table-cell>
          <table:table-cell table:style-name="4">
            <text:p text:style-name="s1_right_fi0">по <text:a xlink:type="simple" xlink:href="http://ivo.garant.ru/document/redirect/12117985/0">ОКФС</text:a></text:p>
          </table:table-cell>
          <table:table-cell table:style-name="5">
            <text:p text:style-name="s1"/>
          </table:table-cell>
        </table:table-row>
        <table:table-row>
          <table:table-cell table:style-name="0">
            <text:p text:style-name="s16_fi0">Место нахождения, телефон, адрес электронной почты</text:p>
          </table:table-cell>
          <table:table-cell table:style-name="1">
            <text:p text:style-name="s1"/>
          </table:table-cell>
          <table:table-cell table:style-name="4">
            <text:p text:style-name="s1_right_fi0">по <text:a xlink:type="simple" xlink:href="http://ivo.garant.ru/document/redirect/70465940/0">ОКТМО</text:a></text:p>
          </table:table-cell>
          <table:table-cell table:style-name="5">
            <text:p text:style-name="s1"/>
          </table:table-cell>
        </table:table-row>
        <table:table-row>
          <table:table-cell table:style-name="64" table:number-rows-spanned="3">
            <text:p text:style-name="s16_fi0">Наименование, место нахождения, телефон, адрес электронной почты бюджетного, автономного учреждения, государственного, муниципального унитарного предприятия, иного юридического лица, которому переданы полномочия государственного, муниципального заказчика</text:p>
          </table:table-cell>
          <table:table-cell table:style-name="0">
            <text:p text:style-name="s1"/>
          </table:table-cell>
          <table:table-cell table:style-name="4">
            <text:p text:style-name="s1_right_fi0">ИНН</text:p>
          </table:table-cell>
          <table:table-cell table:style-name="5">
            <text:p text:style-name="s1"/>
          </table:table-cell>
        </table:table-row>
        <table:table-row>
          <table:table-cell table:style-name="0">
            <text:p text:style-name="s1"/>
          </table:table-cell>
          <table:table-cell table:style-name="4">
            <text:p text:style-name="s1_right_fi0">КПП</text:p>
          </table:table-cell>
          <table:table-cell table:style-name="5">
            <text:p text:style-name="s1"/>
          </table:table-cell>
        </table:table-row>
        <table:table-row>
          <table:table-cell table:style-name="1">
            <text:p text:style-name="s1"/>
          </table:table-cell>
          <table:table-cell table:style-name="4">
            <text:p text:style-name="s1_right_fi0">по <text:a xlink:type="simple" xlink:href="http://ivo.garant.ru/document/redirect/70465940/0">ОКТМО</text:a></text:p>
          </table:table-cell>
          <table:table-cell table:style-name="5">
            <text:p text:style-name="s1"/>
          </table:table-cell>
        </table:table-row>
        <table:table-row>
          <table:table-cell table:style-name="0">
            <text:p text:style-name="s16_fi0">Вид документа</text:p>
          </table:table-cell>
          <table:table-cell table:style-name="1">
            <text:p text:style-name="s1"/>
          </table:table-cell>
          <table:table-cell table:style-name="4">
            <text:p text:style-name="s1"/>
          </table:table-cell>
          <table:table-cell table:style-name="5">
            <text:p text:style-name="s1"/>
          </table:table-cell>
        </table:table-row>
        <table:table-row>
          <table:table-cell table:style-name="0">
            <text:p text:style-name="s16_fi0">Единица измерения</text:p>
          </table:table-cell>
          <table:table-cell table:style-name="1">
            <text:p text:style-name="s1_center_fi0">рубль</text:p>
          </table:table-cell>
          <table:table-cell table:style-name="4">
            <text:p text:style-name="s1_right_fi0">по ОКЕИ</text:p>
          </table:table-cell>
          <table:table-cell table:style-name="5">
            <text:p text:style-name="s1_center_fi0"><text:a xlink:type="simple" xlink:href="http://ivo.garant.ru/document/redirect/179222/383">383</text:a></text:p>
          </table:table-cell>
        </table:table-row>
      </table:table>
      <text:p text:style-name="s1"/>
      <text:h text:outline-level="1" text:style-name="s3"><text:bookmark text:name="anchor51200"/>2. Информация об объеме закупок товаров российского происхождения (в том числе поставляемых при выполнении закупаемых работ, оказании закупаемых услуг)</text:h>
      <text:p text:style-name="s1"/>
      <table:table table:name="15156" table:style-name="15156">
        <table:table-column table:style-name="597"/>
        <table:table-column table:style-name="1696"/>
        <table:table-column table:style-name="2353"/>
        <table:table-column table:style-name="1664"/>
        <table:table-column table:style-name="1856"/>
        <table:table-column table:style-name="3083"/>
        <table:table-column table:style-name="2095"/>
        <table:table-column table:style-name="1812"/>
        <table:table-row>
          <table:table-cell table:style-name="79" table:number-rows-spanned="2">
            <text:p text:style-name="s1_center_fi0"><text:bookmark text:name="anchor51210"/>N</text:p>
          </table:table-cell>
          <table:table-cell table:style-name="77" table:number-rows-spanned="2">
            <text:p text:style-name="s1_center_fi0">Наименование товара</text:p>
          </table:table-cell>
          <table:table-cell table:style-name="77" table:number-rows-spanned="2">
            <text:p text:style-name="s1_center_fi0">Код товара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cell table:style-name="13" table:number-columns-spanned="3">
            <table:covered-table-cell/>
            <table:covered-table-cell/>
            <text:p text:style-name="s1_center_fi0">Стоимостной объем закупок товара</text:p>
          </table:table-cell>
          <table:table-cell table:style-name="13" table:number-columns-spanned="2">
            <table:covered-table-cell/>
            <text:p text:style-name="s1_center_fi0">Информация о достижении минимальной обязательной доли закупок товаров российского происхождения</text:p>
          </table:table-cell>
        </table:table-row>
        <table:table-row>
          <table:table-cell table:style-name="5">
            <text:p text:style-name="s1_center_fi0">стоимостной объем поставленного товара</text:p>
          </table:table-cell>
          <table:table-cell table:style-name="5">
            <text:p text:style-name="s1_center_fi0">стоимостной объем поставленного товара российского происхождения</text:p>
          </table:table-cell>
          <table:table-cell table:style-name="5">
            <text:p text:style-name="s1_center_fi0">номер реестровой записи из реестра контрактов, заключенных заказчиками, или реестра договоров, заключенных заказчиками, либо номер контракта (договора)</text:p>
          </table:table-cell>
          <table:table-cell table:style-name="5">
            <text:p text:style-name="s1_center_fi0">размер установленной минимальной обязательной доли закупок товаров российского происхождения, процентов</text:p>
          </table:table-cell>
          <table:table-cell table:style-name="5">
            <text:p text:style-name="s1_center_fi0">размер достигнутой доли закупок товаров российского происхождения, процентов</text:p>
          </table:table-cell>
        </table:table-row>
        <table:table-row>
          <table:table-cell table:style-name="7">
            <text:p text:style-name="s1_center_fi0">1</text:p>
          </table:table-cell>
          <table:table-cell table:style-name="5">
            <text:p text:style-name="s1_center_fi0">2</text:p>
          </table:table-cell>
          <table:table-cell table:style-name="5">
            <text:p text:style-name="s1_center_fi0">3</text:p>
          </table:table-cell>
          <table:table-cell table:style-name="5">
            <text:p text:style-name="s1_center_fi0">4</text:p>
          </table:table-cell>
          <table:table-cell table:style-name="5">
            <text:p text:style-name="s1_center_fi0">5</text:p>
          </table:table-cell>
          <table:table-cell table:style-name="5">
            <text:p text:style-name="s1_center_fi0">6</text:p>
          </table:table-cell>
          <table:table-cell table:style-name="5">
            <text:p text:style-name="s1_center_fi0">7</text:p>
          </table:table-cell>
          <table:table-cell table:style-name="5">
            <text:p text:style-name="s1_center_fi0">8</text:p>
          </table:table-cell>
        </table:table-row>
        <table:table-row>
          <table:table-cell table:style-name="7">
            <text:p text:style-name="s1_center_fi0">1</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
          </table:table-cell>
          <table:table-cell table:style-name="5">
            <text:p text:style-name="s1_fi0">Всего</text:p>
            <text:p text:style-name="s1_fi0">в том числе:</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
      <text:p text:style-name="s1"/>
      <text:h text:outline-level="1" text:style-name="s3"><text:bookmark text:name="anchor51300"/>3. Информация об объеме закупок работ, услуг, соответственно выполняемых, оказываемых российскими гражданами, российскими юридическими лицами, за исключением товаров, поставленных при выполнении закупаемых работ, оказании закупаемых услуг</text:h>
      <text:p text:style-name="s1"/>
      <table:table table:name="15156" table:style-name="15156">
        <table:table-column table:style-name="580"/>
        <table:table-column table:style-name="1919"/>
        <table:table-column table:style-name="3063"/>
        <table:table-column table:style-name="2243"/>
        <table:table-column table:style-name="3256"/>
        <table:table-column table:style-name="4095"/>
        <table:table-row>
          <table:table-cell table:style-name="95" table:number-rows-spanned="2">
            <text:p text:style-name="s1_center_fi0"><text:bookmark text:name="anchor51310"/>N</text:p>
          </table:table-cell>
          <table:table-cell table:style-name="93" table:number-rows-spanned="2">
            <text:p text:style-name="s1_center_fi0">Наименование работы, услуги</text:p>
          </table:table-cell>
          <table:table-cell table:style-name="93" table:number-rows-spanned="2">
            <text:p text:style-name="s1_center_fi0">Код работы, услуги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cell table:style-name="29" table:number-columns-spanned="3">
            <table:covered-table-cell/>
            <table:covered-table-cell/>
            <text:p text:style-name="s1_center_fi0">Стоимостной объем закупок работ, услуг</text:p>
          </table:table-cell>
        </table:table-row>
        <table:table-row>
          <table:table-cell table:style-name="21">
            <text:p text:style-name="s1_center_fi0">стоимостной объем выполненных работ, оказанных услуг</text:p>
          </table:table-cell>
          <table:table-cell table:style-name="21">
            <text:p text:style-name="s1_center_fi0">стоимостной объем выполненных работ, оказанных услуг российскими гражданами, российскими юридическими лицами</text:p>
          </table:table-cell>
          <table:table-cell table:style-name="21">
            <text:p text:style-name="s1_center_fi0">номер реестровой записи из реестра контрактов, заключенных заказчиками или реестра договоров, заключенных заказчиками, либо номер контракта (договора)</text:p>
          </table:table-cell>
        </table:table-row>
        <table:table-row>
          <table:table-cell table:style-name="7">
            <text:p text:style-name="s1_center_fi0">1</text:p>
          </table:table-cell>
          <table:table-cell table:style-name="5">
            <text:p text:style-name="s1_center_fi0">2</text:p>
          </table:table-cell>
          <table:table-cell table:style-name="5">
            <text:p text:style-name="s1_center_fi0">3</text:p>
          </table:table-cell>
          <table:table-cell table:style-name="5">
            <text:p text:style-name="s1_center_fi0">4</text:p>
          </table:table-cell>
          <table:table-cell table:style-name="5">
            <text:p text:style-name="s1_center_fi0">5</text:p>
          </table:table-cell>
          <table:table-cell table:style-name="5">
            <text:p text:style-name="s1_center_fi0">6</text:p>
          </table:table-cell>
        </table:table-row>
        <table:table-row>
          <table:table-cell table:style-name="7">
            <text:p text:style-name="s1_center_fi0">1</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
          </table:table-cell>
          <table:table-cell table:style-name="5">
            <text:p text:style-name="s1_fi0">Всего</text:p>
            <text:p text:style-name="s1_fi0">в том числе:</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
      <text:p text:style-name="s1"/>
      <text:p text:style-name="SB1"/>
      <text:p text:style-name="s22header">Информация об изменениях:</text:p>
      <text:p text:style-name="s22"><text:bookmark text:name="anchor52000"/>Приложение 2 изменено с 1 января 2026 г. - <text:a xlink:type="simple" xlink:href="http://ivo.garant.ru/document/redirect/413396332/1162">Постановление</text:a> Правительства России от 30 декабря 2025 г. № 2225</text:p>
      <text:p text:style-name="s22"><text:a xlink:type="simple" xlink:href="http://ivo.garant.ru/document/redirect/76849700/52000">См. предыдущую редакцию</text:a></text:p>
      <text:p text:style-name="s1_right_fi698"><text:span text:style-name="s10">Приложение N 2
к <text:a xlink:type="simple" xlink:href="#anchor5000">Положению</text:a> о требованиях к форме и содержанию
отчета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о порядке
формирования и размещения такого отчета в единой
информационной системе в сфере закупок товаров,
работ, услуг для обеспечения государственных
и муниципальных нужд, на официальном сайте
единой информационной системы в сфере закупок
товаров, работ, услуг для обеспечения
государственных и муниципальных нужд
в информационно-телекоммуникационной сети
"Интернет", о порядке предоставления федеральному
органу исполнительной власти, указанному в части 7
статьи 14 Федерального закона "О контрактной
системе в сфере закупок товаров, работ, услуг для
обеспечения государственных и муниципальных
нужд" и части 7 статьи 3</text:span><text:span text:style-name="upper"><text:span text:style-name="s10"> 1-4 </text:span></text:span><text:span text:style-name="s10">Федерального закона
"О закупках товаров, работ, услуг отдельными видами
юридических лиц", доступа к информации,
содержащейся в таких отчетах, размещенных в единой
информационной системе в сфере закупок товаров,
работ, услуг для обеспечения государственных
и муниципальных нужд, о порядке рассмотрения
таких отчетов и оценки результатов осуществления
в отчетном году указанных закупок этим
федеральным органом исполнительной власти
(с изменениями от 30 декабря 2025 г.)</text:span></text:p>
      <text:p text:style-name="s1"/>
      <text:p text:style-name="s1_right_fi698"><text:span text:style-name="s10">(форма)</text:span></text:p>
      <text:p text:style-name="s1"/>
      <text:h text:outline-level="1" text:style-name="s3">ИНФОРМАЦИЯ
о совокупном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text:h>
      <text:p text:style-name="s1"/>
      <text:h text:outline-level="1" text:style-name="s3"><text:bookmark text:name="anchor52100"/>I. Совокупный объем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осуществленных в соответствии с Федеральным законом "О контрактной системе в сфере закупок товаров, работ, услуг для обеспечения государственных и муниципальных нужд"</text:h>
      <text:p text:style-name="s1"/>
      <text:h text:outline-level="1" text:style-name="s3"><text:bookmark text:name="anchor52110"/>1. Совокупный объем товаров российского происхождения (в том числе поставляемых при выполнении закупаемых работ, оказании закупаемых услуг), осуществленных в соответствии с Федеральным законом "О контрактной системе в сфере закупок товаров, работ, услуг для обеспечения государственных и муниципальных нужд"</text:h>
      <text:p text:style-name="s1"/>
      <table:table table:name="9989" table:style-name="9989">
        <table:table-column table:style-name="634"/>
        <table:table-column table:style-name="2135"/>
        <table:table-column table:style-name="3263"/>
        <table:table-column table:style-name="1957"/>
        <table:table-column table:style-name="2000"/>
        <table:table-row>
          <table:table-cell table:style-name="15">
            <text:p text:style-name="s1_center_fi0"><text:bookmark text:name="anchor521110"/>N</text:p>
          </table:table-cell>
          <table:table-cell table:style-name="13">
            <text:p text:style-name="s1_center_fi0">Наименование товара</text:p>
          </table:table-cell>
          <table:table-cell table:style-name="13">
            <text:p text:style-name="s1_center_fi0">Код товара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cell table:style-name="13">
            <text:p text:style-name="s1_center_fi0">Совокупный стоимостной объем поставленного товара</text:p>
          </table:table-cell>
          <table:table-cell table:style-name="13">
            <text:p text:style-name="s1_center_fi0">Совокупный стоимостной объем поставленного товара российского происхождения</text:p>
          </table:table-cell>
        </table:table-row>
        <table:table-row>
          <table:table-cell table:style-name="7">
            <text:p text:style-name="s1_center_fi0">1</text:p>
          </table:table-cell>
          <table:table-cell table:style-name="5">
            <text:p text:style-name="s1_center_fi0">2</text:p>
          </table:table-cell>
          <table:table-cell table:style-name="5">
            <text:p text:style-name="s1_center_fi0">3</text:p>
          </table:table-cell>
          <table:table-cell table:style-name="5">
            <text:p text:style-name="s1_center_fi0">4</text:p>
          </table:table-cell>
          <table:table-cell table:style-name="5">
            <text:p text:style-name="s1_center_fi0">5</text:p>
          </table:table-cell>
        </table:table-row>
        <table:table-row>
          <table:table-cell table:style-name="7">
            <text:p text:style-name="s1_center_fi0">1</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
          </table:table-cell>
          <table:table-cell table:style-name="5">
            <text:p text:style-name="s1_fi0">Всего</text:p>
            <text:p text:style-name="s1_fi0">в том числе:</text:p>
          </table:table-cell>
          <table:table-cell table:style-name="5">
            <text:p text:style-name="s1"/>
          </table:table-cell>
          <table:table-cell table:style-name="5">
            <text:p text:style-name="s1"/>
          </table:table-cell>
          <table:table-cell table:style-name="5">
            <text:p text:style-name="s1"/>
          </table:table-cell>
        </table:table-row>
      </table:table>
      <text:p text:style-name="s1"/>
      <text:h text:outline-level="1" text:style-name="s3"><text:bookmark text:name="anchor52120"/>2. Совокупный объем закупок работ, услуг, соответственно выполняемых, оказываемых российскими гражданами, российскими юридическими лицами, осуществленных в соответствии с Федеральным законом "О контрактной системе в сфере закупок товаров, работ, услуг для обеспечения государственных и муниципальных нужд", за исключением товаров, поставленных при выполнении закупаемых работ, оказании закупаемых услуг</text:h>
      <text:p text:style-name="s1"/>
      <table:table table:name="9989" table:style-name="9989">
        <table:table-column table:style-name="479"/>
        <table:table-column table:style-name="1844"/>
        <table:table-column table:style-name="2817"/>
        <table:table-column table:style-name="2184"/>
        <table:table-column table:style-name="2665"/>
        <table:table-row>
          <table:table-cell table:style-name="15">
            <text:p text:style-name="s1_center_fi0"><text:bookmark text:name="anchor521210"/>N</text:p>
          </table:table-cell>
          <table:table-cell table:style-name="13">
            <text:p text:style-name="s1_center_fi0">Наименование работы, услуги</text:p>
          </table:table-cell>
          <table:table-cell table:style-name="13">
            <text:p text:style-name="s1_center_fi0">Код работы, услуги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cell table:style-name="13">
            <text:p text:style-name="s1_center_fi0">Совокупный стоимостной объем выполненных работ, оказанных услуг</text:p>
          </table:table-cell>
          <table:table-cell table:style-name="13">
            <text:p text:style-name="s1_center_fi0">Совокупный стоимостной объем выполненных работ, оказанных услуг российскими гражданами, российскими юридическими лицами</text:p>
          </table:table-cell>
        </table:table-row>
        <table:table-row>
          <table:table-cell table:style-name="7">
            <text:p text:style-name="s1_center_fi0">1</text:p>
          </table:table-cell>
          <table:table-cell table:style-name="5">
            <text:p text:style-name="s1_center_fi0">2</text:p>
          </table:table-cell>
          <table:table-cell table:style-name="5">
            <text:p text:style-name="s1_center_fi0">3</text:p>
          </table:table-cell>
          <table:table-cell table:style-name="5">
            <text:p text:style-name="s1_center_fi0">4</text:p>
          </table:table-cell>
          <table:table-cell table:style-name="5">
            <text:p text:style-name="s1_center_fi0">5</text:p>
          </table:table-cell>
        </table:table-row>
        <table:table-row>
          <table:table-cell table:style-name="7">
            <text:p text:style-name="s1_center_fi0">1</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
          </table:table-cell>
          <table:table-cell table:style-name="5">
            <text:p text:style-name="s1_fi0">Всего</text:p>
            <text:p text:style-name="s1_fi0">в том числе:</text:p>
          </table:table-cell>
          <table:table-cell table:style-name="5">
            <text:p text:style-name="s1"/>
          </table:table-cell>
          <table:table-cell table:style-name="5">
            <text:p text:style-name="s1"/>
          </table:table-cell>
          <table:table-cell table:style-name="5">
            <text:p text:style-name="s1"/>
          </table:table-cell>
        </table:table-row>
      </table:table>
      <text:p text:style-name="s1"/>
      <text:h text:outline-level="1" text:style-name="s3"><text:bookmark text:name="anchor52200"/>II. Совокупный объем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осуществленных в соответствии c Федеральным законом "О закупках товаров, работ, услуг отдельными видами юридических лиц"</text:h>
      <text:p text:style-name="s1"/>
      <text:h text:outline-level="1" text:style-name="s3"><text:bookmark text:name="anchor52210"/>1. Совокупный объем закупок товаров российского происхождения (в том числе поставляемых при выполнении закупаемых работ, оказании закупаемых услуг), осуществленных в соответствии с Федеральным законом "О закупках товаров, работ, услуг отдельными видами юридических лиц"</text:h>
      <text:p text:style-name="s1"/>
      <table:table table:name="10129" table:style-name="10129">
        <table:table-column table:style-name="499"/>
        <table:table-column table:style-name="2168"/>
        <table:table-column table:style-name="3282"/>
        <table:table-column table:style-name="2045"/>
        <table:table-column table:style-name="2135"/>
        <table:table-row>
          <table:table-cell table:style-name="15">
            <text:p text:style-name="s1_center_fi0"><text:bookmark text:name="anchor522110"/>N</text:p>
          </table:table-cell>
          <table:table-cell table:style-name="13">
            <text:p text:style-name="s1_center_fi0">Наименование товара</text:p>
          </table:table-cell>
          <table:table-cell table:style-name="13">
            <text:p text:style-name="s1_center_fi0">Код товара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cell table:style-name="13">
            <text:p text:style-name="s1_center_fi0">Совокупный стоимостной объем поставленного товара</text:p>
          </table:table-cell>
          <table:table-cell table:style-name="13">
            <text:p text:style-name="s1_center_fi0">Совокупный стоимостной объем поставленного товара российского происхождения</text:p>
          </table:table-cell>
        </table:table-row>
        <table:table-row>
          <table:table-cell table:style-name="7">
            <text:p text:style-name="s1_center_fi0">1</text:p>
          </table:table-cell>
          <table:table-cell table:style-name="5">
            <text:p text:style-name="s1_center_fi0">2</text:p>
          </table:table-cell>
          <table:table-cell table:style-name="5">
            <text:p text:style-name="s1_center_fi0">3</text:p>
          </table:table-cell>
          <table:table-cell table:style-name="5">
            <text:p text:style-name="s1_center_fi0">4</text:p>
          </table:table-cell>
          <table:table-cell table:style-name="5">
            <text:p text:style-name="s1_center_fi0">5</text:p>
          </table:table-cell>
        </table:table-row>
        <table:table-row>
          <table:table-cell table:style-name="7">
            <text:p text:style-name="s1_center_fi0">1</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
          </table:table-cell>
          <table:table-cell table:style-name="5">
            <text:p text:style-name="s1_fi0">Всего</text:p>
            <text:p text:style-name="s1_fi0">в том числе:</text:p>
          </table:table-cell>
          <table:table-cell table:style-name="5">
            <text:p text:style-name="s1"/>
          </table:table-cell>
          <table:table-cell table:style-name="5">
            <text:p text:style-name="s1"/>
          </table:table-cell>
          <table:table-cell table:style-name="5">
            <text:p text:style-name="s1"/>
          </table:table-cell>
        </table:table-row>
      </table:table>
      <text:p text:style-name="s1"/>
      <text:h text:outline-level="1" text:style-name="s3"><text:bookmark text:name="anchor52220"/>2. Совокупный объем закупок товаров российского происхождения (в том числе поставляемых при выполнении закупаемых работ, оказании закупаемых услуг), осуществленных в соответствии с Федеральным законом "О закупках товаров, работ, услуг отдельными видами юридических лиц" отдельными заказчиками, указанными в <text:a xlink:type="simple" xlink:href="#anchor4112">абзаце втором подпункта "л" пункта 4</text:a> постановления Правительства Российской Федерации от 23 декабря 2024 г. №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text:h>
      <text:p text:style-name="s1"/>
      <table:table table:name="10129" table:style-name="10129">
        <table:table-column table:style-name="408"/>
        <table:table-column table:style-name="1483"/>
        <table:table-column table:style-name="1849"/>
        <table:table-column table:style-name="1488"/>
        <table:table-column table:style-name="1632"/>
        <table:table-column table:style-name="1637"/>
        <table:table-column table:style-name="1632"/>
        <table:table-row>
          <table:table-cell table:style-name="15">
            <text:p text:style-name="s1_center_fi0"><text:bookmark text:name="anchor522210"/>N</text:p>
          </table:table-cell>
          <table:table-cell table:style-name="13">
            <text:p text:style-name="s1_center_fi0">Наименование товара</text:p>
          </table:table-cell>
          <table:table-cell table:style-name="13">
            <text:p text:style-name="s1_center_fi0">Код товара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cell table:style-name="13">
            <text:p text:style-name="s1_center_fi0">Совокупный стоимостной объем поставленного товара</text:p>
          </table:table-cell>
          <table:table-cell table:style-name="13">
            <text:p text:style-name="s1_center_fi0">Совокупный стоимостной объем поставленного товара российского происхождения</text:p>
          </table:table-cell>
          <table:table-cell table:style-name="13">
            <text:p text:style-name="s1_center_fi0">Размер установленной минимальной обязательной доли закупок товаров российского происхождения, процентов</text:p>
          </table:table-cell>
          <table:table-cell table:style-name="13">
            <text:p text:style-name="s1_center_fi0">Размер достигнутой доли закупок товаров российского происхождения, процентов</text:p>
          </table:table-cell>
        </table:table-row>
        <table:table-row>
          <table:table-cell table:style-name="7">
            <text:p text:style-name="s1_center_fi0">1</text:p>
          </table:table-cell>
          <table:table-cell table:style-name="5">
            <text:p text:style-name="s1_center_fi0">2</text:p>
          </table:table-cell>
          <table:table-cell table:style-name="5">
            <text:p text:style-name="s1_center_fi0">3</text:p>
          </table:table-cell>
          <table:table-cell table:style-name="5">
            <text:p text:style-name="s1_center_fi0">4</text:p>
          </table:table-cell>
          <table:table-cell table:style-name="5">
            <text:p text:style-name="s1_center_fi0">5</text:p>
          </table:table-cell>
          <table:table-cell table:style-name="5">
            <text:p text:style-name="s1_center_fi0">6</text:p>
          </table:table-cell>
          <table:table-cell table:style-name="5">
            <text:p text:style-name="s1_center_fi0">7</text:p>
          </table:table-cell>
        </table:table-row>
        <table:table-row>
          <table:table-cell table:style-name="7">
            <text:p text:style-name="s1_center_fi0">1</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
          </table:table-cell>
          <table:table-cell table:style-name="5">
            <text:p text:style-name="s1_fi0">Всего</text:p>
            <text:p text:style-name="s16_fi0">в том числе:</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
      <text:p text:style-name="s1"/>
      <text:h text:outline-level="1" text:style-name="s3"><text:bookmark text:name="anchor52230"/>3. Совокупный объем закупок работ, услуг, соответственно выполняемых, оказываемых российскими гражданами, российскими юридическими лицами, осуществленных в соответствии с Федеральным законом "О закупках товаров, работ, услуг отдельными видами юридических лиц", за исключением товаров, поставленных при выполнении закупаемых работ, оказании закупаемых услуг</text:h>
      <text:p text:style-name="s1"/>
      <table:table table:name="10129" table:style-name="10129">
        <table:table-column table:style-name="494"/>
        <table:table-column table:style-name="2218"/>
        <table:table-column table:style-name="3039"/>
        <table:table-column table:style-name="1941"/>
        <table:table-column table:style-name="2437"/>
        <table:table-row>
          <table:table-cell table:style-name="15">
            <text:p text:style-name="s1_center_fi0"><text:bookmark text:name="anchor522310"/>N</text:p>
          </table:table-cell>
          <table:table-cell table:style-name="13">
            <text:p text:style-name="s1_center_fi0">Наименование работы, услуги</text:p>
          </table:table-cell>
          <table:table-cell table:style-name="13">
            <text:p text:style-name="s1_center_fi0">Код работы, услуги по Общероссийскому классификатору продукции по видам экономической деятельности <text:a xlink:type="simple" xlink:href="http://ivo.garant.ru/document/redirect/70650730/0">ОК 034-2014 (КПЕС 2008)</text:a></text:p>
          </table:table-cell>
          <table:table-cell table:style-name="13">
            <text:p text:style-name="s1_center_fi0">Совокупный стоимостной объем выполненных работ, оказанных услуг</text:p>
          </table:table-cell>
          <table:table-cell table:style-name="13">
            <text:p text:style-name="s1_center_fi0">Совокупный стоимостной объем выполненных работ, оказанных услуг российскими гражданами, российскими юридическими лицами</text:p>
          </table:table-cell>
        </table:table-row>
        <table:table-row>
          <table:table-cell table:style-name="7">
            <text:p text:style-name="s1_center_fi0">1</text:p>
          </table:table-cell>
          <table:table-cell table:style-name="5">
            <text:p text:style-name="s1_center_fi0">2</text:p>
          </table:table-cell>
          <table:table-cell table:style-name="5">
            <text:p text:style-name="s1_center_fi0">3</text:p>
          </table:table-cell>
          <table:table-cell table:style-name="5">
            <text:p text:style-name="s1_center_fi0">4</text:p>
          </table:table-cell>
          <table:table-cell table:style-name="5">
            <text:p text:style-name="s1_center_fi0">5</text:p>
          </table:table-cell>
        </table:table-row>
        <table:table-row>
          <table:table-cell table:style-name="7">
            <text:p text:style-name="s1_center_fi0">1</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
          </table:table-cell>
          <table:table-cell table:style-name="5">
            <text:p text:style-name="s1_fi0">Всего</text:p>
            <text:p text:style-name="s1_fi0">в том числе:</text:p>
          </table:table-cell>
          <table:table-cell table:style-name="5">
            <text:p text:style-name="s1"/>
          </table:table-cell>
          <table:table-cell table:style-name="5">
            <text:p text:style-name="s1"/>
          </table:table-cell>
          <table:table-cell table:style-name="5">
            <text:p text:style-name="s1"/>
          </table:table-cell>
        </table:table-row>
      </table:table>
      <text:p text:style-name="s1"/>
      <text:p text:style-name="s1_right_fi698"><text:bookmark text:name="anchor6000"/><text:span text:style-name="s10">УТВЕРЖДЕНЫ
<text:a xlink:type="simple" xlink:href="#anchor0">постановлением</text:a> Правительства
Российской Федерации
от 23 декабря 2024 г. N 1875</text:span></text:p>
      <text:p text:style-name="s1"/>
      <text:h text:outline-level="1" text:style-name="s3">Изменения,
которые вносятся в акты Правительства Российской Федерации</text:h>
      <text:p text:style-name="s1"/>
      <text:p text:style-name="s9header">ГАРАНТ:</text:p>
      <text:p text:style-name="s9"><text:bookmark text:name="anchor6001"/>Положения пункта 1 <text:a xlink:type="simple" xlink:href="#anchor108">применяются</text:a> к отношениям, связанным с осуществлением закупок,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с 1 января 2026 г.</text:p>
      <text:p text:style-name="s1">1. <text:a xlink:type="simple" xlink:href="http://ivo.garant.ru/document/redirect/70782736/1002">Пункт 2</text:a> Правил ведения реестра договоров, заключенных заказчиками по результатам закупки, утвержденных <text:a xlink:type="simple" xlink:href="http://ivo.garant.ru/document/redirect/70782736/0">постановлением</text:a> Правительства Российской Федерации от 31 октября 2014 г. N 1132 "О порядке ведения реестра договоров, заключенных заказчиками по результатам закупки" (Собрание законодательства Российской Федерации, 2014, N 45, ст. 6225; 2018, N 12, ст. 1699; 2020, N 1, ст. 92; N 46, ст. 7299; 2022, N 6, ст. 872; N 46, ст. 7988), дополнить <text:a xlink:type="simple" xlink:href="http://ivo.garant.ru/document/redirect/70782736/1253">подпунктами "д<text:span text:style-name="upper"><text:span> 3</text:span></text:span>" - "д<text:span text:style-name="upper"><text:span> 6</text:span></text:span>"</text:a> следующего содержания:</text:p>
      <text:p text:style-name="s1"><text:bookmark text:name="anchor1253"/>"д<text:span text:style-name="upper"><text:span> 3</text:span></text:span>) номер реестровой записи из реестра российской промышленной продукции, предусмотренного Федеральным законом "О промышленной политике в Российской Федерации", в отношении товара (в том числе поставляемого при выполнении закупаемых работ, оказании закупаемых услуг), указанного в позициях 1 - 145 приложения N 1 к постановлению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 (далее - постановление Правительства Российской Федерации от 23 декабря 2024 г. N 1875), позициях 1 - 433 приложения N 2 к постановлению Правительства Российской Федерации от 23 декабря 2024 г. N 1875, приложении N 3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пунктом 1 постановления Правительства Российской Федерации от 23 декабря 2024 г. N 1875, и в соответствии с подпунктом "д" настоящего пункта страной происхождения товара указана Российская Федерация. В случае если в отношении такого товара постановлением Правительства Российской Федерации от 17 июля 2015 г. N 719 "О подтверждении производства российской промышленной продукции" за выполнение (освоение) на территории Российской Федерации соответствующих операций (условий) установлены требования о совокупном количестве баллов, указывается совокупное количество баллов за выполнение (освоение) на территории Российской Федерации соответствующих операций (условий);</text:p>
      <text:p text:style-name="s1"><text:bookmark text:name="anchor1254"/>д<text:span text:style-name="upper"><text:span> 4</text:span></text:span>) номер реестровой записи из евразийского реестра промышленных товаров государств - членов Евразийского экономического союза, порядок формирования и ведения которого устанавливается правом Евразийского экономического союза, в отношении товара (в том числе поставляемого при выполнении закупаемых работ, оказании закупаемых услуг), указанного в позициях 1 - 145 приложения N 1 к постановлению Правительства Российской Федерации от 23 декабря 2024 г. N 1875, позициях 1 - 433 приложения N 2 к постановлению Правительства Российской Федерации от 23 декабря 2024 г. N 1875, приложении N 3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пунктом 1 постановления Правительства Российской от 23 декабря 2024 г. N 1875, и в соответствии с подпунктом "д" настоящего пункта страной происхождения товара указано государство - член Евразийского экономического союза, за исключением Российской Федерации. При этом указывается совокупное количество баллов за выполнение (освоение) на территории Евразийского экономического союза соответствующих операций (условий), если в отношении такого товара правом Евразийского экономического союза установлены требования о совокупном количестве баллов за выполнение (освоение) на территории Евразийского экономического союза соответствующих операций (условий);</text:p>
      <text:p text:style-name="s1"><text:bookmark text:name="anchor1255"/>д<text:span text:style-name="upper"><text:span> 5</text:span></text:span>) порядковый номер реестровой записи из единого реестра российских программ для электронных вычислительных машин и баз данных в отношении программы для электронных вычислительных машин и (или) баз данных, указанных в позиции 146 приложения N 1 к постановлению Правительства Российской Федерации от 23 декабря 2024 г. N 1875 (далее - программное обеспечение), если при осуществлении закупки применяется запрет, предусмотренный пунктом 1 постановления Правительства Российской Федерации от 23 декабря 2024 г. N 1875, и в соответствии с подпунктом "д" настоящего пункта страной происхождения программного обеспечения указана Российская Федерация;</text:p>
      <text:p text:style-name="s1"><text:bookmark text:name="anchor1256"/>д<text:span text:style-name="upper"><text:span> 6</text:span></text:span>) порядковый номер реестровой записи из единого реестра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 в отношении программного обеспечения, если при осуществлении закупки применяется запрет, предусмотренный пунктом 1 постановления Правительства Российской Федерации от 23 декабря 2024 г. N 1875, и в соответствии с подпунктом "д" настоящего пункта страной происхождения программного обеспечения указано государство - член Евразийского экономического союза, за исключением Российской Федерации;".</text:p>
      <text:p text:style-name="s1"><text:bookmark text:name="anchor6002"/>2. <text:a xlink:type="simple" xlink:href="http://ivo.garant.ru/document/redirect/71139412/3003">Пункт 3</text:a> Правил формирования и ведения реестра российской промышленной продукции, состава сведений, включаемых в реестр, порядка включения таких сведений в реестр и исключения их из реестра, в том числе размещения таких сведений в государственной информационной системе промышленности, и порядка предоставления сведений, включенных в реестр, утвержденных <text:a xlink:type="simple" xlink:href="http://ivo.garant.ru/document/redirect/71139412/0">постановлением</text:a> Правительства Российской Федерации от 17 июля 2015 г. N 719 "О подтверждении производства российской промышленной продукции" (Собрание законодательства Российской Федерации, 2015, N 30, ст. 4597; 2017, N 40, ст. 5843; 2024, N 28, ст. 4023; N 43, ст. 6397), дополнить <text:a xlink:type="simple" xlink:href="http://ivo.garant.ru/document/redirect/71139412/30033">абзацем</text:a> следующего содержания:</text:p>
      <text:p text:style-name="s1"><text:bookmark text:name="anchor30033"/>"Информация о вооружении, военной и специальной технике, принятых на вооружение, снабжение, в эксплуатацию, об образцах вооружения, военной и специальной техники, разработанных в соответствии с конструкторской документацией с литерой не ниже "О<text:span text:style-name="lower"><text:span> 1</text:span></text:span>", в реестр включению не подлежит.".</text:p>
      <text:p text:style-name="s1"><text:bookmark text:name="anchor6003"/>3. В <text:a xlink:type="simple" xlink:href="http://ivo.garant.ru/document/redirect/71252170/0">постановлении</text:a> Правительства Российской Федерации от 16 ноября 2015 г. N 1236 "Об установлении запрета на допуск программного обеспечения, происходящего из иностранных государств, для целей осуществления закупок для обеспечения государственных и муниципальных нужд" (Собрание законодательства Российской Федерации, 2015, N 47, ст. 6600; 2017, N 52, ст. 8168; 2021, N 30, ст. 5801; 2023, N 1, ст. 272):</text:p>
      <text:p text:style-name="s1"><text:bookmark text:name="anchor6031"/>а) <text:a xlink:type="simple" xlink:href="http://ivo.garant.ru/document/redirect/71252170/0">наименование</text:a> изложить в следующей редакции:</text:p>
      <text:p text:style-name="s1"/>
      <text:h text:outline-level="1" text:style-name="s3">"Об утверждении Правил формирования и ведения единого реестра российских программ для электронных вычислительных машин и баз данных и единого реестра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text:h>
      <text:p text:style-name="s1"/>
      <text:p text:style-name="s1"><text:bookmark text:name="anchor6032"/>б) в <text:a xlink:type="simple" xlink:href="http://ivo.garant.ru/document/redirect/71252170/100">преамбуле</text:a> слова "В соответствии с Федеральным законом "Об информации, информационных технологиях и о защите информации" и Федеральным законом "О контрактной системе в сфере закупок товаров, работ, услуг для обеспечения государственных и муниципальных нужд" исключить;</text:p>
      <text:p text:style-name="s1"><text:bookmark text:name="anchor6033"/>в) <text:a xlink:type="simple" xlink:href="http://ivo.garant.ru/document/redirect/71252170/103">абзац третий пункта 1</text:a>, <text:a xlink:type="simple" xlink:href="http://ivo.garant.ru/document/redirect/71252170/2">пункты 2 - 2<text:span text:style-name="upper"><text:span> 2</text:span></text:span></text:a>, <text:a xlink:type="simple" xlink:href="http://ivo.garant.ru/document/redirect/71252170/3">3 - 5</text:a>, <text:a xlink:type="simple" xlink:href="http://ivo.garant.ru/document/redirect/71252170/9">9</text:a> и <text:a xlink:type="simple" xlink:href="http://ivo.garant.ru/document/redirect/71252170/2000">Порядок</text:a> подготовки обоснования невозможности соблюдения запрета на допуск программного обеспечения, происходящего из иностранных государств (за исключением программного обеспечения, включенного в единый реестр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 для целей осуществления закупок для обеспечения государственных и муниципальных нужд, утвержденный указанным постановлением, признать утратившими силу.</text:p>
      <text:p text:style-name="s1"><text:bookmark text:name="anchor6004"/>4. <text:a xlink:type="simple" xlink:href="http://ivo.garant.ru/document/redirect/71606930/20051">Подпункт "а" пункта 5</text:a> Правил использования каталога товаров, работ, услуг для обеспечения государственных и муниципальных нужд, утвержденных <text:a xlink:type="simple" xlink:href="http://ivo.garant.ru/document/redirect/71606930/0">постановлением</text:a> Правительства Российской Федерации от 8 февраля 2017 г. N 145 "Об утверждении Правил формирования и ведения в единой информационной системе в сфере закупок каталога товаров, работ, услуг для обеспечения государственных и муниципальных нужд и Правил использования каталога товаров, работ, услуг для обеспечения государственных и муниципальных нужд" (Собрание законодательства Российской Федерации, 2017, N 7, ст. 1084; 2020, N 28, ст. 4421; N 49, ст. 7898; 2021, N 36, ст. 6406; N 48, ст. 8075; 2022, N 46, ст. 7988; 2023, N 14, ст. 2452), изложить в следующей редакции:</text:p>
      <text:p text:style-name="s1"><text:bookmark text:name="anchor20051"/>"а) если при осуществлении закупки товара (в том числе поставляемого при выполнении закупаемых работ, оказании закупаемых услуг), указанного в позициях 25, 26 и 32 приложения N 1 к постановлению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 позициях 191 - 361 приложения N 2 к указанному постановлению, применяются предусмотренные пунктом 1 указанного постановления запрет, ограничение соответственно;".</text:p>
      <text:p text:style-name="s1"><text:bookmark text:name="anchor6005"/>5. <text:a xlink:type="simple" xlink:href="http://ivo.garant.ru/document/redirect/71968598/40031">Пункт 31</text:a> дополнительных требований к операторам электронных площадок, операторам специализированных электронных площадок и функционированию электронных площадок, специализированных электронных площадок, утвержденных <text:a xlink:type="simple" xlink:href="http://ivo.garant.ru/document/redirect/71968598/0">постановлением</text:a> Правительства Российской Федерации от 8 июня 2018 г. N 656 "О требованиях к операторам электронных площадок, операторам специализированных электронных площадок, электронным площадкам, специализированным электронным площадкам и функционированию электронных площадок, специализированных электронных площадок, подтверждении соответствия таким требованиям, об утрате юридическим лицом статуса оператора электронной площадки, оператора специализированной электронной площадки" (Собрание законодательства Российской Федерации, 2018, N 26, ст. 3843; 2022, N 46, ст. 7988), изложить в следующей редакции:</text:p>
      <text:p text:style-name="s1"><text:bookmark text:name="anchor40031"/>"31. Формирование и размещение на электронной площадке, специализированной электронной площадке заявки на участие в закупке осуществляются в соответствии со следующими требованиями:</text:p>
      <text:p text:style-name="s1"><text:bookmark text:name="anchor40311"/>а) заявка на участие в закупке формируется участником закупки с использованием электронной площадки, специализированной электронной площадки путем заполнения экранных форм ее веб-интерфейса и (или) приложения электронного документа, содержащего информацию, сформированную без использования электронной площадки, специализированной площадки, в том числе электронного образа бумажного документа (документа на бумажном носителе, преобразованного в электронную форму путем сканирования с сохранением его реквизитов в файле в формате PDF);</text:p>
      <text:p text:style-name="s1"><text:bookmark text:name="anchor40312"/>б) путем заполнения экранных форм веб-интерфейса электронной площадки, специализированной электронной площадки подлежат указанию:</text:p>
      <text:p text:style-name="s1">товарный знак (при наличии у товара товарного знака);</text:p>
      <text:p text:style-name="s1">характеристики предлагаемого участником закупки товара в части характеристик, содержащихся в извещении об осуществлении закупки в соответствии с пунктом 5 части 1 статьи 42 Федерального закона, в приглашении принять участие в определении поставщика (подрядчика, исполнителя) в соответствии с пунктом 1 части 1 статьи 75 Федерального закона соответственно;</text:p>
      <text:p text:style-name="s1"><text:bookmark text:name="anchor403124"/>наименование страны происхождения товара (в соответствии с Общероссийским классификатором стран мира);</text:p>
      <text:p text:style-name="s1">номер реестровой записи из реестра российской промышленной продукции, предусмотренного Федеральным законом "О промышленной политике в Российской Федерации", в отношении товара (в том числе поставляемого при выполнении закупаемых работ, оказании закупаемых услуг), указанного в позициях 1 - 145 приложения N 1 к постановлению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 (далее - постановление Правительства Российской Федерации от 23 декабря 2024 г. N 1875), позициях 1 - 433 приложения N 2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пунктом 1 постановления Правительства Российской Федерации от 23 декабря 2024 г. N 1875, и в соответствии с абзацем четвертым настоящего подпункта страной происхождения товара указана Российская Федерация. В случае если в отношении такого товара постановлением Правительства Российской Федерации от 17 июля 2015 г. N 719 "О подтверждении производства российской промышленной продукции" за выполнение (освоение) на территории Российской Федерации соответствующих операций (условий) установлены требования о совокупном количестве баллов, указывается совокупное количество баллов за выполнение (освоение) на территории Российской Федерации соответствующих операций (условий);</text:p>
      <text:p text:style-name="s1">номер реестровой записи из евразийского реестра промышленных товаров государств - членов Евразийского экономического союза, порядок формирования и ведения которого устанавливается правом Евразийского экономического союза, в отношении товара (в том числе поставляемого при выполнении закупаемых работ, оказании закупаемых услуг), указанного в позициях 1 - 145 приложения N 1 к постановлению Правительства Российской Федерации от 23 декабря 2024 г. N 1875, позициях 1 - 433 приложения N 2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пунктом 1 постановления Правительства Российской Федерации от 23 декабря 2024 г. N 1875, и в соответствии с абзацем четвертым настоящего подпункта страной происхождения товара указано государство - член Евразийского экономического союза, за исключением Российской Федерации. При этом указывается совокупное количество баллов за выполнение (освоение) на территории Евразийского экономического союза соответствующих операций (условий), если в отношении такого товара правом Евразийского экономического союза установлены требования о совокупном количестве баллов за выполнение (освоение) на территории Евразийского экономического союза соответствующих операций (условий);</text:p>
      <text:p text:style-name="s1">порядковый номер реестровой записи из единого реестра российских программ для электронных вычислительных машин и баз данных в отношении программы для электронных вычислительных машин и (или) баз данных, указанных в позиции 146 приложения N 1 к постановлению Правительства Российской Федерации от 23 декабря 2024 г. N 1875 (далее - программное обеспечение), если при осуществлении закупки применяется запрет, предусмотренный пунктом 1 постановления Правительства Российской Федерации от 23 декабря 2024 г. N 1875, и в соответствии с абзацем четвертым настоящего подпункта страной происхождения программного обеспечения указана Российская Федерация;</text:p>
      <text:p text:style-name="s1">порядковый номер реестровой записи из единого реестра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 в отношении программного обеспечения, если при осуществлении закупки применяется запрет, предусмотренный пунктом 1 постановления Правительства Российской Федерации от 23 декабря 2024 г. N 1875, и в соответствии с абзацем четвертым настоящего подпункта страной происхождения программного обеспечения указано государство - член Евразийского экономического союза, за исключением Российской Федерации;</text:p>
      <text:p text:style-name="s1"><text:bookmark text:name="anchor40313"/>в) в случае незаполнения экранных форм веб-интерфейса электронной площадки, специализированной электронной площадки в соответствии с подпунктом "б" настоящего пункта, заявка на участие в закупке на электронной площадке, специализированной электронной площадке не формируется.".</text:p>
      <text:p text:style-name="s1"><text:bookmark text:name="anchor6006"/>6. <text:a xlink:type="simple" xlink:href="http://ivo.garant.ru/document/redirect/71968590/1000">Дополнительные требования</text:a> к функционированию электронной площадки для целей осуществления конкурентной закупки с участием субъектов малого и среднего предпринимательства, утвержденные <text:a xlink:type="simple" xlink:href="http://ivo.garant.ru/document/redirect/71968590/0">постановлением</text:a> Правительства Российской Федерации от 8 июня 2018 г. N 657 "Об утверждении дополнительных требований к функционированию электронной площадки для целей осуществления конкурентной закупки с участием субъектов малого и среднего предпринимательства" (Собрание законодательства Российской Федерации, 2018, N 26, ст. 3844), дополнить <text:a xlink:type="simple" xlink:href="http://ivo.garant.ru/document/redirect/71968590/10020">пунктом 20</text:a> следующего содержания:</text:p>
      <text:p text:style-name="s1"><text:bookmark text:name="anchor10020"/>"20. Формирование и размещение на электронной площадке заявки на участие в конкурентной закупке осуществляются в соответствии со следующими требованиями:</text:p>
      <text:p text:style-name="s1"><text:bookmark text:name="anchor10021"/>а) заявка на участие в конкурентной закупке формируется участником закупки с использованием электронной площадки путем заполнения экранных форм ее веб-интерфейса, приложения электронного документа, содержащего информацию, сформированную без использования электронной площадки, в том числе электронного образа бумажного документа (документа на бумажном носителе, преобразованного в электронную форму путем сканирования с сохранением его реквизитов в файле в формате PDF);</text:p>
      <text:p text:style-name="s1"><text:bookmark text:name="anchor10022"/>б) путем заполнения экранных форм веб-интерфейса электронной площадки подлежат указанию:</text:p>
      <text:p text:style-name="s1"><text:bookmark text:name="anchor10222"/>наименование страны происхождения товара (в соответствии с Общероссийским классификатором стран мира);</text:p>
      <text:p text:style-name="s1">номер реестровой записи из реестра российской промышленной продукции, предусмотренного Федеральным законом "О промышленной политике в Российской Федерации", в отношении товара (в том числе поставляемого при выполнении закупаемых работ, оказании закупаемых услуг), указанного в позициях 1 - 145 приложения N 1 к постановлению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 (далее - постановление Правительства Российской Федерации от 23 декабря 2024 г. N 1875), позициях 1 - 433 приложения N 2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пунктом 1 постановления Правительства Российской Федерации от 23 декабря 2024 г. N 1875, и в соответствии с абзацем вторым настоящего подпункта страной происхождения товара указана Российская Федерация. В случае если в отношении такого товара постановлением Правительства Российской Федерации от 17 июля 2015 г. N 719 "О подтверждении производства российской промышленной продукции" за выполнение (освоение) на территории Российской Федерации соответствующих операций (условий) установлены требования о совокупном количестве баллов, также указывается совокупное количество баллов за выполнение (освоение) на территории Российской Федерации соответствующих операций (условий);</text:p>
      <text:p text:style-name="s1">номер реестровой записи из евразийского реестра промышленных товаров государств - членов Евразийского экономического союза, порядок формирования и ведения которого устанавливается правом Евразийского экономического союза, в отношении товара (в том числе поставляемого при выполнении закупаемых работ, оказании закупаемых услуг), указанного в позициях 1 - 145 приложения N 1 к постановлению Правительства Российской Федерации от 23 декабря 2024 г. N 1875, позициях 1 - 433 приложения N 2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пунктом 1 постановления Правительства Российской Федерации от 23 декабря 2024 г. N 1875, и в соответствии с абзацем вторым настоящего подпункта страной происхождения товара указано государство - член Евразийского экономического союза, за исключением Российской Федерации. При этом указывается совокупное количество баллов за выполнение (освоение) на территории Евразийского экономического союза соответствующих операций (условий), если в отношении такого товара правом Евразийского экономического союза установлены требования о совокупном количестве баллов за выполнение (освоение) на территории Евразийского экономического союза соответствующих операций (условий);</text:p>
      <text:p text:style-name="s1">порядковый номер реестровой записи из единого реестра российских программ для электронных вычислительных машин и баз данных в отношении программы для электронных вычислительных машин и (или) баз данных, указанных в позиции 146 приложения N 1 к постановлению Правительства Российской Федерации от 23 декабря 2024 г. N 1875 (далее - программное обеспечение), если при осуществлении закупки применяется запрет, предусмотренный пунктом 1 постановления Правительства Российской Федерации от 23 декабря 2024 г. N 1875, и в соответствии с абзацем вторым настоящего подпункта страной происхождения программного обеспечения указана Российская Федерация;</text:p>
      <text:p text:style-name="s1">порядковый номер реестровой записи из единого реестра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 в отношении программного обеспечения, если при осуществлении закупки применяются запрет и (или) ограничение, предусмотренные пунктом 1 постановления Правительства Российской Федерации от 23 декабря 2024 г. N 1875, и в соответствии с абзацем вторым настоящего подпункта страной происхождения программного обеспечения указано государство - член Евразийского экономического союза, за исключением Российской Федерации;</text:p>
      <text:p text:style-name="s1"><text:bookmark text:name="anchor10023"/>в) в случае незаполнения экранных форм веб-интерфейса электронной площадки в соответствии с подпунктом "б" настоящего пункта, заявка на участие в закупке на электронной площадке не формируется.".</text:p>
      <text:p text:style-name="s1"><text:bookmark text:name="anchor6007"/>7. В <text:a xlink:type="simple" xlink:href="http://ivo.garant.ru/document/redirect/400860204/0">постановлении</text:a> Правительства Российской Федерации от 27 мая 2021 г. N 814 "О мониторинге закупок товаров, работ, услуг для обеспечения государственных и муниципальных нужд и закупок товаров, работ, услуг отдельными видами юридических лиц, а также об оценке эффективности деятельности органов контроля, осуществляющих контроль за соблюдением законодательства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о внесении изменений в некоторые акты Правительства Российской Федерации и признании утратившими силу некоторых актов Правительства Российской Федерации и отдельных положений некоторых актов Правительства Российской Федерации" (Собрание законодательства Российской Федерации, 2021, N 24, ст. 4495; N 50, ст. 8544):</text:p>
      <text:p text:style-name="s1"><text:bookmark text:name="anchor6071"/>а) <text:a xlink:type="simple" xlink:href="http://ivo.garant.ru/document/redirect/400860204/2">пункт 2</text:a> признать утратившим силу;</text:p>
      <text:p text:style-name="s1"><text:bookmark text:name="anchor6072"/>б) в <text:a xlink:type="simple" xlink:href="http://ivo.garant.ru/document/redirect/400860204/0">Положении</text:a> о порядке обеспечения мониторинга закупок товаров, работ, услуг для обеспечения государственных и муниципальных нужд, о требованиях к содержанию и порядку подготовки сводного аналитического отчета по результатам такого мониторинга, а также сроки подготовки указанного отчета, о порядке оценки эффективности деятельности органов контроля, указанных в части 1 статьи 99 Федерального закона "О контрактной системе в сфере закупок товаров, работ, услуг для обеспечения государственных и муниципальных нужд", а также о порядке и сроке осуществления мониторинга закупок товаров, работ, услуг отдельными видами юридических лиц и о требованиях к его содержанию, утвержденном указанным <text:a xlink:type="simple" xlink:href="http://ivo.garant.ru/document/redirect/400860204/0">постановлением</text:a>:</text:p>
      <text:p text:style-name="s1"><text:bookmark text:name="anchor6721"/><text:a xlink:type="simple" xlink:href="http://ivo.garant.ru/document/redirect/400860204/10482">абзац второй подпункта "з" пункта 4</text:a> признать утратившим силу;</text:p>
      <text:p text:style-name="s1"><text:bookmark text:name="anchor6722"/><text:a xlink:type="simple" xlink:href="http://ivo.garant.ru/document/redirect/400860204/1010">пункт 10</text:a> изложить в следующей редакции:</text:p>
      <text:p text:style-name="s1"><text:bookmark text:name="anchor1010"/>"10. Федеральный орган исполнительной власти в сфере промышленной политики по результатам рассмотрения информации о совокупном объеме закупок товаров российского происхождения, работ, услуг, соответственно выполняемых, оказываемых российскими лицами, предусмотренной пунктом 12 Положения о требованиях к форме и содержанию отчета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о порядке формирования и размещения такого отчета в единой информационной системе в сфере закупок товаров, работ, услуг для обеспечения государственных и муниципальных нужд, на официальном сайте единой информационной системы в сфере закупок товаров, работ, услуг для обеспечения государственных и муниципальных нужд в информационно-телекоммуникационной сети "Интернет", о порядке предоставления федеральному органу исполнительной власти, указанному в части 7 статьи 14 Федерального закона "О контрактной системе в сфере закупок товаров, работ, услуг для обеспечения государственных и муниципальных нужд" и части 7 статьи 3<text:span text:style-name="upper"><text:span> 1-4 </text:span></text:span>Федерального закона "О закупках товаров, работ, услуг отдельными видами юридических лиц", доступа к информации, содержащейся в таких отчетах, размещенных в единой информационной системе в сфере закупок товаров, работ, услуг для обеспечения государственных и муниципальных нужд, о порядке рассмотрения таких отчетов и оценки результатов осуществления в отчетном году указанных закупок этим федеральным органом исполнительной власти, утвержденного постановлением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 вправе представить в уполномоченный орган предложения для рассмотрения при определении мер в соответствии с подпунктом "в" пункта 22 настоящего Положения в части изменения размеров минимальной обязательной доли закупок товаров российского происхождения, установленной пунктом 2 указанного постановления, совершенствования иных мер по предоставлению национального режима при осуществлении закупок товаров для обеспечения государственных и муниципальных нужд, закупок товаров отдельными видами юридических лиц.";</text:p>
      <text:p text:style-name="s1"><text:bookmark text:name="anchor6723"/><text:a xlink:type="simple" xlink:href="http://ivo.garant.ru/document/redirect/400860204/10221">подпункт "а" пункта 22</text:a> дополнить словами ", результаты оценки осуществления в отчетном году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text:p>
      <text:p text:style-name="s1"><text:bookmark text:name="anchor6008"/>8. В <text:a xlink:type="simple" xlink:href="http://ivo.garant.ru/document/redirect/403480268/0">постановлении</text:a> Правительства Российской Федерации от 27 января 2022 г. N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 (Собрание законодательства Российской Федерации, 2022, N 6, ст. 872; N 46, ст. 7988; N 51, ст. 9233; 2023, N 34, ст. 6590; 2024, N 28, ст. 4019):</text:p>
      <text:p text:style-name="s1"><text:bookmark text:name="anchor6081"/>а) в <text:a xlink:type="simple" xlink:href="http://ivo.garant.ru/document/redirect/403480268/1000">Положении</text:a> о единой информационной системе в сфере закупок, утвержденном указанным <text:a xlink:type="simple" xlink:href="http://ivo.garant.ru/document/redirect/403480268/0">постановлением</text:a>:</text:p>
      <text:p text:style-name="s1"><text:bookmark text:name="anchor6811"/>в <text:a xlink:type="simple" xlink:href="http://ivo.garant.ru/document/redirect/403480268/1020">пункте 20</text:a>:</text:p>
      <text:p text:style-name="s1"><text:bookmark text:name="anchor68111"/><text:a xlink:type="simple" xlink:href="http://ivo.garant.ru/document/redirect/403480268/1204">подпункт "г"</text:a> изложить в следующей редакции:</text:p>
      <text:p text:style-name="s1"><text:bookmark text:name="anchor1204"/>"г) к информации и документам, предусмотренным частью 19 статьи 4 Федерального закона "О закупках товаров, работ, услуг отдельными видами юридических лиц", - органам, указанным в абзацах втором - пятом и восьмом подпункта "б" настоящего пункта;";</text:p>
      <text:p text:style-name="s1"><text:bookmark text:name="anchor68112"/>в <text:a xlink:type="simple" xlink:href="http://ivo.garant.ru/document/redirect/403480268/12063">абзаце третьем подпункта "е"</text:a> слова "федеральному органу исполнительной власти, уполномоченному Правительством Российской Федерации на осуществление оценки достижения заказчиком минимальной доли закупок" заменить словами "федеральному органу исполнительной власти в сфере промышленной политики";</text:p>
      <text:p text:style-name="s1"><text:bookmark text:name="anchor6812"/>в <text:a xlink:type="simple" xlink:href="http://ivo.garant.ru/document/redirect/403480268/1022">пункте 22</text:a>:</text:p>
      <text:p text:style-name="s1"><text:bookmark text:name="anchor68121"/><text:a xlink:type="simple" xlink:href="http://ivo.garant.ru/document/redirect/403480268/12215">абзац пятый подпункта "а"</text:a> изложить в следующей редакции:</text:p>
      <text:p text:style-name="s1"><text:bookmark text:name="anchor12215"/>"федеральному органу исполнительной власти в сфере промышленной политики;";</text:p>
      <text:p text:style-name="s1"><text:bookmark text:name="anchor68122"/>дополнить <text:a xlink:type="simple" xlink:href="http://ivo.garant.ru/document/redirect/403480268/1228">подпунктом "ж"</text:a> следующего содержания:</text:p>
      <text:p text:style-name="s1"><text:bookmark text:name="anchor1228"/>"ж) к информации о совокупном объеме закупок товаров российского происхождения, работ, услуг, соответственно выполняемых, оказываемых российскими лицами, предусмотренной пунктом 12 Положения о требованиях к форме и содержанию отчета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о порядке формирования и размещения такого отчета в единой информационной системе в сфере закупок товаров, работ, услуг для обеспечения государственных и муниципальных нужд, на официальном сайте единой информационной системы в сфере закупок товаров, работ, услуг для обеспечения государственных и муниципальных нужд в информационно-телекоммуникационной сети "Интернет", о порядке предоставления федеральному органу исполнительной власти, указанному в части 7 статьи 14 Федерального закона "О контрактной системе в сфере закупок товаров, работ, услуг для обеспечения государственных и муниципальных нужд" и части 7 статьи 3<text:span text:style-name="upper"><text:span> 1-4</text:span></text:span> Федерального закона "О закупках товаров, работ, услуг отдельными видами юридических лиц", доступа к информации, содержащейся в таких отчетах, размещенных в единой информационной системе в сфере закупок товаров, работ, услуг для обеспечения государственных и муниципальных нужд, о порядке рассмотрения таких отчетов и оценки результатов осуществления в отчетном году указанных закупок этим федеральным органом исполнительной власти, утвержденного постановлением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text:p>
      <text:p text:style-name="s1">федеральному органу исполнительной власти, определенному пунктом 9 указанного постановления Правительства Российской Федерации;</text:p>
      <text:p text:style-name="s1">федеральному органу исполнительной власти в сфере промышленной политики;</text:p>
      <text:p text:style-name="s1">федеральному органу исполнительной власти, определенному в соответствии с частью 6 статьи 4 Федерального закона.";</text:p>
      <text:p text:style-name="s1"><text:bookmark text:name="anchor6813"/><text:a xlink:type="simple" xlink:href="http://ivo.garant.ru/document/redirect/403480268/1311">подпункт "а" пункта 31</text:a> изложить в следующей редакции:</text:p>
      <text:p text:style-name="s1"><text:bookmark text:name="anchor1311"/>"а) представление с электронных площадок в единую информационную систему:</text:p>
      <text:p text:style-name="s1">информации об аккредитованных на электронных площадках участниках закупок;</text:p>
      <text:p text:style-name="s1">предварительных предложений, предусмотренных частью 12 статьи 93 Федерального закона;</text:p>
      <text:p text:style-name="s1">характеристик предлагаемого участником закупки товара путем их размещения в единой информационной системе без размещения на официальном сайте одновременно с размещением протокола подведения итогов определения поставщика (подрядчика, исполнителя);</text:p>
      <text:p text:style-name="s1">иной информации и документов в соответствии с положениями Федерального закона и Федерального закона "О закупках товаров, работ, услуг отдельными видами юридических лиц" с целью их размещения в единой информационной системе;";</text:p>
      <text:p text:style-name="s1"><text:bookmark text:name="anchor6083"/>б) в <text:a xlink:type="simple" xlink:href="http://ivo.garant.ru/document/redirect/403480268/2000">Положении</text:a> о порядке формирования и размещения информации и документов в единой информационной системе в сфере закупок, о требованиях к их формам, утвержденном указанным <text:a xlink:type="simple" xlink:href="http://ivo.garant.ru/document/redirect/403480268/0">постановлением</text:a>:</text:p>
      <text:p text:style-name="s1"><text:bookmark text:name="anchor6831"/><text:a xlink:type="simple" xlink:href="http://ivo.garant.ru/document/redirect/403480268/208226">абзац двадцать шестой подпункта "б" пункта 8</text:a> изложить в следующей редакции:</text:p>
      <text:p text:style-name="s1"><text:bookmark text:name="anchor208226"/>"информация о запрете или об ограничении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 о преимуществе в отношении товаров российского происхождения (в том числе поставляемых при выполнении закупаемых работ, оказании закупаемых услуг), работ, услуг, соответственно выполняемых, оказываемых российскими лицами, в случае, если такие запрет, ограничение, преимущество установлены в соответствии с пунктом 1 части 2 статьи 14 Федерального закона в отношении товара (в том числе поставляемого при выполнении закупаемой работы, оказании закупаемой услуги), работы, услуги, являющихся объектом закупки;";</text:p>
      <text:p text:style-name="s1"><text:bookmark text:name="anchor6832"/><text:a xlink:type="simple" xlink:href="http://ivo.garant.ru/document/redirect/403480268/10125">позицию 25 раздела 1</text:a> приложения к указанному Положению изложить в следующей редакции:</text:p>
      <text:p text:style-name="s1"><text:bookmark text:name="anchor10125"/>"25. Информация о запрете или об ограничении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 о преимуществе в отношении товаров российского происхождения (в том числе поставляемых при выполнении закупаемых работ, оказании закупаемых услуг), работ, услуг, соответственно выполняемых, оказываемых российскими лицами, в случае, если такие запрет, ограничение, преимущество установлены в соответствии с пунктом 1 части 2 статьи 14 Федерального закона в отношении товара (в том числе поставляемого при выполнении закупаемой работы, оказании закупаемой услуги), работы, услуги, являющихся объектом закупки";</text:p>
      <text:p text:style-name="s9header">ГАРАНТ:</text:p>
      <text:p text:style-name="s9"><text:bookmark text:name="anchor6084"/>Положения подпункта "в" <text:a xlink:type="simple" xlink:href="#anchor108">применяются</text:a> к отношениям, связанным с осуществлением закупок, извещения об осуществлении которых размещены в единой информационной системе и приглашения принять участие в которых направлены либо контракты (договоры) с единственным поставщиком (подрядчиком, исполнителем) при осуществлении которых заключены с 1 января 2026 г.</text:p>
      <text:p text:style-name="s1">в) в <text:a xlink:type="simple" xlink:href="http://ivo.garant.ru/document/redirect/403480268/5000">Правилах</text:a> ведения реестра контрактов, заключенных заказчиками, утвержденных указанным <text:a xlink:type="simple" xlink:href="http://ivo.garant.ru/document/redirect/403480268/0">постановлением</text:a>:</text:p>
      <text:p text:style-name="s1"><text:bookmark text:name="anchor6841"/><text:a xlink:type="simple" xlink:href="http://ivo.garant.ru/document/redirect/403480268/5108">подпункт "з" пункта 10</text:a> дополнить <text:a xlink:type="simple" xlink:href="http://ivo.garant.ru/document/redirect/403480268/510812">абзацами</text:a> следующего содержания:</text:p>
      <text:p text:style-name="s1"><text:bookmark text:name="anchor510812"/>"номер реестровой записи из реестра российской промышленной продукции, предусмотренного Федеральным законом "О промышленной политике в Российской Федерации", в отношении товара (в том числе поставляемого при выполнении закупаемых работ, оказании закупаемых услуг), указанного в позициях 1 - 145 приложения N 1 к постановлению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 (далее - постановление Правительства Российской Федерации от 23 декабря 2024 г. N 1875), позициях 1 - 433 приложения N 2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пунктом 1 постановления Правительства Российской Федерации от 23 декабря 2024 г. N 1875, и в соответствии с абзацем одиннадцатым настоящего подпункта страной происхождения товара указана Российская Федерация. В случае если в отношении такого товара постановлением Правительства Российской Федерации от 17 июля 2015 г. N 719 "О подтверждении производства российской промышленной продукции" за выполнение (освоение) на территории Российской Федерации соответствующих операций (условий) установлены требования о совокупном количестве баллов, также указывается совокупное количество баллов за выполнение (освоение) на территории Российской Федерации соответствующих операций (условий);</text:p>
      <text:p text:style-name="s1">номер реестровой записи из евразийского реестра промышленных товаров государств - членов Евразийского экономического союза, порядок формирования и ведения которого устанавливается правом Евразийского экономического союза, в отношении товара (в том числе поставляемого при выполнении закупаемых работ, оказании закупаемых услуг), указанного в позициях 1 - 145 приложения N 1 к постановлению Правительства Российской Федерации от 23 декабря 2024 г. N 1875, позициях 1 - 433 приложения N 2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пунктом 1 постановления Правительства Российской Федерации от 23 декабря 2024 г. N 1875, и в соответствии с абзацем одиннадцатым настоящего подпункта страной происхождения товара указано государство - член Евразийского экономического союза, за исключением Российской Федерации. При этом указывается совокупное количество баллов за выполнение (освоение) на территории Евразийского экономического союза соответствующих операций (условий), если в отношении такого товара правом Евразийского экономического союза установлены требования о совокупном количестве баллов за выполнение (освоение) на территории Евразийского экономического союза соответствующих операций (условий);</text:p>
      <text:p text:style-name="s1">порядковый номер реестровой записи из единого реестра российских программ для электронных вычислительных машин и баз данных в отношении программы для электронных вычислительных машин и (или) баз данных, указанных в позиции 146 приложения N 1 к постановлению Правительства Российской Федерации от 23 декабря 2024 г. N 1875 (далее - программное обеспечение), если при осуществлении закупки применяется запрет, предусмотренный пунктом 1 постановления Правительства Российской Федерации от 23 декабря 2024 г. N 1875, и в соответствии с абзацем одиннадцатым настоящего подпункта страной происхождения программного обеспечения указана Российская Федерация;</text:p>
      <text:p text:style-name="s1">порядковый номер реестровой записи из единого реестра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 в отношении программного обеспечения, если при осуществлении закупки применяется запрет, предусмотренный пунктом 1 постановления Правительства Российской Федерации от 23 декабря 2024 г. N 1875, и в соответствии с абзацем одиннадцатым настоящего подпункта страной происхождения программного обеспечения указано государство - член Евразийского экономического союза, за исключением Российской Федерации;";</text:p>
      <text:p text:style-name="s1"><text:bookmark text:name="anchor6842"/><text:a xlink:type="simple" xlink:href="http://ivo.garant.ru/document/redirect/403480268/5185">подпункт "д" пункта 18</text:a> после слов "и услуг" дополнить словами ", номера реестровой записи из реестра российской промышленной продукции, предусмотренного Федеральным законом "О промышленной политике в Российской Федерации", совокупного количества баллов за выполнение (освоение) на территории Российской Федерации соответствующих операций (условий), номера реестровой записи из евразийского реестра промышленных товаров, порядок формирования и ведения которого устанавливается правом Евразийского экономического союза, совокупного количества баллов за выполнение (освоение) на территории Евразийского экономического союза соответствующих операций (условий), порядковых номеров реестровых записей из единого реестра российских программ для электронных вычислительных машин и баз данных, единого реестра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text:p>
      <text:p text:style-name="s1"/>
      <text:p text:style-name="s1_right_fi698"><text:bookmark text:name="anchor7000"/><text:span text:style-name="s10">УТВЕРЖДЕН
<text:a xlink:type="simple" xlink:href="#anchor0">постановлением</text:a> Правительства
Российской Федерации
от 23 декабря 2024 г. N 1875</text:span></text:p>
      <text:p text:style-name="s1"/>
      <text:h text:outline-level="1" text:style-name="s3">Перечень
утративших силу актов и отдельных положений актов Правительства Российской Федерации</text:h>
      <text:p text:style-name="s1"/>
      <text:p text:style-name="s1"><text:bookmark text:name="anchor7001"/>1. <text:a xlink:type="simple" xlink:href="http://ivo.garant.ru/document/redirect/70227594/10457">Пункты 45<text:span text:style-name="upper"><text:span> 7</text:span></text:span></text:a> и <text:a xlink:type="simple" xlink:href="http://ivo.garant.ru/document/redirect/70227594/10458">45<text:span text:style-name="upper"><text:span> 8</text:span></text:span></text:a> Положения о размещении в единой информационной системе, на официальном сайте такой системы в информационно-телекоммуникационной сети "Интернет" положения о закупке, типового положения о закупке, информации о закупке, утвержденного <text:a xlink:type="simple" xlink:href="http://ivo.garant.ru/document/redirect/70227594/0">постановлением</text:a> Правительства Российской Федерации от 10 сентября 2012 г. N 908 "Об утверждении Положения о размещении в единой информационной системе, на официальном сайте такой системы в информационно-телекоммуникационной сети "Интернет" положения о закупке, типового положения о закупке, информации о закупке" (Собрание законодательства Российской Федерации, 2012, N 38, ст. 5120; 2016, N 7, ст. 986; 2022, N 6, ст. 872; N 46, ст. 7988), <text:a xlink:type="simple" xlink:href="http://ivo.garant.ru/document/redirect/70227594/10300">разделы 3</text:a>, <text:a xlink:type="simple" xlink:href="http://ivo.garant.ru/document/redirect/70227594/10400">4</text:a> и <text:a xlink:type="simple" xlink:href="http://ivo.garant.ru/document/redirect/70227594/102222">сноску 2</text:a> приложения к указанному Положению.</text:p>
      <text:p text:style-name="s1"><text:bookmark text:name="anchor7002"/>2. <text:a xlink:type="simple" xlink:href="http://ivo.garant.ru/document/redirect/70861952/0">Постановление</text:a> Правительства Российской Федерации от 5 февраля 2015 г. N 102 "Об установлении ограничения допуска отдельных видов медицинских изделий, происходящих из иностранных государств, для целей осуществления закупок для обеспечения государственных и муниципальных нужд" (Собрание законодательства Российской Федерации, 2015, N 6, ст. 979).</text:p>
      <text:p text:style-name="s1"><text:bookmark text:name="anchor7003"/>3. <text:a xlink:type="simple" xlink:href="http://ivo.garant.ru/document/redirect/71064920/0">Постановление</text:a> Правительства Российской Федерации от 2 июня 2015 г. N 528 "О внесении изменения в перечень отдельных видов медицинских изделий, происходящих из иностранных государств, в отношении которых устанавливается ограничение допуска для целей осуществления закупок для обеспечения государственных и муниципальных нужд" (Собрание законодательства Российской Федерации, 2015, N 23, ст. 3329).</text:p>
      <text:p text:style-name="s1"><text:bookmark text:name="anchor7004"/>4. <text:a xlink:type="simple" xlink:href="http://ivo.garant.ru/document/redirect/71264810/0">Постановление</text:a> Правительства Российской Федерации от 30 ноября 2015 г. N 1289 "Об ограничениях и условиях допуска происходящих из иностранных государств лекарственных препаратов, включенных в перечень жизненно необходимых и важнейших лекарственных препаратов, для целей осуществления закупок для обеспечения государственных и муниципальных нужд" (Собрание законодательства Российской Федерации, 2015, N 49, ст. 6981).</text:p>
      <text:p text:style-name="s1"><text:bookmark text:name="anchor7005"/>5. <text:a xlink:type="simple" xlink:href="http://ivo.garant.ru/document/redirect/71385036/0">Постановление</text:a> Правительства Российской Федерации от 22 апреля 2016 г. N 337 "О внесении изменений в постановление Правительства Российской Федерации от 5 февраля 2015 г. N 102" (Собрание законодательства Российской Федерации, 2016, N 18, ст. 2630).</text:p>
      <text:p text:style-name="s1"><text:bookmark text:name="anchor7006"/>6. <text:a xlink:type="simple" xlink:href="http://ivo.garant.ru/document/redirect/71475172/0">Постановление</text:a> Правительства Российской Федерации от 22 августа 2016 г. N 832 "Об ограничениях допуска отдельных видов пищевых продуктов, происходящих из иностранных государств, для целей осуществления закупок для обеспечения государственных и муниципальных нужд" (Собрание законодательства Российской Федерации, 2016, N 36, ст. 5398).</text:p>
      <text:p text:style-name="s1"><text:bookmark text:name="anchor7007"/>7. <text:a xlink:type="simple" xlink:href="http://ivo.garant.ru/document/redirect/71492106/0">Постановление</text:a> Правительства Российской Федерации от 16 сентября 2016 г. N 925 "О приоритете товаров российского происхождения, работ, услуг, выполняемых, оказываемых российскими лицами, по отношению к товарам, происходящим из иностранного государства, работам, услугам, выполняемым, оказываемым иностранными лицами" (Собрание законодательства Российской Федерации, 2016, N 39, ст. 5649).</text:p>
      <text:p text:style-name="s1"><text:bookmark text:name="anchor7008"/>8. <text:a xlink:type="simple" xlink:href="http://ivo.garant.ru/document/redirect/71557232/0">Постановление</text:a> Правительства Российской Федерации от 30 ноября 2016 г. N 1268 "О внесении изменений в перечень отдельных видов медицинских изделий,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16, N 50, ст. 7091).</text:p>
      <text:p text:style-name="s1"><text:bookmark text:name="anchor7009"/>9. <text:a xlink:type="simple" xlink:href="http://ivo.garant.ru/document/redirect/71689754/1008">Пункты 8</text:a> и <text:a xlink:type="simple" xlink:href="http://ivo.garant.ru/document/redirect/71689754/1011">11</text:a> изменений, которые вносятся в акты Правительства Российской Федерации, утвержденных <text:a xlink:type="simple" xlink:href="http://ivo.garant.ru/document/redirect/71689754/0">постановлением</text:a> Правительства Российской Федерации от 30 мая 2017 г. N 663 "О внесении изменений и признании утратившими силу некоторых актов Правительства Российской Федерации" (Собрание законодательства Российской Федерации, 2017, N 23, ст. 3359).</text:p>
      <text:p text:style-name="s1"><text:bookmark text:name="anchor7010"/>10. <text:a xlink:type="simple" xlink:href="http://ivo.garant.ru/document/redirect/71745364/0">Постановление</text:a> Правительства Российской Федерации от 14 августа 2017 г. N 968 "О внесении изменений в постановление Правительства Российской Федерации от 5 февраля 2015 г. N 102" (Собрание законодательства Российской Федерации, 2017, N 34, ст. 5291).</text:p>
      <text:p text:style-name="s1"><text:bookmark text:name="anchor7011"/>11. <text:a xlink:type="simple" xlink:href="http://ivo.garant.ru/document/redirect/71808874/0">Постановление</text:a> Правительства Российской Федерации от 10 ноября 2017 г. N 1352 "О внесении изменения в перечень отдельных видов медицинских изделий,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17, N 47, ст. 6988).</text:p>
      <text:p text:style-name="s22header">Информация об изменениях:</text:p>
      <text:p text:style-name="s22"><text:bookmark text:name="anchor7012"/>Пункт 12 изменен с 19 февраля 2025 г. - <text:a xlink:type="simple" xlink:href="http://ivo.garant.ru/document/redirect/411523017/1002">Постановление</text:a> Правительства России от 18 февраля 2025 г. № 174</text:p>
      <text:p text:style-name="s22"><text:a xlink:type="simple" xlink:href="http://ivo.garant.ru/document/redirect/76847716/7012">См. предыдущую редакцию</text:a></text:p>
      <text:p text:style-name="s1">12. <text:a xlink:type="simple" xlink:href="http://ivo.garant.ru/document/redirect/71840062/1012">Подпункт 2 пункта 1</text:a>, <text:a xlink:type="simple" xlink:href="http://ivo.garant.ru/document/redirect/71840062/1002">пункт 2</text:a>, <text:a xlink:type="simple" xlink:href="http://ivo.garant.ru/document/redirect/71840062/1003">абзац первый</text:a> (в части пунктов 2<text:span text:style-name="upper"><text:span> 1</text:span></text:span> и 2<text:span text:style-name="upper"><text:span> 2</text:span></text:span>) и <text:a xlink:type="simple" xlink:href="http://ivo.garant.ru/document/redirect/483413628/21">абзацы второй - девятый пункта 3</text:a>, <text:a xlink:type="simple" xlink:href="http://ivo.garant.ru/document/redirect/71840062/1004">пункт 4</text:a> и <text:a xlink:type="simple" xlink:href="http://ivo.garant.ru/document/redirect/71840062/1009">пункт 9</text:a> изменений, которые вносятся в постановление Правительства Российской Федерации от 16 ноября 2015 г. N 1236, утвержденных <text:a xlink:type="simple" xlink:href="http://ivo.garant.ru/document/redirect/71840062/0">постановлением</text:a> Правительства Российской Федерации от 20 декабря 2017 г. N 1594 "О внесении изменений в постановление Правительства Российской Федерации от 16 ноября 2015 г. N 1236" (Собрание законодательства Российской Федерации, 2017, N 52, ст. 8168).</text:p>
      <text:p text:style-name="s1"><text:bookmark text:name="anchor7013"/>13. <text:a xlink:type="simple" xlink:href="http://ivo.garant.ru/document/redirect/71946614/0">Постановление</text:a> Правительства Российской Федерации от 12 мая 2018 г. N 572 "О внесении изменений в постановление Правительства Российской Федерации от 30 ноября 2015 г. N 1289" (Собрание законодательства Российской Федерации, 2018, N 22, ст. 3165).</text:p>
      <text:p text:style-name="s1"><text:bookmark text:name="anchor7014"/>14. <text:a xlink:type="simple" xlink:href="http://ivo.garant.ru/document/redirect/72134568/0">Постановление</text:a> Правительства Российской Федерации от 19 декабря 2018 г. N 1590 "О внесении изменений в постановление Правительства Российской Федерации от 5 февраля 2015 г. N 102" (Собрание законодательства Российской Федерации, 2018, N 53, ст. 8644).</text:p>
      <text:p text:style-name="s1"><text:bookmark text:name="anchor7015"/>15. <text:a xlink:type="simple" xlink:href="http://ivo.garant.ru/document/redirect/72246932/0">Постановление</text:a> Правительства Российской Федерации от 15 мая 2019 г. N 602 "О внесении изменений в некоторые акты Правительства Российской Федерации" (Собрание законодательства Российской Федерации, 2019, N 21, ст. 2564).</text:p>
      <text:p text:style-name="s1"><text:bookmark text:name="anchor7016"/>16. <text:a xlink:type="simple" xlink:href="http://ivo.garant.ru/document/redirect/72252770/0">Постановление</text:a> Правительства Российской Федерации от 25 мая 2019 г. N 660 "О внесении изменений в перечень отдельных видов пищевых продуктов,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19, N 22, ст. 2826).</text:p>
      <text:p text:style-name="s1"><text:bookmark text:name="anchor7017"/>17. <text:a xlink:type="simple" xlink:href="http://ivo.garant.ru/document/redirect/72283428/0">Постановление</text:a> Правительства Российской Федерации от 26 июня 2019 г. N 813 "О внесении изменений в перечень отдельных видов медицинских изделий,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19, N 27, ст. 3578).</text:p>
      <text:p text:style-name="s1"><text:bookmark text:name="anchor7018"/>18. <text:a xlink:type="simple" xlink:href="http://ivo.garant.ru/document/redirect/72301838/203">Абзацы четвертый</text:a> и <text:a xlink:type="simple" xlink:href="http://ivo.garant.ru/document/redirect/76848239/204">пятый пункта 2</text:a>, <text:a xlink:type="simple" xlink:href="http://ivo.garant.ru/document/redirect/72301838/3">пункты 3 - 3<text:span text:style-name="upper"><text:span> 3</text:span></text:span></text:a>, <text:a xlink:type="simple" xlink:href="http://ivo.garant.ru/document/redirect/72301838/6">6 - 8</text:a> и <text:a xlink:type="simple" xlink:href="http://ivo.garant.ru/document/redirect/72301838/10">10</text:a> постановления Правительства Российской Федерации от 10 июля 2019 г. N 878 "О мерах стимулирования производства радиоэлектронной продукции на территории Российской Федерации при осуществлении закупок товаров, работ, услуг для обеспечения государственных и муниципальных нужд, о внесении изменений в постановление Правительства Российской Федерации от 16 сентября 2016 г. N 925 и признании утратившими силу некоторых актов Правительства Российской Федерации" (Собрание законодательства Российской Федерации, 2019, N 29, ст. 4023; 2021, N 50, ст. 8596; 2023, N 14, ст. 2452), <text:a xlink:type="simple" xlink:href="http://ivo.garant.ru/document/redirect/72301838/3000">перечень</text:a> радиоэлектронной продукции, происходящей из иностранных государств, в отношении которой устанавливаются ограничения для целей осуществления закупок для обеспечения государственных и муниципальных нужд, и <text:a xlink:type="simple" xlink:href="http://ivo.garant.ru/document/redirect/72301838/4000">изменения</text:a>, которые вносятся в постановление Правительства Российской Федерации от 16 сентября 2016 г. N 925, утвержденные указанным постановлением.</text:p>
      <text:p text:style-name="s1"><text:bookmark text:name="anchor7019"/>19. <text:a xlink:type="simple" xlink:href="http://ivo.garant.ru/document/redirect/73850818/0">Постановление</text:a> Правительства Российской Федерации от 3 апреля 2020 г. N 445 "О внесении изменений в перечень отдельных видов пищевых продуктов,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20, N 15, ст. 2299).</text:p>
      <text:p text:style-name="s1"><text:bookmark text:name="anchor7020"/>20. <text:a xlink:type="simple" xlink:href="http://ivo.garant.ru/document/redirect/73979145/0">Постановление</text:a> Правительства Российской Федерации от 30 апреля 2020 г. N 616 "Об установлении запрета на допуск промышленных товаров, происходящих из иностранных государств, для целей осуществления закупок для государственных и муниципальных нужд, а также промышленных товаров, происходящих из иностранных государств, работ (услуг), выполняемых (оказываемых) иностранными лицами, для целей осуществления закупок для нужд обороны страны и безопасности государства" (Собрание законодательства Российской Федерации, 2020, N 19, ст. 2993).</text:p>
      <text:p text:style-name="s1"><text:bookmark text:name="anchor7021"/>21. <text:a xlink:type="simple" xlink:href="http://ivo.garant.ru/document/redirect/73979683/0">Постановление</text:a> Правительства Российской Федерации от 30 апреля 2020 г. N 617 "Об ограничениях допуска отдельных видов промышленных товаров, происходящих из иностранных государств, для целей осуществления закупок для обеспечения государственных и муниципальных нужд" (Собрание законодательства Российской Федерации, 2020, N 19, ст. 2994).</text:p>
      <text:p text:style-name="s1"><text:bookmark text:name="anchor7022"/>22. <text:a xlink:type="simple" xlink:href="http://ivo.garant.ru/document/redirect/74332238/0">Постановление</text:a> Правительства Российской Федерации от 30 июня 2020 г. N 962 "О внесении изменения в перечень отдельных видов медицинских изделий,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20, N 27, ст. 4245).</text:p>
      <text:p text:style-name="s1"><text:bookmark text:name="anchor7023"/>23. <text:a xlink:type="simple" xlink:href="http://ivo.garant.ru/document/redirect/74437706/0">Постановление</text:a> Правительства Российской Федерации от 25 июля 2020 г. N 1116 "О внесении изменений в постановление Правительства Российской Федерации от 10 июля 2019 г. N 878" (Собрание законодательства Российской Федерации, 2020, N 31, ст. 5192).</text:p>
      <text:p text:style-name="s1"><text:bookmark text:name="anchor7024"/>24. <text:a xlink:type="simple" xlink:href="http://ivo.garant.ru/document/redirect/74468871/0">Постановление</text:a> Правительства Российской Федерации от 4 августа 2020 г. N 1178 "О внесении изменений в постановление Правительства Российской Федерации от 30 апреля 2020 г. N 616" (Собрание законодательства Российской Федерации, 2020, N 32, ст. 5315).</text:p>
      <text:p text:style-name="s1"><text:bookmark text:name="anchor7025"/>25. <text:a xlink:type="simple" xlink:href="http://ivo.garant.ru/document/redirect/75007257/0">Постановление</text:a> Правительства Российской Федерации от 3 декабря 2020 г. N 2013 "О минимальной доле закупок товаров российского происхождения" (Собрание законодательства Российской Федерации, 2020, N 50, ст. 8219).</text:p>
      <text:p text:style-name="s1"><text:bookmark text:name="anchor7026"/>26. <text:a xlink:type="simple" xlink:href="http://ivo.garant.ru/document/redirect/75016819/0">Постановление</text:a> Правительства Российской Федерации от 3 декабря 2020 г. N 2014 "О минимальной обязательной доле закупок российских товаров и ее достижении заказчиком" (Собрание законодательства Российской Федерации, 2020, N 50, ст. 8220).</text:p>
      <text:p text:style-name="s1"><text:bookmark text:name="anchor7027"/>27. <text:a xlink:type="simple" xlink:href="http://ivo.garant.ru/document/redirect/400132484/0">Постановление</text:a> Правительства Российской Федерации от 23 декабря 2020 г. N 2238 "О внесении изменений в перечень медицинских изделий одноразового применения (использования) из поливинилхлоридных пластиков,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21, N 1, ст. 103).</text:p>
      <text:p text:style-name="s1"><text:bookmark text:name="anchor7028"/>28. <text:a xlink:type="simple" xlink:href="http://ivo.garant.ru/document/redirect/400132348/0">Постановление</text:a> Правительства Российской Федерации от 23 декабря 2020 г. N 2241 "О внесении изменений в постановление Правительства Российской Федерации от 30 апреля 2020 г. N 616" (Собрание законодательства Российской Федерации, 2021, N 1, ст. 106).</text:p>
      <text:p text:style-name="s1"><text:bookmark text:name="anchor7029"/>29. <text:a xlink:type="simple" xlink:href="http://ivo.garant.ru/document/redirect/400169334/0">Постановление</text:a> Правительства Российской Федерации от 31 декабря 2020 г. N 2407 "О внесении изменений в пункт 3 постановления Правительства Российской Федерации от 30 апреля 2020 г. N 616" (Собрание законодательства Российской Федерации, 2021, N 2, ст. 454).</text:p>
      <text:p text:style-name="s1"><text:bookmark text:name="anchor7030"/>30. <text:a xlink:type="simple" xlink:href="http://ivo.garant.ru/document/redirect/400258643/0">Постановление</text:a> Правительства Российской Федерации от 28 января 2021 г. N 76 "О внесении изменений в постановление Правительства Российской Федерации от 5 февраля 2015 г. N 102 и признании утратившими силу отдельных актов Правительства Российской Федерации" (Собрание законодательства Российской Федерации, 2021, N 5, ст. 857).</text:p>
      <text:p text:style-name="s1"><text:bookmark text:name="anchor7031"/>31. <text:a xlink:type="simple" xlink:href="http://ivo.garant.ru/document/redirect/400416472/0">Постановление</text:a> Правительства Российской Федерации от 3 марта 2021 г. N 304 "О внесении изменений в постановление Правительства Российской Федерации от 3 декабря 2020 г. N 2013" (Собрание законодательства Российской Федерации, 2021, N 11, ст. 1800).</text:p>
      <text:p text:style-name="s1"><text:bookmark text:name="anchor7032"/>32. <text:a xlink:type="simple" xlink:href="http://ivo.garant.ru/document/redirect/400431344/0">Постановление</text:a> Правительства Российской Федерации от 6 марта 2021 г. N 336 "О внесении изменений в перечень отдельных видов медицинских изделий,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21, N 11, ст. 1828).</text:p>
      <text:p text:style-name="s1"><text:bookmark text:name="anchor7033"/>33. <text:a xlink:type="simple" xlink:href="http://ivo.garant.ru/document/redirect/400860204/2013">Абзац первый</text:a> (в части пунктов 45<text:span text:style-name="upper"><text:span> 7</text:span></text:span> и 45<text:span text:style-name="upper"><text:span> 8</text:span></text:span>), <text:a xlink:type="simple" xlink:href="http://ivo.garant.ru/document/redirect/400860204/10457">абзацы пятьдесят второй - семидесятый подпункта "в</text:a>" и <text:a xlink:type="simple" xlink:href="http://ivo.garant.ru/document/redirect/400860204/2016">подпункт "е"</text:a> (в части разделов 3, 4 и сноски 2) пункта 1 изменений, которые вносятся в акты Правительства Российской Федерации, утвержденных <text:a xlink:type="simple" xlink:href="http://ivo.garant.ru/document/redirect/400860204/0">постановлением</text:a> Правительства Российской Федерации от 27 мая 2021 г. N 814 "О мониторинге закупок товаров, работ, услуг для обеспечения государственных и муниципальных нужд и закупок товаров, работ, услуг отдельными видами юридических лиц, а также об оценке эффективности деятельности органов контроля, осуществляющих контроль за соблюдением законодательства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о внесении изменений в некоторые акты Правительства Российской Федерации и признании утратившими силу некоторых актов Правительства Российской Федерации и отдельных положений некоторых актов Правительства Российской Федерации" (Собрание законодательства Российской Федерации, 2021, N 24, ст. 4495).</text:p>
      <text:p text:style-name="s1"><text:bookmark text:name="anchor7034"/>34. <text:a xlink:type="simple" xlink:href="http://ivo.garant.ru/document/redirect/401392601/0">Постановление</text:a> Правительства Российской Федерации от 24 июня 2021 г. N 983 "О внесении изменений в приложение к постановлению Правительства Российской Федерации от 3 декабря 2020 г. N 2014" (Собрание законодательства Российской Федерации, 2021, N 26, ст. 4994).</text:p>
      <text:p text:style-name="s1"><text:bookmark text:name="anchor7035"/>35. <text:a xlink:type="simple" xlink:href="http://ivo.garant.ru/document/redirect/401517228/1001">Пункт 1</text:a> изменений, которые вносятся в постановление Правительства Российской Федерации от 16 ноября 2015 г. N 1236, утвержденных <text:a xlink:type="simple" xlink:href="http://ivo.garant.ru/document/redirect/401517228/0">постановлением</text:a> Правительства Российской Федерации от 20 июля 2021 г. N 1226 "О внесении изменений в постановление Правительства Российской Федерации от 16 ноября 2015 г. N 1236 и признании утратившим силу абзаца одиннадцатого подпункта 29 пункта 8 изменений, которые вносятся в постановление Правительства Российской Федерации от 16 ноября 2015 г. N 1236" (Собрание законодательства Российской Федерации, 2021, N 30, ст. 5801).</text:p>
      <text:p text:style-name="s1"><text:bookmark text:name="anchor7036"/>36. <text:a xlink:type="simple" xlink:href="http://ivo.garant.ru/document/redirect/402660120/0">Постановление</text:a> Правительства Российской Федерации от 23 августа 2021 г. N 1382 "О внесении изменений в постановление Правительства Российской Федерации от 16 сентября 2016 г. N 925" (Собрание законодательства Российской Федерации, 2021, N 35, ст. 6295).</text:p>
      <text:p text:style-name="s1"><text:bookmark text:name="anchor7037"/>37. <text:a xlink:type="simple" xlink:href="http://ivo.garant.ru/document/redirect/402680660/101">Пункт 1</text:a>, <text:a xlink:type="simple" xlink:href="http://ivo.garant.ru/document/redirect/402680660/1013">подпункты "а"</text:a>, <text:a xlink:type="simple" xlink:href="http://ivo.garant.ru/document/redirect/402680660/1015">"в" - "д"</text:a> и <text:a xlink:type="simple" xlink:href="http://ivo.garant.ru/document/redirect/402680660/1020">"з" пункта 3</text:a> и <text:a xlink:type="simple" xlink:href="http://ivo.garant.ru/document/redirect/402680660/104">пункт 4</text:a> изменений, которые вносятся в акты Правительства Российской Федерации, утвержденных <text:a xlink:type="simple" xlink:href="http://ivo.garant.ru/document/redirect/402680660/0">постановлением</text:a> Правительства Российской Федерации от 28 августа 2021 г. N 1432 "О внесении изменений в некоторые акты Правительства Российской Федерации" (Собрание законодательства Российской Федерации, 2021, N 36, ст. 6406).</text:p>
      <text:p text:style-name="s1"><text:bookmark text:name="anchor7038"/>38. <text:a xlink:type="simple" xlink:href="http://ivo.garant.ru/document/redirect/403108863/0">Постановление</text:a> Правительства Российской Федерации от 20 ноября 2021 г. N 1989 "О внесении изменений в постановление Правительства Российской Федерации от 30 апреля 2020 г. N 616 и признании утратившими силу отдельных положений некоторых актов Правительства Российской Федерации" (Собрание законодательства Российской Федерации, 2021, N 48, ст. 8070).</text:p>
      <text:p text:style-name="s1"><text:bookmark text:name="anchor7039"/>39. <text:a xlink:type="simple" xlink:href="http://ivo.garant.ru/document/redirect/403118953/0">Постановление</text:a> Правительства Российской Федерации от 24 ноября 2021 г. N 2014 "О внесении изменений в постановление Правительства Российской Федерации от 5 февраля 2015 г. N 102" (Собрание законодательства Российской Федерации, 2021, N 48, ст. 8090).</text:p>
      <text:p text:style-name="s1"><text:bookmark text:name="anchor7040"/>40. <text:a xlink:type="simple" xlink:href="http://ivo.garant.ru/document/redirect/403192776/0">Постановление</text:a> Правительства Российской Федерации от 4 декабря 2021 г. N 2201 "О внесении изменений в постановление Правительства Российской Федерации от 30 апреля 2020 г. N 617" (Собрание законодательства Российской Федерации, 2021, N 50, ст. 8585).</text:p>
      <text:p text:style-name="s1"><text:bookmark text:name="anchor7041"/>41. <text:a xlink:type="simple" xlink:href="http://ivo.garant.ru/document/redirect/403192800/10012">Подпункты "б"</text:a>, <text:a xlink:type="simple" xlink:href="http://ivo.garant.ru/document/redirect/403192800/10013">"в"</text:a>, <text:a xlink:type="simple" xlink:href="http://ivo.garant.ru/document/redirect/403192800/10015">"д" - "ж"</text:a> и <text:a xlink:type="simple" xlink:href="http://ivo.garant.ru/document/redirect/76849400/10019">"и" пункта 1</text:a> и <text:a xlink:type="simple" xlink:href="http://ivo.garant.ru/document/redirect/403192800/10002">пункт 2</text:a> изменений, которые вносятся в акты Правительства Российской Федерации, утвержденных <text:a xlink:type="simple" xlink:href="http://ivo.garant.ru/document/redirect/403192800/0">постановлением</text:a> Правительства Российской Федерации от 6 декабря 2021 г. N 2213 "О внесении изменений в некоторые акты Правительства Российской Федерации" (Собрание законодательства Российской Федерации, 2021, N 50, ст. 8596).</text:p>
      <text:p text:style-name="s1"><text:bookmark text:name="anchor7042"/>42. <text:a xlink:type="simple" xlink:href="http://ivo.garant.ru/document/redirect/403290569/0">Постановление</text:a> Правительства Российской Федерации от 21 декабря 2021 г. N 2376 "О внесении изменений в постановление Правительства Российской Федерации от 3 декабря 2020 г. N 2014" (Собрание законодательства Российской Федерации, 2021, N 52, ст. 9199).</text:p>
      <text:p text:style-name="s1"><text:bookmark text:name="anchor7043"/>43. <text:a xlink:type="simple" xlink:href="http://ivo.garant.ru/document/redirect/403332845/0">Постановление</text:a> Правительства Российской Федерации от 23 декабря 2021 г. N 2419 "О внесении изменений в приложение к постановлению Правительства Российской Федерации от 3 декабря 2020 г. N 2013" (Собрание законодательства Российской Федерации, 2022, N 1, ст. 130).</text:p>
      <text:p text:style-name="s1"><text:bookmark text:name="anchor7044"/>44. <text:a xlink:type="simple" xlink:href="http://ivo.garant.ru/document/redirect/403480268/80012">Подпункт "б" пункта 1</text:a> изменений, которые вносятся в акты Правительства Российской Федерации, утвержденных <text:a xlink:type="simple" xlink:href="http://ivo.garant.ru/document/redirect/403480268/0">постановлением</text:a> Правительства Российской Федерации от 27 января 2022 г. N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 (Собрание законодательства Российской Федерации, 2022, N 6, ст. 872).</text:p>
      <text:p text:style-name="s1"><text:bookmark text:name="anchor7045"/>45. <text:a xlink:type="simple" xlink:href="http://ivo.garant.ru/document/redirect/403553042/0">Постановление</text:a> Правительства Российской Федерации от 15 февраля 2022 г. N 175 "О внесении изменений в постановление Правительства Российской Федерации от 22 августа 2016 г. N 832" (Собрание законодательства Российской Федерации, 2022, N 8, ст. 1181).</text:p>
      <text:p text:style-name="s1"><text:bookmark text:name="anchor7046"/>46. <text:a xlink:type="simple" xlink:href="http://ivo.garant.ru/document/redirect/403553234/12">Абзац второй пункта 1</text:a> постановления Правительства Российской Федерации от 17 февраля 2022 г. N 201 "О мерах по реализации Указа Президента Российской Федерации от 15 ноября 2021 г. N 657" (Собрание законодательства Российской Федерации, 2022, N 9, ст. 1319), а также <text:a xlink:type="simple" xlink:href="http://ivo.garant.ru/document/redirect/403553234/1000">изменения</text:a>, которые вносятся в акты Правительства Российской Федерации, утвержденные указанным постановлением.</text:p>
      <text:p text:style-name="s1"><text:bookmark text:name="anchor7047"/>47. <text:a xlink:type="simple" xlink:href="http://ivo.garant.ru/document/redirect/404534446/0">Постановление</text:a> Правительства Российской Федерации от 21 апреля 2022 г. N 733 "О внесении изменений в перечень медицинских изделий одноразового применения (использования) из поливинилхлоридных пластиков и иных пластиков, полимеров и материалов,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22, N 18, ст. 3069).</text:p>
      <text:p text:style-name="s1"><text:bookmark text:name="anchor7048"/>48. <text:a xlink:type="simple" xlink:href="http://ivo.garant.ru/document/redirect/404697877/1001">Пункты 1 - 5</text:a>, <text:a xlink:type="simple" xlink:href="http://ivo.garant.ru/document/redirect/404697877/1007">7</text:a> и <text:a xlink:type="simple" xlink:href="http://ivo.garant.ru/document/redirect/404697877/1008">8</text:a> изменений, которые вносятся в акты Правительства Российской Федерации, утвержденных <text:a xlink:type="simple" xlink:href="http://ivo.garant.ru/document/redirect/404697877/0">постановлением</text:a> Правительства Российской Федерации от 16 мая 2022 г. N 883 "О внесении изменений в некоторые акты Правительства Российской Федерации и признании утратившими силу отдельных положений некоторых актов Правительства Российской Федерации" (Собрание законодательства Российской Федерации, 2022, N 21, ст. 3459).</text:p>
      <text:p text:style-name="s1"><text:bookmark text:name="anchor7049"/>49. <text:a xlink:type="simple" xlink:href="http://ivo.garant.ru/document/redirect/405374613/6">Пункт 6</text:a> постановления Правительства Российской Федерации от 3 октября 2022 г. N 1745 "О специальной мере в сфере экономики и внесении изменения в постановление Правительства Российской Федерации от 30 апреля 2020 г. N 616" (Собрание законодательства Российской Федерации, 2022, N 41, ст. 7078).</text:p>
      <text:p text:style-name="s1"><text:bookmark text:name="anchor7050"/>50. <text:a xlink:type="simple" xlink:href="http://ivo.garant.ru/document/redirect/405672917/1016">Пункт 16</text:a> изменений, которые вносятся в акты Правительства Российской Федерации по вопросам осуществления закупок товаров, работ, услуг для обеспечения государственных и муниципальных нужд и закупок товаров, работ, услуг отдельными видами юридических лиц, утвержденных <text:a xlink:type="simple" xlink:href="http://ivo.garant.ru/document/redirect/405672917/0">постановлением</text:a> Правительства Российской Федерации от 31 октября 2022 г. N 1946 "О внесении изменений в некоторые акты Правительства Российской Федерации по вопросам осуществления закупок товаров, работ, услуг для обеспечения государственных и муниципальных нужд, закупок товаров, работ, услуг отдельными видами юридических лиц и признании утратившими силу постановления Правительства Российской Федерации от 26 сентября 1997 г. N 1222 и отдельных положений некоторых актов Правительства Российской Федерации" (Собрание законодательства Российской Федерации, 2022, N 46, ст. 7988).</text:p>
      <text:p text:style-name="s1"><text:bookmark text:name="anchor7051"/>51. <text:a xlink:type="simple" xlink:href="http://ivo.garant.ru/document/redirect/406060493/1001">Пункт 1</text:a> изменений, которые вносятся в постановление Правительства Российской Федерации от 16 ноября 2015 г. N 1236, утвержденных <text:a xlink:type="simple" xlink:href="http://ivo.garant.ru/document/redirect/406060493/0">постановлением</text:a> Правительства Российской Федерации от 28 декабря 2022 г. N 2461 "О внесении изменений в <text:a xlink:type="simple" xlink:href="http://ivo.garant.ru/document/redirect/71252170/0">постановление</text:a> Правительства Российской Федерации от 16 ноября 2015 г. N 1236 и признании утратившими силу отдельных положений некоторых актов Правительства Российской Федерации" (Собрание законодательства Российской Федерации, 2023, N 1, ст. 272).</text:p>
      <text:p text:style-name="s1"><text:bookmark text:name="anchor7052"/>52. <text:a xlink:type="simple" xlink:href="http://ivo.garant.ru/document/redirect/406061929/2">Пункт "б"</text:a> постановления Правительства Российской Федерации от 28 декабря 2022 г. N 2470 "Об определении особенностей осуществления Министерством внутренних дел Российской Федерации закупок планшетных компьютеров" (Собрание законодательства Российской Федерации, 2023, N 1, ст. 280).</text:p>
      <text:p text:style-name="s1"><text:bookmark text:name="anchor7053"/>53. <text:a xlink:type="simple" xlink:href="http://ivo.garant.ru/document/redirect/406197979/1002">Пункт 2</text:a> изменений, которые вносятся в акты Правительства Российской Федерации по вопросам осуществления закупок товаров, работ, услуг для обеспечения государственных и муниципальных нужд, утвержденных <text:a xlink:type="simple" xlink:href="http://ivo.garant.ru/document/redirect/406197979/0">постановлением</text:a> Правительства Российской Федерации от 31 декабря 2022 г. N 2559 "О мерах по обеспечению режима военного положения и об особенностях планирования и осуществления закупок для обеспечения государственных нужд Донецкой Народной Республики, Луганской Народной Республики, Запорожской области, Херсонской области и муниципальных нужд муниципальных образований, находящихся на их территориях, и о внесении изменений в некоторые акты Правительства Российской Федерации" (Собрание законодательства Российской Федерации, 2023, N 4, ст. 635).</text:p>
      <text:p text:style-name="s1"><text:bookmark text:name="anchor7054"/>54. <text:a xlink:type="simple" xlink:href="http://ivo.garant.ru/document/redirect/406150045/4">Пункт 4</text:a> постановления Правительства Российской Федерации от 12 января 2023 г. N 10 "Об особенностях описания тест-полосок для определения содержания глюкозы в крови, являющихся объектом закупки для обеспечения государственных и муниципальных нужд, о типовых условиях контрактов, подлежащих применению заказчиками при осуществлении закупок, на поставку таких тест-полосок и о внесении изменений в перечень отдельных видов медицинских изделий,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Собрание законодательства Российской Федерации, 2023, N 3, ст. 569), а также <text:a xlink:type="simple" xlink:href="http://ivo.garant.ru/document/redirect/406150045/100">изменения</text:a>, которые вносятся в перечень отдельных видов медицинских изделий, происходящих из иностранных государств, в отношении которых устанавливаются ограничения допуска для целей осуществления закупок для обеспечения государственных и муниципальных нужд, утвержденные указанным постановлением.</text:p>
      <text:p text:style-name="s1"><text:bookmark text:name="anchor7055"/>55. <text:a xlink:type="simple" xlink:href="http://ivo.garant.ru/document/redirect/406467645/0">Постановление</text:a> Правительства Российской Федерации от 28 февраля 2023 г. N 318 "Об изменении и признании утратившими силу отдельных положений некоторых актов Правительства Российской Федерации" (Собрание законодательства Российской Федерации, 2023, N 10, ст. 1689).</text:p>
      <text:p text:style-name="s1"><text:bookmark text:name="anchor7056"/>56. <text:a xlink:type="simple" xlink:href="http://ivo.garant.ru/document/redirect/406634995/1001">Пункт 1</text:a>, <text:a xlink:type="simple" xlink:href="http://ivo.garant.ru/document/redirect/406634995/1041">подпункты "а" - "г"</text:a> и <text:a xlink:type="simple" xlink:href="http://ivo.garant.ru/document/redirect/406634995/1047">"ж" пункта 4</text:a>, <text:a xlink:type="simple" xlink:href="http://ivo.garant.ru/document/redirect/406634995/10005">пункты 5</text:a> и <text:a xlink:type="simple" xlink:href="http://ivo.garant.ru/document/redirect/406634995/10006">6</text:a> изменений, которые вносятся в акты Правительства Российской Федерации, утвержденных <text:a xlink:type="simple" xlink:href="http://ivo.garant.ru/document/redirect/406634995/0">постановлением</text:a> Правительства Российской Федерации от 27 марта 2023 г. N 486 "О внесении изменений в некоторые акты Правительства Российской Федерации" (Собрание законодательства Российской Федерации, 2023, N 14, ст. 2452).</text:p>
      <text:p text:style-name="s1"><text:bookmark text:name="anchor7057"/>57. <text:a xlink:type="simple" xlink:href="http://ivo.garant.ru/document/redirect/407630034/0">Постановление</text:a> Правительства Российской Федерации от 2 сентября 2023 г. N 1443 "О внесении изменений в некоторые акты Правительства Российской Федерации и признании утратившими силу отдельных положений некоторых актов Правительства Российской Федерации" (Собрание законодательства Российской Федерации, 2023, N 37, ст. 6838).</text:p>
      <text:p text:style-name="s1"><text:bookmark text:name="anchor7058"/>58. <text:a xlink:type="simple" xlink:href="http://ivo.garant.ru/document/redirect/407711016/0">Постановление</text:a> Правительства Российской Федерации от 16 сентября 2023 г. N 1512 "О внесении изменений в некоторые акты Правительства Российской Федерации" (Собрание законодательства Российской Федерации, 2023, N 39, ст. 7026).</text:p>
      <text:p text:style-name="s1"><text:bookmark text:name="anchor7059"/>59. <text:a xlink:type="simple" xlink:href="http://ivo.garant.ru/document/redirect/408213847/0">Постановление</text:a> Правительства Российской Федерации от 9 декабря 2023 г. N 2094 "О внесении изменений в некоторые акты Правительства Российской Федерации" (Собрание законодательства Российской Федерации, 2023, N 51, ст. 9356).</text:p>
      <text:p text:style-name="s1"><text:bookmark text:name="anchor7060"/>60. <text:a xlink:type="simple" xlink:href="http://ivo.garant.ru/document/redirect/408322083/0">Постановление</text:a> Правительства Российской Федерации от 28 декабря 2023 г. N 2357 "О внесении изменений в некоторые акты Правительства Российской Федерации" (Собрание законодательства Российской Федерации, 2024, N 1, ст. 235).</text:p>
      <text:p text:style-name="s1"><text:bookmark text:name="anchor7061"/>61. <text:a xlink:type="simple" xlink:href="http://ivo.garant.ru/document/redirect/408348623/0">Постановление</text:a> Правительства Российской Федерации от 10 января 2024 г. N 1 "О внесении изменения в постановление Правительства Российской Федерации от 30 апреля 2020 г. N 616" (Собрание законодательства Российской Федерации, 2024, N 3, ст. 461).</text:p>
      <text:p text:style-name="s1"><text:bookmark text:name="anchor7062"/>62. <text:a xlink:type="simple" xlink:href="http://ivo.garant.ru/document/redirect/409261354/0">Постановление</text:a> Правительства Российской Федерации от 26 июня 2024 г. N 858 "О внесении изменений в некоторые акты Правительства Российской Федерации" (Собрание законодательства Российской Федерации, 2024, N 27, ст. 3823).</text:p>
      <text:p text:style-name="s1"><text:bookmark text:name="anchor7063"/>63. <text:a xlink:type="simple" xlink:href="http://ivo.garant.ru/document/redirect/409280434/10003">Пункт 3</text:a> изменений, которые вносятся в акты Правительства Российской Федерации, утвержденных <text:a xlink:type="simple" xlink:href="http://ivo.garant.ru/document/redirect/409280434/0">постановлением</text:a> Правительства Российской Федерации от 29 июня 2024 г. N 895 "О внесении изменений в некоторые акты Правительства Российской Федерации" (Собрание законодательства Российской Федерации, 2024, N 28, ст. 4024).</text:p>
      <text:p text:style-name="s1"><text:bookmark text:name="anchor7064"/>64. <text:a xlink:type="simple" xlink:href="http://ivo.garant.ru/document/redirect/410506044/0">Постановление</text:a> Правительства Российской Федерации от 9 октября 2024 г. N 1352 "О внесении изменения в постановление Правительства Российской Федерации от 30 апреля 2020 г. N 616" (Собрание законодательства Российской Федерации, 2024, N 42, ст. 6247).</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style:page-layout style:name="PageOrientation0">
      <style:page-layout-properties fo:page-width="297mm" fo:page-height="210mm" style:num-format="1" style:print-orientation="landscape" fo:margin-top="14mm" fo:margin-bottom="14mm" fo:margin-left="14mm" fo:margin-right="14mm"/>
      <style:header-style>
        <style:header-footer-properties fo:margin-bottom="5mm"/>
      </style:header-style>
      <style:footer-style/>
    </style:page-layout>
    <style:page-layout style:name="PageOrientation1">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Постановление Правительства Российской Федерации от 23 декабря 2024 г. N 1875 "О мерах по предост...</text:p>
      </style:header>
      <style:footer>
        <table:table>
          <table:table-column table:number-columns-repeated="3"/>
          <table:table-row>
            <table:table-cell>
              <text:p text:style-name="footer_left">
							<text:date style:data-style-name="date" text:fixed="true" text:date-value="2026-5-12"/>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style:master-page style:name="landscape0" style:page-layout-name="PageOrientation0">
      <style:header>
        <text:p text:style-name="header">Постановление Правительства Российской Федерации от 23 декабря 2024 г. N 1875 "О мерах по предост...</text:p>
      </style:header>
      <style:footer>
        <table:table>
          <table:table-column table:number-columns-repeated="3"/>
          <table:table-row>
            <table:table-cell>
              <text:p text:style-name="footer_left">
							<text:date style:data-style-name="date" text:fixed="true" text:date-value="2026-5-12"/>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style:master-page style:name="portrait1" style:page-layout-name="PageOrientation1">
      <style:header>
        <text:p text:style-name="header">Постановление Правительства Российской Федерации от 23 декабря 2024 г. N 1875 "О мерах по предост...</text:p>
      </style:header>
      <style:footer>
        <table:table>
          <table:table-column table:number-columns-repeated="3"/>
          <table:table-row>
            <table:table-cell>
              <text:p text:style-name="footer_left">
							<text:date style:data-style-name="date" text:fixed="true" text:date-value="2026-5-12"/>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