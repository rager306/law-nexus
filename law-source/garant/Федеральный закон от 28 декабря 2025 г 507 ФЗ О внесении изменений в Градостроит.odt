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style:style style:name="s93" style:family="section">
      <style:section-properties fo:background-color="#FFF5AD"/>
    </style:style>
    <style:style style:name="s94" style:family="section">
      <style:section-properties fo:background-color="#f0f0f0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cm" fo:margin-right="0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icon" style:family="graphic">
      <style:graphic-properties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!-- Table cells styles -->
    <!-- Table columns styles -->
    <style:style style:name="3401" style:family="table-column">
      <style:table-column-properties style:column-width="60mm"/>
    </style:style>
    <style:style style:name="6803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204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413371648/0">Федеральный закон от 28 декабря 2025 г. № 507-ФЗ
"О внесении изменений в Градостроительный кодекс Российской Федерации и отдельные законодательные акты Российской Федерации"</text:a></text:h>
      <text:p text:style-name="s1"/>
      <text:p text:style-name="s1"><text:span text:style-name="s10">Принят Государственной Думой 18 декабря 2025 года</text:span></text:p>
      <text:p text:style-name="s1"><text:span text:style-name="s10">Одобрен Советом Федерации 24 декабря 2025 года</text:span></text:p>
      <text:p text:style-name="s1"/>
      <text:p text:style-name="s15"><text:bookmark text:name="anchor1"/><text:span text:style-name="s10">Статья 1</text:span></text:p>
      <text:p text:style-name="s1">Внести в <text:a xlink:type="simple" xlink:href="http://ivo.garant.ru/document/redirect/12138258/0">Градостроительный кодекс</text:a> Российской Федерации (Собрание законодательства Российской Федерации, 2005, N 1, ст. 16; 2006, N 1, ст. 10, 21; N 52, ст. 5498; 2007, N 31, ст. 4012; N 45, ст. 5417; № 46, ст. 5553; 2008, № 30, ст. 3604; 2009, № 52, ст. 6419; 2010, № 31, ст. 4209; 2011, N 13, ст. 1688; N 30, ст. 4563, 4590; N 49, ст. 7015; 2012, № 47, ст. 6390; N 53, ст. 7614; 2013, № 30, ст. 4080; N 52, ст. 6961; 2014, N 16, ст. 1837; N 26, ст. 3377; N 43, ст. 5799; N 48, ст. 6640; 2015, N 1, ст. 9, 11, 52; 2016, N 27, ст. 4301, 4302, 4305, 4306; 2017, N 31, ст. 4740, 4766; 2018, № 1, ст. 27, 90, 91; № 32, ст. 5105, 5133, 5134, 5135; 2019, N 26, ст. 3317; N 31, ст. 4442; N 52, ст. 7790; 2020, N 31, ст. 5023; 2021, N 1, ст. 7, 33; № 24, ст. 4188; № 27, ст. 5103; 2022, N 1, ст. 16; № 29, ст. 5317; N 52, ст. 9371; 2023, N 1, ст. 59; N 25, ст. 4429; N 29, ст. 5323; N 32, ст. 6180; 2024, N 1, ст. 8, 34; N 33, ст. 4928, 4934; N 53, ст. 8496, 8504; 2025, N 26, ст. 3511; № 31, ст. 4658, 4663, 4707) следующие изменения:</text:p>
      <text:p text:style-name="s1"><text:bookmark text:name="anchor11"/>1) <text:a xlink:type="simple" xlink:href="http://ivo.garant.ru/document/redirect/12138258/60717">пункт 7.17 части 1 статьи 6</text:a> и <text:a xlink:type="simple" xlink:href="http://ivo.garant.ru/document/redirect/12138258/83021">часть 2.1 статьи 8.3</text:a> признать утратившими силу;</text:p>
      <text:p text:style-name="s1"><text:bookmark text:name="anchor12"/>2) <text:a xlink:type="simple" xlink:href="http://ivo.garant.ru/document/redirect/12138258/45">статью 45</text:a> дополнить <text:a xlink:type="simple" xlink:href="http://ivo.garant.ru/document/redirect/12138258/45181">частью 18.1</text:a> следующего содержания:</text:p>
      <text:p text:style-name="s1"><text:bookmark text:name="anchor45181"/>"18.1. Основания для отмены документации по планировке территории, подготовка которой осуществляется на основании решений уполномоченных федеральных органов исполнительной власти, исполнительных органов субъектов Российской Федерации и органов местного самоуправления, устанавливаются Правительством Российской Федерации.";</text:p>
      <text:p text:style-name="s1"><text:bookmark text:name="anchor13"/>3) в <text:a xlink:type="simple" xlink:href="http://ivo.garant.ru/document/redirect/12138258/53">статье 53</text:a>:</text:p>
      <text:p text:style-name="s1"><text:bookmark text:name="anchor131"/>а) <text:a xlink:type="simple" xlink:href="http://ivo.garant.ru/document/redirect/12138258/5301">часть 1</text:a> после слова "ресурсов)" дополнить словами "и рабочей документации (за исключением случаев, если в соответствии с законодательством о градостроительной деятельности не требуется подготовка рабочей документации в целях строительства, реконструкции объекта капитального строительства)";</text:p>
      <text:p text:style-name="s1"><text:bookmark text:name="anchor132"/>б) <text:a xlink:type="simple" xlink:href="http://ivo.garant.ru/document/redirect/12138258/5304">часть 4</text:a> изложить в следующей редакции:</text:p>
      <text:p text:style-name="s1"><text:bookmark text:name="anchor5304"/>"4. В процессе строительства, реконструкции, капитального ремонта объекта капитального строительства лицом, осуществляющим строительство (лицом, осуществляющим строительство, и застройщиком, техническим заказчиком, лицом, ответственным за эксплуатацию здания, сооружения, или региональным оператором в случае осуществления строительства, реконструкции, капитального ремонта на основании договора строительного подряда), должен проводиться контроль за выполнением работ, которые оказывают влияние на безопасность объекта капитального строительства и в соответствии с технологией строительства, реконструкции, капитального ремонта контроль за выполнением которых не может быть проведен после выполнения других работ, а также за безопасностью строительных конструкций и участков сетей инженерно-технического обеспечения, если устранение выявленных в процессе проведения строительного контроля недостатков невозможно без разборки или повреждения других строительных конструкций и участков сетей инженерно-технического обеспечения, за соответствием указанных работ, конструкций и участков сетей требованиям технических регламентов, проектной документации и рабочей документации (за исключением случаев, если в соответствии с законодательством о градостроительной деятельности не требуется подготовка рабочей документации в целях строительства, реконструкции объекта капитального строительства). До проведения контроля за безопасностью строительных конструкций должен проводиться контроль за выполнением всех работ, которые оказывают влияние на безопасность таких конструкций и в соответствии с технологией строительства, реконструкции, капитального ремонта контроль за выполнением которых не может быть проведен после выполнения других работ, а также в случаях, предусмотренных проектной документацией, рабочей документацией (за исключением случаев, если в соответствии с законодательством о градостроительной деятельности не требуется подготовка рабочей документации в целях строительства, реконструкции объекта капитального строительства) и требованиями технических регламентов, должны проводиться испытания таких конструкций. По результатам проведения контроля за выполнением указанных работ, безопасностью указанных конструкций, участков сетей инженерно-технического обеспечения составляются акты освидетельствования указанных работ, конструкций, участков сетей инженерно-технического обеспечения.";</text:p>
      <text:p text:style-name="s1"><text:bookmark text:name="anchor133"/>в) <text:a xlink:type="simple" xlink:href="http://ivo.garant.ru/document/redirect/12138258/5371">часть 7.1</text:a> после слова "ресурсов)" дополнить словами "и рабочей документации (за исключением случаев, если в соответствии с законодательством о градостроительной деятельности не требуется подготовка рабочей документации в целях строительства, реконструкции объекта капитального строительства)";</text:p>
      <text:p text:style-name="s9header">ГАРАНТ:</text:p>
      <text:p text:style-name="s9"><text:bookmark text:name="anchor14"/>Пункт 4 <text:a xlink:type="simple" xlink:href="#anchor1102">вступает в силу</text:a> с 1 марта 2026 г.</text:p>
      <text:p text:style-name="s1">4) в <text:a xlink:type="simple" xlink:href="http://ivo.garant.ru/document/redirect/12138258/5551">статье 55.5-1</text:a>:</text:p>
      <text:p text:style-name="s1"><text:bookmark text:name="anchor141"/>а) <text:a xlink:type="simple" xlink:href="http://ivo.garant.ru/document/redirect/12138258/5551">наименование</text:a> дополнить словами "и иные специалисты, занятые в строительстве";</text:p>
      <text:p text:style-name="s1"><text:bookmark text:name="anchor142"/>б) дополнить <text:a xlink:type="simple" xlink:href="http://ivo.garant.ru/document/redirect/12138258/5551091">частью 9.1</text:a> следующего содержания:</text:p>
      <text:p text:style-name="s1"><text:bookmark text:name="anchor5551091"/>"9.1. Сведения о физических лицах, не указанных в части 1 или 2 настоящей статьи, если такие физические лица занимают должности, предусмотренные перечнем, указанным в части 11 настоящей статьи (далее - иные специалисты, занятые в строительстве), требования к которым устанавливаются правилами саморегулирования в соответствии с частью 2 статьи 55.20-1 настоящего Кодекса, включаются в национальные реестры специалистов.";</text:p>
      <text:p text:style-name="s1"><text:bookmark text:name="anchor143"/>в) в <text:a xlink:type="simple" xlink:href="http://ivo.garant.ru/document/redirect/12138258/555111">части 11</text:a> слова "Перечни специальностей, направлений подготовки в области инженерных изысканий, архитектурно-строительного проектирования и строительства" заменить словами "Перечень направлений подготовки, специальностей в области строительства, получение высшего образования по которым необходимо для специалистов по организации инженерных изысканий, специалистов по организации архитектурно-строительного проектирования, специалистов по организации строительства, и Перечень должностей специалистов, занятых в строительстве, требования к которым устанавливаются правилами саморегулирования,";</text:p>
      <text:p text:style-name="s1"><text:bookmark text:name="anchor144"/>г) <text:a xlink:type="simple" xlink:href="http://ivo.garant.ru/document/redirect/12138258/555113">часть 13</text:a> после слов "частью 10 настоящей статьи," дополнить словами "либо требованиям, установленным правилами саморегулирования в отношении иных специалистов, занятых в строительстве, сведения о которых включаются в национальные реестры специалистов,".</text:p>
      <text:p text:style-name="s1"/>
      <text:p text:style-name="s15"><text:bookmark text:name="anchor2"/><text:span text:style-name="s10">Статья 2</text:span></text:p>
      <text:p text:style-name="s1">Внести в <text:a xlink:type="simple" xlink:href="http://ivo.garant.ru/document/redirect/12138257/0">Федеральный закон</text:a> от 29 декабря 2004 года N 191-ФЗ "О введении в действие Градостроительного кодекса Российской Федерации" (Собрание законодательства Российской Федерации, 2005, N 1, ст. 17; 2006, N 1, ст. 17; N 52, ст. 5498; 2009, N 52, ст. 6419, 6427; 2011, N 13, ст. 1688; N 30, ст. 4594; 2012, N 27, ст. 3587; N 53, ст. 7614, 7615; 2013, N 52, ст. 6976; 2014, N 26, ст. 3377; 2015, N 1, ст. 9, 38; N 10, ст. 1418; N 29, ст. 4376; 2016, N 1, ст. 22; N 26, ст. 3890; N 27, ст. 4306; 2017, № 25, ст. 3593; № 27, ст. 3938; 2018, № 1, ст. 39; 2019, N 26, ст. 3317; N 31, ст. 4442; N 52, ст. 7790; 2021, N 1, ст. 7; 2022, N 1, ст. 16; N 11, ст. 1596; N 18, ст. 3010; № 52, ст. 9349, 9372; 2023, № 29, ст. 5323; 2024, № 1, ст. 6; № 8, ст. 1044; № 33, ст. 4928; № 53, ст. 8496, 8504) следующие изменения:</text:p>
      <text:p text:style-name="s1"><text:bookmark text:name="anchor21"/>1) в <text:a xlink:type="simple" xlink:href="http://ivo.garant.ru/document/redirect/12138257/410">абзаце первом части 10 статьи 4</text:a> цифры "2026" заменить цифрами "2027", цифры "2023" заменить цифрами "2024";</text:p>
      <text:p text:style-name="s1"><text:bookmark text:name="anchor22"/>2) в <text:a xlink:type="simple" xlink:href="http://ivo.garant.ru/document/redirect/12138257/1091">части 1 статьи 10.9</text:a> слова "в целях реновации жилищного фонда" исключить, после слов "в соответствии с федеральным законом," дополнить словами "в том числе";</text:p>
      <text:p text:style-name="s1"><text:bookmark text:name="anchor23"/>3) в <text:a xlink:type="simple" xlink:href="http://ivo.garant.ru/document/redirect/12138257/1018">статье 10.18</text:a> слова "и 2025" заменить словами ", 2025 и 2026".</text:p>
      <text:p text:style-name="s1"/>
      <text:p text:style-name="s15"><text:bookmark text:name="anchor3"/><text:span text:style-name="s10">Статья 3</text:span></text:p>
      <text:p text:style-name="s1">Внести в <text:a xlink:type="simple" xlink:href="http://ivo.garant.ru/document/redirect/12154776/0">Федеральный закон</text:a> от 21 июля 2007 года N 185-ФЗ "О Фонде содействия реформированию жилищно-коммунального хозяйства" (Собрание законодательства Российской Федерации, 2007, N 30, ст. 3799; 2008, N 30, ст. 3597; N 49, ст. 5723; 2009, N 29, ст. 3584; N 51, ст. 6153; 2011, N 1, ст. 53; N 23, ст. 3264; N 49, ст. 7028; 2012, N 53, ст. 7595; 2013, N 14, ст. 1646; N 30, ст. 4073; N 52, ст. 6982; 2014, N 26, ст. 3406; N 48, ст. 6637; 2015, N 1, ст. 11, 52; N 10, ст. 1418; N 27, ст. 3967; 2016, N 23, ст. 3299; N 26, ст. 3890; 2018, N 1, ст. 67, 90; N 49, ст. 7508; 2019, N 52, ст. 7791; 2020, N 52, ст. 8605; 2021, N 1, ст. 33; 2022, N 1, ст. 5, 45; N 52, ст. 9372; 2024, N 1, ст. 8) следующие изменения:</text:p>
      <text:p text:style-name="s1"><text:bookmark text:name="anchor31"/>1) в <text:a xlink:type="simple" xlink:href="http://ivo.garant.ru/document/redirect/12154776/141910">пункте 9.10 части 1 статьи 14</text:a> цифры "2025" заменить цифрами "2028";</text:p>
      <text:p text:style-name="s1"><text:bookmark text:name="anchor32"/>2) в <text:a xlink:type="simple" xlink:href="http://ivo.garant.ru/document/redirect/12154776/16">статье 16</text:a>:</text:p>
      <text:p text:style-name="s1"><text:bookmark text:name="anchor321"/>а) в <text:a xlink:type="simple" xlink:href="http://ivo.garant.ru/document/redirect/12154776/1601">части 1</text:a> цифры "2025" заменить цифрами "2028";</text:p>
      <text:p text:style-name="s1"><text:bookmark text:name="anchor322"/>б) в <text:a xlink:type="simple" xlink:href="http://ivo.garant.ru/document/redirect/12154776/1611">части 11</text:a> слова "(за исключением этапа 2024 года)" заменить словами "(за исключением последнего этапа)", слова "Этап 2024 года" заменить словами "Последний этап", слова "чем 1 сентября 2025 года" заменить словами "установленного срока завершения этой программы".</text:p>
      <text:p text:style-name="s1"/>
      <text:p text:style-name="s15"><text:bookmark text:name="anchor4"/><text:span text:style-name="s10">Статья 4</text:span></text:p>
      <text:p text:style-name="s1">Внести в <text:a xlink:type="simple" xlink:href="http://ivo.garant.ru/document/redirect/70353464/112">статью 112</text:a> Федерального закона от 5 апреля 2013 года N 44-ФЗ "О контрактной системе в сфере закупок товаров, работ, услуг для обеспечения государственных и муниципальных нужд" (Собрание законодательства Российской Федерации, 2013, N 14, ст. 1652; N 27, ст. 3480; N 52, ст. 6961; 2014, N 23, ст. 2925; 2015, N 1, ст. 51; N 29, ст. 4342, 4375; 2016, N 15, ст. 2058; N 27, ст. 4254; 2017, N 24, ст. 3477; 2018, N 1, ст. 59, 88; N 18, ст. 2578; N 27, ст. 3957; N 53, ст. 8428; 2019, N 18, ст. 2194, 2195; N 52, ст. 7767; 2020, N 14, ст. 2028, 2037; N 17, ст. 2702; N 31, ст. 5008; 2021, N 1, ст. 40; № 9, ст. 1467; № 27, ст. 5188; 2022, N 1, ст. 45; N 11, ст. 1596; N 13, ст. 1953; N 16, ст. 2606; N 27, ст. 4632; N 45, ст. 7665; N 52, ст. 9349; 2023, N 1, ст. 10; N 18, ст. 3231; N 32, ст. 6176; 2024, N 1, ст. 5, 6; N 33, ст. 4928; N 49, ст. 7423; N 53, ст. 8504) следующие изменения:</text:p>
      <text:p text:style-name="s1"><text:bookmark text:name="anchor41"/>1) в <text:a xlink:type="simple" xlink:href="http://ivo.garant.ru/document/redirect/70353464/11256">части 56</text:a> цифры "2026" заменить цифрами "2027";</text:p>
      <text:p text:style-name="s1"><text:bookmark text:name="anchor42"/>2) в <text:a xlink:type="simple" xlink:href="http://ivo.garant.ru/document/redirect/70353464/112631">абзаце первом части 63.1</text:a> цифры "2026" заменить цифрами "2027";</text:p>
      <text:p text:style-name="s1"><text:bookmark text:name="anchor43"/>3) в <text:a xlink:type="simple" xlink:href="http://ivo.garant.ru/document/redirect/70353464/1126501">части 65.1</text:a> цифры "2026" заменить цифрами "2027";</text:p>
      <text:p text:style-name="s1"><text:bookmark text:name="anchor44"/>4) в <text:a xlink:type="simple" xlink:href="http://ivo.garant.ru/document/redirect/70353464/1126502">части 65.2</text:a> цифры "2025" заменить цифрами "2026";</text:p>
      <text:p text:style-name="s1"><text:bookmark text:name="anchor45"/>5) в <text:a xlink:type="simple" xlink:href="http://ivo.garant.ru/document/redirect/70353464/11266">части 66</text:a> слова "выполняемых государственным (бюджетным или автономным) учреждением" заменить словами "выполняемых хозяйственным обществом, сто процентов акций (долей в уставном капитале) которого принадлежит Республике Крым либо городу федерального значения Севастополю, а также государственным (бюджетным или автономным) учреждением";</text:p>
      <text:p text:style-name="s1"><text:bookmark text:name="anchor46"/>6) в <text:a xlink:type="simple" xlink:href="http://ivo.garant.ru/document/redirect/70353464/11267">части 67</text:a> слова "выполняемых государственным (бюджетным или автономным) учреждением" заменить словами "выполняемых хозяйственным обществом, сто процентов акций (долей в уставном капитале) которого принадлежит Республике Крым либо городу федерального значения Севастополю, а также государственным (бюджетным или автономным) учреждением";</text:p>
      <text:p text:style-name="s1"><text:bookmark text:name="anchor47"/>7) в <text:a xlink:type="simple" xlink:href="http://ivo.garant.ru/document/redirect/70353464/11272">части 72</text:a> цифры "2025" заменить цифрами "2026";</text:p>
      <text:p text:style-name="s1"><text:bookmark text:name="anchor48"/>8) в <text:a xlink:type="simple" xlink:href="http://ivo.garant.ru/document/redirect/70353464/11273">части 73</text:a> цифры "2023 - 2025" заменить цифрами "2023 - 2026".</text:p>
      <text:p text:style-name="s1"/>
      <text:p text:style-name="s15"><text:bookmark text:name="anchor5"/><text:span text:style-name="s10">Статья 5</text:span></text:p>
      <text:p text:style-name="s1">Внести в <text:a xlink:type="simple" xlink:href="http://ivo.garant.ru/document/redirect/74450806/0">Федеральный закон</text:a> от 31 июля 2020 года N 254-ФЗ "Об особенностях регулирования отдельных отношений в целях реализации приоритетных проектов по модернизации и расширению инфраструктуры и о внесении изменений в отдельные законодательные акты Российской Федерации" (Собрание законодательства Российской Федерации, 2020, N 31, ст. 5013; 2022, N 1, ст. 16; N 18, ст. 3010; 2024, N 33, ст. 4957; 2025, N 31, ст. 4661, 4693) следующие изменения:</text:p>
      <text:p text:style-name="s1"><text:bookmark text:name="anchor51"/>1) <text:a xlink:type="simple" xlink:href="http://ivo.garant.ru/document/redirect/74450806/20251">пункт 5.1 части 2 статьи 2</text:a> после слова "нефтепродуктопроводы," дополнить словами "объекты электроэнергетики,";</text:p>
      <text:p text:style-name="s1"><text:bookmark text:name="anchor52"/>2) в <text:a xlink:type="simple" xlink:href="http://ivo.garant.ru/document/redirect/74450806/3">статье 3</text:a>:</text:p>
      <text:p text:style-name="s1"><text:bookmark text:name="anchor521"/>а) в <text:a xlink:type="simple" xlink:href="http://ivo.garant.ru/document/redirect/74450806/301">части 1</text:a> слова "Подготовка и утверждение" заменить словом "Утверждение";</text:p>
      <text:p text:style-name="s1"><text:bookmark text:name="anchor522"/>б) дополнить <text:a xlink:type="simple" xlink:href="http://ivo.garant.ru/document/redirect/74450806/3021">частью 2.1</text:a> следующего содержания:</text:p>
      <text:p text:style-name="s1"><text:bookmark text:name="anchor3021"/>"2.1. Наряду со случаями, предусмотренными законодательством о градостроительной деятельности, подготовка документации по планировке территории, предусматривающей размещение объектов инфраструктуры, допускается при наличии поданного субъектом естественной монополии, осуществляющим размещение линейного объекта, указанного в статье 2 настоящего Федерального закона, предложения по проектам схем территориального планирования Российской Федерации.";</text:p>
      <text:p text:style-name="s1"><text:bookmark text:name="anchor53"/>3) в <text:a xlink:type="simple" xlink:href="http://ivo.garant.ru/document/redirect/74450806/4">статье 4</text:a>:</text:p>
      <text:p text:style-name="s1"><text:bookmark text:name="anchor531"/>а) <text:a xlink:type="simple" xlink:href="http://ivo.garant.ru/document/redirect/74450806/407">часть 7</text:a> дополнить словами ", за исключением случая, если установление публичного сервитута для проведения инженерных изысканий в целях подготовки такого проекта планировки территории осуществляется на основании заявления заинтересованного лица";</text:p>
      <text:p text:style-name="s1"><text:bookmark text:name="anchor532"/>б) дополнить <text:a xlink:type="simple" xlink:href="http://ivo.garant.ru/document/redirect/74450806/4071">частью 7.1</text:a> следующего содержания:</text:p>
      <text:p text:style-name="s1"><text:bookmark text:name="anchor4071"/>"7.1. Установление публичного сервитута для проведения инженерных изысканий в целях подготовки документации по планировке территории, предусматривающей размещение объектов инфраструктуры, допускается в отсутствие сведений о таких объектах в документах территориального планирования.".</text:p>
      <text:p text:style-name="s1"/>
      <text:p text:style-name="s15"><text:bookmark text:name="anchor6"/><text:span text:style-name="s10">Статья 6</text:span></text:p>
      <text:p text:style-name="s1">Внести в <text:a xlink:type="simple" xlink:href="http://ivo.garant.ru/document/redirect/403620528/0">Федеральный закон</text:a> от 8 марта 2022 года N 46-ФЗ "О внесении изменений в отдельные законодательные акты Российской Федерации" (Собрание законодательства Российской Федерации, 2022, N 11, ст. 1596; N 13, ст. 1960; N 16, ст. 2594, 2606; N 27, ст. 4614; № 29, ст. 5253; № 45, ст. 7665; № 52, ст. 9349; 2024, N 1, ст. 6; N 53, ст. 8504; 2025, N 31, ст. 4626; Российская газета, 2025, 18 декабря) следующие изменения:</text:p>
      <text:p text:style-name="s1"><text:bookmark text:name="anchor61"/>1) в <text:a xlink:type="simple" xlink:href="http://ivo.garant.ru/document/redirect/403620528/15">статье 15</text:a>:</text:p>
      <text:p text:style-name="s1"><text:bookmark text:name="anchor611"/>а) <text:a xlink:type="simple" xlink:href="http://ivo.garant.ru/document/redirect/403620528/150021">части 2.1</text:a> и <text:a xlink:type="simple" xlink:href="http://ivo.garant.ru/document/redirect/403620528/150023">2.3</text:a> признать утратившими силу;</text:p>
      <text:p text:style-name="s1"><text:bookmark text:name="anchor612"/>б) дополнить <text:a xlink:type="simple" xlink:href="http://ivo.garant.ru/document/redirect/403620528/150024">частями 2.4</text:a> и <text:a xlink:type="simple" xlink:href="http://ivo.garant.ru/document/redirect/403620528/150025">2.5</text:a> следующего содержания:</text:p>
      <text:p text:style-name="s1"><text:bookmark text:name="anchor150024"/>"2.4. Установить, что в 2026 году в дополнение к случаям, предусмотренным частью 1 статьи 93 Федерального закона от 5 апреля 2013 года N 44-ФЗ "О контрактной системе в сфере закупок товаров, работ, услуг для обеспечения государственных и муниципальных нужд", Правительство Российской Федерации вправе предусматривать иные случаи осуществления закупок товаров, работ, услуг для государственных и (или) муниципальных нужд у единственного поставщика (подрядчика, исполнителя), а также определять порядок осуществления закупок в указанных случаях. Заказчик заключает контракт с таким поставщиком (подрядчиком, исполнителем) не позднее 31 декабря 2026 года.</text:p>
      <text:p text:style-name="s1"><text:bookmark text:name="anchor150025"/>2.5. Установить, что в 2026 году в дополнение к случаям, предусмотренным частью 1 статьи 93 Федерального закона от 5 апреля 2013 года N 44-ФЗ "О контрактной системе в сфере закупок товаров, работ, услуг для обеспечения государственных и муниципальных нужд" и установленным в соответствии с частью 2.4 настоящей статьи, высший исполнительный орган субъекта Российской Федерации - города федерального значения Москвы вправе предусматривать иные случаи осуществления закупок товаров, работ, услуг у единственного поставщика (подрядчика, исполнителя) для обеспечения нужд субъекта Российской Федерации - города федерального значения Москвы и муниципальных нужд внутригородских муниципальных образований данного субъекта Российской Федерации, а также определять порядок осуществления закупок в указанных случаях. Заказчик заключает контракт с таким поставщиком (подрядчиком, исполнителем) не позднее 31 декабря 2026 года.";</text:p>
      <text:p text:style-name="s1"><text:bookmark text:name="anchor613"/>в) в <text:a xlink:type="simple" xlink:href="http://ivo.garant.ru/document/redirect/403620528/153">части 3</text:a> цифры "2.1 - 2.3" заменить словами "2.4 и 2.5";</text:p>
      <text:p text:style-name="s1"><text:bookmark text:name="anchor614"/>г) в <text:a xlink:type="simple" xlink:href="http://ivo.garant.ru/document/redirect/403620528/154">части 4</text:a> цифры "2.1 - 2.3" заменить словами "2.4 и 2.5";</text:p>
      <text:p text:style-name="s1"><text:bookmark text:name="anchor615"/>д) в <text:a xlink:type="simple" xlink:href="http://ivo.garant.ru/document/redirect/403620528/155">части 5</text:a> цифры "2.1 - 2.3" заменить словами "2.4 и 2.5";</text:p>
      <text:p text:style-name="s1"><text:bookmark text:name="anchor616"/>е) в <text:a xlink:type="simple" xlink:href="http://ivo.garant.ru/document/redirect/403620528/156">части 6</text:a> цифры "2.1 - 2.3" заменить словами "2.4 и 2.5";</text:p>
      <text:p text:style-name="s1"><text:bookmark text:name="anchor617"/>ж) в <text:a xlink:type="simple" xlink:href="http://ivo.garant.ru/document/redirect/403620528/157">части 7</text:a>:</text:p>
      <text:p text:style-name="s1"><text:bookmark text:name="anchor6172"/>в <text:a xlink:type="simple" xlink:href="http://ivo.garant.ru/document/redirect/403620528/157">абзаце первом</text:a> цифры "2025" заменить цифрами "2026";</text:p>
      <text:p text:style-name="s1"><text:bookmark text:name="anchor6173"/>в <text:a xlink:type="simple" xlink:href="http://ivo.garant.ru/document/redirect/403620528/1571">пункте 1</text:a> цифры "2025" заменить цифрами "2026";</text:p>
      <text:p text:style-name="s1"><text:bookmark text:name="anchor62"/>2) в <text:a xlink:type="simple" xlink:href="http://ivo.garant.ru/document/redirect/403620528/18">статье 18</text:a>:</text:p>
      <text:p text:style-name="s1"><text:bookmark text:name="anchor621"/>а) в <text:a xlink:type="simple" xlink:href="http://ivo.garant.ru/document/redirect/403620528/184">части 4</text:a> цифры "2025" заменить цифрами "2026";</text:p>
      <text:p text:style-name="s1"><text:bookmark text:name="anchor622"/>б) в <text:a xlink:type="simple" xlink:href="http://ivo.garant.ru/document/redirect/403620528/185">части 5</text:a> слова "до 30 июня 2025 года" заменить словами "до 31 декабря 2025 года", слова "до 31 декабря 2025 года" заменить словами "до 31 декабря 2026 года";</text:p>
      <text:p text:style-name="s1"><text:bookmark text:name="anchor623"/>3) дополнить <text:a xlink:type="simple" xlink:href="http://ivo.garant.ru/document/redirect/403620528/1830">статьей 18.3</text:a> следующего содержания:</text:p>
      <text:p text:style-name="s1">"</text:p>
      <text:p text:style-name="s15"><text:bookmark text:name="anchor1830"/><text:span text:style-name="s10">Статья 18.3</text:span></text:p>
      <text:p text:style-name="s1">Установить, что Правительство Российской Федерации в 2026 году вправе принимать решения, предусматривающие:</text:p>
      <text:p text:style-name="s1"><text:bookmark text:name="anchor18301"/>1) особенности подтверждения пригодности новых материалов, изделий, конструкций и технологий для применения в строительстве;</text:p>
      <text:p text:style-name="s1"><text:bookmark text:name="anchor18302"/>2) особенности проведения государственной экспертизы проектной документации;</text:p>
      <text:p text:style-name="s1"><text:bookmark text:name="anchor18303"/>3) особенности подготовки, утверждения и внесения изменений в документацию по планировке территории, выдачи градостроительных планов земельных участков, информационного обеспечения градостроительной деятельности, выдачи разрешений на строительство и ввод в эксплуатацию объектов капитального строительства в случаях, если установление таких особенностей необходимо для обеспечения обороноспособности и безопасности государства, либо в отношении объектов капитального строительства, создаваемых для нужд Вооруженных Сил Российской Федерации, либо в отношении объектов капитального строительства, необходимых для обеспечения деятельности объектов государственной охраны, а также утверждение перечня указанных в настоящем пункте объектов капитального строительства;</text:p>
      <text:p text:style-name="s1"><text:bookmark text:name="anchor18304"/>4) особенности передачи объекта долевого строительства участнику долевого строительства;</text:p>
      <text:p text:style-name="s1"><text:bookmark text:name="anchor18305"/>5) особенности применения неустойки (штрафа, пени), иных финансовых санкций, а также других мер ответственности за неисполнение или ненадлежащее исполнение обязательств по договорам участия в долевом строительстве, установленных законодательством о долевом строительстве;</text:p>
      <text:p text:style-name="s1"><text:bookmark text:name="anchor18306"/>6) особенности открытия пунктов пропуска через Государственную границу Российской Федерации.".</text:p>
      <text:p text:style-name="s1"/>
      <text:p text:style-name="s15"><text:bookmark text:name="anchor7"/><text:span text:style-name="s10">Статья 7</text:span></text:p>
      <text:p text:style-name="s1">Внести в <text:a xlink:type="simple" xlink:href="http://ivo.garant.ru/document/redirect/403694246/7">статью 7</text:a> Федерального закона от 14 марта 2022 года N 58-ФЗ "О внесении изменений в отдельные законодательные акты Российской Федерации" (Собрание законодательства Российской Федерации, 2022, N 12, ст. 1785; N 52, ст. 9349; 2024, N 1, ст. 6; N 53, ст. 8504) следующие изменения:</text:p>
      <text:p text:style-name="s1"><text:bookmark text:name="anchor71"/>1) в <text:a xlink:type="simple" xlink:href="http://ivo.garant.ru/document/redirect/403694246/70">абзаце первом</text:a> слова "и 2025" заменить словами ",2025 и 2026";</text:p>
      <text:p text:style-name="s1"><text:bookmark text:name="anchor72"/>2) <text:a xlink:type="simple" xlink:href="http://ivo.garant.ru/document/redirect/403694246/71">пункты 1</text:a>, <text:a xlink:type="simple" xlink:href="http://ivo.garant.ru/document/redirect/403694246/74">4</text:a> и <text:a xlink:type="simple" xlink:href="http://ivo.garant.ru/document/redirect/403694246/75">5</text:a> признать утратившими силу.</text:p>
      <text:p text:style-name="s1"/>
      <text:p text:style-name="s15"><text:bookmark text:name="anchor8"/><text:span text:style-name="s10">Статья 8</text:span></text:p>
      <text:p text:style-name="s1">В <text:a xlink:type="simple" xlink:href="http://ivo.garant.ru/document/redirect/408276873/502">части 2 статьи 5</text:a> Федерального закона от 25 декабря 2023 года N 653-ФЗ "О внесении изменений в Федеральный закон "Технический регламент о безопасности зданий и сооружений" и отдельные законодательные акты Российской Федерации" (Собрание законодательства Российской Федерации, 2024, N 1, ст. 34) цифры "2026" заменить цифрами "2027".</text:p>
      <text:p text:style-name="s1"/>
      <text:p text:style-name="s15"><text:bookmark text:name="anchor9"/><text:span text:style-name="s10">Статья 9</text:span></text:p>
      <text:p text:style-name="s1">В <text:a xlink:type="simple" xlink:href="http://ivo.garant.ru/document/redirect/412423794/5520102">абзаце четвертом пункта 13 статьи 1</text:a> Федерального закона от 31 июля 2025 года N 309-ФЗ "О внесении изменений в Градостроительный кодекс Российской Федерации" (Собрание законодательства Российской Федерации, 2025, № 31, ст. 4663) слова "специалистов иных профессий, сведения о которых не включаются в национальные реестры специалистов, предусмотренные статьей 55.5-1" заменить словами "иных специалистов, занятых в строительстве, сведения о которых включаются в национальные реестры специалистов в соответствии с частью 9.1 статьи 55.5-1".</text:p>
      <text:p text:style-name="s1"/>
      <text:p text:style-name="s15"><text:bookmark text:name="anchor10"/><text:span text:style-name="s10">Статья 10</text:span></text:p>
      <text:p text:style-name="s1">Предоставление публично-правовой компанией "Фонд развития территорий" после дня <text:a xlink:type="simple" xlink:href="http://ivo.garant.ru/document/redirect/413371649/0">вступления в силу</text:a> настоящего Федерального закона целевых средств бюджетам субъектов Российской Федерации на переселение граждан из жилых помещений в многоквартирных домах, признанных в установленном порядке до 1 января 2017 года аварийными и подлежащими сносу или реконструкции, осуществляется в порядке, предусмотренном <text:a xlink:type="simple" xlink:href="http://ivo.garant.ru/document/redirect/71732782/136">статьей 13.6</text:a> Федерального закона от 29 июля 2017 года N 218-ФЗ "О публично-правовой компании "Фонд развития территорий" и о внесении изменений в отдельные законодательные акты Российской Федерации".</text:p>
      <text:p text:style-name="s1"/>
      <text:p text:style-name="s15"><text:bookmark text:name="anchor110"/><text:span text:style-name="s10">Статья 11</text:span></text:p>
      <text:p text:style-name="s1"><text:bookmark text:name="anchor1101"/>1. Настоящий Федеральный закон вступает в силу со дня его <text:a xlink:type="simple" xlink:href="http://ivo.garant.ru/document/redirect/413371649/0">официального опубликования</text:a>, за исключением <text:a xlink:type="simple" xlink:href="#anchor14">пункта 4 статьи 1</text:a> настоящего Федерального закона.</text:p>
      <text:p text:style-name="s1"><text:bookmark text:name="anchor1102"/>2. <text:a xlink:type="simple" xlink:href="#anchor14">Пункт 4 статьи 1</text:a> настоящего Федерального закона вступает в силу с 1 марта 2026 года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Президент Российской Федерации</text:p>
          </table:table-cell>
          <table:table-cell>
            <text:p text:style-name="s1_right_fi0">В. Путин</text:p>
          </table:table-cell>
        </table:table-row>
      </table:table>
      <text:p text:style-name="s1"/>
      <text:p text:style-name="s16_fi0">Москва, Кремль
28 декабря 2025 года
№ 507-ФЗ</text:p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justify" fo:text-indent="0cm" fo:margin-left="0cm" fo:margin-right="0cm" fo:margin-top="0.132cm" fo:margin-bottom="0cm"/>
      <style:text-properties fo:font-style="italic" fo:color="#353842"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/>
      <style:text-properties fo:background-color="#f0f0f0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/>
      <style:text-properties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Text (reference)">
      <style:paragraph-properties fo:background-color="#eaefed"/>
      <style:text-properties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  <style:style style:name="s93" style:family="paragraph" style:display-name="Взамен" style:parent-style-name="Text (reference)">
      <style:paragraph-properties fo:auto-text-indent="false" fo:text-indent="0cm" fo:background-color="#FFF5AD" fo:margin-left="0.3in"/>
      <style:text-properties fo:background-color="#FFF5AD"/>
    </style:style>
    <style:style style:name="s94" style:family="paragraph" style:display-name="Сравнение" style:parent-style-name="Text (reference)">
      <style:paragraph-properties fo:auto-text-indent="false" fo:text-indent="0cm" fo:background-color="#f0f0f0" fo:margin-left="0.3in"/>
      <style:text-properties fo:background-color="#f0f0f0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Федеральный закон от 28 декабря 2025 г. № 507-ФЗ "О внесении изменений в Градостроительный кодекс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5-12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