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 Out of date -->
    <style:style style:name="s7" style:family="text" style:parent-style-name="Standard">
      <style:text-properties fo:color="#666600" style:text-line-through-style="solid" style:text-line-through-type="single" fo:font-weight="normal"/>
    </style:style>
    <!-- Comment -->
    <style:style style:name="s9" style:family="section">
      <style:section-properties fo:background-color="#f0f0f0"/>
    </style:style>
    <style:style style:family="text" style:name="s9">
      <style:text-properties fo:color="#353842" style:font-name="Times New Roman CYR" fo:font-size="12pt" fo:background-color="#f0f0f0"/>
    </style:style>
    <style:style style:family="paragraph" style:name="s9header" style:parent-style-name="s9">
      <style:text-properties fo:font-size="8pt"/>
    </style:style>
    <style:style style:name="s93" style:family="section">
      <style:section-properties fo:background-color="#FFF5AD"/>
    </style:style>
    <style:style style:name="s94" style:family="section">
      <style:section-properties fo:background-color="#f0f0f0"/>
    </style:style>
    <!-- Color selection -->
    <style:style style:family="text" style:name="s10">
      <style:text-properties fo:color="#26282f" fo:font-weight="bold"/>
    </style:style>
    <!-- Version info -->
    <style:style style:name="s22" style:family="section">
      <style:section-properties fo:background-color="#f0f0f0" fo:margin-left="0.3cm" fo:margin-right="0cm"/>
    </style:style>
    <style:style style:family="paragraph" style:name="s22header" style:parent-style-name="s22">
      <style:text-properties fo:font-size="8pt"/>
    </style:style>
    <!-- Necessary documents -->
    <style:style style:name="s45" style:family="section">
      <style:section-properties fo:background-color="#f0f0f0" fo:margin-left="0.74cm" fo:margin-right="0.74cm"/>
    </style:style>
    <!-- Who helps? -->
    <style:style style:name="s46" style:family="section">
      <style:section-properties fo:background-color="#f0f0f0" fo:margin-left="0.74cm" fo:margin-right="0.74cm"/>
    </style:style>
    <!-- Attention: dishonesty -->
    <style:style style:name="s47" style:family="section">
      <style:section-properties fo:background-color="#f0f0f0" fo:margin-left="0.74cm" fo:margin-right="0.74cm"/>
    </style:style>
    <!-- Attention: crime! -->
    <style:style style:name="s48" style:family="section">
      <style:section-properties fo:background-color="#f0f0f0" fo:margin-left="0.74cm" fo:margin-right="0.74cm"/>
    </style:style>
    <!-- Note -->
    <style:style style:name="s49" style:family="section">
      <style:section-properties fo:background-color="#f0f0f0" fo:margin-left="0.74cm" fo:margin-right="0.74cm"/>
    </style:style>
    <!-- Example -->
    <style:style style:name="s50" style:family="section">
      <style:section-properties fo:background-color="#f0f0f0" fo:margin-left="0.74cm" fo:margin-right="0.74cm"/>
    </style:style>
    <!-- Attention -->
    <style:style style:name="s68" style:family="section">
      <style:section-properties fo:background-color="#f0f0f0" fo:margin-left="0.74cm" fo:margin-right="0.74cm"/>
    </style:style>
    <!-- Special formula -->
    <style:style style:name="s74" style:family="section">
      <style:section-properties fo:background-color="#f0f0f0" fo:margin-left="0.74cm" fo:margin-right="0.74cm"/>
    </style:style>
    <!-- Changes info -->
    <style:style style:name="s52" style:family="section">
      <style:section-properties fo:background-color="#eaefed" fo:margin-left="0cm" fo:margin-right="0cm"/>
    </style:style>
    <style:style style:family="paragraph" style:name="s52header" style:parent-style-name="s52"/>
    <style:style style:name="s41" style:family="text">
      <style:text-properties fo:color="#000000" style:font-name="Arial" fo:background-color="#c1d7ff"/>
    </style:style>
    <style:style style:name="s42" style:family="text">
      <style:text-properties fo:color="#000000" style:font-name="Arial" fo:background-color="#c4c413"/>
    </style:style>
    <style:style style:name="lower" style:family="text">
      <style:text-properties style:text-position="sub 58%"/>
    </style:style>
    <style:style style:name="upper" style:family="text">
      <style:text-properties style:text-position="super 58%"/>
    </style:style>
    <style:style style:name="bold" style:family="text">
      <style:text-properties fo:font-weight="bold"/>
    </style:style>
    <style:style style:name="preformatted" style:family="text">
      <style:text-properties style:font-name="Courier New" fo:font-size="11pt"/>
    </style:style>
    <style:style style:name="fr1" style:family="graphic">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icon" style:family="graphic">
      <style:graphic-properties fo:border="none" style:mirror="none" fo:clip="rect(0cm, 0cm, 0cm, 0cm)" draw:luminance="0%" draw:contrast="0%" draw:red="0%" draw:green="0%" draw:blue="0%" draw:gamma="100%" draw:color-inversion="false" draw:image-opacity="100%" draw:color-mode="standard"/>
    </style:style>
    <style:style style:name="tiff" style:family="graphic">
      <style:graphic-properties style:vertical-pos="middle" style:vertical-rel="char" style:horizontal-pos="center" style:horizontal-rel="page" style:mirror="none" fo:clip="rect(0in, 0in, 0in, 0in)" draw:luminance="0%" draw:contrast="0%" draw:red="0%" draw:green="0%" draw:blue="0%" draw:gamma="100%" draw:color-inversion="false" draw:image-opacity="100%" draw:color-mode="standard"/>
    </style:style>
    <!-- prime -->
    <style:style style:family="paragraph" style:name="s777" style:parent-style-name="Heading">
      <style:paragraph-properties fo:text-align="left"/>
      <style:text-properties style:font-name="Times New Roman" fo:text-align="left" fo:font-size="20pt" fo:font-weight="normal" fo:language="ru" fo:country="RU"/>
    </style:style>
    <style:style style:family="paragraph" style:name="s778" style:parent-style-name="Heading">
      <style:paragraph-properties fo:text-align="left"/>
      <style:text-properties style:font-name="Times New Roman" fo:text-align="left" fo:background-color="#000000" fo:color="#ffffff" fo:font-size="12pt" fo:font-weight="normal" fo:language="ru" fo:country="RU"/>
    </style:style>
    <style:style style:family="paragraph" style:name="s779" style:parent-style-name="Heading">
      <style:paragraph-properties fo:text-align="left"/>
      <style:text-properties style:font-name="Times New Roman" fo:text-align="left" fo:font-size="14pt" fo:font-weight="bold" fo:language="ru" fo:country="RU"/>
    </style:style>
    <style:style style:family="paragraph" style:name="s780" style:parent-style-name="Heading">
      <style:paragraph-properties fo:text-align="left"/>
      <style:text-properties style:font-name="Times New Roman" fo:text-align="left" fo:font-size="12pt" fo:font-weight="normal" style:text-underline-type="single" fo:language="ru" fo:country="RU"/>
    </style:style>
    <!-- lists -->
    <style:style style:family="paragraph" style:name="s781" style:parent-style-name="Heading">
      <style:paragraph-properties fo:text-align="left"/>
      <style:text-properties fo:color="#ffffff" style:font-name="Times New Roman" fo:text-align="left" fo:font-size="16pt" fo:language="ru" fo:country="RU" fo:background-color="#2e2e2e"/>
    </style:style>
    <style:style style:family="paragraph" style:name="s782" style:parent-style-name="Heading">
      <style:paragraph-properties fo:text-align="left"/>
      <style:text-properties fo:color="#000000" style:text-underline-type="single" style:font-name="Times New Roman" fo:text-align="left" fo:font-size="20pt" fo:language="ru" fo:country="RU" fo:background-color="#ffffff"/>
    </style:style>
    <style:style style:family="paragraph" style:name="s84" style:parent-style-name="Standard">
      <style:paragraph-properties fo:text-align="left" fo:text-indent="0cm"/>
    </style:style>
    <style:style style:family="paragraph" style:name="s75" style:parent-style-name="Standard">
      <style:paragraph-properties fo:text-align="left" fo:text-indent="0cm"/>
      <style:text-properties fo:font-style="italic"/>
    </style:style>
    <!-- document changes style -->
    <style:style style:name="ChangesCell" style:family="table-cell">
      <style:table-cell-properties fo:padding-left="0.19cm" fo:padding-right="0.19cm"/>
    </style:style>
    <!-- Picture paragraph -->
    <style:style style:family="paragraph" style:name="image" style:parent-style-name="Heading">
      <style:paragraph-properties fo:text-indent="0cm"/>
    </style:style>
    <style:style style:name="TiffA4P" style:family="paragraph" style:parent-style-name="Standard" style:master-page-name="A4Portrait">
      <style:paragraph-properties fo:break-before="page" fo:text-indent="0cm" fo:margin-left="0cm" fo:margin-right="0cm" fo:margin-top="0cm" fo:margin-bottom="0cm"/>
    </style:style>
    <style:style style:name="TiffA4L" style:family="paragraph" style:parent-style-name="Standard" style:master-page-name="A4Landscape">
      <style:paragraph-properties fo:break-before="page" fo:text-indent="0cm" fo:margin-left="0cm" fo:margin-right="0cm" fo:margin-top="0cm" fo:margin-bottom="0cm"/>
    </style:style>
    <!-- Section break styles -->
    <style:style style:name="SB0" style:family="paragraph" style:parent-style-name="Standard" style:master-page-name="landscape0">
      <style:paragraph-properties fo:break-before="page"/>
    </style:style>
    <!-- Page break style -->
    <style:style style:name="PB" style:family="paragraph" style:parent-style-name="Standard">
      <style:paragraph-properties fo:break-before="page"/>
    </style:style>
    <!-- Specific styles -->
    <style:style style:name="s16_fi0" style:family="paragraph" style:parent-style-name="s16">
      <style:paragraph-properties fo:text-indent="0mm"/>
    </style:style>
    <style:style style:name="s1_right_fi0" style:family="paragraph" style:parent-style-name="s1">
      <style:paragraph-properties fo:text-align="right" fo:text-indent="0mm"/>
    </style:style>
    <style:style style:name="s1_right_fi698" style:family="paragraph" style:parent-style-name="s1">
      <style:paragraph-properties fo:text-align="right" fo:text-indent="12mm"/>
    </style:style>
    <style:style style:name="s1_center_fi698" style:family="paragraph" style:parent-style-name="s1">
      <style:paragraph-properties fo:text-align="center" fo:text-indent="12mm"/>
    </style:style>
    <style:style style:name="s1_center_fi0" style:family="paragraph" style:parent-style-name="s1">
      <style:paragraph-properties fo:text-align="center" fo:text-indent="0mm"/>
    </style:style>
    <style:style style:name="s1_fi0" style:family="paragraph" style:parent-style-name="s1">
      <style:paragraph-properties fo:text-indent="0mm"/>
    </style:style>
    <style:style style:name="s2_preformatted11" style:family="paragraph" style:parent-style-name="s2">
      <style:text-properties style:font-name="Courier New" fo:font-family="'Courier New'" fo:font-size="11pt"/>
    </style:style>
    <!-- Table cells styles -->
    <style:style style:name="0" style:family="table-cell">
      <style:table-cell-properties style:vertical-align="top"/>
    </style:style>
    <style:style style:name="1" style:family="table-cell">
      <style:table-cell-properties fo:border-bottom="0.05pt solid #000000" style:vertical-align="top"/>
    </style:style>
    <style:style style:name="4" style:family="table-cell">
      <style:table-cell-properties fo:border-right="0.05pt solid #000000" style:vertical-align="top"/>
    </style:style>
    <style:style style:name="5" style:family="table-cell">
      <style:table-cell-properties fo:border-right="0.05pt solid #000000" fo:border-bottom="0.05pt solid #000000" style:vertical-align="top"/>
    </style:style>
    <style:style style:name="7" style:family="table-cell">
      <style:table-cell-properties fo:border-left="0.05pt solid #000000" fo:border-right="0.05pt solid #000000" fo:border-bottom="0.05pt solid #000000" style:vertical-align="top"/>
    </style:style>
    <style:style style:name="13" style:family="table-cell">
      <style:table-cell-properties fo:border-top="0.05pt solid #000000" fo:border-right="0.05pt solid #000000" fo:border-bottom="0.05pt solid #000000" style:vertical-align="top"/>
    </style:style>
    <style:style style:name="20" style:family="table-cell">
      <style:table-cell-properties fo:border-right="0.05pt solid #000000" style:vertical-align="middle"/>
    </style:style>
    <style:style style:name="21" style:family="table-cell">
      <style:table-cell-properties fo:border-right="0.05pt solid #000000" fo:border-bottom="0.05pt solid #000000" style:vertical-align="middle"/>
    </style:style>
    <style:style style:name="36" style:family="table-cell">
      <style:table-cell-properties fo:border-right="0.05pt solid #000000" style:vertical-align="bottom"/>
    </style:style>
    <style:style style:name="64" style:family="table-cell">
      <style:table-cell-properties style:vertical-align="top"/>
    </style:style>
    <style:style style:name="65" style:family="table-cell">
      <style:table-cell-properties fo:border-bottom="0.05pt solid #000000" style:vertical-align="top"/>
    </style:style>
    <style:style style:name="69" style:family="table-cell">
      <style:table-cell-properties fo:border-right="0.05pt solid #000000" fo:border-bottom="0.05pt solid #000000" style:vertical-align="top"/>
    </style:style>
    <style:style style:name="77" style:family="table-cell">
      <style:table-cell-properties fo:border-top="0.05pt solid #000000" fo:border-right="0.05pt solid #000000" fo:border-bottom="0.05pt solid #000000" style:vertical-align="top"/>
    </style:style>
    <style:style style:name="79" style:family="table-cell">
      <style:table-cell-properties fo:border-left="0.05pt solid #000000" fo:border-top="0.05pt solid #000000" fo:border-right="0.05pt solid #000000" fo:border-bottom="0.05pt solid #000000" style:vertical-align="top"/>
    </style:style>
    <!-- Table columns styles -->
    <style:style style:name="578" style:family="table-column">
      <style:table-column-properties style:column-width="10mm"/>
    </style:style>
    <style:style style:name="709" style:family="table-column">
      <style:table-column-properties style:column-width="13mm"/>
    </style:style>
    <style:style style:name="713" style:family="table-column">
      <style:table-column-properties style:column-width="13mm"/>
    </style:style>
    <style:style style:name="733" style:family="table-column">
      <style:table-column-properties style:column-width="13mm"/>
    </style:style>
    <style:style style:name="814" style:family="table-column">
      <style:table-column-properties style:column-width="14mm"/>
    </style:style>
    <style:style style:name="815" style:family="table-column">
      <style:table-column-properties style:column-width="14mm"/>
    </style:style>
    <style:style style:name="974" style:family="table-column">
      <style:table-column-properties style:column-width="17mm"/>
    </style:style>
    <style:style style:name="1002" style:family="table-column">
      <style:table-column-properties style:column-width="18mm"/>
    </style:style>
    <style:style style:name="1262" style:family="table-column">
      <style:table-column-properties style:column-width="22mm"/>
    </style:style>
    <style:style style:name="1270" style:family="table-column">
      <style:table-column-properties style:column-width="22mm"/>
    </style:style>
    <style:style style:name="1344" style:family="table-column">
      <style:table-column-properties style:column-width="24mm"/>
    </style:style>
    <style:style style:name="1455" style:family="table-column">
      <style:table-column-properties style:column-width="26mm"/>
    </style:style>
    <style:style style:name="1496" style:family="table-column">
      <style:table-column-properties style:column-width="26mm"/>
    </style:style>
    <style:style style:name="1532" style:family="table-column">
      <style:table-column-properties style:column-width="27mm"/>
    </style:style>
    <style:style style:name="2037" style:family="table-column">
      <style:table-column-properties style:column-width="36mm"/>
    </style:style>
    <style:style style:name="2311" style:family="table-column">
      <style:table-column-properties style:column-width="41mm"/>
    </style:style>
    <style:style style:name="3401" style:family="table-column">
      <style:table-column-properties style:column-width="60mm"/>
    </style:style>
    <style:style style:name="4212" style:family="table-column">
      <style:table-column-properties style:column-width="74mm"/>
    </style:style>
    <style:style style:name="6803" style:family="table-column">
      <style:table-column-properties style:column-width="120mm"/>
    </style:style>
    <style:style style:name="6939" style:family="table-column">
      <style:table-column-properties style:column-width="122mm"/>
    </style:style>
    <!-- Table styles -->
    <style:style style:name="rubber" style:family="table">
      <style:table-properties style:rel-width="100%" table:align="center"/>
    </style:style>
    <style:style style:name="10204" style:family="table">
      <style:table-properties style:width="180mm" table:align="left"/>
    </style:style>
    <style:style style:name="14958" style:family="table">
      <style:table-properties style:width="264mm" table:align="left"/>
    </style:style>
    <style:style style:name="15238" style:family="table">
      <style:table-properties style:width="269mm" table:align="left"/>
    </style:style>
    <!-- Colored text styles -->
  </office:automatic-styles>
  <office:body>
    <office:text text:use-soft-page-breaks="true">
      <text:p text:style-name="s22header">Информация об изменениях:</text:p>
      <text:p text:style-name="s22"><text:bookmark text:name="anchor0"/>Наименование изменено с 1 января 2022 г. - <text:a xlink:type="simple" xlink:href="http://ivo.garant.ru/document/redirect/403185566/1111">Постановление</text:a> Правительства России от 1 декабря 2021 г. № 2151</text:p>
      <text:p text:style-name="s22"><text:a xlink:type="simple" xlink:href="http://ivo.garant.ru/document/redirect/77319584/0">См. предыдущую редакцию</text:a></text:p>
      <text:h text:outline-level="1" text:style-name="s3"><text:a xlink:type="simple" xlink:href="http://ivo.garant.ru/document/redirect/72826254/0">Постановление Правительства РФ от 30 сентября 2019 г. N 1279
"О планах-графиках закупок и о признании утратившими силу отдельных решений Правительства Российской Федерации"</text:a></text:h>
      <text:p text:style-name="s52header">С изменениями и дополнениями от:</text:p>
      <text:p text:style-name="s52">27 декабря 2019 г., 6 августа, 7 ноября 2020 г., 27 мая, 1 декабря 2021 г., 18 августа, 31 октября, 31 декабря 2022 г., 9 декабря 2024 г., 2 сентября 2025 г.</text:p>
      <text:p text:style-name="s1"/>
      <text:p text:style-name="s22header">Информация об изменениях:</text:p>
      <text:p text:style-name="s22"><text:bookmark text:name="anchor10"/>Преамбула изменена с 1 января 2022 г. - <text:a xlink:type="simple" xlink:href="http://ivo.garant.ru/document/redirect/403185566/1112">Постановление</text:a> Правительства России от 1 декабря 2021 г. № 2151</text:p>
      <text:p text:style-name="s22">Изменения применяются при осуществлении закупок товаров, работ, услуг для обеспечения государственных и муниципальных нужд, извещения об осуществлении которых размещены в ЕИС в сфере закупок либо приглашения принять участие в определении поставщика (подрядчика, исполнителя) по которым направлены после 1 января 2022 г.</text:p>
      <text:p text:style-name="s22"><text:a xlink:type="simple" xlink:href="http://ivo.garant.ru/document/redirect/77319584/10">См. предыдущую редакцию</text:a></text:p>
      <text:p text:style-name="s1">Правительство Российской Федерации постановляет:</text:p>
      <text:p text:style-name="s22header">Информация об изменениях:</text:p>
      <text:p text:style-name="s22"><text:bookmark text:name="anchor1"/>Пункт 1 изменен с 1 января 2022 г. - <text:a xlink:type="simple" xlink:href="http://ivo.garant.ru/document/redirect/403185566/1113">Постановление</text:a> Правительства России от 1 декабря 2021 г. № 2151</text:p>
      <text:p text:style-name="s22">Изменения применяются при осуществлении закупок товаров, работ, услуг для обеспечения государственных и муниципальных нужд, извещения об осуществлении которых размещены в ЕИС в сфере закупок либо приглашения принять участие в определении поставщика (подрядчика, исполнителя) по которым направлены после 1 января 2022 г.</text:p>
      <text:p text:style-name="s22"><text:a xlink:type="simple" xlink:href="http://ivo.garant.ru/document/redirect/77319584/1">См. предыдущую редакцию</text:a></text:p>
      <text:p text:style-name="s1">1. Утвердить прилагаемое <text:a xlink:type="simple" xlink:href="#anchor1000">Положение</text:a> о порядке формирования, утверждения планов-графиков закупок, внесения изменений в такие планы-графики, размещения планов-графиков закупок в единой информационной системе в сфере закупок, на официальном сайте такой системы в информационно-телекоммуникационной сети "Интернет", об особенностях включения информации в такие планы-графики и планирования закупок заказчиком, осуществляющим деятельность на территории иностранного государства, а также о требованиях к форме планов-графиков закупок (далее - Положение).</text:p>
      <text:p text:style-name="s9header">ГАРАНТ:</text:p>
      <text:p text:style-name="s9"><text:bookmark text:name="anchor2"/>Пункт 2 <text:a xlink:type="simple" xlink:href="#anchor3">вступает в силу</text:a> с 1 января 2020 г.</text:p>
      <text:p text:style-name="s1">2. Признать утратившими силу:</text:p>
      <text:p text:style-name="s1"><text:bookmark text:name="anchor21"/><text:a xlink:type="simple" xlink:href="http://ivo.garant.ru/document/redirect/70514250/0">постановление</text:a> Правительства Российской Федерации от 21 ноября 2013 г. N 1043 "О требованиях к формированию, утверждению и ведению планов закупок товаров, работ, услуг для обеспечения нужд субъекта Российской Федерации и муниципальных нужд, а также требованиях к форме планов закупок товаров, работ, услуг" (Собрание законодательства Российской Федерации, 2013, N 48, ст. 6252);</text:p>
      <text:p text:style-name="s1"><text:bookmark text:name="anchor22"/><text:a xlink:type="simple" xlink:href="http://ivo.garant.ru/document/redirect/70782752/0">постановление</text:a> Правительства Российской Федерации от 29 октября 2014 г. N 1113 "О внесении изменений в постановление Правительства Российской Федерации от 21 ноября 2013 г. N 1043" (Собрание законодательства Российской Федерации, 2014, N 45, ст. 6215);</text:p>
      <text:p text:style-name="s1"><text:bookmark text:name="anchor23"/><text:a xlink:type="simple" xlink:href="http://ivo.garant.ru/document/redirect/71067324/0">постановление</text:a> Правительства Российской Федерации от 5 июня 2015 г. N 552 "Об утверждении Правил формирования, утверждения и ведения плана закупок товаров, работ, услуг для обеспечения федеральных нужд, а также требований к форме плана закупок товаров, работ, услуг для обеспечения федеральных нужд" (Собрание законодательства Российской Федерации, 2015, N 24, ст. 3473);</text:p>
      <text:p text:style-name="s1"><text:bookmark text:name="anchor24"/><text:a xlink:type="simple" xlink:href="http://ivo.garant.ru/document/redirect/71067264/0">постановление</text:a> Правительства Российской Федерации от 5 июня 2015 г. N 553 "Об утверждении Правил формирования, утверждения и ведения плана-графика закупок товаров, работ, услуг для обеспечения федеральных нужд, а также требований к форме плана-графика закупок товаров, работ, услуг для обеспечения федеральных нужд" (Собрание законодательства Российской Федерации, 2015, N 24, ст. 3474);</text:p>
      <text:p text:style-name="s1"><text:bookmark text:name="anchor25"/><text:a xlink:type="simple" xlink:href="http://ivo.garant.ru/document/redirect/71067350/0">постановление</text:a> Правительства Российской Федерации от 5 июня 2015 г. N 554 "О требованиях к формированию, утверждению и ведению плана-графика закупок товаров, работ, услуг для обеспечения нужд субъекта Российской Федерации и муниципальных нужд, а также о требованиях к форме плана-графика закупок товаров, работ, услуг" (Собрание законодательства Российской Федерации, 2015, N 24, ст. 3475);</text:p>
      <text:p text:style-name="s1"><text:bookmark text:name="anchor26"/><text:a xlink:type="simple" xlink:href="http://ivo.garant.ru/document/redirect/71067244/0">постановление</text:a> Правительства Российской Федерации от 5 июня 2015 г. N 555 "Об установлении порядка обоснования закупок товаров, работ и услуг для обеспечения государственных и муниципальных нужд и форм такого обоснования" (Собрание законодательства Российской Федерации, 2015, N 24, ст. 3476);</text:p>
      <text:p text:style-name="s1"><text:bookmark text:name="anchor27"/><text:a xlink:type="simple" xlink:href="http://ivo.garant.ru/document/redirect/71237146/0">постановление</text:a> Правительства Российской Федерации от 29 октября 2015 г. N 1168 "Об утверждении Правил размещения в единой информационной системе в сфере закупок планов закупок товаров, работ, услуг для обеспечения государственных и муниципальных нужд, планов-графиков закупок товаров, работ, услуг для обеспечения государственных и муниципальных нужд" (Собрание законодательства Российской Федерации, 2015, N 45, ст. 6258);</text:p>
      <text:p text:style-name="s1"><text:bookmark text:name="anchor28"/><text:a xlink:type="simple" xlink:href="http://ivo.garant.ru/document/redirect/71580874/0">постановление</text:a> Правительства Российской Федерации от 29 декабря 2016 г. N 1543 "О внесении изменений в пункт 2 Правил размещения в единой информационной системе в сфере закупок планов закупок товаров, работ, услуг для обеспечения государственных и муниципальных нужд, планов-графиков закупок товаров, работ, услуг для обеспечения государственных и муниципальных нужд" (Собрание законодательства Российской Федерации, 2017, N 2, ст. 371);</text:p>
      <text:p text:style-name="s1"><text:bookmark text:name="anchor29"/><text:a xlink:type="simple" xlink:href="http://ivo.garant.ru/document/redirect/71599834/0">постановление</text:a> Правительства Российской Федерации от 25 января 2017 г. N 73 "О внесении изменений в некоторые акты Правительства Российской Федерации" (Собрание законодательства Российской Федерации, 2017, N 6, ст. 927);</text:p>
      <text:p text:style-name="s1"><text:bookmark text:name="anchor210"/><text:a xlink:type="simple" xlink:href="http://ivo.garant.ru/document/redirect/72023408/0">постановление</text:a> Правительства Российской Федерации от 16 августа 2018 г. N 952 "О внесении изменений в некоторые акты Правительства Российской Федерации" (Собрание законодательства Российской Федерации, 2018, N 35, ст. 5546);</text:p>
      <text:p text:style-name="s1"><text:bookmark text:name="anchor211"/><text:a xlink:type="simple" xlink:href="http://ivo.garant.ru/document/redirect/72134538/1001">пункты 1</text:a> и <text:a xlink:type="simple" xlink:href="http://ivo.garant.ru/document/redirect/72134538/1002">2</text:a> изменений, которые вносятся в акты Правительства Российской Федерации, утвержденных <text:a xlink:type="simple" xlink:href="http://ivo.garant.ru/document/redirect/72134538/0">постановлением</text:a> Правительства Российской Федерации от 21 декабря 2018 г. N 1618 "О внесении изменений в некоторые акты Правительства Российской Федерации" (Собрание законодательства Российской Федерации, 2018, N 53, ст. 8662).</text:p>
      <text:p text:style-name="s1"><text:bookmark text:name="anchor3"/>3. <text:a xlink:type="simple" xlink:href="#anchor2">Пункт 2</text:a> настоящего постановления вступает в силу с 1 января 2020 г.</text:p>
      <text:p text:style-name="s22header">Информация об изменениях:</text:p>
      <text:p text:style-name="s22"><text:bookmark text:name="anchor4"/>Пункт 4 изменен с 1 апреля 2020 г. - <text:a xlink:type="simple" xlink:href="http://ivo.garant.ru/document/redirect/73364267/10191">Постановление</text:a> Правительства России от 27 декабря 2019 г. № 1906</text:p>
      <text:p text:style-name="s22"><text:a xlink:type="simple" xlink:href="http://ivo.garant.ru/document/redirect/77691040/4">См. предыдущую редакцию</text:a></text:p>
      <text:p text:style-name="s1">4. Установить, что положения <text:a xlink:type="simple" xlink:href="#anchor1017">пункта 17</text:a> Положения применяются с 1 апреля 2020 г.</text:p>
      <text:p text:style-name="s22header">Информация об изменениях:</text:p>
      <text:p text:style-name="s22"><text:bookmark text:name="anchor5"/>Постановление дополнено пунктом 5 с 9 декабря 2021 г. - <text:a xlink:type="simple" xlink:href="http://ivo.garant.ru/document/redirect/403185566/1114">Постановление</text:a> Правительства России от 1 декабря 2021 г. № 2151</text:p>
      <text:p text:style-name="s22">Изменения применяются при осуществлении закупок товаров, работ, услуг для обеспечения государственных и муниципальных нужд, извещения об осуществлении которых размещены в ЕИС в сфере закупок либо приглашения принять участие в определении поставщика (подрядчика, исполнителя) по которым направлены после 9 декабря 2021 г.</text:p>
      <text:p text:style-name="s1">5. Установить, что при планировании закупок на 2022 финансовый год и на плановый период 2023 и 2024 годов:</text:p>
      <text:p text:style-name="s1"><text:bookmark text:name="anchor51"/>а) закупки лекарственных препаратов, необходимых для назначения пациенту по медицинским показаниям (индивидуальная непереносимость, по жизненным показаниям) по решению врачебной комиссии, которое фиксируется в медицинской документации пациента и журнале принятых на заседании врачебной комиссии решений, включаются в план-график закупок в форме отдельной закупки в размере годового объема финансового обеспечения таких закупок. При этом <text:a xlink:type="simple" xlink:href="#anchor10021">графы 3</text:a>, 4, 12, 14 раздела 2 приложения к Положению не заполняются. В качестве наименования объекта закупки указывается положение <text:a xlink:type="simple" xlink:href="http://ivo.garant.ru/document/redirect/70353464/0">Федерального закона</text:a> "О контрактной системе в сфере закупок товаров, работ, услуг для обеспечения государственных и муниципальных нужд", являющееся основанием для осуществления указанных закупок;</text:p>
      <text:p text:style-name="s1"><text:bookmark text:name="anchor52"/>б) планы-графики закупок федеральных органов исполнительной власти, осуществляющих функции по выработке и реализации государственной политики в области обороны, государственного управления в области обеспечения безопасности Российской Федерации, подведомственных им государственных учреждений, государственных унитарных предприятий формируются в соответствии с Положением в форме электронного документа (за исключением случая, предусмотренного <text:a xlink:type="simple" xlink:href="#anchor1025">пунктом 25</text:a> Положения), который размещается в порядке, установленном Положением, в единой информационной системе в сфере закупок без размещения на официальном сайте такой системы в информационно-телекоммуникационной сети "Интернет" (далее соответственно - единая информационная система, официальный сайт);</text:p>
      <text:p text:style-name="s1"><text:bookmark text:name="anchor53"/>в) планы-графики закупок федеральных органов исполнительной власти, осуществляющих функции по выработке и реализации государственной политики в области государственной охраны, в сфере деятельности войск национальной гвардии Российской Федерации, подведомственных им государственных учреждений, государственных унитарных предприятий формируются в соответствии с Положением в форме электронного документа (за исключением случая, предусмотренного <text:a xlink:type="simple" xlink:href="#anchor1025">пунктом 25</text:a> Положения), который размещается в порядке, установленном Положением, но не ранее 1 января 2022 г., в единой информационной системе без размещения на официальном сайте;</text:p>
      <text:p text:style-name="s1"><text:bookmark text:name="anchor54"/>г) информация о закупках, при проведении которых в 2022 году будут применяться закрытые способы определения поставщика (подрядчика, исполнителя), за исключением закупок, необходимых для обеспечения федеральных нужд, если сведения о таких нуждах составляют государственную тайну, включается в планы-графики закупок, формируемые в соответствии с <text:a xlink:type="simple" xlink:href="#anchor1000">Положением</text:a> в форме электронного документа и размещаемые в единой информационной системе. При этом информация о таких закупках не размещается на официальном сайте.</text:p>
      <text:p text:style-name="s22header">Информация об изменениях:</text:p>
      <text:p text:style-name="s22"><text:bookmark text:name="anchor6"/>Постановление дополнено пунктом 6 с 20 января 2023 г. - <text:a xlink:type="simple" xlink:href="http://ivo.garant.ru/document/redirect/406197979/1001">Постановление</text:a> Правительства России от 31 декабря 2022 г. № 2559</text:p>
      <text:p text:style-name="s1">6. Установить, что при планировании закупок, предусмотренных <text:a xlink:type="simple" xlink:href="http://ivo.garant.ru/document/redirect/406197979/11">подпунктом "а" пункта 1</text:a> постановления Правительства Российской Федерации от 31 декабря 2022 г. N 2559 "О мерах по обеспечению режима военного положения и об особенностях планирования и осуществления закупок для обеспечения государственных нужд Донецкой Народной Республики, Луганской Народной Республики, Запорожской области, Херсонской области и муниципальных нужд муниципальных образований, находящихся на их территориях, и о внесении изменений в некоторые акты Правительства Российской Федерации":</text:p>
      <text:p text:style-name="s1"><text:bookmark text:name="anchor61"/>а) информация о таких закупках включается в планы-графики закупок, формируемые в форме электронного документа и размещаемые в единой информационной системе;</text:p>
      <text:p text:style-name="s1"><text:bookmark text:name="anchor62"/>б) внесение изменений в план-график закупок при осуществлении таких закупок осуществляется не позднее дня заключения контракта;</text:p>
      <text:p text:style-name="s1"><text:bookmark text:name="anchor63"/>в) информация о таких закупках, включенная в планы-графики закупок, не размещается на официальном сайте;</text:p>
      <text:p text:style-name="s1"><text:bookmark text:name="anchor64"/>г) в случае отсутствия возможности формирования информации и документов в единой информационной системе в связи с нарушением функционирования коммуникаций и связи заказчик не позднее 5 рабочих дней, следующих за днем появления такой возможности, вносит изменения в план-график закупок для приведения его в соответствие в связи с заключением в период отсутствия такой возможности контрактов по результатам таких закупок.</text:p>
      <text:p text:style-name="s1"/>
      <table:table table:name="10204" table:style-name="10204">
        <table:table-column table:style-name="6803"/>
        <table:table-column table:style-name="3401"/>
        <table:table-row>
          <table:table-cell>
            <text:p text:style-name="s16_fi0">Председатель Правительства
Российской Федерации</text:p>
          </table:table-cell>
          <table:table-cell>
            <text:p text:style-name="s1_right_fi0">Д. Медведев</text:p>
          </table:table-cell>
        </table:table-row>
      </table:table>
      <text:p text:style-name="s1"/>
      <text:p text:style-name="s22header">Информация об изменениях:</text:p>
      <text:p text:style-name="s22"><text:bookmark text:name="anchor1000"/>Наименование изменено с 1 января 2022 г. - <text:a xlink:type="simple" xlink:href="http://ivo.garant.ru/document/redirect/403185566/1115">Постановление</text:a> Правительства России от 1 декабря 2021 г. № 2151</text:p>
      <text:p text:style-name="s22">Изменения применяются при осуществлении закупок товаров, работ, услуг для обеспечения государственных и муниципальных нужд, извещения об осуществлении которых размещены в ЕИС в сфере закупок либо приглашения принять участие в определении поставщика (подрядчика, исполнителя) по которым направлены после 1 января 2022 г.</text:p>
      <text:p text:style-name="s22"><text:a xlink:type="simple" xlink:href="http://ivo.garant.ru/document/redirect/77319584/1000">См. предыдущую редакцию</text:a></text:p>
      <text:p text:style-name="s1_right_fi698"><text:span text:style-name="s10">УТВЕРЖДЕНО
<text:a xlink:type="simple" xlink:href="#anchor0">постановлением</text:a> Правительства
Российской Федерации
от 30 сентября 2019 г. N 1279</text:span></text:p>
      <text:p text:style-name="s1"/>
      <text:h text:outline-level="1" text:style-name="s3">Положение
о порядке формирования, утверждения планов-графиков закупок, внесения изменений в такие планы-графики, размещения планов-графиков закупок в единой информационной системе в сфере закупок, на официальном сайте такой системы в информационно-телекоммуникационной сети "Интернет", об особенностях включения информации в такие планы-графики и планирования закупок заказчиком, осуществляющим деятельность на территории иностранного государства, а также о требованиях к форме планов-графиков закупок</text:h>
      <text:p text:style-name="s52header">С изменениями и дополнениями от:</text:p>
      <text:p text:style-name="s52">27 декабря 2019 г., 6 августа, 7 ноября 2020 г., 27 мая, 1 декабря 2021 г., 18 августа, 31 октября 2022 г., 9 декабря 2024 г., 2 сентября 2025 г.</text:p>
      <text:p text:style-name="s1"/>
      <text:p text:style-name="s22header">Информация об изменениях:</text:p>
      <text:p text:style-name="s22"><text:bookmark text:name="anchor1001"/>Пункт 1 изменен с 1 января 2022 г. - <text:a xlink:type="simple" xlink:href="http://ivo.garant.ru/document/redirect/403185566/11152">Постановление</text:a> Правительства России от 1 декабря 2021 г. № 2151</text:p>
      <text:p text:style-name="s22">Изменения применяются при осуществлении закупок товаров, работ, услуг для обеспечения государственных и муниципальных нужд, извещения об осуществлении которых размещены в ЕИС в сфере закупок либо приглашения принять участие в определении поставщика (подрядчика, исполнителя) по которым направлены после 1 января 2022 г.</text:p>
      <text:p text:style-name="s22"><text:a xlink:type="simple" xlink:href="http://ivo.garant.ru/document/redirect/77319584/1001">См. предыдущую редакцию</text:a></text:p>
      <text:p text:style-name="s1">1. Настоящее Положение устанавливает порядок формирования, утверждения планов-графиков закупок, внесения изменений в такие планы-графики, размещения планов-графиков закупок в единой информационной системе в сфере закупок, на официальном сайте такой системы в информационно-телекоммуникационной сети "Интернет", особенности включения информации, указанной в <text:a xlink:type="simple" xlink:href="http://ivo.garant.ru/document/redirect/70353464/164">части 4 статьи 16</text:a> Федерального закона "О контрактной системе в сфере закупок товаров, работ, услуг для обеспечения государственных и муниципальных нужд" (далее соответственно - единая информационная система, официальный сайт, план-график, Федеральный закон), в план-график и планирования закупок заказчиком, осуществляющим деятельность на территории иностранного государства, а также требования к форме планов-графиков в соответствии с Федеральным законом.</text:p>
      <text:p text:style-name="s1"><text:bookmark text:name="anchor1002"/>2. Формирование планов-графиков осуществляется:</text:p>
      <text:p text:style-name="s1"><text:bookmark text:name="anchor1201"/>а) государственным заказчиком, действующим от имени Российской Федерации;</text:p>
      <text:p text:style-name="s1"><text:bookmark text:name="anchor1202"/>б) заказчиком, являющимся федеральным бюджетным учреждением, за исключением закупок, осуществляемых в соответствии с <text:a xlink:type="simple" xlink:href="http://ivo.garant.ru/document/redirect/70353464/152">частями 2</text:a> и <text:a xlink:type="simple" xlink:href="http://ivo.garant.ru/document/redirect/70353464/156">6 статьи 15</text:a> Федерального закона;</text:p>
      <text:p text:style-name="s22header">Информация об изменениях:</text:p>
      <text:p text:style-name="s22"><text:bookmark text:name="anchor1203"/>Подпункт "в" изменен с 13 августа 2020 г. - <text:a xlink:type="simple" xlink:href="http://ivo.garant.ru/document/redirect/74503725/2051">Постановление</text:a> Правительства России от 6 августа 2020 г. № 1193</text:p>
      <text:p text:style-name="s22"><text:a xlink:type="simple" xlink:href="http://ivo.garant.ru/document/redirect/77700316/1203">См. предыдущую редакцию</text:a></text:p>
      <text:p text:style-name="s1">в) заказчиком, являющимся федеральным государственным унитарным предприятием, за исключением закупок, осуществляемых в соответствии с <text:a xlink:type="simple" xlink:href="http://ivo.garant.ru/document/redirect/70353464/152101">пунктами 1</text:a> и <text:a xlink:type="simple" xlink:href="http://ivo.garant.ru/document/redirect/70353464/152102">2 части 2.1</text:a> и <text:a xlink:type="simple" xlink:href="http://ivo.garant.ru/document/redirect/70353464/156">частью 6 статьи 15</text:a> Федерального закона;</text:p>
      <text:p text:style-name="s1"><text:bookmark text:name="anchor1204"/>г) федеральным автономным учреждением в случае осуществления закупок в соответствии с <text:a xlink:type="simple" xlink:href="http://ivo.garant.ru/document/redirect/70353464/154">частью 4 статьи 15</text:a> Федерального закона;</text:p>
      <text:p text:style-name="s1"><text:bookmark text:name="anchor1205"/>д) федеральным бюджетным учреждением, федеральным автономным учреждением, федеральным государственным унитарным предприятием, иным юридическим лицом в случае передачи такому учреждению, унитарному предприятию либо юридическому лицу в соответствии с <text:a xlink:type="simple" xlink:href="http://ivo.garant.ru/document/redirect/12112604/0">Бюджетным кодексом</text:a> Российской Федерации полномочий государственного заказчика;</text:p>
      <text:p text:style-name="s1"><text:bookmark text:name="anchor1206"/>е) государственным заказчиком, действующим от имени субъекта Российской Федерации, или муниципальным заказчиком;</text:p>
      <text:p text:style-name="s1"><text:bookmark text:name="anchor1207"/>ж) заказчиком, являющимся бюджетным учреждением субъекта Российской Федерации или муниципальным бюджетным учреждением, за исключением закупок, осуществляемых в соответствии с <text:a xlink:type="simple" xlink:href="http://ivo.garant.ru/document/redirect/70353464/152">частями 2</text:a> и <text:a xlink:type="simple" xlink:href="http://ivo.garant.ru/document/redirect/70353464/156">6 статьи 15</text:a> Федерального закона;</text:p>
      <text:p text:style-name="s22header">Информация об изменениях:</text:p>
      <text:p text:style-name="s22"><text:bookmark text:name="anchor1208"/>Подпункт "з" изменен с 13 августа 2020 г. - <text:a xlink:type="simple" xlink:href="http://ivo.garant.ru/document/redirect/74503725/2051">Постановление</text:a> Правительства России от 6 августа 2020 г. № 1193</text:p>
      <text:p text:style-name="s22"><text:a xlink:type="simple" xlink:href="http://ivo.garant.ru/document/redirect/77700316/1208">См. предыдущую редакцию</text:a></text:p>
      <text:p text:style-name="s1">з) заказчиком, являющимся государственным унитарным предприятием субъекта Российской Федерации или муниципальным унитарным предприятием, за исключением закупок, осуществляемых в соответствии с <text:a xlink:type="simple" xlink:href="http://ivo.garant.ru/document/redirect/70353464/152101">пунктами 1</text:a> и <text:a xlink:type="simple" xlink:href="http://ivo.garant.ru/document/redirect/70353464/152102">2 части 2.1</text:a> и <text:a xlink:type="simple" xlink:href="http://ivo.garant.ru/document/redirect/70353464/156">частью 6 статьи 15</text:a> Федерального закона;</text:p>
      <text:p text:style-name="s1"><text:bookmark text:name="anchor1209"/>и) автономным учреждением, созданным субъектом Российской Федерации или муниципальным образованием, в случае осуществления закупок в соответствии с <text:a xlink:type="simple" xlink:href="http://ivo.garant.ru/document/redirect/70353464/154">частью 4 статьи 15</text:a> Федерального закона;</text:p>
      <text:p text:style-name="s1"><text:bookmark text:name="anchor1210"/>к) бюджетным, автономным учреждением, созданным субъектом Российской Федерации или муниципальным образованием, государственным унитарным предприятием субъекта Российской Федерации или муниципальным унитарным предприятием, иными юридическими лицами в случае передачи такому учреждению, унитарному предприятию либо юридическому лицу в соответствии с <text:a xlink:type="simple" xlink:href="http://ivo.garant.ru/document/redirect/12112604/0">Бюджетным кодексом</text:a> Российской Федерации полномочий государственного, муниципального заказчика.</text:p>
      <text:p text:style-name="s22header">Информация об изменениях:</text:p>
      <text:p text:style-name="s22"><text:bookmark text:name="anchor1003"/>Пункт 3 изменен с 1 января 2022 г. - <text:a xlink:type="simple" xlink:href="http://ivo.garant.ru/document/redirect/403185566/11153">Постановление</text:a> Правительства России от 1 декабря 2021 г. № 2151</text:p>
      <text:p text:style-name="s22">Изменения применяются при осуществлении закупок товаров, работ, услуг для обеспечения государственных и муниципальных нужд, извещения об осуществлении которых размещены в ЕИС в сфере закупок либо приглашения принять участие в определении поставщика (подрядчика, исполнителя) по которым направлены после 1 января 2022 г.</text:p>
      <text:p text:style-name="s22"><text:a xlink:type="simple" xlink:href="http://ivo.garant.ru/document/redirect/77319584/1003">См. предыдущую редакцию</text:a></text:p>
      <text:p text:style-name="s1">3. План-график формируется в форме электронного документа (за исключением случаев, предусмотренных <text:a xlink:type="simple" xlink:href="#anchor1025">пунктами 25</text:a> и <text:a xlink:type="simple" xlink:href="#anchor1026">26</text:a> настоящего Положения) по форме согласно <text:a xlink:type="simple" xlink:href="#anchor10000">приложению</text:a> и утверждается посредством подписания усиленной <text:a xlink:type="simple" xlink:href="http://ivo.garant.ru/document/redirect/12184522/54">квалифицированной электронной подписью</text:a> лица, имеющего право действовать от имени заказчика.</text:p>
      <text:p text:style-name="s1"><text:bookmark text:name="anchor1004"/>4. План-график формируется на срок, соответствующий сроку действия <text:a xlink:type="simple" xlink:href="http://ivo.garant.ru/document/redirect/5759555/0">федерального закона</text:a> о федеральном бюджете на очередной финансовый год и плановый период, федеральных законов о бюджетах государственных внебюджетных фондов Российской Федерации на очередной финансовый год и плановый период, закона субъекта Российской Федерации о бюджете субъекта Российской Федерации, законов субъекта Российской Федерации о бюджетах территориальных государственных внебюджетных фондов, муниципального правового акта представительного органа муниципального образования о местном бюджете.</text:p>
      <text:p text:style-name="s1"><text:bookmark text:name="anchor1005"/>5. В случае если срок осуществления планируемой закупки превышает срок, на который утверждается план-график, в план-график включается информация о такой закупке на весь срок ее осуществления.</text:p>
      <text:p text:style-name="s1"><text:bookmark text:name="anchor1006"/>6. План-график формируется путем внесения изменений в утвержденные показатели плана-графика на очередной финансовый год и первый год планового периода и составления показателей плана-графика на второй год планового периода.</text:p>
      <text:p text:style-name="s22header">Информация об изменениях:</text:p>
      <text:p text:style-name="s22"><text:bookmark text:name="anchor1007"/>Пункт 7 изменен с 11 сентября 2025 г. - <text:a xlink:type="simple" xlink:href="http://ivo.garant.ru/document/redirect/412632303/1001">Постановление</text:a> Правительства России от 2 сентября 2025 г. № 1353</text:p>
      <text:p text:style-name="s22"><text:a xlink:type="simple" xlink:href="http://ivo.garant.ru/document/redirect/76849738/1007">См. предыдущую редакцию</text:a></text:p>
      <text:p text:style-name="s1">7. План-график на очередной финансовый год и плановый период включает информацию о закупках, финансовое обеспечение которых предусмотрено в очередном финансовом году и плановом периоде и извещения об осуществлении которых планируется разместить, приглашение принять участие в определении поставщика (подрядчика, исполнителя) в которых планируется направить, контракты с единственными поставщиками (подрядчиками, исполнителями) при осуществлении которых планируется заключить при реализации такого плана-графика.</text:p>
      <text:p text:style-name="s1"><text:bookmark text:name="anchor1008"/>8. Проекты планов-графиков формируются:</text:p>
      <text:p text:style-name="s1"><text:bookmark text:name="anchor1081"/>а) заказчиками и лицами, указанными в <text:a xlink:type="simple" xlink:href="#anchor1201">подпунктах "а"</text:a>, <text:a xlink:type="simple" xlink:href="#anchor1205">"д"</text:a>, <text:a xlink:type="simple" xlink:href="#anchor1206">"е"</text:a> и <text:a xlink:type="simple" xlink:href="#anchor1210">"к" пункта 2</text:a> настоящего Положения, в процессе составления и рассмотрения проектов законов (решений) о соответствующих бюджетах;</text:p>
      <text:p text:style-name="s1"><text:bookmark text:name="anchor1082"/>б) заказчиками и лицами, указанными в <text:a xlink:type="simple" xlink:href="#anchor1202">подпунктах "б" - "г"</text:a>, <text:a xlink:type="simple" xlink:href="#anchor1207">"ж" - "и" пункта 2</text:a> настоящего Положения, в процессе формирования проектов планов финансово-хозяйственной деятельности таких заказчиков и лиц.</text:p>
      <text:p text:style-name="s1"><text:bookmark text:name="anchor1009"/>9. Проекты планов-графиков заказчиков, указанных в <text:a xlink:type="simple" xlink:href="#anchor1201">подпунктах "а"</text:a>, <text:a xlink:type="simple" xlink:href="#anchor1205">"д"</text:a>, <text:a xlink:type="simple" xlink:href="#anchor1206">"е"</text:a> и <text:a xlink:type="simple" xlink:href="#anchor1210">"к" пункта 2</text:a> настоящего Положения, формируются на основании обоснований (расчетов) плановых сметных показателей, формируемых при составлении проекта бюджетной сметы таких заказчиков как получателей бюджетных средств в соответствии с <text:a xlink:type="simple" xlink:href="http://ivo.garant.ru/document/redirect/12112604/0">Бюджетным кодексом</text:a> Российской Федерации.</text:p>
      <text:p text:style-name="s1"><text:bookmark text:name="anchor1010"/>10. Проекты планов-графиков заказчиков, указанных в <text:a xlink:type="simple" xlink:href="#anchor1202">подпунктах "б"</text:a> и <text:a xlink:type="simple" xlink:href="#anchor1207">"ж" пункта 2</text:a> настоящего Положения, формируются на основании обоснований (расчетов) плановых показателей выплат, формируемых при составлении проектов планов финансово-хозяйственной деятельности таких заказчиков в соответствии с <text:a xlink:type="simple" xlink:href="http://ivo.garant.ru/document/redirect/10105879/0">Федеральным законом</text:a> "О некоммерческих организациях".</text:p>
      <text:p text:style-name="s1"><text:bookmark text:name="anchor1011"/>11. Проекты планов-графиков лиц, указанных в <text:a xlink:type="simple" xlink:href="#anchor1204">подпунктах "г"</text:a> и <text:a xlink:type="simple" xlink:href="#anchor1209">"и" пункта 2</text:a> настоящего Положения, формируются на основании принятого в установленном в соответствии с <text:a xlink:type="simple" xlink:href="http://ivo.garant.ru/document/redirect/12112604/2">бюджетным законодательством</text:a> Российской Федерации порядке решения (согласованного в установленном порядке проекта такого решения) о предоставлении средств из бюджетов бюджетной системы Российской Федерации на осуществление капитальных вложений в объекты государственной, муниципальной собственности.</text:p>
      <text:p text:style-name="s1"><text:bookmark text:name="anchor1012"/>12. План-график утверждается в течение 10 рабочих дней:</text:p>
      <text:p text:style-name="s1"><text:bookmark text:name="anchor1121"/>а) заказчиками, указанными в <text:a xlink:type="simple" xlink:href="#anchor1201">подпунктах "а"</text:a> и <text:a xlink:type="simple" xlink:href="#anchor1206">"е" пункта 2</text:a> настоящего Положения, - со дня, следующего за днем доведения до соответствующего заказчика объема прав в денежном выражении на принятие и (или) исполнение обязательств в соответствии с <text:a xlink:type="simple" xlink:href="http://ivo.garant.ru/document/redirect/12112604/2">бюджетным законодательством</text:a> Российской Федерации;</text:p>
      <text:p text:style-name="s1"><text:bookmark text:name="anchor1122"/>б) заказчиками и лицами, указанными в <text:a xlink:type="simple" xlink:href="#anchor1202">подпунктах "б" - "г"</text:a>, <text:a xlink:type="simple" xlink:href="#anchor1207">"ж" - "и" пункта 2</text:a> настоящего Положения, - со дня, следующего за днем утверждения плана финансово-хозяйственной деятельности учреждения или плана (программы) финансово-хозяйственной деятельности унитарного предприятия;</text:p>
      <text:p text:style-name="s1"><text:bookmark text:name="anchor1123"/>в) лицами, указанными в <text:a xlink:type="simple" xlink:href="#anchor1205">подпунктах "д"</text:a> и <text:a xlink:type="simple" xlink:href="#anchor1210">"к" пункта 2</text:a> настоящего Положения, - со дня, следующего за днем доведения объема прав в денежном выражении на принятие и (или) исполнение обязательств в соответствии с <text:a xlink:type="simple" xlink:href="http://ivo.garant.ru/document/redirect/12112604/2">бюджетным законодательством</text:a> Российской Федерации на соответствующий лицевой счет, предназначенный для учета операций по переданным полномочиям получателя бюджетных средств.</text:p>
      <text:p text:style-name="s1"><text:bookmark text:name="anchor1013"/>13. Формирование и утверждение плана-графика государственного, муниципального заказчика в случае передачи в соответствии с <text:a xlink:type="simple" xlink:href="http://ivo.garant.ru/document/redirect/12112604/0">Бюджетным кодексом</text:a> Российской Федерации полномочий государственного, муниципального заказчика бюджетному, автономному учреждению, государственному, муниципальному унитарному предприятию, иному юридическому лицу осуществляется указанным учреждением, унитарным предприятием, иным юридическим лицом от лица соответствующего органа или организации, являющихся государственными, муниципальными заказчиками и передавших им указанные полномочия государственного, муниципального заказчика.</text:p>
      <text:p text:style-name="s1"><text:bookmark text:name="anchor1014"/>14. В <text:a xlink:type="simple" xlink:href="#anchor10001">разделе 1</text:a> приложения к настоящему Положению указывается следующая информация о заказчике и лице, указанных в <text:a xlink:type="simple" xlink:href="#anchor1002">пункте 2</text:a> настоящего Положения:</text:p>
      <text:p text:style-name="s1"><text:bookmark text:name="anchor1141"/>а) полное наименование;</text:p>
      <text:p text:style-name="s1"><text:bookmark text:name="anchor1142"/>б) идентификационный номер налогоплательщика;</text:p>
      <text:p text:style-name="s1"><text:bookmark text:name="anchor1143"/>в) код причины постановки на учет в налоговом органе;</text:p>
      <text:p text:style-name="s1"><text:bookmark text:name="anchor1144"/>г) организационно-правовая форма с указанием кода организационно-правовой формы в соответствии с <text:a xlink:type="simple" xlink:href="http://ivo.garant.ru/document/redirect/70284934/0">Общероссийским классификатором</text:a> организационно-правовых форм;</text:p>
      <text:p text:style-name="s1"><text:bookmark text:name="anchor1145"/>д) форма собственности с указанием кода формы собственности по <text:a xlink:type="simple" xlink:href="http://ivo.garant.ru/document/redirect/12117985/0">Общероссийскому классификатору</text:a> форм собственности;</text:p>
      <text:p text:style-name="s1"><text:bookmark text:name="anchor1146"/>е) место нахождения с указанием кода территории населенного пункта в соответствии с <text:a xlink:type="simple" xlink:href="http://ivo.garant.ru/document/redirect/70465940/0">Общероссийским классификатором</text:a> территорий муниципальных образований, телефон и адрес электронной почты;</text:p>
      <text:p text:style-name="s1"><text:bookmark text:name="anchor1147"/>ж) в отношении плана-графика, содержащего информацию о закупках, осуществляемых в рамках переданных бюджетному, автономному учреждению, государственному, муниципальному унитарному предприятию, иному юридическому лицу полномочий государственного, муниципального заказчика, - полное наименование, идентификационный номер налогоплательщика, код причины постановки на учет в налоговом органе, место нахождения с указанием кода территории населенного пункта в соответствии с <text:a xlink:type="simple" xlink:href="http://ivo.garant.ru/document/redirect/70465940/0">Общероссийским классификатором</text:a> территорий муниципальных образований, телефон и адрес электронной почты такого учреждения, унитарного предприятия или юридического лица.</text:p>
      <text:p text:style-name="s22header">Информация об изменениях:</text:p>
      <text:p text:style-name="s22"><text:bookmark text:name="anchor1015"/>Пункт 15 изменен с 1 января 2022 г. - <text:a xlink:type="simple" xlink:href="http://ivo.garant.ru/document/redirect/403185566/11153">Постановление</text:a> Правительства России от 1 декабря 2021 г. № 2151</text:p>
      <text:p text:style-name="s22">Изменения применяются при осуществлении закупок товаров, работ, услуг для обеспечения государственных и муниципальных нужд, извещения об осуществлении которых размещены в ЕИС в сфере закупок либо приглашения принять участие в определении поставщика (подрядчика, исполнителя) по которым направлены после 1 января 2022 г.</text:p>
      <text:p text:style-name="s22"><text:a xlink:type="simple" xlink:href="http://ivo.garant.ru/document/redirect/77319584/1015">См. предыдущую редакцию</text:a></text:p>
      <text:p text:style-name="s1">15. Информация, предусмотренная <text:a xlink:type="simple" xlink:href="#anchor1014">пунктом 14</text:a> настоящего Положения, формируется (за исключением случаев, предусмотренных <text:a xlink:type="simple" xlink:href="#anchor1025">пунктами 25</text:a> и <text:a xlink:type="simple" xlink:href="#anchor1026">26</text:a> настоящего Положения) автоматически в соответствии со сведениями, включенными в реестр участников бюджетного процесса, а также юридических лиц, не являющихся участниками бюджетного процесса. При этом в случае формирования плана-графика лицами, указанными в <text:a xlink:type="simple" xlink:href="#anchor1205">подпунктах "д"</text:a> и <text:a xlink:type="simple" xlink:href="#anchor1210">"к" пункта 2</text:a> настоящего Положения, такая информация формируется после указания предусмотренной <text:a xlink:type="simple" xlink:href="#anchor1142">подпунктами "б"</text:a> и <text:a xlink:type="simple" xlink:href="#anchor1143">"в" пункта 14</text:a> настоящего Положения информации об органе или организации, являющихся государственными, муниципальными заказчиками и передавших таким лицам полномочия государственного, муниципального заказчика.</text:p>
      <text:p text:style-name="s1"><text:bookmark text:name="anchor1016"/>16. В <text:a xlink:type="simple" xlink:href="#anchor10002">разделе 2</text:a> приложения к настоящему Положению:</text:p>
      <text:p text:style-name="s1"><text:bookmark text:name="anchor1161"/>а) в <text:a xlink:type="simple" xlink:href="#anchor10021">графе 2</text:a> указывается идентификационный код закупки в соответствии с порядком, установленным в соответствии с <text:a xlink:type="simple" xlink:href="http://ivo.garant.ru/document/redirect/70353464/233">частью 3 статьи 23</text:a> Федерального закона;</text:p>
      <text:p text:style-name="s1"><text:bookmark text:name="anchor1162"/>б) <text:a xlink:type="simple" xlink:href="#anchor10021">графы 3</text:a> и 4 заполняются на основании <text:a xlink:type="simple" xlink:href="http://ivo.garant.ru/document/redirect/70650730/0">Общероссийского классификатора</text:a> продукции по видам экономической деятельности (ОКПД2) ОК 034-2014 (КПЕС 2008) с детализацией не ниже группы товаров (работ, услуг). Допускается указание одного или нескольких кодов такого классификатора;</text:p>
      <text:p text:style-name="s1"><text:bookmark text:name="anchor1163"/>в) в <text:a xlink:type="simple" xlink:href="#anchor10021">графе 5</text:a> указывается наименование объекта закупки;</text:p>
      <text:p text:style-name="s1"><text:bookmark text:name="anchor1164"/>г) в <text:a xlink:type="simple" xlink:href="#anchor10021">графе 6</text:a> указывается планируемый год размещения извещения (извещений) об осуществлении закупки или приглашения (приглашений) принять участие в определении поставщика (подрядчика, исполнителя) либо заключения контракта (контрактов) с единственным поставщиком (подрядчиком, исполнителем);</text:p>
      <text:p text:style-name="s1"><text:bookmark text:name="anchor1165"/>д) в <text:a xlink:type="simple" xlink:href="#anchor10021">графах 7 - 11</text:a> указывается объем финансового обеспечения (планируемые платежи) для осуществления закупок на соответствующий финансовый год;</text:p>
      <text:p text:style-name="s22header">Информация об изменениях:</text:p>
      <text:p text:style-name="s22"><text:bookmark text:name="anchor1166"/>Подпункт "е" изменен с 16 ноября 2022 г. - <text:a xlink:type="simple" xlink:href="http://ivo.garant.ru/document/redirect/405672917/1141">Постановление</text:a> Правительства России от 31 октября 2022 г. № 1946</text:p>
      <text:p text:style-name="s22"><text:a xlink:type="simple" xlink:href="http://ivo.garant.ru/document/redirect/76810045/1166">См. предыдущую редакцию</text:a></text:p>
      <text:p text:style-name="s1">е) в <text:a xlink:type="simple" xlink:href="#anchor10021">графах 7 - 11</text:a> в строке "Всего для осуществления закупок, в том числе по коду бюджетной классификации ______ / по коду вида расходов _________ / по коду объекта капитального строительства или объекта недвижимого имущества _________" указывается общий объем финансового обеспечения, предусмотренный для осуществления закупок в текущем финансовом году, плановом периоде и последующих годах (в случае осуществления закупок, которые планируются по истечении планового периода), детализированный на объем финансового обеспечения:</text:p>
      <text:p text:style-name="s1">по каждому коду бюджетной классификации (указывается заказчиками и лицами, указанными в <text:a xlink:type="simple" xlink:href="#anchor1201">подпунктах "а"</text:a>, <text:a xlink:type="simple" xlink:href="#anchor1205">"д"</text:a>, <text:a xlink:type="simple" xlink:href="#anchor1206">"е"</text:a> и <text:a xlink:type="simple" xlink:href="#anchor1210">"к" пункта 2</text:a> настоящего Положения, а также заказчиками и лицами, указанными в <text:a xlink:type="simple" xlink:href="#anchor1202">подпунктах "б"</text:a>, <text:a xlink:type="simple" xlink:href="#anchor1203">"г"</text:a>, <text:a xlink:type="simple" xlink:href="#anchor1204">"ж"</text:a> и <text:a xlink:type="simple" xlink:href="#anchor1209">"и" пункта 2</text:a> настоящего Положения, в случае осуществления закупок в целях реализации национальных и федеральных проектов);</text:p>
      <text:p text:style-name="s1">по каждому коду вида расходов (указывается заказчиками и лицами, указанными в <text:a xlink:type="simple" xlink:href="#anchor1202">подпунктах "б"</text:a>, <text:a xlink:type="simple" xlink:href="#anchor1203">"г"</text:a>, <text:a xlink:type="simple" xlink:href="#anchor1204">"ж"</text:a> и <text:a xlink:type="simple" xlink:href="#anchor1209">"и" пункта 2</text:a> настоящего Положения);</text:p>
      <text:p text:style-name="s1"><text:bookmark text:name="anchor11664"/>по каждому коду объекта капитального строительства или объекта недвижимого имущества, сформированному в государственной интегрированной информационной системе управления общественными финансами "Электронный бюджет" (далее - система "Электронный бюджет") (указывается в случае осуществления закупок, по результатам которых заключаются контракты, предметом которых являются приобретение объектов недвижимого имущества, подготовка проектной документации и (или) выполнение инженерных изысканий, выполнение работ по строительству, реконструкции и (или) капитальному ремонту, сносу объектов капитального строительства (в том числе линейных объектов), а также контракты, предусмотренные <text:a xlink:type="simple" xlink:href="http://ivo.garant.ru/document/redirect/70353464/3416">частями 16</text:a> (если контракт жизненного цикла предусматривает проектирование, строительство, реконструкцию, капитальный ремонт объекта капитального строительства), <text:a xlink:type="simple" xlink:href="http://ivo.garant.ru/document/redirect/70353464/34161">16<text:span text:style-name="upper"><text:span> 1</text:span></text:span> статьи 34</text:a> и <text:a xlink:type="simple" xlink:href="http://ivo.garant.ru/document/redirect/70353464/11256">частями 56</text:a> и <text:a xlink:type="simple" xlink:href="http://ivo.garant.ru/document/redirect/70353464/112631">63<text:span text:style-name="upper"><text:span> 1</text:span></text:span></text:a> статьи 112 Федерального закона, заказчиками и лицами, указанными в <text:a xlink:type="simple" xlink:href="#anchor1201">подпунктах "а" - "д" пункта 2</text:a> настоящего Положения, а также заказчиками и лицами, указанными в <text:a xlink:type="simple" xlink:href="#anchor1206">подпунктах "е" - "к" пункта 2</text:a> настоящего Положения, если в целях софинансирования капитальных вложений в объекты капитального строительства и (или) приобретения объектов недвижимого имущества предоставляются субсидии из федерального бюджета бюджету субъекта Российской Федерации).</text:p>
      <text:p text:style-name="s1">Объем финансового обеспечения по каждому коду бюджетной классификации, по каждому коду вида расходов или по каждому коду объекта капитального строительства или объекта недвижимого имущества формируется автоматически на основе информации, предусмотренной <text:a xlink:type="simple" xlink:href="#anchor1017">пунктом 17</text:a> настоящего Положения;</text:p>
      <text:p text:style-name="s22header">Информация об изменениях:</text:p>
      <text:p text:style-name="s22"><text:bookmark text:name="anchor1167"/>Подпункт "ж" изменен с 1 января 2022 г. - <text:a xlink:type="simple" xlink:href="http://ivo.garant.ru/document/redirect/403185566/11154">Постановление</text:a> Правительства России от 1 декабря 2021 г. № 2151</text:p>
      <text:p text:style-name="s22">Изменения применяются при осуществлении закупок товаров, работ, услуг для обеспечения государственных и муниципальных нужд, извещения об осуществлении которых размещены в ЕИС в сфере закупок либо приглашения принять участие в определении поставщика (подрядчика, исполнителя) по которым направлены после 1 января 2022 г.</text:p>
      <text:p text:style-name="s22"><text:a xlink:type="simple" xlink:href="http://ivo.garant.ru/document/redirect/77319584/1167">См. предыдущую редакцию</text:a></text:p>
      <text:p text:style-name="s1">ж) в <text:a xlink:type="simple" xlink:href="#anchor10021">графе 12</text:a> указывается информация о проведении общественного обсуждения закупки (путем указания "да" или "нет"). Графа может не заполняться в отношении закупок, извещения об осуществлении которых планируется разместить, приглашение принять участие в определении поставщика (подрядчика, исполнителя) в которых планируется направить в плановом периоде, а также о закупках у единственных поставщиков (подрядчиков, исполнителей), контракты с которыми планируются к заключению в течение указанного периода;</text:p>
      <text:p text:style-name="s1"><text:bookmark text:name="anchor1168"/>з) в <text:a xlink:type="simple" xlink:href="#anchor10021">графе 13</text:a> указывается наименование уполномоченного органа или уполномоченного учреждения, осуществляющих определение поставщика (подрядчика, исполнителя) в случае проведения централизованных закупок в соответствии со <text:a xlink:type="simple" xlink:href="http://ivo.garant.ru/document/redirect/70353464/26">статьей 26</text:a> Федерального закона;</text:p>
      <text:p text:style-name="s1"><text:bookmark text:name="anchor1169"/>и) в <text:a xlink:type="simple" xlink:href="#anchor10021">графе 14</text:a> указывается наименование организатора совместного конкурса или аукциона в случае проведения совместного конкурса или аукциона.</text:p>
      <text:p text:style-name="s22header">Информация об изменениях:</text:p>
      <text:p text:style-name="s22"><text:bookmark text:name="anchor1017"/>Пункт 17 изменен с 16 ноября 2022 г. - <text:a xlink:type="simple" xlink:href="http://ivo.garant.ru/document/redirect/405672917/1142">Постановление</text:a> Правительства России от 31 октября 2022 г. № 1946</text:p>
      <text:p text:style-name="s22"><text:a xlink:type="simple" xlink:href="http://ivo.garant.ru/document/redirect/76810045/1017">См. предыдущую редакцию</text:a></text:p>
      <text:p text:style-name="s1">17. Объем финансового обеспечения по каждому коду бюджетной классификации в рамках каждого идентификационного кода закупки формируется в единой информационной системе или передается в единую информационную систему посредством информационного взаимодействия единой информационной системы с системой "Электронный бюджет" и региональными и муниципальными информационными системами в сфере закупок заказчиками и лицами, предусмотренными <text:a xlink:type="simple" xlink:href="#anchor1201">подпунктами "а"</text:a>, <text:a xlink:type="simple" xlink:href="#anchor1205">"д"</text:a>, <text:a xlink:type="simple" xlink:href="#anchor1206">"е"</text:a> и <text:a xlink:type="simple" xlink:href="#anchor1210">"к" пункта 2</text:a> настоящего Положения, а также (в случае осуществления закупок в целях реализации национальных и федеральных проектов) заказчиками и лицами, указанными в <text:a xlink:type="simple" xlink:href="#anchor1202">подпунктах "б"</text:a>, <text:a xlink:type="simple" xlink:href="#anchor1203">"г"</text:a>, <text:a xlink:type="simple" xlink:href="#anchor1204">"ж"</text:a> и <text:span text:style-name="s8">"и" пункта 2</text:span> настоящего Положения, без включения в план-график.</text:p>
      <text:p text:style-name="s1">Объем финансового обеспечения по каждому коду вида расходов в рамках каждого идентификационного кода закупки формируется в единой информационной системе или передается в единую информационную систему посредством информационного взаимодействия единой информационной системы с системой "Электронный бюджет" и региональными и муниципальными информационными системами в сфере закупок заказчиками и лицами, предусмотренными <text:a xlink:type="simple" xlink:href="#anchor1202">подпунктами "б"</text:a>, <text:a xlink:type="simple" xlink:href="#anchor1204">"г"</text:a>, <text:a xlink:type="simple" xlink:href="#anchor1207">"ж"</text:a> и <text:a xlink:type="simple" xlink:href="#anchor1209">"и" пункта 2</text:a> настоящего Положения, без включения в план-график.</text:p>
      <text:p text:style-name="s1"><text:bookmark text:name="anchor10173"/>Объем финансового обеспечения закупок, по результатам которых заключаются контракты, предметом которых являются приобретение объектов недвижимого имущества, подготовка проектной документации и (или) выполнение инженерных изысканий, выполнение работ по строительству, реконструкции и (или) капитальному ремонту, сносу объектов капитального строительства (в том числе линейных объектов), а также контракты, предусмотренные <text:a xlink:type="simple" xlink:href="http://ivo.garant.ru/document/redirect/70353464/3416">частями 16</text:a> (если контракт жизненного цикла предусматривает проектирование, строительство, реконструкцию, капитальный ремонт объекта капитального строительства), <text:a xlink:type="simple" xlink:href="http://ivo.garant.ru/document/redirect/70353464/34161">16<text:span text:style-name="upper"><text:span> 1</text:span></text:span> статьи 34</text:a> и <text:a xlink:type="simple" xlink:href="http://ivo.garant.ru/document/redirect/70353464/11256">частями 56</text:a> и <text:a xlink:type="simple" xlink:href="http://ivo.garant.ru/document/redirect/70353464/112631">63<text:span text:style-name="upper"><text:span> 1</text:span></text:span></text:a> статьи 112 Федерального закона, формируется в единой информационной системе или передается в единую информационную систему посредством информационного взаимодействия единой информационной системы с системой "Электронный бюджет" и региональными и муниципальными информационными системами в сфере закупок заказчиками и лицами, указанными в <text:a xlink:type="simple" xlink:href="#anchor1201">подпунктах "а" - "д" пункта 2</text:a> настоящего Положения, а также в <text:a xlink:type="simple" xlink:href="#anchor1206">подпунктах "е" - "к" пункта 2</text:a> настоящего Положения, если в целях софинансирования капитальных вложений в объекты капитального строительства и (или) приобретения объектов недвижимого имущества предоставляются субсидии из федерального бюджета бюджету субъекта Российской Федерации, по каждому коду объекта капитального строительства или объекта недвижимого имущества, сформированному в системе "Электронный бюджет", без включения в план-график.</text:p>
      <text:p text:style-name="s1"><text:bookmark text:name="anchor1018"/>18. В план-график в форме отдельной закупки включается информация:</text:p>
      <text:p text:style-name="s22header">Информация об изменениях:</text:p>
      <text:p text:style-name="s22"><text:bookmark text:name="anchor1181"/>Подпункт 1 изменен с 16 ноября 2022 г. - <text:a xlink:type="simple" xlink:href="http://ivo.garant.ru/document/redirect/405672917/1143">Постановление</text:a> Правительства России от 31 октября 2022 г. № 1946</text:p>
      <text:p text:style-name="s22"><text:a xlink:type="simple" xlink:href="http://ivo.garant.ru/document/redirect/76810045/1181">См. предыдущую редакцию</text:a></text:p>
      <text:p text:style-name="s1">а) о закупке, по результатам которой заключается контракт, предметом которого являются приобретение объектов недвижимого имущества, подготовка проектной документации и (или) выполнение инженерных изысканий, выполнение работ по строительству, реконструкции и (или) капитальному ремонту, сносу объекта капитального строительства (в том числе линейного объекта), а также контракт, предусмотренный <text:a xlink:type="simple" xlink:href="http://ivo.garant.ru/document/redirect/70353464/3416">частями 16</text:a> (если контракт жизненного цикла предусматривает проектирование, строительство, реконструкцию, капитальный ремонт объекта капитального строительства), <text:a xlink:type="simple" xlink:href="http://ivo.garant.ru/document/redirect/70353464/34161">16<text:span text:style-name="upper"><text:span> 1</text:span></text:span> статьи 34</text:a> и <text:a xlink:type="simple" xlink:href="http://ivo.garant.ru/document/redirect/70353464/11256">частями 56</text:a> и <text:a xlink:type="simple" xlink:href="http://ivo.garant.ru/document/redirect/70353464/112631">63<text:span text:style-name="upper"><text:span> 1</text:span></text:span></text:a> статьи 112 Федерального закона;</text:p>
      <text:p text:style-name="s1"><text:bookmark text:name="anchor1182"/>б) о закупке, предусматривающей заключение энергосервисного контракта (отдельно от закупок товаров, работ, услуг, относящихся к сфере деятельности субъектов естественных монополий, услуг по водоснабжению, водоотведению, теплоснабжению, газоснабжению, по подключению (присоединению) к сетям инженерно-технического обеспечения по регулируемым в соответствии с законодательством Российской Федерации ценам (тарифам), а также от закупок электрической энергии, мазута, угля и закупок топлива, используемого в целях выработки энергии);</text:p>
      <text:p text:style-name="s1"><text:bookmark text:name="anchor1183"/>в) о каждом лоте, выделяемом в соответствии с <text:a xlink:type="simple" xlink:href="http://ivo.garant.ru/document/redirect/70353464/0">Федеральным законом</text:a>;</text:p>
      <text:p text:style-name="s22header">Информация об изменениях:</text:p>
      <text:p text:style-name="s22"><text:bookmark text:name="anchor1184"/>Подпункт "г" изменен с 1 января 2022 г. - <text:a xlink:type="simple" xlink:href="http://ivo.garant.ru/document/redirect/403185566/11156">Постановление</text:a> Правительства России от 1 декабря 2021 г. № 2151</text:p>
      <text:p text:style-name="s22">Изменения применяются при осуществлении закупок товаров, работ, услуг для обеспечения государственных и муниципальных нужд, извещения об осуществлении которых размещены в ЕИС в сфере закупок либо приглашения принять участие в определении поставщика (подрядчика, исполнителя) по которым направлены после 1 января 2022 г.</text:p>
      <text:p text:style-name="s22"><text:a xlink:type="simple" xlink:href="http://ivo.garant.ru/document/redirect/77319584/1184">См. предыдущую редакцию</text:a></text:p>
      <text:p text:style-name="s1">г) о закупках, которые планируется осуществлять в соответствии с <text:a xlink:type="simple" xlink:href="http://ivo.garant.ru/document/redirect/70353464/241024">подпунктом "г" пункта 2 части 10 статьи 24</text:a>, <text:a xlink:type="simple" xlink:href="http://ivo.garant.ru/document/redirect/70353464/9314">пунктами 4</text:a> (за исключением закупки у единственного поставщика на сумму, предусмотренную <text:a xlink:type="simple" xlink:href="http://ivo.garant.ru/document/redirect/70353464/93012">частью 12 статьи 93</text:a> Федерального закона), <text:a xlink:type="simple" xlink:href="http://ivo.garant.ru/document/redirect/70353464/9315">5</text:a> (за исключением закупки у единственного поставщика на сумму, предусмотренную частью 12 статьи 93 Федерального закона), <text:a xlink:type="simple" xlink:href="http://ivo.garant.ru/document/redirect/70353464/93123">23</text:a>, <text:a xlink:type="simple" xlink:href="http://ivo.garant.ru/document/redirect/70353464/93126">26</text:a>, <text:a xlink:type="simple" xlink:href="http://ivo.garant.ru/document/redirect/70353464/93133">33</text:a>, <text:a xlink:type="simple" xlink:href="http://ivo.garant.ru/document/redirect/70353464/93142">42</text:a> и <text:a xlink:type="simple" xlink:href="http://ivo.garant.ru/document/redirect/70353464/93144">44 </text:a><text:a xlink:type="simple" xlink:href="http://ivo.garant.ru/document/redirect/70353464/931">части 1</text:a> и <text:a xlink:type="simple" xlink:href="http://ivo.garant.ru/document/redirect/70353464/93012">частью 12 статьи 93</text:a> Федерального закона, в размере годового объема финансового обеспечения соответствующих закупок. При этом <text:a xlink:type="simple" xlink:href="#anchor10021">графы 3</text:a>, 4, 12, 14 раздела 2 приложения к настоящему Положению не заполняются. В качестве наименования объекта закупки указывается положение Федерального закона, являющееся основанием для осуществления указанных закупок;</text:p>
      <text:p text:style-name="s1"><text:bookmark text:name="anchor1185"/>д) о закупке, подлежащей общественному обсуждению в соответствии с <text:a xlink:type="simple" xlink:href="http://ivo.garant.ru/document/redirect/70353464/0">Федеральным законом</text:a>;</text:p>
      <text:p text:style-name="s22header">Информация об изменениях:</text:p>
      <text:p text:style-name="s22"><text:bookmark text:name="anchor1186"/>Подпункт "е" изменен с 1 января 2022 г. - <text:a xlink:type="simple" xlink:href="http://ivo.garant.ru/document/redirect/403185566/11157">Постановление</text:a> Правительства России от 1 декабря 2021 г. № 2151</text:p>
      <text:p text:style-name="s22">Изменения применяются при осуществлении закупок товаров, работ, услуг для обеспечения государственных и муниципальных нужд, извещения об осуществлении которых размещены в ЕИС в сфере закупок либо приглашения принять участие в определении поставщика (подрядчика, исполнителя) по которым направлены после 1 января 2022 г.</text:p>
      <text:p text:style-name="s22"><text:a xlink:type="simple" xlink:href="http://ivo.garant.ru/document/redirect/77319584/1186">См. предыдущую редакцию</text:a></text:p>
      <text:p text:style-name="s1">е) о закупках, предусмотренных <text:a xlink:type="simple" xlink:href="http://ivo.garant.ru/document/redirect/70353464/240112">пунктами 2 - 7 части 11</text:a>, <text:a xlink:type="simple" xlink:href="http://ivo.garant.ru/document/redirect/70353464/24012">частью 12 статьи 24</text:a> Федерального закона;</text:p>
      <text:p text:style-name="s22header">Информация об изменениях:</text:p>
      <text:p text:style-name="s22"><text:bookmark text:name="anchor1187"/>Пункт 18 дополнен подпунктом "ж" с 1 января 2021 г. - <text:a xlink:type="simple" xlink:href="http://ivo.garant.ru/document/redirect/74503725/20535">Постановление</text:a> Правительства России от 6 августа 2020 г. № 1193</text:p>
      <text:p text:style-name="s1">ж) о закупке на оказание услуг по предоставлению кредита;</text:p>
      <text:p text:style-name="s22header">Информация об изменениях:</text:p>
      <text:p text:style-name="s22"><text:bookmark text:name="anchor1188"/>Пункт 18 дополнен подпунктом "з" с 27 августа 2022 г. - <text:a xlink:type="simple" xlink:href="http://ivo.garant.ru/document/redirect/405175699/1004">Постановление</text:a> Правительства России от 18 августа 2022 г. № 1440</text:p>
      <text:p text:style-name="s1">з) о закупке, по результатам которой заключается контракт со встречными инвестиционными обязательствами.</text:p>
      <text:p text:style-name="s22header">Информация об изменениях:</text:p>
      <text:p text:style-name="s22"><text:bookmark text:name="anchor1019"/>Пункт 19 изменен с 16 ноября 2022 г. - <text:a xlink:type="simple" xlink:href="http://ivo.garant.ru/document/redirect/405672917/1144">Постановление</text:a> Правительства России от 31 октября 2022 г. № 1946</text:p>
      <text:p text:style-name="s22"><text:a xlink:type="simple" xlink:href="http://ivo.garant.ru/document/redirect/76810045/1019">См. предыдущую редакцию</text:a></text:p>
      <text:p text:style-name="s1">19. Заказчики и лица, указанные в <text:a xlink:type="simple" xlink:href="#anchor1201">подпунктах "а" - "д" пункта 2</text:a> настоящего Положения, за исключением случаев, предусмотренных <text:a xlink:type="simple" xlink:href="#anchor1020">пунктами 20</text:a>, <text:a xlink:type="simple" xlink:href="#anchor1025">25</text:a> и <text:a xlink:type="simple" xlink:href="#anchor1026">26</text:a> настоящего Положения, формируют, утверждают планы-графики в системе "Электронный бюджет" и размещают планы-графики в единой информационной системе посредством информационного взаимодействия системы "Электронный бюджет" с единой информационной системой.</text:p>
      <text:p text:style-name="s22header">Информация об изменениях:</text:p>
      <text:p text:style-name="s22"><text:bookmark text:name="anchor1020"/>Пункт 20 изменен с 16 ноября 2022 г. - <text:a xlink:type="simple" xlink:href="http://ivo.garant.ru/document/redirect/405672917/1145">Постановление</text:a> Правительства России от 31 октября 2022 г. № 1946</text:p>
      <text:p text:style-name="s22"><text:a xlink:type="simple" xlink:href="http://ivo.garant.ru/document/redirect/76810045/1020">См. предыдущую редакцию</text:a></text:p>
      <text:p text:style-name="s1">20. Следующие заказчики и лица, за исключением случаев, предусмотренных <text:a xlink:type="simple" xlink:href="#anchor1025">пунктами 25</text:a> и <text:a xlink:type="simple" xlink:href="#anchor1026">26</text:a> настоящего Положения, формируют, утверждают и размещают планы-графики в единой информационной системе:</text:p>
      <text:p text:style-name="s1"><text:bookmark text:name="anchor10201"/>а) заказчики и лица, указанные в <text:a xlink:type="simple" xlink:href="#anchor1206">подпунктах "е" - "к" пункта 2</text:a> настоящего Положения. При этом формирование планов-графиков в единой информационной системе допускается посредством информационного взаимодействия единой информационной системы с региональными и муниципальными информационными системами в сфере закупок;</text:p>
      <text:p text:style-name="s1"><text:bookmark text:name="anchor10202"/>б) подведомственные учреждения Министерства обороны Российской Федерации, являющиеся иными получателями средств федерального бюджета, осуществляющими операции с бюджетными средствами на счетах, открытых в подразделениях расчетной сети Центрального банка Российской Федерации или кредитной организации;</text:p>
      <text:p text:style-name="s1"><text:bookmark text:name="anchor10203"/>в) Служба внешней разведки Российской Федерации, а также подведомственные ей государственные учреждения и государственные унитарные предприятия;</text:p>
      <text:p text:style-name="s1"><text:bookmark text:name="anchor10204"/>г) Федеральная служба безопасности Российской Федерации, а также подведомственные ей государственные учреждения и государственные унитарные предприятия.</text:p>
      <text:p text:style-name="s22header">Информация об изменениях:</text:p>
      <text:p text:style-name="s22"><text:bookmark text:name="anchor1021"/>Пункт 21 изменен с 1 января 2025 г. - <text:a xlink:type="simple" xlink:href="http://ivo.garant.ru/document/redirect/411084786/10007">Постановление</text:a> Правительства России от 9 декабря 2024 г. № 1740</text:p>
      <text:p text:style-name="s22"><text:a xlink:type="simple" xlink:href="http://ivo.garant.ru/document/redirect/76845974/1021">См. предыдущую редакцию</text:a></text:p>
      <text:p text:style-name="s1">21. Размещение (за исключением случаев, предусмотренных <text:a xlink:type="simple" xlink:href="#anchor1025">пунктами 25</text:a> и <text:a xlink:type="simple" xlink:href="#anchor1026">26</text:a> настоящего Положения) плана-графика в единой информационной системе осуществляется автоматически после осуществления контроля в порядке, установленном в соответствии с <text:a xlink:type="simple" xlink:href="http://ivo.garant.ru/document/redirect/70353464/996">частью 6 статьи 99</text:a> Федерального закона, в случае соответствия контролируемой информации требованиям <text:a xlink:type="simple" xlink:href="http://ivo.garant.ru/document/redirect/70353464/995">части 5</text:a> указанной статьи Федерального закона, а также форматно-логической проверки информации, содержащейся в плане-графике, на соответствие настоящему Положению. Планы-графики заказчиков, предусмотренных <text:a xlink:type="simple" xlink:href="http://ivo.garant.ru/document/redirect/70353464/2401151">подпунктами "а"</text:a> и <text:a xlink:type="simple" xlink:href="http://ivo.garant.ru/document/redirect/70353464/2401152">"б" пункта 5 части 11 статьи 24</text:a> Федерального закона, а также информация о закупках, предусмотренных <text:a xlink:type="simple" xlink:href="#anchor1186">подпунктом "е" пункта 18</text:a> настоящего Положения, не размещаются на официальном сайте. Планы-графики, размещаемые в единой информационной системе, должны быть подписаны усиленной квалифицированной электронной подписью лица, имеющего право действовать от имени заказчика.</text:p>
      <text:p text:style-name="s1"><text:bookmark text:name="anchor1022"/>22. Планы-графики подлежат изменению при необходимости в случаях:</text:p>
      <text:p text:style-name="s1"><text:bookmark text:name="anchor1221"/>а) предусмотренных <text:a xlink:type="simple" xlink:href="http://ivo.garant.ru/document/redirect/70353464/1681">пунктами 1 - 4 части 8 статьи 16</text:a> Федерального закона;</text:p>
      <text:p text:style-name="s1"><text:bookmark text:name="anchor1222"/>б) уточнения информации об объекте закупки;</text:p>
      <text:p text:style-name="s1"><text:bookmark text:name="anchor1223"/>в) исполнения предписания органов контроля, указанных в <text:a xlink:type="simple" xlink:href="http://ivo.garant.ru/document/redirect/70353464/991">части 1 статьи 99</text:a> Федерального закона;</text:p>
      <text:p text:style-name="s1"><text:bookmark text:name="anchor1224"/>г) признания определения поставщика (подрядчика, исполнителя) несостоявшимся;</text:p>
      <text:p text:style-name="s1"><text:bookmark text:name="anchor1225"/>д) расторжения контракта;</text:p>
      <text:p text:style-name="s1"><text:bookmark text:name="anchor1226"/>е) возникновения иных обстоятельств, предвидеть которые при утверждении плана-графика было невозможно.</text:p>
      <text:p text:style-name="s22header">Информация об изменениях:</text:p>
      <text:p text:style-name="s22"><text:bookmark text:name="anchor1023"/>Пункт 23 изменен с 1 января 2022 г. - <text:a xlink:type="simple" xlink:href="http://ivo.garant.ru/document/redirect/403185566/111510">Постановление</text:a> Правительства России от 1 декабря 2021 г. № 2151</text:p>
      <text:p text:style-name="s22">Изменения применяются при осуществлении закупок товаров, работ, услуг для обеспечения государственных и муниципальных нужд, извещения об осуществлении которых размещены в ЕИС в сфере закупок либо приглашения принять участие в определении поставщика (подрядчика, исполнителя) по которым направлены после 1 января 2022 г.</text:p>
      <text:p text:style-name="s22"><text:a xlink:type="simple" xlink:href="http://ivo.garant.ru/document/redirect/77319584/1023">См. предыдущую редакцию</text:a></text:p>
      <text:p text:style-name="s1">23. В случае осуществления закупки у единственного поставщика (подрядчика, исполнителя) в соответствии с <text:a xlink:type="simple" xlink:href="http://ivo.garant.ru/document/redirect/70353464/9319">пунктом 9 части 1 </text:a><text:a xlink:type="simple" xlink:href="http://ivo.garant.ru/document/redirect/70353464/93">статьи 93</text:a> Федерального закона внесение изменений в план-график осуществляется не позднее дня заключения контракта.</text:p>
      <text:p text:style-name="s1"><text:bookmark text:name="anchor1024"/>24. При внесении изменений в план-график в единой информационной системе в соответствии с настоящим Положением размещается новая редакция плана-графика с указанием даты внесения таких изменений. Датой внесения изменений считается дата утверждения таких изменений.</text:p>
      <text:p text:style-name="s22header">Информация об изменениях:</text:p>
      <text:p text:style-name="s22"><text:bookmark text:name="anchor1025"/>Пункт 25 изменен с 1 января 2022 г. - <text:a xlink:type="simple" xlink:href="http://ivo.garant.ru/document/redirect/403185566/111511">Постановление</text:a> Правительства России от 1 декабря 2021 г. № 2151</text:p>
      <text:p text:style-name="s22">Изменения применяются при осуществлении закупок товаров, работ, услуг для обеспечения государственных и муниципальных нужд, извещения об осуществлении которых размещены в ЕИС в сфере закупок либо приглашения принять участие в определении поставщика (подрядчика, исполнителя) по которым направлены после 1 января 2022 г.</text:p>
      <text:p text:style-name="s22"><text:a xlink:type="simple" xlink:href="http://ivo.garant.ru/document/redirect/77319584/1025">См. предыдущую редакцию</text:a></text:p>
      <text:p text:style-name="s1">25. Информация о закупках, предусмотренных <text:a xlink:type="simple" xlink:href="http://ivo.garant.ru/document/redirect/70353464/240111">пунктом 1 части 11 статьи 24</text:a> Федерального закона, о закупках у единственного поставщика (подрядчика, исполнителя) для обеспечения федеральных нужд, если сведения о таких нуждах составляют государственную тайну, подлежит включению в отдельное приложение к плану-графику, которое не размещается в единой информационной системе и формируется по форме, установленной для формирования плана-графика, с указанием грифа секретности в соответствии с требованиями <text:a xlink:type="simple" xlink:href="http://ivo.garant.ru/document/redirect/10102673/3">законодательства</text:a> Российской Федерации о государственной тайне, а также фамилии, имени, отчества (при наличии) должностного лица, утвердившего план-график закупок.</text:p>
      <text:p text:style-name="s22header">Информация об изменениях:</text:p>
      <text:p text:style-name="s22"><text:bookmark text:name="anchor1026"/>Положение дополнено пунктом 26 с 1 января 2022 г. - <text:a xlink:type="simple" xlink:href="http://ivo.garant.ru/document/redirect/403185566/111512">Постановление</text:a> Правительства России от 1 декабря 2021 г. № 2151</text:p>
      <text:p text:style-name="s22">Изменения применяются при осуществлении закупок товаров, работ, услуг для обеспечения государственных и муниципальных нужд, извещения об осуществлении которых размещены в ЕИС в сфере закупок либо приглашения принять участие в определении поставщика (подрядчика, исполнителя) по которым направлены после 1 января 2022 г.</text:p>
      <text:p text:style-name="s1">26. Планирование закупок заказчиком, осуществляющим деятельность на территории иностранного государства, осуществляется в соответствии с настоящим Положением с учетом следующих особенностей:</text:p>
      <text:p text:style-name="s1"><text:bookmark text:name="anchor1261"/>а) план-график такого заказчика не размещается в единой информационной системе и формируется по форме согласно <text:a xlink:type="simple" xlink:href="#anchor10000">приложению</text:a> с указанием фамилии, имени, отчества (при наличии) должностного лица, утвердившего план-график. При этом:</text:p>
      <text:p text:style-name="s1">объем финансового обеспечения может указываться в <text:a xlink:type="simple" xlink:href="#anchor10021">графах 7 - 11 раздела 2</text:a> приложения к настоящему Положению в долларах США. В этом случае в качестве единицы измерения в <text:a xlink:type="simple" xlink:href="#anchor10001">разделе 1</text:a> приложения к настоящему Положению указывается "доллар США", код по <text:a xlink:type="simple" xlink:href="http://ivo.garant.ru/document/redirect/179222/0">Общероссийскому классификатору</text:a> единиц измерения ОК 015-94 не указывается;</text:p>
      <text:p text:style-name="s1">в дополнение к случаям, предусмотренным <text:a xlink:type="simple" xlink:href="#anchor1018">пунктом 18</text:a> настоящего Положения, в план-график в форме отдельной закупки включается информация о закупках, которые планируется осуществлять в соответствии с <text:a xlink:type="simple" xlink:href="http://ivo.garant.ru/document/redirect/70353464/93123">пунктами 23</text:a>, <text:a xlink:type="simple" xlink:href="http://ivo.garant.ru/document/redirect/70353464/93126">26</text:a> и <text:a xlink:type="simple" xlink:href="http://ivo.garant.ru/document/redirect/70353464/93133">33 части 1 статьи 93</text:a> Федерального закона, в размере годового объема финансового обеспечения соответствующих закупок. При этом <text:a xlink:type="simple" xlink:href="#anchor10021">графы 3</text:a>, 4, 12, 14 раздела 2 приложения к настоящему Положению не заполняются. В качестве наименования объекта закупки указывается положение Федерального закона, являющееся основанием для осуществления указанных закупок;</text:p>
      <text:p text:style-name="s1">информация, предусмотренная <text:a xlink:type="simple" xlink:href="#anchor1142">подпунктами "б" - "д"</text:a> и <text:a xlink:type="simple" xlink:href="#anchor1147">"ж" пункта 14</text:a> настоящего Положения, в плане-графике не указывается. Информация, предусмотренная <text:a xlink:type="simple" xlink:href="#anchor1146">подпунктом "е" пункта 14</text:a> настоящего Положения, указывается без кода территории населенного пункта в соответствии с <text:a xlink:type="simple" xlink:href="http://ivo.garant.ru/document/redirect/70465940/0">Общероссийским классификатором</text:a> территорий муниципальных образований;</text:p>
      <text:p text:style-name="s1">в <text:a xlink:type="simple" xlink:href="#anchor10021">графе 2 раздела 2</text:a> приложения к настоящему Положению вместо идентификационного кода закупки указывается код вида расходов. В качестве наименования указанной графы указывается "Код вида расходов";</text:p>
      <text:p text:style-name="s1"><text:a xlink:type="simple" xlink:href="#anchor10021">графы 3</text:a>, 4, 13 и 14 раздела 2 приложения к настоящему Положению могут не заполняться;</text:p>
      <text:p text:style-name="s1"><text:a xlink:type="simple" xlink:href="#anchor10021">графа 12 раздела 2</text:a> приложения к настоящему Положению не заполняется;</text:p>
      <text:p text:style-name="s1"><text:bookmark text:name="anchor1262"/>б) при установлении в соответствии со <text:a xlink:type="simple" xlink:href="http://ivo.garant.ru/document/redirect/70353464/19">статьей 19</text:a> Федерального закона требований к закупаемым отдельным видам товаров, работ, услуг (в том числе предельных цен товаров, работ, услуг), нормативных затрат:</text:p>
      <text:p text:style-name="s1">могут не применяться технические регламенты, принятые в соответствии с <text:a xlink:type="simple" xlink:href="http://ivo.garant.ru/document/redirect/12129354/200">законодательством</text:a> Российской Федерации о техническом регулировании, документы, разрабатываемые и применяемые в национальной системе стандартизации, принятые в соответствии с <text:a xlink:type="simple" xlink:href="http://ivo.garant.ru/document/redirect/71108018/0">законодательством</text:a> Российской Федерации о стандартизации;</text:p>
      <text:p text:style-name="s1">могут не учитываться регулируемые цены (тарифы), действующие на территории Российской Федерации;</text:p>
      <text:p text:style-name="s1">затраты на приобретение полисов обязательного страхования определяются в соответствии с законодательством иностранного государства, на территории которого осуществляется закупка таких полисов;</text:p>
      <text:p text:style-name="s1"><text:bookmark text:name="anchor1263"/>в) при применении в соответствии с Федеральным законом метода сопоставимых рыночных цен (анализа рынка) помимо общедоступной информации, предусмотренной <text:a xlink:type="simple" xlink:href="http://ivo.garant.ru/document/redirect/70353464/2218">частью 18 статьи 22</text:a> Федерального закона, может использоваться иная общедоступная информация, в том числе размещенная на сайтах в информационно-телекоммуникационной сети "Интернет".</text:p>
      <text:p text:style-name="s1"/>
      <text:p text:style-name="SB0"/>
      <text:p text:style-name="s22header">Информация об изменениях:</text:p>
      <text:p text:style-name="s22"><text:bookmark text:name="anchor10000"/>Приложение изменено с 1 января 2022 г. - <text:a xlink:type="simple" xlink:href="http://ivo.garant.ru/document/redirect/403185566/111513">Постановление</text:a> Правительства России от 1 декабря 2021 г. № 2151</text:p>
      <text:p text:style-name="s22">Изменения применяются при осуществлении закупок товаров, работ, услуг для обеспечения государственных и муниципальных нужд, извещения об осуществлении которых размещены в ЕИС в сфере закупок либо приглашения принять участие в определении поставщика (подрядчика, исполнителя) по которым направлены после 1 января 2022 г.</text:p>
      <text:p text:style-name="s22"><text:a xlink:type="simple" xlink:href="http://ivo.garant.ru/document/redirect/77319584/10000">См. предыдущую редакцию</text:a></text:p>
      <text:p text:style-name="s9header">ГАРАНТ:</text:p>
      <text:p text:style-name="s9">См. <text:a xlink:type="simple" xlink:href="http://ivo.garant.ru/document/redirect/57750594/0">онлайн-сервис</text:a> ОКПД 2. Поиск кодов и особенности закупок</text:p>
      <text:p text:style-name="s9">См. данную <text:a xlink:type="simple" xlink:href="http://ivo.garant.ru/blob/redirect/77192287">форму</text:a> в редакторе MS-Excel и <text:a xlink:type="simple" xlink:href="http://ivo.garant.ru/document/redirect/481019947/0">образец</text:a> ее заполнения</text:p>
      <text:p text:style-name="s1_right_fi698"><text:span text:style-name="s10">Приложение
к <text:a xlink:type="simple" xlink:href="#anchor1000">Положению</text:a> о порядке формирования,
утверждения планов-графиков закупок, внесения
изменений в такие планы-графики, размещения
планов-графиков закупок в единой
информационной системе в сфере закупок,
на официальном сайте такой системы в
информационно-телекоммуникационной сети "Интернет",
об особенностях включения информации в такие
планы-графики и планирования закупок заказчиком,
осуществляющим деятельность на территории иностранного государства,
а также о требованиях к форме планов-
графиков закупок
(с изменениями от 6 августа, 7 ноября 2020 г., 1 декабря 2021 г.)</text:span></text:p>
      <text:p text:style-name="s1"/>
      <text:p text:style-name="s1_right_fi698"><text:span text:style-name="s10">(форма)</text:span></text:p>
      <text:p text:style-name="s1"/>
      <text:p text:style-name="s1_center_fi698"><text:span text:style-name="s10">ПЛАН-ГРАФИК
закупок товаров, работ, услуг на 20__ финансовый год и на плановый период 20__ и 20__ годов
(в части закупок, предусмотренных <text:a xlink:type="simple" xlink:href="http://ivo.garant.ru/document/redirect/70353464/240111">пунктом 1 части 11 статьи 24</text:a> Федерального закона "О контрактной системе в сфере закупок товаров, работ, услуг для обеспечения государственных и муниципальных нужд"</text:span><text:span text:style-name="upper"><text:span text:style-name="s10"> <text:a xlink:type="simple" xlink:href="#anchor111">1</text:a>
)</text:span></text:span></text:p>
      <text:p text:style-name="s1"/>
      <text:h text:outline-level="1" text:style-name="s3"><text:bookmark text:name="anchor10001"/>1. Информация о заказчике:</text:h>
      <text:p text:style-name="s1"/>
      <table:table table:name="14958" table:style-name="14958">
        <table:table-column table:style-name="6939"/>
        <table:table-column table:style-name="4212"/>
        <table:table-column table:style-name="2311"/>
        <table:table-column table:style-name="1496"/>
        <table:table-row>
          <table:table-cell table:style-name="0">
            <text:p text:style-name="s1"/>
          </table:table-cell>
          <table:table-cell table:style-name="0">
            <text:p text:style-name="s1"/>
          </table:table-cell>
          <table:table-cell table:style-name="4">
            <text:p text:style-name="s1"/>
          </table:table-cell>
          <table:table-cell table:style-name="13">
            <text:p text:style-name="s1_center_fi0">Коды</text:p>
          </table:table-cell>
        </table:table-row>
        <table:table-row>
          <table:table-cell table:style-name="64" table:number-rows-spanned="2">
            <text:p text:style-name="s16_fi0">полное наименование</text:p>
          </table:table-cell>
          <table:table-cell table:style-name="0">
            <text:p text:style-name="s1"/>
          </table:table-cell>
          <table:table-cell table:style-name="4">
            <text:p text:style-name="s1_right_fi0">ИНН</text:p>
          </table:table-cell>
          <table:table-cell table:style-name="5">
            <text:p text:style-name="s1"/>
          </table:table-cell>
        </table:table-row>
        <table:table-row>
          <table:table-cell table:style-name="1">
            <text:p text:style-name="s1"/>
          </table:table-cell>
          <table:table-cell table:style-name="4">
            <text:p text:style-name="s1_right_fi0">КПП</text:p>
          </table:table-cell>
          <table:table-cell table:style-name="5">
            <text:p text:style-name="s1"/>
          </table:table-cell>
        </table:table-row>
        <table:table-row>
          <table:table-cell table:style-name="0">
            <text:p text:style-name="s16_fi0">организационно-правовая форма</text:p>
          </table:table-cell>
          <table:table-cell table:style-name="1">
            <text:p text:style-name="s1"/>
          </table:table-cell>
          <table:table-cell table:style-name="4">
            <text:p text:style-name="s1_right_fi0">по <text:a xlink:type="simple" xlink:href="http://ivo.garant.ru/document/redirect/70284934/0">ОКОПФ</text:a></text:p>
          </table:table-cell>
          <table:table-cell table:style-name="5">
            <text:p text:style-name="s1"/>
          </table:table-cell>
        </table:table-row>
        <table:table-row>
          <table:table-cell table:style-name="0">
            <text:p text:style-name="s16_fi0">форма собственности</text:p>
          </table:table-cell>
          <table:table-cell table:style-name="1">
            <text:p text:style-name="s1"/>
          </table:table-cell>
          <table:table-cell table:style-name="4">
            <text:p text:style-name="s1_right_fi0">по <text:a xlink:type="simple" xlink:href="http://ivo.garant.ru/document/redirect/12117985/0">ОКФС</text:a></text:p>
          </table:table-cell>
          <table:table-cell table:style-name="5">
            <text:p text:style-name="s1"/>
          </table:table-cell>
        </table:table-row>
        <table:table-row>
          <table:table-cell table:style-name="0">
            <text:p text:style-name="s16_fi0">место нахождения, телефон, адрес электронной почты</text:p>
          </table:table-cell>
          <table:table-cell table:style-name="1">
            <text:p text:style-name="s1"/>
          </table:table-cell>
          <table:table-cell table:style-name="36">
            <text:p text:style-name="s1_right_fi0">по <text:a xlink:type="simple" xlink:href="http://ivo.garant.ru/document/redirect/70465940/0">ОКТМО</text:a></text:p>
          </table:table-cell>
          <table:table-cell table:style-name="5">
            <text:p text:style-name="s1"/>
          </table:table-cell>
        </table:table-row>
        <table:table-row>
          <table:table-cell table:style-name="64" table:number-rows-spanned="2">
            <text:p text:style-name="s16_fi0">полное наименование бюджетного, автономного учреждения, государственного, муниципального унитарного предприятия, иного юридического лица, которому переданы полномочия государственного, муниципального заказчика<text:span text:style-name="upper"><text:span> <text:a xlink:type="simple" xlink:href="#anchor222">2</text:a></text:span></text:span></text:p>
          </table:table-cell>
          <table:table-cell table:style-name="65" table:number-rows-spanned="2">
            <text:p text:style-name="s1"/>
          </table:table-cell>
          <table:table-cell table:style-name="20">
            <text:p text:style-name="s1_right_fi0">ИНН</text:p>
          </table:table-cell>
          <table:table-cell table:style-name="21">
            <text:p text:style-name="s1"/>
          </table:table-cell>
        </table:table-row>
        <table:table-row>
          <table:table-cell table:style-name="20">
            <text:p text:style-name="s1_right_fi0">КПП</text:p>
          </table:table-cell>
          <table:table-cell table:style-name="21">
            <text:p text:style-name="s1"/>
          </table:table-cell>
        </table:table-row>
        <table:table-row>
          <table:table-cell table:style-name="0">
            <text:p text:style-name="s16_fi0">место нахождения, телефон, адрес электронной почты<text:span text:style-name="upper"><text:span> <text:a xlink:type="simple" xlink:href="#anchor222">2</text:a></text:span></text:span></text:p>
          </table:table-cell>
          <table:table-cell table:style-name="1">
            <text:p text:style-name="s1"/>
          </table:table-cell>
          <table:table-cell table:style-name="36">
            <text:p text:style-name="s1_right_fi0">по <text:a xlink:type="simple" xlink:href="http://ivo.garant.ru/document/redirect/70465940/0">ОКТМО</text:a></text:p>
          </table:table-cell>
          <table:table-cell table:style-name="21">
            <text:p text:style-name="s1"/>
          </table:table-cell>
        </table:table-row>
        <table:table-row>
          <table:table-cell table:style-name="0">
            <text:p text:style-name="s16_fi0">единица измерения</text:p>
          </table:table-cell>
          <table:table-cell table:style-name="1">
            <text:p text:style-name="s1_fi0">рубль</text:p>
          </table:table-cell>
          <table:table-cell table:style-name="4">
            <text:p text:style-name="s1_right_fi0">по ОКЕИ</text:p>
          </table:table-cell>
          <table:table-cell table:style-name="5">
            <text:p text:style-name="s1_center_fi0"><text:a xlink:type="simple" xlink:href="http://ivo.garant.ru/document/redirect/179222/383">383</text:a></text:p>
          </table:table-cell>
        </table:table-row>
      </table:table>
      <text:p text:style-name="s1"/>
      <text:h text:outline-level="1" text:style-name="s3"><text:bookmark text:name="anchor10002"/>2. Информация о закупках товаров, работ, услуг на 20__ финансовый год и на плановый период 20__ и 20__ годов</text:h>
      <text:p text:style-name="s1"/>
      <table:table table:name="15238" table:style-name="15238">
        <table:table-column table:style-name="713"/>
        <table:table-column table:style-name="1532"/>
        <table:table-column table:style-name="709"/>
        <table:table-column table:style-name="1262"/>
        <table:table-column table:style-name="1002"/>
        <table:table-column table:style-name="2037"/>
        <table:table-column table:style-name="578"/>
        <table:table-column table:style-name="974"/>
        <table:table-column table:style-name="814"/>
        <table:table-column table:style-name="815"/>
        <table:table-column table:style-name="733"/>
        <table:table-column table:style-name="1455"/>
        <table:table-column table:style-name="1344"/>
        <table:table-column table:style-name="1270"/>
        <table:table-row>
          <table:table-cell table:style-name="79" table:number-rows-spanned="3">
            <text:p text:style-name="s1_center_fi0"><text:bookmark text:name="anchor10021"/>N</text:p>
            <text:p text:style-name="s1_center_fi0">п/п</text:p>
          </table:table-cell>
          <table:table-cell table:style-name="77" table:number-rows-spanned="3">
            <text:p text:style-name="s1_center_fi0">Идентификационный код закупки</text:p>
          </table:table-cell>
          <table:table-cell table:style-name="13" table:number-columns-spanned="3">
            <table:covered-table-cell/>
            <table:covered-table-cell/>
            <text:p text:style-name="s1_center_fi0">Объект закупки</text:p>
          </table:table-cell>
          <table:table-cell table:style-name="77" table:number-rows-spanned="3">
            <text:p text:style-name="s1_center_fi0">Планируемый год размещения извещения об осуществлении закупки, направления приглашения принять участие в определении поставщика (подрядчика, исполнителя), заключения контракта с единственным поставщиком (подрядчиком, исполнителем)</text:p>
          </table:table-cell>
          <table:table-cell table:style-name="13" table:number-columns-spanned="5">
            <table:covered-table-cell/>
            <table:covered-table-cell/>
            <table:covered-table-cell/>
            <table:covered-table-cell/>
            <text:p text:style-name="s1_center_fi0">Объем финансового обеспечения, в том числе планируемые платежи</text:p>
          </table:table-cell>
          <table:table-cell table:style-name="77" table:number-rows-spanned="3">
            <text:p text:style-name="s1_center_fi0">Информация о проведении общественного обсуждения закупки</text:p>
          </table:table-cell>
          <table:table-cell table:style-name="77" table:number-rows-spanned="3">
            <text:p text:style-name="s1_center_fi0">Наименование уполномоченного органа (учреждения)</text:p>
          </table:table-cell>
          <table:table-cell table:style-name="77" table:number-rows-spanned="3">
            <text:p text:style-name="s1_center_fi0">Наименование организатора проведения совместного конкурса или аукциона</text:p>
          </table:table-cell>
        </table:table-row>
        <table:table-row>
          <table:table-cell table:style-name="5" table:number-columns-spanned="2">
            <table:covered-table-cell/>
            <text:p text:style-name="s1_center_fi0">Товар, работа, услуга по Общероссийскому классификатору продукции по видам экономической деятельности ОК 034-2014 (КПЕС 2008) (<text:a xlink:type="simple" xlink:href="http://ivo.garant.ru/document/redirect/70650730/0">ОКПД2</text:a>)</text:p>
          </table:table-cell>
          <table:table-cell table:style-name="69" table:number-rows-spanned="2">
            <text:p text:style-name="s1_center_fi0">Наименование объекта закупки</text:p>
          </table:table-cell>
          <table:table-cell table:style-name="69" table:number-rows-spanned="2">
            <text:p text:style-name="s1_center_fi0">всего</text:p>
          </table:table-cell>
          <table:table-cell table:style-name="69" table:number-rows-spanned="2">
            <text:p text:style-name="s1_center_fi0">на текущий финансовый год</text:p>
          </table:table-cell>
          <table:table-cell table:style-name="5" table:number-columns-spanned="2">
            <table:covered-table-cell/>
            <text:p text:style-name="s1_center_fi0">на плановый период</text:p>
          </table:table-cell>
          <table:table-cell table:style-name="69" table:number-rows-spanned="2">
            <text:p text:style-name="s1_center_fi0">последующие годы</text:p>
          </table:table-cell>
        </table:table-row>
        <table:table-row>
          <table:table-cell table:style-name="5">
            <text:p text:style-name="s1_center_fi0">Код</text:p>
          </table:table-cell>
          <table:table-cell table:style-name="5">
            <text:p text:style-name="s1_center_fi0">Наименование</text:p>
          </table:table-cell>
          <table:table-cell table:style-name="5">
            <text:p text:style-name="s1_center_fi0">на первый год</text:p>
          </table:table-cell>
          <table:table-cell table:style-name="5">
            <text:p text:style-name="s1_center_fi0">на второй год</text:p>
          </table:table-cell>
        </table:table-row>
        <table:table-row>
          <table:table-cell table:style-name="7">
            <text:p text:style-name="s1_center_fi0">1</text:p>
          </table:table-cell>
          <table:table-cell table:style-name="5">
            <text:p text:style-name="s1_center_fi0">2</text:p>
          </table:table-cell>
          <table:table-cell table:style-name="5">
            <text:p text:style-name="s1_center_fi0">3</text:p>
          </table:table-cell>
          <table:table-cell table:style-name="5">
            <text:p text:style-name="s1_center_fi0">4</text:p>
          </table:table-cell>
          <table:table-cell table:style-name="5">
            <text:p text:style-name="s1_center_fi0">5</text:p>
          </table:table-cell>
          <table:table-cell table:style-name="5">
            <text:p text:style-name="s1_center_fi0">6</text:p>
          </table:table-cell>
          <table:table-cell table:style-name="5">
            <text:p text:style-name="s1_center_fi0">7</text:p>
          </table:table-cell>
          <table:table-cell table:style-name="5">
            <text:p text:style-name="s1_center_fi0">8</text:p>
          </table:table-cell>
          <table:table-cell table:style-name="5">
            <text:p text:style-name="s1_center_fi0">9</text:p>
          </table:table-cell>
          <table:table-cell table:style-name="5">
            <text:p text:style-name="s1_center_fi0">10</text:p>
          </table:table-cell>
          <table:table-cell table:style-name="5">
            <text:p text:style-name="s1_center_fi0">11</text:p>
          </table:table-cell>
          <table:table-cell table:style-name="5">
            <text:p text:style-name="s1_center_fi0">12</text:p>
          </table:table-cell>
          <table:table-cell table:style-name="5">
            <text:p text:style-name="s1_center_fi0">13</text:p>
          </table:table-cell>
          <table:table-cell table:style-name="5">
            <text:p text:style-name="s1_center_fi0">14</text:p>
          </table:table-cell>
        </table:table-row>
        <table:table-row>
          <table:table-cell table:style-name="7">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row>
        <table:table-row>
          <table:table-cell table:style-name="7" table:number-columns-spanned="6">
            <table:covered-table-cell/>
            <table:covered-table-cell/>
            <table:covered-table-cell/>
            <table:covered-table-cell/>
            <table:covered-table-cell/>
            <text:p text:style-name="s1_center_fi0"><text:bookmark text:name="anchor10022"/>Всего для осуществления закупок,</text:p>
            <text:p text:style-name="s1_center_fi0">в том числе по коду бюджетной классификации ___</text:p>
            <text:p text:style-name="s1_center_fi0">/ по коду вида расходов ____</text:p>
            <text:p text:style-name="s1_center_fi0">/ по коду объекта капитального строительства или объекта недвижимого имущества _________</text:p>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_center_fi0">-</text:p>
          </table:table-cell>
          <table:table-cell table:style-name="5">
            <text:p text:style-name="s1_center_fi0">-</text:p>
          </table:table-cell>
          <table:table-cell table:style-name="5">
            <text:p text:style-name="s1_center_fi0">-</text:p>
          </table:table-cell>
        </table:table-row>
      </table:table>
      <text:p text:style-name="s1"/>
      <text:p text:style-name="s2_preformatted11">──────────────────────────────</text:p>
      <text:p text:style-name="s91"><text:bookmark text:name="anchor111"/><text:span text:style-name="upper"><text:span>1</text:span></text:span> Указывается в случае, предусмотренном <text:a xlink:type="simple" xlink:href="#anchor1025">пунктом 25</text:a> Положения о порядке формирования, утверждения планов-графиков закупок, внесения изменений в такие планы-графики, размещения планов-графиков закупок в единой информационной системе в сфере закупок, на официальном сайте такой системы в информационно-телекоммуникационной сети "Интернет", об особенностях включения информации в такие планы-графики и планирования закупок заказчиком, осуществляющим деятельность на территории иностранного государства, а также о требованиях к форме планов-графиков закупок, утвержденного <text:a xlink:type="simple" xlink:href="#anchor0">постановлением</text:a> Правительства Российской Федерации от 30 сентября 2019 г. N 1279 "Об установлении порядка формирования, утверждения планов-графиков закупок, внесения изменений в такие планы-графики, размещения планов-графиков закупок в единой информационной системе в сфере закупок, на официальном сайте такой системы в информационно-телекоммуникационной сети "Интернет", особенностей включения информации в такие планы-графики и планирования закупок заказчиком, осуществляющим деятельность на территории иностранного государства, а также требований к форме планов-графиков закупок и о признании утратившими силу отдельных решений Правительства Российской Федерации" (далее - Положение).</text:p>
      <text:p text:style-name="s91"><text:bookmark text:name="anchor222"/><text:span text:style-name="upper"><text:span>2</text:span></text:span> Указывается в соответствии с <text:a xlink:type="simple" xlink:href="#anchor1147">подпунктом "ж" пункта 14</text:a> Положения.</text:p>
      <text:p text:style-name="s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office:font-face-decls>
  <office:styles>
    <style:default-style style:family="paragraph">
      <style:paragraph-properties style:tab-stop-distance="1.27cm"/>
    </style:default-style>
    <style:style style:family="paragraph" style:name="Normal">
      <style:paragraph-properties style:writing-mode="lr"/>
      <style:text-properties style:font-name="Times New Roman" fo:font-size="12pt" fo:language="ru" fo:country="RU"/>
    </style:style>
    <style:style style:family="paragraph" style:name="Standard">
      <style:paragraph-properties fo:text-align="justify" fo:text-indent="1.27cm" fo:widows="2" fo:orphans="2" fo:margin-left="0cm" fo:margin-right="0cm" fo:margin-top="0cm" fo:margin-bottom="0cm" style:writing-mode="lr"/>
      <style:text-properties style:font-name="Times New Roman" fo:font-size="12pt"/>
    </style:style>
    <style:style style:name="Preformatted" style:display-name="Preformatted" style:family="paragraph">
      <style:paragraph-properties fo:margin-left="0cm" fo:margin-right="0cm" fo:margin-top="0cm" fo:margin-bottom="0cm" fo:text-align="justify" style:justify-single-word="false" fo:orphans="2" fo:widows="2" fo:hyphenation-ladder-count="no-limit" fo:text-indent="0cm" style:auto-text-indent="false" style:writing-mode="lr-tb"/>
      <style:text-properties style:font-name="Courier New" fo:font-family="'Courier New'" style:font-family-generic="roman" style:font-pitch="fixed" fo:font-size="12pt" style:font-name-asian="Symbol" style:font-family-asian="Symbol" style:font-family-generic-asian="system" style:font-pitch-asian="variable" style:font-size-asian="12pt" style:font-name-complex="Wingdings" style:font-family-complex="Wingdings" style:font-family-generic-complex="system" style:font-pitch-complex="variable" style:font-size-complex="12pt" fo:hyphenate="true" fo:hyphenation-remain-char-count="2" fo:hyphenation-push-char-count="2"/>
    </style:style>
    <style:style style:family="paragraph" style:name="Heading" style:parent-style-name="Standard">
      <style:paragraph-properties fo:text-align="center" fo:margin-top="0.423cm" fo:margin-bottom="0.212cm" fo:keep-with-next="always"/>
      <style:text-properties style:font-name="Times New Roman" fo:font-weight="bold"/>
    </style:style>
    <style:style style:name="s1" style:family="paragraph" style:display-name="Нормальный" style:parent-style-name="Standard"/>
    <style:style style:name="s2" style:family="paragraph" style:display-name="Нормальный (OEM)" style:parent-style-name="Preformatted"/>
    <style:style style:name="s3" style:family="paragraph" style:display-name="Заголовок 1" style:parent-style-name="Heading"/>
    <style:style style:name="s4" style:family="paragraph" style:display-name="Заголовок 2" style:parent-style-name="Heading"/>
    <style:style style:name="s5" style:family="paragraph" style:display-name="Заголовок 3" style:parent-style-name="Heading"/>
    <style:style style:name="s6" style:family="paragraph" style:display-name="Заголовок 4" style:parent-style-name="Heading"/>
    <style:style style:name="s7" style:family="paragraph" style:display-name="Утратил силу" style:parent-style-name="Standard">
      <style:text-properties fo:color="#666600" style:text-line-through-style="solid" style:text-line-through-type="single"/>
    </style:style>
    <!-- Text (reference) -->
    <style:style style:name="Text (reference)" style:family="paragraph" style:parent-style-name="Standard">
      <style:paragraph-properties fo:text-align="justify" fo:text-indent="0cm" fo:margin-left="0cm" fo:margin-right="0cm" fo:margin-top="0.132cm" fo:margin-bottom="0cm"/>
      <style:text-properties fo:font-style="italic" fo:color="#353842" style:font-name="Times New Roman CYR" fo:font-size="12pt"/>
    </style:style>
    <style:style style:name="s9" style:family="paragraph" style:display-name="Комментарий" style:parent-style-name="Text (reference)">
      <style:paragraph-properties fo:text-align="justify" fo:background-color="#f0f0f0"/>
      <style:text-properties fo:background-color="#f0f0f0"/>
    </style:style>
    <style:style style:name="s15" style:family="paragraph" style:display-name="Заголовок статьи" style:parent-style-name="Standard">
      <style:paragraph-properties fo:text-align="justify" fo:text-indent="-1.573cm" fo:margin-left="2.843cm" fo:margin-right="0cm" fo:margin-top="0cm" fo:margin-bottom="0cm"/>
    </style:style>
    <style:style style:name="s16" style:family="paragraph" style:display-name="Прижатый влево" style:parent-style-name="Standard">
      <style:paragraph-properties fo:text-indent="0cm" fo:text-align="start" style:justify-single-word="false" fo:hyphenation-ladder-count="no-limit"/>
    </style:style>
    <style:style style:name="s22" style:family="paragraph" style:display-name="Информация о версии" style:parent-style-name="Text (reference)">
      <style:paragraph-properties fo:text-align="justify" fo:background-color="#f0f0f0"/>
      <style:text-properties fo:background-color="#f0f0f0"/>
    </style:style>
    <style:style style:name="s25" style:family="paragraph" style:display-name="Не вступил в силу" style:parent-style-name="Standard">
      <style:paragraph-properties fo:margin-left="0.245cm" fo:margin-right="0cm" fo:text-indent="-0.245cm"/>
    </style:style>
    <style:style style:name="s52" style:family="paragraph" style:display-name="Информация об изменениях" style:parent-style-name="Text (reference)">
      <style:paragraph-properties fo:background-color="#eaefed"/>
      <style:text-properties fo:font-size="10pt" fo:background-color="#eaefed"/>
    </style:style>
    <style:style style:name="s71" style:family="paragraph" style:display-name="Заголовок ЭР (левое окно)" style:parent-style-name="Heading"/>
    <style:style style:name="s91" style:family="paragraph" style:display-name="Сноска" style:parent-style-name="Standard">
      <style:text-properties fo:font-size="10pt"/>
    </style:style>
    <style:style style:name="s93" style:family="paragraph" style:display-name="Взамен" style:parent-style-name="Text (reference)">
      <style:paragraph-properties fo:auto-text-indent="false" fo:text-indent="0cm" fo:background-color="#FFF5AD" fo:margin-left="0.3in"/>
      <style:text-properties fo:background-color="#FFF5AD"/>
    </style:style>
    <style:style style:name="s94" style:family="paragraph" style:display-name="Сравнение" style:parent-style-name="Text (reference)">
      <style:paragraph-properties fo:auto-text-indent="false" fo:text-indent="0cm" fo:background-color="#f0f0f0" fo:margin-left="0.3in"/>
      <style:text-properties fo:background-color="#f0f0f0"/>
    </style:style>
  </office:styles>
  <office:automatic-styles>
    <!-- header and footer styles -->
    <style:style style:family="paragraph" style:name="header" style:parent-style-name="Standard">
      <style:paragraph-properties fo:text-align="left" fo:text-indent="0cm"/>
      <style:text-properties style:font-name="Times New Roman" fo:font-family="'Times New Roman'" fo:font-size="10"/>
    </style:style>
    <style:style style:family="paragraph" style:name="footer_left" style:parent-style-name="Standard">
      <style:paragraph-properties fo:text-align="left" fo:text-indent="0cm"/>
      <style:text-properties style:font-name="Times New Roman" fo:font-family="'Times New Roman'" fo:font-size="10"/>
    </style:style>
    <style:style style:family="paragraph" style:name="footer_center" style:parent-style-name="Standard">
      <style:paragraph-properties fo:text-align="center" fo:text-indent="0cm"/>
      <style:text-properties style:font-name="Times New Roman" fo:font-family="'Times New Roman'" fo:font-size="10"/>
    </style:style>
    <style:style style:family="paragraph" style:name="footer_right" style:parent-style-name="Standard">
      <style:paragraph-properties fo:text-align="right" fo:text-indent="0cm"/>
      <style:text-properties style:font-name="Times New Roman" fo:font-family="'Times New Roman'" fo:font-size="10"/>
    </style:style>
    <style:page-layout style:name="Standard">
      <style:page-layout-properties fo:page-width="210mm" fo:page-height="297mm" style:num-format="1" style:print-orientation="portrait" fo:margin-top="14mm" fo:margin-bottom="14mm" fo:margin-left="14mm" fo:margin-right="14mm"/>
      <style:header-style>
        <style:header-footer-properties fo:margin-bottom="5mm"/>
      </style:header-style>
      <style:footer-style/>
    </style:page-layout>
    <style:page-layout style:name="PageOrientation0">
      <style:page-layout-properties fo:page-width="297mm" fo:page-height="210mm" style:num-format="1" style:print-orientation="landscape" fo:margin-top="14mm" fo:margin-bottom="14mm" fo:margin-left="14mm" fo:margin-right="14mm"/>
      <style:header-style>
        <style:header-footer-properties fo:margin-bottom="5mm"/>
      </style:header-style>
      <style:footer-style/>
    </style:page-layout>
    <number:date-style style:name="date" number:automatic-order="true" number:format-source="fixed">
      <number:day number:style="long"/>
      <number:text>.</number:text>
      <number:month number:style="long"/>
      <number:text>.</number:text>
      <number:year number:style="long"/>
    </number:date-style>
  </office:automatic-styles>
  <office:master-styles>
    <style:master-page style:name="Standard" style:page-layout-name="Standard">
      <style:header>
        <text:p text:style-name="header">Постановление Правительства РФ от 30 сентября 2019 г. N 1279 "О планах-графиках закупок и о призн...</text:p>
      </style:header>
      <style:footer>
        <table:table>
          <table:table-column table:number-columns-repeated="3"/>
          <table:table-row>
            <table:table-cell>
              <text:p text:style-name="footer_left">
							<text:date style:data-style-name="date" text:fixed="true" text:date-value="2026-5-12"/>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style:master-page style:name="landscape0" style:page-layout-name="PageOrientation0">
      <style:header>
        <text:p text:style-name="header">Постановление Правительства РФ от 30 сентября 2019 г. N 1279 "О планах-графиках закупок и о призн...</text:p>
      </style:header>
      <style:footer>
        <table:table>
          <table:table-column table:number-columns-repeated="3"/>
          <table:table-row>
            <table:table-cell>
              <text:p text:style-name="footer_left">
							<text:date style:data-style-name="date" text:fixed="true" text:date-value="2026-5-12"/>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initial-creator>НПП "Гарант-Сервис"</meta:initial-creator>
    <dc:description>Документ экспортирован из системы ГАРАНТ</dc:description>
    <meta:generator>Garant</meta:generator>
    <meta:user-defined meta:name="Company">НПП "Гарант-Сервис"</meta:user-defined>
  </office:meta>
</office:document-meta>
</file>